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PAFJ+Aptos" svg:font-family="GPAFJ+Aptos" style:font-family-generic="system" style:font-pitch="variable"/>
    <style:font-face style:name="Yu Mincho" svg:font-family="Yu Mincho" style:font-family-generic="roman" style:font-pitch="variable" svg:panose-1="2 2 4 0 0 0 0 0 0 0"/>
    <style:font-face style:name="WYAXW+Aptos" svg:font-family="WYAXW+Aptos"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text:style-name="WW_CharLFO18LV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0118in" fo:line-height="0.1527in"/>
    </style:style>
    <style:style style:name="P3" style:parent-style-name="Normal" style:family="paragraph">
      <style:paragraph-properties fo:widows="0" fo:orphans="0" fo:line-height="100%" fo:margin-left="5.2118in" fo:margin-right="-0.0138in">
        <style:tab-stops/>
      </style:paragraph-properties>
    </style:style>
    <style:style style:name="T4" style:parent-style-name="Policepardéfaut" style:family="text">
      <style:text-properties style:font-name="Times New Roman" style:font-name-asian="Times New Roman" style:font-name-complex="Times New Roman" fo:color="#000000" fo:letter-spacing="-0.0006in"/>
    </style:style>
    <style:style style:name="T5" style:parent-style-name="Policepardéfaut" style:family="text">
      <style:text-properties style:font-name="Times New Roman" style:font-name-asian="Times New Roman" style:font-name-complex="Times New Roman" fo:color="#000000"/>
    </style:style>
    <style:style style:name="T6" style:parent-style-name="Policepardéfaut" style:family="text">
      <style:text-properties style:font-name="Times New Roman" style:font-name-asian="Times New Roman" style:font-name-complex="Times New Roman" fo:color="#000000" fo:letter-spacing="-0.0006in"/>
    </style:style>
    <style:style style:name="T7" style:parent-style-name="Policepardéfaut" style:family="text">
      <style:text-properties style:font-name="Times New Roman" style:font-name-asian="Times New Roman" style:font-name-complex="Times New Roman" fo:color="#000000" style:text-scale="101%"/>
    </style:style>
    <style:style style:name="T8" style:parent-style-name="Policepardéfaut" style:family="text">
      <style:text-properties style:font-name="Times New Roman" style:font-name-asian="Times New Roman" style:font-name-complex="Times New Roman" fo:color="#000000" fo:letter-spacing="-0.0013in"/>
    </style:style>
    <style:style style:name="T9" style:parent-style-name="Policepardéfaut" style:family="text">
      <style:text-properties style:font-name="Times New Roman" style:font-name-asian="Times New Roman" style:font-name-complex="Times New Roman" fo:color="#000000"/>
    </style:style>
    <style:style style:name="P10" style:parent-style-name="Normal" style:family="paragraph">
      <style:paragraph-properties fo:margin-bottom="0.0131in" fo:line-height="0.1111in"/>
      <style:text-properties style:font-name="Times New Roman" style:font-name-asian="Times New Roman" style:font-name-complex="Times New Roman" fo:font-size="8pt" style:font-size-asian="8pt" style:font-size-complex="8pt"/>
    </style:style>
    <style:style style:name="P11" style:parent-style-name="Normal" style:family="paragraph">
      <style:paragraph-properties fo:widows="0" fo:orphans="0" fo:line-height="100%" fo:margin-left="5.2118in" fo:margin-right="-0.0138in">
        <style:tab-stops/>
      </style:paragraph-properties>
    </style:style>
    <style:style style:name="T12" style:parent-style-name="Policepardéfaut" style:family="text">
      <style:text-properties style:font-name="Times New Roman" style:font-name-asian="Times New Roman" style:font-name-complex="Times New Roman" fo:color="#000000"/>
    </style:style>
    <style:style style:name="T13" style:parent-style-name="Policepardéfaut" style:family="text">
      <style:text-properties style:font-name="Times New Roman" style:font-name-asian="Times New Roman" style:font-name-complex="Times New Roman" fo:color="#000000" style:text-scale="101%"/>
    </style:style>
    <style:style style:name="T14" style:parent-style-name="Policepardéfaut" style:family="text">
      <style:text-properties style:font-name="Times New Roman" style:font-name-asian="Times New Roman" style:font-name-complex="Times New Roman" fo:color="#000000" fo:letter-spacing="0.0006in"/>
    </style:style>
    <style:style style:name="T15" style:parent-style-name="Policepardéfaut" style:family="text">
      <style:text-properties style:font-name="Times New Roman" style:font-name-asian="Times New Roman" style:font-name-complex="Times New Roman" fo:color="#000000" style:text-scale="101%"/>
    </style:style>
    <style:style style:name="T16" style:parent-style-name="Policepardéfaut" style:family="text">
      <style:text-properties style:font-name="Times New Roman" style:font-name-asian="Times New Roman" style:font-name-complex="Times New Roman" fo:color="#000000"/>
    </style:style>
    <style:style style:name="P17" style:parent-style-name="Normal" style:family="paragraph">
      <style:paragraph-properties fo:line-height="0.1666in"/>
      <style:text-properties style:font-name="Times New Roman" style:font-name-asian="Times New Roman" style:font-name-complex="Times New Roman" fo:font-size="12pt" style:font-size-asian="12pt" style:font-size-complex="12pt"/>
    </style:style>
    <style:style style:name="P18" style:parent-style-name="Normal" style:family="paragraph">
      <style:paragraph-properties fo:line-height="0.1666in"/>
      <style:text-properties style:font-name="Times New Roman" style:font-name-asian="Times New Roman" style:font-name-complex="Times New Roman" fo:font-size="12pt" style:font-size-asian="12pt" style:font-size-complex="12pt"/>
    </style:style>
    <style:style style:name="P19" style:parent-style-name="Normal" style:family="paragraph">
      <style:paragraph-properties fo:text-align="center" fo:line-height="0.1666in"/>
      <style:text-properties style:font-name="Times New Roman" style:font-name-asian="Times New Roman" style:font-name-complex="Times New Roman" fo:font-size="12pt" style:font-size-asian="12pt" style:font-size-complex="12pt"/>
    </style:style>
    <style:style style:name="P20" style:parent-style-name="Normal" style:family="paragraph">
      <style:paragraph-properties fo:text-align="center" fo:line-height="0.1666in"/>
      <style:text-properties style:font-name="Times New Roman" style:font-name-asian="Times New Roman" style:font-name-complex="Times New Roman" fo:font-size="12pt" style:font-size-asian="12pt" style:font-size-complex="12pt"/>
    </style:style>
    <style:style style:name="P21" style:parent-style-name="Normal" style:family="paragraph">
      <style:paragraph-properties fo:line-height="0.1666in"/>
      <style:text-properties style:font-name="Times New Roman" style:font-name-asian="Times New Roman" style:font-name-complex="Times New Roman" fo:font-size="12pt" style:font-size-asian="12pt" style:font-size-complex="12pt"/>
    </style:style>
    <style:style style:name="P22" style:parent-style-name="Normal" style:family="paragraph">
      <style:paragraph-properties fo:line-height="0.1666in"/>
      <style:text-properties style:font-name="Times New Roman" style:font-name-asian="Times New Roman" style:font-name-complex="Times New Roman" fo:font-size="12pt" style:font-size-asian="12pt" style:font-size-complex="12pt"/>
    </style:style>
    <style:style style:name="P23" style:parent-style-name="Normal" style:family="paragraph">
      <style:paragraph-properties fo:line-height="0.1666in"/>
      <style:text-properties style:font-name="Times New Roman" style:font-name-asian="Times New Roman" style:font-name-complex="Times New Roman" fo:font-size="12pt" style:font-size-asian="12pt" style:font-size-complex="12pt"/>
    </style:style>
    <style:style style:name="P24" style:parent-style-name="Normal" style:family="paragraph">
      <style:paragraph-properties fo:text-align="center" fo:line-height="0.1666in"/>
      <style:text-properties style:font-name="Times New Roman" style:font-name-asian="Times New Roman" style:font-name-complex="Times New Roman" fo:font-size="12pt" style:font-size-asian="12pt" style:font-size-complex="12pt"/>
    </style:style>
    <style:style style:name="P25" style:parent-style-name="Normal" style:family="paragraph">
      <style:paragraph-properties fo:line-height="0.1666in"/>
      <style:text-properties style:font-name="Times New Roman" style:font-name-asian="Times New Roman" style:font-name-complex="Times New Roman" fo:font-size="12pt" style:font-size-asian="12pt" style:font-size-complex="12pt"/>
    </style:style>
    <style:style style:name="P26" style:parent-style-name="Normal" style:family="paragraph">
      <style:paragraph-properties fo:text-align="center" fo:line-height="0.1666in"/>
      <style:text-properties style:font-name="Times New Roman" style:font-name-asian="Times New Roman" style:font-name-complex="Times New Roman" fo:font-size="12pt" style:font-size-asian="12pt" style:font-size-complex="12pt"/>
    </style:style>
    <style:style style:name="P27" style:parent-style-name="Normal" style:family="paragraph">
      <style:paragraph-properties fo:line-height="0.1666in"/>
      <style:text-properties style:font-name="Times New Roman" style:font-name-asian="Times New Roman" style:font-name-complex="Times New Roman" fo:font-size="12pt" style:font-size-asian="12pt" style:font-size-complex="12pt"/>
    </style:style>
    <style:style style:name="P28" style:parent-style-name="Normal" style:family="paragraph">
      <style:paragraph-properties fo:text-align="center" fo:line-height="0.1666in"/>
      <style:text-properties style:font-name="Times New Roman" style:font-name-asian="Times New Roman" style:font-name-complex="Times New Roman" fo:font-size="12pt" style:font-size-asian="12pt" style:font-size-complex="12pt"/>
    </style:style>
    <style:style style:name="P29" style:parent-style-name="Normal" style:family="paragraph">
      <style:paragraph-properties fo:line-height="0.1666in"/>
      <style:text-properties style:font-name="Times New Roman" style:font-name-asian="Times New Roman" style:font-name-complex="Times New Roman" fo:font-size="12pt" style:font-size-asian="12pt" style:font-size-complex="12pt"/>
    </style:style>
    <style:style style:name="P30" style:parent-style-name="Normal" style:family="paragraph">
      <style:paragraph-properties fo:line-height="0.1666in"/>
      <style:text-properties style:font-name="Times New Roman" style:font-name-asian="Times New Roman" style:font-name-complex="Times New Roman" fo:font-size="12pt" style:font-size-asian="12pt" style:font-size-complex="12pt"/>
    </style:style>
    <style:style style:name="P31" style:parent-style-name="Normal" style:family="paragraph">
      <style:paragraph-properties fo:line-height="0.1666in"/>
      <style:text-properties style:font-name="Times New Roman" style:font-name-asian="Times New Roman" style:font-name-complex="Times New Roman" fo:font-size="12pt" style:font-size-asian="12pt" style:font-size-complex="12pt"/>
    </style:style>
    <style:style style:name="P32" style:parent-style-name="Normal" style:family="paragraph">
      <style:text-properties style:font-name="Times New Roman" style:font-name-asian="Times New Roman" style:font-name-complex="Times New Roman" fo:font-size="12pt" style:font-size-asian="12pt" style:font-size-complex="12pt"/>
    </style:style>
    <style:style style:name="P33" style:parent-style-name="Normal" style:family="paragraph">
      <style:text-properties style:font-name="Times New Roman" style:font-name-asian="Times New Roman" style:font-name-complex="Times New Roman" fo:font-size="12pt" style:font-size-asian="12pt" style:font-size-complex="12pt"/>
    </style:style>
    <style:style style:name="P34" style:parent-style-name="Normal" style:family="paragraph">
      <style:text-properties style:font-name="Times New Roman" style:font-name-asian="Times New Roman" style:font-name-complex="Times New Roman" fo:font-size="12pt" style:font-size-asian="12pt" style:font-size-complex="12pt"/>
    </style:style>
    <style:style style:name="P35" style:parent-style-name="Normal" style:family="paragraph">
      <style:text-properties style:font-name="Times New Roman" style:font-name-asian="Times New Roman" style:font-name-complex="Times New Roman" fo:font-size="12pt" style:font-size-asian="12pt" style:font-size-complex="12pt"/>
    </style:style>
    <style:style style:name="P36" style:parent-style-name="Normal" style:family="paragraph">
      <style:text-properties style:font-name="Times New Roman" style:font-name-asian="Times New Roman" style:font-name-complex="Times New Roman" fo:font-size="12pt" style:font-size-asian="12pt" style:font-size-complex="12pt"/>
    </style:style>
    <style:style style:name="P37" style:parent-style-name="Normal" style:family="paragraph">
      <style:text-properties style:font-name="Times New Roman" style:font-name-asian="Times New Roman" style:font-name-complex="Times New Roman" fo:font-size="12pt" style:font-size-asian="12pt" style:font-size-complex="12pt"/>
    </style:style>
    <style:style style:name="P38" style:parent-style-name="Normal" style:family="paragraph">
      <style:text-properties style:font-name="Times New Roman" style:font-name-asian="Times New Roman" style:font-name-complex="Times New Roman" fo:font-size="12pt" style:font-size-asian="12pt" style:font-size-complex="12pt"/>
    </style:style>
    <style:style style:name="P39" style:parent-style-name="Normal" style:family="paragraph">
      <style:text-properties style:font-name="Times New Roman" style:font-name-asian="Times New Roman" style:font-name-complex="Times New Roman" fo:font-size="12pt" style:font-size-asian="12pt" style:font-size-complex="12pt"/>
    </style:style>
    <style:style style:name="P40" style:parent-style-name="Normal" style:family="paragraph">
      <style:text-properties style:font-name="Times New Roman" style:font-name-asian="Times New Roman" style:font-name-complex="Times New Roman" fo:font-size="28pt" style:font-size-asian="28pt" style:font-size-complex="28pt"/>
    </style:style>
    <style:style style:name="P41" style:parent-style-name="Normal" style:family="paragraph">
      <style:paragraph-properties fo:text-align="center"/>
      <style:text-properties style:font-name="Times New Roman" style:font-name-asian="Times New Roman" style:font-name-complex="Times New Roman" fo:font-size="28pt" style:font-size-asian="28pt" style:font-size-complex="28pt"/>
    </style:style>
    <style:style style:name="P42" style:parent-style-name="Normal" style:family="paragraph">
      <style:text-properties style:font-name="Times New Roman" style:font-name-asian="Times New Roman" style:font-name-complex="Times New Roman" fo:font-size="12pt" style:font-size-asian="12pt" style:font-size-complex="12pt"/>
    </style:style>
    <style:style style:name="P43" style:parent-style-name="Normal" style:family="paragraph">
      <style:text-properties style:font-name="Times New Roman" style:font-name-asian="Times New Roman" style:font-name-complex="Times New Roman" fo:font-size="12pt" style:font-size-asian="12pt" style:font-size-complex="12pt"/>
    </style:style>
    <style:style style:name="P44" style:parent-style-name="Normal" style:family="paragraph">
      <style:text-properties style:font-name="Times New Roman" style:font-name-asian="Times New Roman" style:font-name-complex="Times New Roman" fo:font-size="12pt" style:font-size-asian="12pt" style:font-size-complex="12pt"/>
    </style:style>
    <style:style style:name="P45" style:parent-style-name="Normal" style:family="paragraph">
      <style:text-properties style:font-name="Times New Roman" style:font-name-asian="Times New Roman" style:font-name-complex="Times New Roman" fo:font-size="12pt" style:font-size-asian="12pt" style:font-size-complex="12pt"/>
    </style:style>
    <style:style style:name="P46" style:parent-style-name="Normal" style:family="paragraph">
      <style:text-properties style:font-name="Times New Roman" style:font-name-asian="Times New Roman" style:font-name-complex="Times New Roman" fo:font-size="12pt" style:font-size-asian="12pt" style:font-size-complex="12pt"/>
    </style:style>
    <style:style style:name="P47" style:parent-style-name="Normal" style:family="paragraph">
      <style:text-properties style:font-name="Times New Roman" style:font-name-asian="Times New Roman" style:font-name-complex="Times New Roman" fo:font-size="12pt" style:font-size-asian="12pt" style:font-size-complex="12pt"/>
    </style:style>
    <style:style style:name="P48" style:parent-style-name="Normal" style:family="paragraph">
      <style:text-properties style:font-name="Times New Roman" style:font-name-asian="Times New Roman" style:font-name-complex="Times New Roman" fo:font-size="12pt" style:font-size-asian="12pt" style:font-size-complex="12pt"/>
    </style:style>
    <style:style style:name="P49" style:parent-style-name="Normal" style:family="paragraph">
      <style:text-properties style:font-name="Times New Roman" style:font-name-asian="Times New Roman" style:font-name-complex="Times New Roman" fo:font-size="12pt" style:font-size-asian="12pt" style:font-size-complex="12pt"/>
    </style:style>
    <style:style style:name="P50" style:parent-style-name="Normal" style:family="paragraph">
      <style:text-properties style:font-name="Times New Roman" style:font-name-asian="Times New Roman" style:font-name-complex="Times New Roman" fo:font-size="12pt" style:font-size-asian="12pt" style:font-size-complex="12pt"/>
    </style:style>
    <style:style style:name="P51" style:parent-style-name="Normal" style:family="paragraph">
      <style:text-properties style:font-name="Times New Roman" style:font-name-asian="Times New Roman" style:font-name-complex="Times New Roman" fo:font-size="12pt" style:font-size-asian="12pt" style:font-size-complex="12pt"/>
    </style:style>
    <style:style style:name="P52" style:parent-style-name="Normal" style:family="paragraph">
      <style:text-properties style:font-name="Times New Roman" style:font-name-asian="Times New Roman" style:font-name-complex="Times New Roman" fo:font-size="12pt" style:font-size-asian="12pt" style:font-size-complex="12pt"/>
    </style:style>
    <style:style style:name="P53" style:parent-style-name="Normal" style:family="paragraph">
      <style:text-properties style:font-name="Times New Roman" style:font-name-asian="Times New Roman" style:font-name-complex="Times New Roman" fo:font-size="12pt" style:font-size-asian="12pt" style:font-size-complex="12pt"/>
    </style:style>
    <style:style style:name="P54" style:parent-style-name="Normal" style:family="paragraph">
      <style:text-properties style:font-name="Times New Roman" style:font-name-asian="Times New Roman" style:font-name-complex="Times New Roman" fo:font-size="12pt" style:font-size-asian="12pt" style:font-size-complex="12pt"/>
    </style:style>
    <style:style style:name="P55" style:parent-style-name="Normal" style:family="paragraph">
      <style:text-properties style:font-name="Times New Roman" style:font-name-asian="Times New Roman" style:font-name-complex="Times New Roman" fo:font-size="12pt" style:font-size-asian="12pt" style:font-size-complex="12pt"/>
    </style:style>
    <style:style style:name="P56" style:parent-style-name="Normal" style:family="paragraph">
      <style:text-properties style:font-name="Times New Roman" style:font-name-asian="Times New Roman" style:font-name-complex="Times New Roman" fo:font-size="12pt" style:font-size-asian="12pt" style:font-size-complex="12pt"/>
    </style:style>
    <style:style style:name="P57" style:parent-style-name="Normal" style:family="paragraph">
      <style:text-properties style:font-name="Times New Roman" style:font-name-asian="Times New Roman" style:font-name-complex="Times New Roman" fo:font-size="12pt" style:font-size-asian="12pt" style:font-size-complex="12pt"/>
    </style:style>
    <style:style style:name="P58" style:parent-style-name="Normal" style:family="paragraph">
      <style:text-properties style:font-name="Times New Roman" style:font-name-asian="Times New Roman" style:font-name-complex="Times New Roman" fo:font-size="12pt" style:font-size-asian="12pt" style:font-size-complex="12pt"/>
    </style:style>
    <style:style style:name="P59" style:parent-style-name="Normal" style:family="paragraph">
      <style:text-properties style:font-name="Times New Roman" style:font-name-asian="Times New Roman" style:font-name-complex="Times New Roman" fo:font-size="12pt" style:font-size-asian="12pt" style:font-size-complex="12pt"/>
    </style:style>
    <style:style style:name="P60" style:parent-style-name="Normal" style:family="paragraph">
      <style:text-properties style:font-name="Times New Roman" style:font-name-asian="Times New Roman" style:font-name-complex="Times New Roman" fo:font-size="12pt" style:font-size-asian="12pt" style:font-size-complex="12pt"/>
    </style:style>
    <style:style style:name="P61" style:parent-style-name="Titre1" style:list-style-name="LFO18" style:family="paragraph"/>
    <style:style style:name="T62" style:parent-style-name="Policepardéfaut" style:family="text">
      <style:text-properties style:font-name-asian="Times New Roman" fo:font-size="48pt" style:font-size-asian="48pt" style:font-size-complex="48pt"/>
    </style:style>
    <style:style style:name="T63" style:parent-style-name="Policepardéfaut" style:family="text">
      <style:text-properties style:font-name-asian="Times New Roman" fo:font-size="48pt" style:font-size-asian="48pt" style:font-size-complex="48pt"/>
    </style:style>
    <style:style style:name="P64" style:parent-style-name="Normal" style:family="paragraph">
      <style:paragraph-properties fo:widows="0" fo:orphans="0" fo:text-align="justify" fo:line-height="107%" fo:margin-right="0.5062in"/>
      <style:text-properties style:font-name="Times New Roman" style:font-name-asian="Times New Roman" style:font-name-complex="Times New Roman" fo:color="#000000"/>
    </style:style>
    <style:style style:name="P65" style:parent-style-name="Normal" style:family="paragraph">
      <style:paragraph-properties fo:widows="0" fo:orphans="0" fo:text-align="justify" fo:line-height="107%" fo:margin-right="0.5062in"/>
      <style:text-properties style:font-name="Times New Roman" style:font-name-asian="Times New Roman" style:font-name-complex="Times New Roman" fo:color="#000000"/>
    </style:style>
    <style:style style:name="P66" style:parent-style-name="Normal" style:family="paragraph">
      <style:paragraph-properties fo:widows="0" fo:orphans="0" fo:text-align="justify" fo:line-height="107%" fo:margin-right="0.5062in"/>
      <style:text-properties style:font-name="Times New Roman" style:font-name-asian="Times New Roman" style:font-name-complex="Times New Roman" fo:color="#000000"/>
    </style:style>
    <style:style style:name="P67" style:parent-style-name="Normal" style:family="paragraph">
      <style:paragraph-properties fo:widows="0" fo:orphans="0" fo:text-align="justify" fo:line-height="107%" fo:margin-right="0.5062in"/>
    </style:style>
    <style:style style:name="T68" style:parent-style-name="Policepardéfaut" style:family="text">
      <style:text-properties style:font-name="Times New Roman" style:font-name-asian="Times New Roman" style:font-name-complex="Times New Roman" fo:color="#000000"/>
    </style:style>
    <style:style style:name="T69" style:parent-style-name="Policepardéfaut" style:family="text">
      <style:text-properties style:font-name="Times New Roman" style:font-name-asian="Times New Roman" style:font-name-complex="Times New Roman" fo:color="#000000" fo:letter-spacing="-0.0006in"/>
    </style:style>
    <style:style style:name="T70" style:parent-style-name="Policepardéfaut" style:family="text">
      <style:text-properties style:font-name="Times New Roman" style:font-name-asian="Times New Roman" style:font-name-complex="Times New Roman" fo:color="#000000"/>
    </style:style>
    <style:style style:name="T71" style:parent-style-name="Policepardéfaut" style:family="text">
      <style:text-properties style:font-name="Times New Roman" style:font-name-asian="Times New Roman" style:font-name-complex="Times New Roman" fo:color="#000000" fo:letter-spacing="0.0006in"/>
    </style:style>
    <style:style style:name="T72" style:parent-style-name="Policepardéfaut" style:family="text">
      <style:text-properties style:font-name="Times New Roman" style:font-name-asian="Times New Roman" style:font-name-complex="Times New Roman" fo:color="#000000"/>
    </style:style>
    <style:style style:name="T73" style:parent-style-name="Policepardéfaut" style:family="text">
      <style:text-properties style:font-name="Times New Roman" style:font-name-asian="Times New Roman" style:font-name-complex="Times New Roman" fo:color="#000000" fo:letter-spacing="-0.0006in"/>
    </style:style>
    <style:style style:name="T74" style:parent-style-name="Policepardéfaut" style:family="text">
      <style:text-properties style:font-name="Times New Roman" style:font-name-asian="Times New Roman" style:font-name-complex="Times New Roman" fo:color="#000000"/>
    </style:style>
    <style:style style:name="T75" style:parent-style-name="Policepardéfaut" style:family="text">
      <style:text-properties style:font-name="Times New Roman" style:font-name-asian="Times New Roman" style:font-name-complex="Times New Roman" fo:color="#000000" fo:letter-spacing="-0.0006in"/>
    </style:style>
    <style:style style:name="T76" style:parent-style-name="Policepardéfaut" style:family="text">
      <style:text-properties style:font-name="Times New Roman" style:font-name-asian="Times New Roman" style:font-name-complex="Times New Roman" fo:color="#000000" fo:letter-spacing="0.0006in"/>
    </style:style>
    <style:style style:name="T77" style:parent-style-name="Policepardéfaut" style:family="text">
      <style:text-properties style:font-name="Times New Roman" style:font-name-asian="Times New Roman" style:font-name-complex="Times New Roman" fo:color="#000000"/>
    </style:style>
    <style:style style:name="T78" style:parent-style-name="Policepardéfaut" style:family="text">
      <style:text-properties style:font-name="Times New Roman" style:font-name-asian="Times New Roman" style:font-name-complex="Times New Roman" fo:color="#000000" fo:letter-spacing="-0.0006in"/>
    </style:style>
    <style:style style:name="T79" style:parent-style-name="Policepardéfaut" style:family="text">
      <style:text-properties style:font-name="Times New Roman" style:font-name-asian="Times New Roman" style:font-name-complex="Times New Roman" fo:color="#000000"/>
    </style:style>
    <style:style style:name="T80" style:parent-style-name="Policepardéfaut" style:family="text">
      <style:text-properties style:font-name="Times New Roman" style:font-name-asian="Times New Roman" style:font-name-complex="Times New Roman" fo:color="#000000" fo:letter-spacing="0.0006in"/>
    </style:style>
    <style:style style:name="T81" style:parent-style-name="Policepardéfaut" style:family="text">
      <style:text-properties style:font-name="Times New Roman" style:font-name-asian="Times New Roman" style:font-name-complex="Times New Roman" fo:color="#000000"/>
    </style:style>
    <style:style style:name="T82" style:parent-style-name="Policepardéfaut" style:family="text">
      <style:text-properties style:font-name="Times New Roman" style:font-name-asian="Times New Roman" style:font-name-complex="Times New Roman" fo:color="#000000" fo:letter-spacing="0.0013in"/>
    </style:style>
    <style:style style:name="T83" style:parent-style-name="Policepardéfaut" style:family="text">
      <style:text-properties style:font-name="Times New Roman" style:font-name-asian="Times New Roman" style:font-name-complex="Times New Roman" fo:color="#000000"/>
    </style:style>
    <style:style style:name="T84" style:parent-style-name="Policepardéfaut" style:family="text">
      <style:text-properties style:font-name="Times New Roman" style:font-name-asian="Times New Roman" style:font-name-complex="Times New Roman" fo:color="#000000" fo:letter-spacing="-0.0006in"/>
    </style:style>
    <style:style style:name="T85" style:parent-style-name="Policepardéfaut" style:family="text">
      <style:text-properties style:font-name="Times New Roman" style:font-name-asian="Times New Roman" style:font-name-complex="Times New Roman" fo:color="#000000"/>
    </style:style>
    <style:style style:name="T86" style:parent-style-name="Policepardéfaut" style:family="text">
      <style:text-properties style:font-name="Times New Roman" style:font-name-asian="Times New Roman" style:font-name-complex="Times New Roman" fo:color="#000000" fo:letter-spacing="-0.0006in"/>
    </style:style>
    <style:style style:name="T87" style:parent-style-name="Policepardéfaut" style:family="text">
      <style:text-properties style:font-name="Times New Roman" style:font-name-asian="Times New Roman" style:font-name-complex="Times New Roman" fo:color="#000000"/>
    </style:style>
    <style:style style:name="T88" style:parent-style-name="Policepardéfaut" style:family="text">
      <style:text-properties style:font-name="Times New Roman" style:font-name-asian="Times New Roman" style:font-name-complex="Times New Roman" fo:color="#000000" fo:letter-spacing="0.002in"/>
    </style:style>
    <style:style style:name="T89" style:parent-style-name="Policepardéfaut" style:family="text">
      <style:text-properties style:font-name="Times New Roman" style:font-name-asian="Times New Roman" style:font-name-complex="Times New Roman" fo:color="#000000"/>
    </style:style>
    <style:style style:name="T90" style:parent-style-name="Policepardéfaut" style:family="text">
      <style:text-properties style:font-name="Times New Roman" style:font-name-asian="Times New Roman" style:font-name-complex="Times New Roman" fo:color="#000000" fo:letter-spacing="-0.0006in"/>
    </style:style>
    <style:style style:name="T91" style:parent-style-name="Policepardéfaut" style:family="text">
      <style:text-properties style:font-name="Times New Roman" style:font-name-asian="Times New Roman" style:font-name-complex="Times New Roman" fo:color="#000000"/>
    </style:style>
    <style:style style:name="T92" style:parent-style-name="Policepardéfaut" style:family="text">
      <style:text-properties style:font-name="Times New Roman" style:font-name-asian="Times New Roman" style:font-name-complex="Times New Roman" fo:color="#000000" fo:letter-spacing="0.002in"/>
    </style:style>
    <style:style style:name="T93" style:parent-style-name="Policepardéfaut" style:family="text">
      <style:text-properties style:font-name="Times New Roman" style:font-name-asian="Times New Roman" style:font-name-complex="Times New Roman" fo:color="#000000" fo:letter-spacing="0.0006in"/>
    </style:style>
    <style:style style:name="T94" style:parent-style-name="Policepardéfaut" style:family="text">
      <style:text-properties style:font-name="Times New Roman" style:font-name-asian="Times New Roman" style:font-name-complex="Times New Roman" fo:color="#000000"/>
    </style:style>
    <style:style style:name="T95" style:parent-style-name="Policepardéfaut" style:family="text">
      <style:text-properties style:font-name="Times New Roman" style:font-name-asian="Times New Roman" style:font-name-complex="Times New Roman" fo:color="#000000" fo:letter-spacing="-0.0006in"/>
    </style:style>
    <style:style style:name="T96" style:parent-style-name="Policepardéfaut" style:family="text">
      <style:text-properties style:font-name="Times New Roman" style:font-name-asian="Times New Roman" style:font-name-complex="Times New Roman" fo:color="#000000"/>
    </style:style>
    <style:style style:name="T97" style:parent-style-name="Policepardéfaut" style:family="text">
      <style:text-properties style:font-name="Times New Roman" style:font-name-asian="Times New Roman" style:font-name-complex="Times New Roman" fo:color="#000000" fo:letter-spacing="-0.0006in"/>
    </style:style>
    <style:style style:name="T98" style:parent-style-name="Policepardéfaut" style:family="text">
      <style:text-properties style:font-name="Times New Roman" style:font-name-asian="Times New Roman" style:font-name-complex="Times New Roman" fo:color="#000000"/>
    </style:style>
    <style:style style:name="T99" style:parent-style-name="Policepardéfaut" style:family="text">
      <style:text-properties style:font-name="Times New Roman" style:font-name-asian="Times New Roman" style:font-name-complex="Times New Roman" fo:color="#000000" fo:letter-spacing="0.0013in"/>
    </style:style>
    <style:style style:name="T100" style:parent-style-name="Policepardéfaut" style:family="text">
      <style:text-properties style:font-name="Times New Roman" style:font-name-asian="Times New Roman" style:font-name-complex="Times New Roman" fo:color="#000000"/>
    </style:style>
    <style:style style:name="P101" style:parent-style-name="Normal" style:family="paragraph">
      <style:paragraph-properties fo:text-align="justify" fo:line-height="0.1666in"/>
      <style:text-properties style:font-name="Times New Roman" style:font-name-asian="Times New Roman" style:font-name-complex="Times New Roman"/>
    </style:style>
    <style:style style:name="P102" style:parent-style-name="Normal" style:family="paragraph">
      <style:paragraph-properties fo:text-align="justify" fo:line-height="0.1666in"/>
      <style:text-properties style:font-name="Times New Roman" style:font-name-asian="Times New Roman" style:font-name-complex="Times New Roman"/>
    </style:style>
    <style:style style:name="P103" style:parent-style-name="Normal" style:family="paragraph">
      <style:paragraph-properties fo:text-align="justify" fo:margin-bottom="0.0118in" fo:line-height="0.0833in"/>
      <style:text-properties style:font-name="Times New Roman" style:font-name-asian="Times New Roman" style:font-name-complex="Times New Roman" fo:font-size="6pt" style:font-size-asian="6pt" style:font-size-complex="6pt"/>
    </style:style>
    <style:style style:name="P104" style:parent-style-name="Normal" style:family="paragraph">
      <style:paragraph-properties fo:widows="0" fo:orphans="0" fo:text-align="justify" fo:line-height="107%" fo:margin-right="0.5694in"/>
    </style:style>
    <style:style style:name="T105" style:parent-style-name="Policepardéfaut" style:family="text">
      <style:text-properties style:font-name="Times New Roman" style:font-name-asian="Times New Roman" style:font-name-complex="Times New Roman" fo:color="#000000"/>
    </style:style>
    <style:style style:name="T106" style:parent-style-name="Policepardéfaut" style:family="text">
      <style:text-properties style:font-name="Times New Roman" style:font-name-asian="Times New Roman" style:font-name-complex="Times New Roman" fo:color="#000000" fo:letter-spacing="-0.0013in"/>
    </style:style>
    <style:style style:name="T107" style:parent-style-name="Policepardéfaut" style:family="text">
      <style:text-properties style:font-name="Times New Roman" style:font-name-asian="Times New Roman" style:font-name-complex="Times New Roman" fo:color="#000000"/>
    </style:style>
    <style:style style:name="T108" style:parent-style-name="Policepardéfaut" style:family="text">
      <style:text-properties style:font-name="Times New Roman" style:font-name-asian="Times New Roman" style:font-name-complex="Times New Roman" fo:color="#000000" fo:letter-spacing="0.0006in"/>
    </style:style>
    <style:style style:name="T109" style:parent-style-name="Policepardéfaut" style:family="text">
      <style:text-properties style:font-name="Times New Roman" style:font-name-asian="Times New Roman" style:font-name-complex="Times New Roman" fo:color="#000000"/>
    </style:style>
    <style:style style:name="T110" style:parent-style-name="Policepardéfaut" style:family="text">
      <style:text-properties style:font-name="Times New Roman" style:font-name-asian="Times New Roman" style:font-name-complex="Times New Roman" fo:color="#000000" fo:letter-spacing="0.0006in"/>
    </style:style>
    <style:style style:name="T111" style:parent-style-name="Policepardéfaut" style:family="text">
      <style:text-properties style:font-name="Times New Roman" style:font-name-asian="Times New Roman" style:font-name-complex="Times New Roman" fo:color="#000000"/>
    </style:style>
    <style:style style:name="T112" style:parent-style-name="Policepardéfaut" style:family="text">
      <style:text-properties style:font-name="Times New Roman" style:font-name-asian="Times New Roman" style:font-name-complex="Times New Roman" fo:color="#000000" fo:letter-spacing="-0.0006in"/>
    </style:style>
    <style:style style:name="T113" style:parent-style-name="Policepardéfaut" style:family="text">
      <style:text-properties style:font-name="Times New Roman" style:font-name-asian="Times New Roman" style:font-name-complex="Times New Roman" fo:color="#000000"/>
    </style:style>
    <style:style style:name="T114" style:parent-style-name="Policepardéfaut" style:family="text">
      <style:text-properties style:font-name="Times New Roman" style:font-name-asian="Times New Roman" style:font-name-complex="Times New Roman" fo:color="#000000" fo:letter-spacing="0.0006in"/>
    </style:style>
    <style:style style:name="T115" style:parent-style-name="Policepardéfaut" style:family="text">
      <style:text-properties style:font-name="Times New Roman" style:font-name-asian="Times New Roman" style:font-name-complex="Times New Roman" fo:color="#000000"/>
    </style:style>
    <style:style style:name="T116" style:parent-style-name="Policepardéfaut" style:family="text">
      <style:text-properties style:font-name="Times New Roman" style:font-name-asian="Times New Roman" style:font-name-complex="Times New Roman" fo:color="#000000"/>
    </style:style>
    <style:style style:name="T117" style:parent-style-name="Policepardéfaut" style:family="text">
      <style:text-properties style:font-name="Times New Roman" style:font-name-asian="Times New Roman" style:font-name-complex="Times New Roman" fo:color="#000000"/>
    </style:style>
    <style:style style:name="T118" style:parent-style-name="Policepardéfaut" style:family="text">
      <style:text-properties style:font-name="Times New Roman" style:font-name-asian="Times New Roman" style:font-name-complex="Times New Roman" fo:color="#000000" fo:letter-spacing="0.0006in"/>
    </style:style>
    <style:style style:name="T119" style:parent-style-name="Policepardéfaut" style:family="text">
      <style:text-properties style:font-name="Times New Roman" style:font-name-asian="Times New Roman" style:font-name-complex="Times New Roman" fo:color="#000000"/>
    </style:style>
    <style:style style:name="T120" style:parent-style-name="Policepardéfaut" style:family="text">
      <style:text-properties style:font-name="Times New Roman" style:font-name-asian="Times New Roman" style:font-name-complex="Times New Roman" fo:color="#000000" fo:letter-spacing="0.0006in"/>
    </style:style>
    <style:style style:name="T121" style:parent-style-name="Policepardéfaut" style:family="text">
      <style:text-properties style:font-name="Times New Roman" style:font-name-asian="Times New Roman" style:font-name-complex="Times New Roman" fo:color="#000000"/>
    </style:style>
    <style:style style:name="T122" style:parent-style-name="Policepardéfaut" style:family="text">
      <style:text-properties style:font-name="Times New Roman" style:font-name-asian="Times New Roman" style:font-name-complex="Times New Roman" fo:color="#000000" fo:letter-spacing="-0.0013in"/>
    </style:style>
    <style:style style:name="T123" style:parent-style-name="Policepardéfaut" style:family="text">
      <style:text-properties style:font-name="Times New Roman" style:font-name-asian="Times New Roman" style:font-name-complex="Times New Roman" fo:color="#000000" fo:letter-spacing="0.0006in"/>
    </style:style>
    <style:style style:name="T124" style:parent-style-name="Policepardéfaut" style:family="text">
      <style:text-properties style:font-name="Times New Roman" style:font-name-asian="Times New Roman" style:font-name-complex="Times New Roman" fo:color="#000000"/>
    </style:style>
    <style:style style:name="T125" style:parent-style-name="Policepardéfaut" style:family="text">
      <style:text-properties style:font-name="Times New Roman" style:font-name-asian="Times New Roman" style:font-name-complex="Times New Roman" fo:color="#000000" fo:letter-spacing="0.0006in"/>
    </style:style>
    <style:style style:name="T126" style:parent-style-name="Policepardéfaut" style:family="text">
      <style:text-properties style:font-name="Times New Roman" style:font-name-asian="Times New Roman" style:font-name-complex="Times New Roman" fo:color="#000000"/>
    </style:style>
    <style:style style:name="T127" style:parent-style-name="Policepardéfaut" style:family="text">
      <style:text-properties style:font-name="Times New Roman" style:font-name-asian="Times New Roman" style:font-name-complex="Times New Roman" fo:color="#000000" fo:letter-spacing="-0.0006in"/>
    </style:style>
    <style:style style:name="T128" style:parent-style-name="Policepardéfaut" style:family="text">
      <style:text-properties style:font-name="Times New Roman" style:font-name-asian="Times New Roman" style:font-name-complex="Times New Roman" fo:color="#000000"/>
    </style:style>
    <style:style style:name="T129" style:parent-style-name="Policepardéfaut" style:family="text">
      <style:text-properties style:font-name="Times New Roman" style:font-name-asian="Times New Roman" style:font-name-complex="Times New Roman" fo:color="#000000" fo:letter-spacing="0.0006in"/>
    </style:style>
    <style:style style:name="T130" style:parent-style-name="Policepardéfaut" style:family="text">
      <style:text-properties style:font-name="Times New Roman" style:font-name-asian="Times New Roman" style:font-name-complex="Times New Roman" fo:color="#000000"/>
    </style:style>
    <style:style style:name="T131" style:parent-style-name="Policepardéfaut" style:family="text">
      <style:text-properties style:font-name="Times New Roman" style:font-name-asian="Times New Roman" style:font-name-complex="Times New Roman" fo:color="#000000" fo:letter-spacing="-0.0006in"/>
    </style:style>
    <style:style style:name="T132" style:parent-style-name="Policepardéfaut" style:family="text">
      <style:text-properties style:font-name="Times New Roman" style:font-name-asian="Times New Roman" style:font-name-complex="Times New Roman" fo:color="#000000"/>
    </style:style>
    <style:style style:name="T133" style:parent-style-name="Policepardéfaut" style:family="text">
      <style:text-properties style:font-name="Times New Roman" style:font-name-asian="Times New Roman" style:font-name-complex="Times New Roman" fo:color="#000000" fo:letter-spacing="-0.0006in"/>
    </style:style>
    <style:style style:name="T134" style:parent-style-name="Policepardéfaut" style:family="text">
      <style:text-properties style:font-name="Times New Roman" style:font-name-asian="Times New Roman" style:font-name-complex="Times New Roman" fo:color="#000000" fo:letter-spacing="0.0013in"/>
    </style:style>
    <style:style style:name="T135" style:parent-style-name="Policepardéfaut" style:family="text">
      <style:text-properties style:font-name="Times New Roman" style:font-name-asian="Times New Roman" style:font-name-complex="Times New Roman" fo:color="#000000"/>
    </style:style>
    <style:style style:name="T136" style:parent-style-name="Policepardéfaut" style:family="text">
      <style:text-properties style:font-name="Times New Roman" style:font-name-asian="Times New Roman" style:font-name-complex="Times New Roman" fo:color="#000000" fo:letter-spacing="-0.0006in"/>
    </style:style>
    <style:style style:name="T137" style:parent-style-name="Policepardéfaut" style:family="text">
      <style:text-properties style:font-name="Times New Roman" style:font-name-asian="Times New Roman" style:font-name-complex="Times New Roman" fo:color="#000000"/>
    </style:style>
    <style:style style:name="T138" style:parent-style-name="Policepardéfaut" style:family="text">
      <style:text-properties style:font-name="Times New Roman" style:font-name-asian="Times New Roman" style:font-name-complex="Times New Roman" fo:color="#000000" fo:letter-spacing="0.0006in"/>
    </style:style>
    <style:style style:name="T139" style:parent-style-name="Policepardéfaut" style:family="text">
      <style:text-properties style:font-name="Times New Roman" style:font-name-asian="Times New Roman" style:font-name-complex="Times New Roman" fo:color="#000000"/>
    </style:style>
    <style:style style:name="T140" style:parent-style-name="Policepardéfaut" style:family="text">
      <style:text-properties style:font-name="Times New Roman" style:font-name-asian="Times New Roman" style:font-name-complex="Times New Roman" fo:color="#000000" fo:letter-spacing="-0.0006in"/>
    </style:style>
    <style:style style:name="T141" style:parent-style-name="Policepardéfaut" style:family="text">
      <style:text-properties style:font-name="Times New Roman" style:font-name-asian="Times New Roman" style:font-name-complex="Times New Roman" fo:color="#000000"/>
    </style:style>
    <style:style style:name="T142" style:parent-style-name="Policepardéfaut" style:family="text">
      <style:text-properties style:font-name="Times New Roman" style:font-name-asian="Times New Roman" style:font-name-complex="Times New Roman" fo:color="#000000" fo:letter-spacing="-0.0006in"/>
    </style:style>
    <style:style style:name="T143" style:parent-style-name="Policepardéfaut" style:family="text">
      <style:text-properties style:font-name="Times New Roman" style:font-name-asian="Times New Roman" style:font-name-complex="Times New Roman" fo:color="#000000"/>
    </style:style>
    <style:style style:name="T144" style:parent-style-name="Policepardéfaut" style:family="text">
      <style:text-properties style:font-name="Times New Roman" style:font-name-asian="Times New Roman" style:font-name-complex="Times New Roman" fo:color="#000000" fo:letter-spacing="0.0013in"/>
    </style:style>
    <style:style style:name="T145" style:parent-style-name="Policepardéfaut" style:family="text">
      <style:text-properties style:font-name="Times New Roman" style:font-name-asian="Times New Roman" style:font-name-complex="Times New Roman" fo:color="#000000"/>
    </style:style>
    <style:style style:name="T146" style:parent-style-name="Policepardéfaut" style:family="text">
      <style:text-properties style:font-name="Times New Roman" style:font-name-asian="Times New Roman" style:font-name-complex="Times New Roman" fo:color="#000000" fo:letter-spacing="0.0013in"/>
    </style:style>
    <style:style style:name="T147" style:parent-style-name="Policepardéfaut" style:family="text">
      <style:text-properties style:font-name="Times New Roman" style:font-name-asian="Times New Roman" style:font-name-complex="Times New Roman" fo:color="#000000"/>
    </style:style>
    <style:style style:name="T148" style:parent-style-name="Policepardéfaut" style:family="text">
      <style:text-properties style:font-name="Times New Roman" style:font-name-asian="Times New Roman" style:font-name-complex="Times New Roman" fo:color="#000000" fo:letter-spacing="-0.0006in"/>
    </style:style>
    <style:style style:name="T149" style:parent-style-name="Policepardéfaut" style:family="text">
      <style:text-properties style:font-name="Times New Roman" style:font-name-asian="Times New Roman" style:font-name-complex="Times New Roman" fo:color="#000000"/>
    </style:style>
    <style:style style:name="T150" style:parent-style-name="Policepardéfaut" style:family="text">
      <style:text-properties style:font-name="Times New Roman" style:font-name-asian="Times New Roman" style:font-name-complex="Times New Roman" fo:color="#000000" fo:letter-spacing="0.0006in"/>
    </style:style>
    <style:style style:name="T151" style:parent-style-name="Policepardéfaut" style:family="text">
      <style:text-properties style:font-name="Times New Roman" style:font-name-asian="Times New Roman" style:font-name-complex="Times New Roman" fo:color="#000000"/>
    </style:style>
    <style:style style:name="T152" style:parent-style-name="Policepardéfaut" style:family="text">
      <style:text-properties style:font-name="Times New Roman" style:font-name-asian="Times New Roman" style:font-name-complex="Times New Roman" fo:color="#000000" fo:letter-spacing="0.0006in"/>
    </style:style>
    <style:style style:name="T153" style:parent-style-name="Policepardéfaut" style:family="text">
      <style:text-properties style:font-name="Times New Roman" style:font-name-asian="Times New Roman" style:font-name-complex="Times New Roman" fo:color="#000000"/>
    </style:style>
    <style:style style:name="T154" style:parent-style-name="Policepardéfaut" style:family="text">
      <style:text-properties style:font-name="Times New Roman" style:font-name-asian="Times New Roman" style:font-name-complex="Times New Roman" fo:color="#000000" fo:letter-spacing="0.0006in"/>
    </style:style>
    <style:style style:name="T155" style:parent-style-name="Policepardéfaut" style:family="text">
      <style:text-properties style:font-name="Times New Roman" style:font-name-asian="Times New Roman" style:font-name-complex="Times New Roman" fo:color="#000000"/>
    </style:style>
    <style:style style:name="T156" style:parent-style-name="Policepardéfaut" style:family="text">
      <style:text-properties style:font-name="Times New Roman" style:font-name-asian="Times New Roman" style:font-name-complex="Times New Roman" fo:color="#000000" fo:letter-spacing="0.0006in"/>
    </style:style>
    <style:style style:name="T157" style:parent-style-name="Policepardéfaut" style:family="text">
      <style:text-properties style:font-name="Times New Roman" style:font-name-asian="Times New Roman" style:font-name-complex="Times New Roman" fo:color="#000000"/>
    </style:style>
    <style:style style:name="T158" style:parent-style-name="Policepardéfaut" style:family="text">
      <style:text-properties style:font-name="Times New Roman" style:font-name-asian="Times New Roman" style:font-name-complex="Times New Roman" fo:color="#000000" fo:letter-spacing="0.0006in"/>
    </style:style>
    <style:style style:name="T159" style:parent-style-name="Policepardéfaut" style:family="text">
      <style:text-properties style:font-name="Times New Roman" style:font-name-asian="Times New Roman" style:font-name-complex="Times New Roman" fo:color="#000000"/>
    </style:style>
    <style:style style:name="T160" style:parent-style-name="Policepardéfaut" style:family="text">
      <style:text-properties style:font-name="Times New Roman" style:font-name-asian="Times New Roman" style:font-name-complex="Times New Roman" fo:color="#000000" fo:letter-spacing="-0.0006in"/>
    </style:style>
    <style:style style:name="T161" style:parent-style-name="Policepardéfaut" style:family="text">
      <style:text-properties style:font-name="Times New Roman" style:font-name-asian="Times New Roman" style:font-name-complex="Times New Roman" fo:color="#000000"/>
    </style:style>
    <style:style style:name="T162" style:parent-style-name="Policepardéfaut" style:family="text">
      <style:text-properties style:font-name="Times New Roman" style:font-name-asian="Times New Roman" style:font-name-complex="Times New Roman" fo:color="#000000" fo:letter-spacing="0.0006in"/>
    </style:style>
    <style:style style:name="T163" style:parent-style-name="Policepardéfaut" style:family="text">
      <style:text-properties style:font-name="Times New Roman" style:font-name-asian="Times New Roman" style:font-name-complex="Times New Roman" fo:color="#000000"/>
    </style:style>
    <style:style style:name="T164" style:parent-style-name="Policepardéfaut" style:family="text">
      <style:text-properties style:font-name="Times New Roman" style:font-name-asian="Times New Roman" style:font-name-complex="Times New Roman" fo:color="#000000" fo:letter-spacing="0.0013in"/>
    </style:style>
    <style:style style:name="T165" style:parent-style-name="Policepardéfaut" style:family="text">
      <style:text-properties style:font-name="Times New Roman" style:font-name-asian="Times New Roman" style:font-name-complex="Times New Roman" fo:color="#000000"/>
    </style:style>
    <style:style style:name="T166" style:parent-style-name="Policepardéfaut" style:family="text">
      <style:text-properties style:font-name="Times New Roman" style:font-name-asian="Times New Roman" style:font-name-complex="Times New Roman" fo:color="#000000" fo:letter-spacing="-0.0006in"/>
    </style:style>
    <style:style style:name="T167" style:parent-style-name="Policepardéfaut" style:family="text">
      <style:text-properties style:font-name="Times New Roman" style:font-name-asian="Times New Roman" style:font-name-complex="Times New Roman" fo:color="#000000"/>
    </style:style>
    <style:style style:name="T168" style:parent-style-name="Policepardéfaut" style:family="text">
      <style:text-properties style:font-name="Times New Roman" style:font-name-asian="Times New Roman" style:font-name-complex="Times New Roman" fo:color="#000000" fo:letter-spacing="0.0027in"/>
    </style:style>
    <style:style style:name="T169" style:parent-style-name="Policepardéfaut" style:family="text">
      <style:text-properties style:font-name="Times New Roman" style:font-name-asian="Times New Roman" style:font-name-complex="Times New Roman" fo:color="#000000"/>
    </style:style>
    <style:style style:name="P170" style:parent-style-name="Normal" style:family="paragraph">
      <style:paragraph-properties fo:text-align="justify" fo:line-height="0.1666in"/>
      <style:text-properties style:font-name="Times New Roman" style:font-name-asian="Times New Roman" style:font-name-complex="Times New Roman"/>
    </style:style>
    <style:style style:name="P171" style:parent-style-name="Normal" style:family="paragraph">
      <style:paragraph-properties fo:text-align="justify" fo:line-height="0.1666in"/>
      <style:text-properties style:font-name="Times New Roman" style:font-name-asian="Times New Roman" style:font-name-complex="Times New Roman"/>
    </style:style>
    <style:style style:name="P172" style:parent-style-name="Normal" style:family="paragraph">
      <style:paragraph-properties fo:text-align="justify" fo:line-height="0.0972in"/>
      <style:text-properties style:font-name="Times New Roman" style:font-name-asian="Times New Roman" style:font-name-complex="Times New Roman" fo:font-size="7pt" style:font-size-asian="7pt" style:font-size-complex="7pt"/>
    </style:style>
    <style:style style:name="P173" style:parent-style-name="Normal" style:family="paragraph">
      <style:paragraph-properties fo:widows="0" fo:orphans="0" fo:text-align="justify" fo:line-height="107%" fo:margin-right="0.7937in"/>
    </style:style>
    <style:style style:name="T174" style:parent-style-name="Policepardéfaut" style:family="text">
      <style:text-properties style:font-name="Times New Roman" style:font-name-asian="Times New Roman" style:font-name-complex="Times New Roman" fo:color="#000000"/>
    </style:style>
    <style:style style:name="T175" style:parent-style-name="Policepardéfaut" style:family="text">
      <style:text-properties style:font-name="Times New Roman" style:font-name-asian="Times New Roman" style:font-name-complex="Times New Roman" fo:color="#000000" fo:letter-spacing="-0.0006in"/>
    </style:style>
    <style:style style:name="T176" style:parent-style-name="Policepardéfaut" style:family="text">
      <style:text-properties style:font-name="Times New Roman" style:font-name-asian="Times New Roman" style:font-name-complex="Times New Roman" fo:color="#000000"/>
    </style:style>
    <style:style style:name="T177" style:parent-style-name="Policepardéfaut" style:family="text">
      <style:text-properties style:font-name="Times New Roman" style:font-name-asian="Times New Roman" style:font-name-complex="Times New Roman" fo:color="#000000" fo:letter-spacing="0.0013in"/>
    </style:style>
    <style:style style:name="T178" style:parent-style-name="Policepardéfaut" style:family="text">
      <style:text-properties style:font-name="Times New Roman" style:font-name-asian="Times New Roman" style:font-name-complex="Times New Roman" fo:color="#000000"/>
    </style:style>
    <style:style style:name="T179" style:parent-style-name="Policepardéfaut" style:family="text">
      <style:text-properties style:font-name="Times New Roman" style:font-name-asian="Times New Roman" style:font-name-complex="Times New Roman" fo:color="#000000" fo:letter-spacing="-0.0006in"/>
    </style:style>
    <style:style style:name="T180" style:parent-style-name="Policepardéfaut" style:family="text">
      <style:text-properties style:font-name="Times New Roman" style:font-name-asian="Times New Roman" style:font-name-complex="Times New Roman" fo:color="#000000"/>
    </style:style>
    <style:style style:name="T181" style:parent-style-name="Policepardéfaut" style:family="text">
      <style:text-properties style:font-name="Times New Roman" style:font-name-asian="Times New Roman" style:font-name-complex="Times New Roman" fo:color="#000000" fo:letter-spacing="0.0006in"/>
    </style:style>
    <style:style style:name="T182" style:parent-style-name="Policepardéfaut" style:family="text">
      <style:text-properties style:font-name="Times New Roman" style:font-name-asian="Times New Roman" style:font-name-complex="Times New Roman" fo:color="#000000"/>
    </style:style>
    <style:style style:name="T183" style:parent-style-name="Policepardéfaut" style:family="text">
      <style:text-properties style:font-name="Times New Roman" style:font-name-asian="Times New Roman" style:font-name-complex="Times New Roman" fo:color="#000000" fo:letter-spacing="0.0006in"/>
    </style:style>
    <style:style style:name="T184" style:parent-style-name="Policepardéfaut" style:family="text">
      <style:text-properties style:font-name="Times New Roman" style:font-name-asian="Times New Roman" style:font-name-complex="Times New Roman" fo:color="#000000"/>
    </style:style>
    <style:style style:name="T185" style:parent-style-name="Policepardéfaut" style:family="text">
      <style:text-properties style:font-name="Times New Roman" style:font-name-asian="Times New Roman" style:font-name-complex="Times New Roman" fo:color="#000000" fo:letter-spacing="-0.0006in"/>
    </style:style>
    <style:style style:name="T186" style:parent-style-name="Policepardéfaut" style:family="text">
      <style:text-properties style:font-name="Times New Roman" style:font-name-asian="Times New Roman" style:font-name-complex="Times New Roman" fo:color="#000000"/>
    </style:style>
    <style:style style:name="T187" style:parent-style-name="Policepardéfaut" style:family="text">
      <style:text-properties style:font-name="Times New Roman" style:font-name-asian="Times New Roman" style:font-name-complex="Times New Roman" fo:color="#000000"/>
    </style:style>
    <style:style style:name="T188" style:parent-style-name="Policepardéfaut" style:family="text">
      <style:text-properties style:font-name="Times New Roman" style:font-name-asian="Times New Roman" style:font-name-complex="Times New Roman" fo:color="#000000"/>
    </style:style>
    <style:style style:name="T189" style:parent-style-name="Policepardéfaut" style:family="text">
      <style:text-properties style:font-name="Times New Roman" style:font-name-asian="Times New Roman" style:font-name-complex="Times New Roman" fo:color="#000000" fo:letter-spacing="0.0006in"/>
    </style:style>
    <style:style style:name="T190" style:parent-style-name="Policepardéfaut" style:family="text">
      <style:text-properties style:font-name="Times New Roman" style:font-name-asian="Times New Roman" style:font-name-complex="Times New Roman" fo:color="#000000"/>
    </style:style>
    <style:style style:name="T191" style:parent-style-name="Policepardéfaut" style:family="text">
      <style:text-properties style:font-name="Times New Roman" style:font-name-asian="Times New Roman" style:font-name-complex="Times New Roman" fo:color="#000000" fo:letter-spacing="-0.0006in"/>
    </style:style>
    <style:style style:name="T192" style:parent-style-name="Policepardéfaut" style:family="text">
      <style:text-properties style:font-name="Times New Roman" style:font-name-asian="Times New Roman" style:font-name-complex="Times New Roman" fo:color="#000000" fo:letter-spacing="0.0006in"/>
    </style:style>
    <style:style style:name="T193" style:parent-style-name="Policepardéfaut" style:family="text">
      <style:text-properties style:font-name="Times New Roman" style:font-name-asian="Times New Roman" style:font-name-complex="Times New Roman" fo:color="#000000"/>
    </style:style>
    <style:style style:name="T194" style:parent-style-name="Policepardéfaut" style:family="text">
      <style:text-properties style:font-name="Times New Roman" style:font-name-asian="Times New Roman" style:font-name-complex="Times New Roman" fo:color="#000000" fo:letter-spacing="-0.0006in"/>
    </style:style>
    <style:style style:name="T195" style:parent-style-name="Policepardéfaut" style:family="text">
      <style:text-properties style:font-name="Times New Roman" style:font-name-asian="Times New Roman" style:font-name-complex="Times New Roman" fo:color="#000000"/>
    </style:style>
    <style:style style:name="T196" style:parent-style-name="Policepardéfaut" style:family="text">
      <style:text-properties style:font-name="Times New Roman" style:font-name-asian="Times New Roman" style:font-name-complex="Times New Roman" fo:color="#000000" fo:letter-spacing="-0.0006in"/>
    </style:style>
    <style:style style:name="T197" style:parent-style-name="Policepardéfaut" style:family="text">
      <style:text-properties style:font-name="Times New Roman" style:font-name-asian="Times New Roman" style:font-name-complex="Times New Roman" fo:color="#000000"/>
    </style:style>
    <style:style style:name="T198" style:parent-style-name="Policepardéfaut" style:family="text">
      <style:text-properties style:font-name="Times New Roman" style:font-name-asian="Times New Roman" style:font-name-complex="Times New Roman" fo:color="#000000" fo:letter-spacing="0.0013in"/>
    </style:style>
    <style:style style:name="T199" style:parent-style-name="Policepardéfaut" style:family="text">
      <style:text-properties style:font-name="Times New Roman" style:font-name-asian="Times New Roman" style:font-name-complex="Times New Roman" fo:color="#000000"/>
    </style:style>
    <style:style style:name="T200" style:parent-style-name="Policepardéfaut" style:family="text">
      <style:text-properties style:font-name="Times New Roman" style:font-name-asian="Times New Roman" style:font-name-complex="Times New Roman" fo:color="#000000" fo:letter-spacing="-0.0006in"/>
    </style:style>
    <style:style style:name="T201" style:parent-style-name="Policepardéfaut" style:family="text">
      <style:text-properties style:font-name="Times New Roman" style:font-name-asian="Times New Roman" style:font-name-complex="Times New Roman" fo:color="#000000" fo:letter-spacing="0.0013in"/>
    </style:style>
    <style:style style:name="T202" style:parent-style-name="Policepardéfaut" style:family="text">
      <style:text-properties style:font-name="Times New Roman" style:font-name-asian="Times New Roman" style:font-name-complex="Times New Roman" fo:color="#000000"/>
    </style:style>
    <style:style style:name="T203" style:parent-style-name="Policepardéfaut" style:family="text">
      <style:text-properties style:font-name="Times New Roman" style:font-name-asian="Times New Roman" style:font-name-complex="Times New Roman" fo:color="#000000" fo:letter-spacing="-0.0013in"/>
    </style:style>
    <style:style style:name="T204" style:parent-style-name="Policepardéfaut" style:family="text">
      <style:text-properties style:font-name="Times New Roman" style:font-name-asian="Times New Roman" style:font-name-complex="Times New Roman" fo:color="#000000" fo:letter-spacing="-0.0006in"/>
    </style:style>
    <style:style style:name="T205" style:parent-style-name="Policepardéfaut" style:family="text">
      <style:text-properties style:font-name="Times New Roman" style:font-name-asian="Times New Roman" style:font-name-complex="Times New Roman" fo:color="#000000"/>
    </style:style>
    <style:style style:name="T206" style:parent-style-name="Policepardéfaut" style:family="text">
      <style:text-properties style:font-name="Times New Roman" style:font-name-asian="Times New Roman" style:font-name-complex="Times New Roman" fo:color="#000000" fo:letter-spacing="0.0006in"/>
    </style:style>
    <style:style style:name="T207" style:parent-style-name="Policepardéfaut" style:family="text">
      <style:text-properties style:font-name="Times New Roman" style:font-name-asian="Times New Roman" style:font-name-complex="Times New Roman" fo:color="#000000"/>
    </style:style>
    <style:style style:name="T208" style:parent-style-name="Policepardéfaut" style:family="text">
      <style:text-properties style:font-name="Times New Roman" style:font-name-asian="Times New Roman" style:font-name-complex="Times New Roman" fo:color="#000000" fo:letter-spacing="0.0006in"/>
    </style:style>
    <style:style style:name="T209" style:parent-style-name="Policepardéfaut" style:family="text">
      <style:text-properties style:font-name="Times New Roman" style:font-name-asian="Times New Roman" style:font-name-complex="Times New Roman" fo:color="#000000"/>
    </style:style>
    <style:style style:name="T210" style:parent-style-name="Policepardéfaut" style:family="text">
      <style:text-properties style:font-name="Times New Roman" style:font-name-asian="Times New Roman" style:font-name-complex="Times New Roman" fo:color="#000000" fo:letter-spacing="-0.0013in"/>
    </style:style>
    <style:style style:name="T211" style:parent-style-name="Policepardéfaut" style:family="text">
      <style:text-properties style:font-name="Times New Roman" style:font-name-asian="Times New Roman" style:font-name-complex="Times New Roman" fo:color="#000000"/>
    </style:style>
    <style:style style:name="T212" style:parent-style-name="Policepardéfaut" style:family="text">
      <style:text-properties style:font-name="Times New Roman" style:font-name-asian="Times New Roman" style:font-name-complex="Times New Roman" fo:color="#000000" fo:letter-spacing="0.0006in"/>
    </style:style>
    <style:style style:name="T213" style:parent-style-name="Policepardéfaut" style:family="text">
      <style:text-properties style:font-name="Times New Roman" style:font-name-asian="Times New Roman" style:font-name-complex="Times New Roman" fo:color="#000000"/>
    </style:style>
    <style:style style:name="T214" style:parent-style-name="Policepardéfaut" style:family="text">
      <style:text-properties style:font-name="Times New Roman" style:font-name-asian="Times New Roman" style:font-name-complex="Times New Roman" fo:color="#000000" fo:letter-spacing="-0.0006in"/>
    </style:style>
    <style:style style:name="T215" style:parent-style-name="Policepardéfaut" style:family="text">
      <style:text-properties style:font-name="Times New Roman" style:font-name-asian="Times New Roman" style:font-name-complex="Times New Roman" fo:color="#000000" fo:letter-spacing="-0.0013in"/>
    </style:style>
    <style:style style:name="T216" style:parent-style-name="Policepardéfaut" style:family="text">
      <style:text-properties style:font-name="Times New Roman" style:font-name-asian="Times New Roman" style:font-name-complex="Times New Roman" fo:color="#000000"/>
    </style:style>
    <style:style style:name="T217" style:parent-style-name="Policepardéfaut" style:family="text">
      <style:text-properties style:font-name="Times New Roman" style:font-name-asian="Times New Roman" style:font-name-complex="Times New Roman" fo:color="#000000" fo:letter-spacing="-0.0006in"/>
    </style:style>
    <style:style style:name="T218" style:parent-style-name="Policepardéfaut" style:family="text">
      <style:text-properties style:font-name="Times New Roman" style:font-name-asian="Times New Roman" style:font-name-complex="Times New Roman" fo:color="#000000"/>
    </style:style>
    <style:style style:name="P219" style:parent-style-name="Normal" style:family="paragraph">
      <style:paragraph-properties fo:text-align="justify" fo:line-height="0.1666in"/>
      <style:text-properties style:font-name="Times New Roman" style:font-name-asian="Times New Roman" style:font-name-complex="Times New Roman"/>
    </style:style>
    <style:style style:name="P220" style:parent-style-name="Normal" style:family="paragraph">
      <style:paragraph-properties fo:text-align="justify" fo:line-height="0.1666in"/>
      <style:text-properties style:font-name="Times New Roman" style:font-name-asian="Times New Roman" style:font-name-complex="Times New Roman"/>
    </style:style>
    <style:style style:name="P221" style:parent-style-name="Normal" style:family="paragraph">
      <style:paragraph-properties fo:text-align="justify" fo:margin-bottom="0.0131in" fo:line-height="0.0833in"/>
      <style:text-properties style:font-name="Times New Roman" style:font-name-asian="Times New Roman" style:font-name-complex="Times New Roman" fo:font-size="6pt" style:font-size-asian="6pt" style:font-size-complex="6pt"/>
    </style:style>
    <style:style style:name="P222" style:parent-style-name="Normal" style:family="paragraph">
      <style:paragraph-properties fo:widows="0" fo:orphans="0" fo:text-align="justify" fo:line-height="107%" fo:margin-right="0.5673in"/>
    </style:style>
    <style:style style:name="T223" style:parent-style-name="Policepardéfaut" style:family="text">
      <style:text-properties style:font-name="Times New Roman" style:font-name-asian="Times New Roman" style:font-name-complex="Times New Roman" fo:color="#000000"/>
    </style:style>
    <style:style style:name="T224" style:parent-style-name="Policepardéfaut" style:family="text">
      <style:text-properties style:font-name="Times New Roman" style:font-name-asian="Times New Roman" style:font-name-complex="Times New Roman" fo:color="#000000" fo:letter-spacing="-0.0013in"/>
    </style:style>
    <style:style style:name="T225" style:parent-style-name="Policepardéfaut" style:family="text">
      <style:text-properties style:font-name="Times New Roman" style:font-name-asian="Times New Roman" style:font-name-complex="Times New Roman" fo:color="#000000"/>
    </style:style>
    <style:style style:name="T226" style:parent-style-name="Policepardéfaut" style:family="text">
      <style:text-properties style:font-name="Times New Roman" style:font-name-asian="Times New Roman" style:font-name-complex="Times New Roman" fo:color="#000000" fo:letter-spacing="0.0006in"/>
    </style:style>
    <style:style style:name="T227" style:parent-style-name="Policepardéfaut" style:family="text">
      <style:text-properties style:font-name="Times New Roman" style:font-name-asian="Times New Roman" style:font-name-complex="Times New Roman" fo:color="#000000"/>
    </style:style>
    <style:style style:name="T228" style:parent-style-name="Policepardéfaut" style:family="text">
      <style:text-properties style:font-name="Times New Roman" style:font-name-asian="Times New Roman" style:font-name-complex="Times New Roman" fo:color="#000000" fo:letter-spacing="-0.0006in"/>
    </style:style>
    <style:style style:name="T229" style:parent-style-name="Policepardéfaut" style:family="text">
      <style:text-properties style:font-name="Times New Roman" style:font-name-asian="Times New Roman" style:font-name-complex="Times New Roman" fo:color="#000000" fo:letter-spacing="0.0013in"/>
    </style:style>
    <style:style style:name="T230" style:parent-style-name="Policepardéfaut" style:family="text">
      <style:text-properties style:font-name="Times New Roman" style:font-name-asian="Times New Roman" style:font-name-complex="Times New Roman" fo:color="#000000"/>
    </style:style>
    <style:style style:name="T231" style:parent-style-name="Policepardéfaut" style:family="text">
      <style:text-properties style:font-name="Times New Roman" style:font-name-asian="Times New Roman" style:font-name-complex="Times New Roman" fo:color="#000000" fo:letter-spacing="0.0006in"/>
    </style:style>
    <style:style style:name="T232" style:parent-style-name="Policepardéfaut" style:family="text">
      <style:text-properties style:font-name="Times New Roman" style:font-name-asian="Times New Roman" style:font-name-complex="Times New Roman" fo:color="#000000"/>
    </style:style>
    <style:style style:name="T233" style:parent-style-name="Policepardéfaut" style:family="text">
      <style:text-properties style:font-name="Times New Roman" style:font-name-asian="Times New Roman" style:font-name-complex="Times New Roman" fo:color="#000000" fo:letter-spacing="-0.0006in"/>
    </style:style>
    <style:style style:name="T234" style:parent-style-name="Policepardéfaut" style:family="text">
      <style:text-properties style:font-name="Times New Roman" style:font-name-asian="Times New Roman" style:font-name-complex="Times New Roman" fo:color="#000000"/>
    </style:style>
    <style:style style:name="T235" style:parent-style-name="Policepardéfaut" style:family="text">
      <style:text-properties style:font-name="Times New Roman" style:font-name-asian="Times New Roman" style:font-name-complex="Times New Roman" fo:color="#000000" fo:letter-spacing="-0.0006in"/>
    </style:style>
    <style:style style:name="T236" style:parent-style-name="Policepardéfaut" style:family="text">
      <style:text-properties style:font-name="Times New Roman" style:font-name-asian="Times New Roman" style:font-name-complex="Times New Roman" fo:color="#000000" fo:letter-spacing="0.0013in"/>
    </style:style>
    <style:style style:name="T237" style:parent-style-name="Policepardéfaut" style:family="text">
      <style:text-properties style:font-name="Times New Roman" style:font-name-asian="Times New Roman" style:font-name-complex="Times New Roman" fo:color="#000000"/>
    </style:style>
    <style:style style:name="T238" style:parent-style-name="Policepardéfaut" style:family="text">
      <style:text-properties style:font-name="Times New Roman" style:font-name-asian="Times New Roman" style:font-name-complex="Times New Roman" fo:color="#000000" fo:letter-spacing="0.0013in"/>
    </style:style>
    <style:style style:name="T239" style:parent-style-name="Policepardéfaut" style:family="text">
      <style:text-properties style:font-name="Times New Roman" style:font-name-asian="Times New Roman" style:font-name-complex="Times New Roman" fo:color="#000000"/>
    </style:style>
    <style:style style:name="T240" style:parent-style-name="Policepardéfaut" style:family="text">
      <style:text-properties style:font-name="Times New Roman" style:font-name-asian="Times New Roman" style:font-name-complex="Times New Roman" fo:color="#000000" fo:letter-spacing="-0.0006in"/>
    </style:style>
    <style:style style:name="T241" style:parent-style-name="Policepardéfaut" style:family="text">
      <style:text-properties style:font-name="Times New Roman" style:font-name-asian="Times New Roman" style:font-name-complex="Times New Roman" fo:color="#000000"/>
    </style:style>
    <style:style style:name="T242" style:parent-style-name="Policepardéfaut" style:family="text">
      <style:text-properties style:font-name="Times New Roman" style:font-name-asian="Times New Roman" style:font-name-complex="Times New Roman" fo:color="#000000" fo:letter-spacing="0.0006in"/>
    </style:style>
    <style:style style:name="T243" style:parent-style-name="Policepardéfaut" style:family="text">
      <style:text-properties style:font-name="Times New Roman" style:font-name-asian="Times New Roman" style:font-name-complex="Times New Roman" fo:color="#000000"/>
    </style:style>
    <style:style style:name="T244" style:parent-style-name="Policepardéfaut" style:family="text">
      <style:text-properties style:font-name="Times New Roman" style:font-name-asian="Times New Roman" style:font-name-complex="Times New Roman" fo:color="#000000" fo:letter-spacing="0.0006in"/>
    </style:style>
    <style:style style:name="T245" style:parent-style-name="Policepardéfaut" style:family="text">
      <style:text-properties style:font-name="Times New Roman" style:font-name-asian="Times New Roman" style:font-name-complex="Times New Roman" fo:color="#000000"/>
    </style:style>
    <style:style style:name="T246" style:parent-style-name="Policepardéfaut" style:family="text">
      <style:text-properties style:font-name="Times New Roman" style:font-name-asian="Times New Roman" style:font-name-complex="Times New Roman" fo:color="#000000" fo:letter-spacing="-0.0006in"/>
    </style:style>
    <style:style style:name="T247" style:parent-style-name="Policepardéfaut" style:family="text">
      <style:text-properties style:font-name="Times New Roman" style:font-name-asian="Times New Roman" style:font-name-complex="Times New Roman" fo:color="#000000"/>
    </style:style>
    <style:style style:name="T248" style:parent-style-name="Policepardéfaut" style:family="text">
      <style:text-properties style:font-name="Times New Roman" style:font-name-asian="Times New Roman" style:font-name-complex="Times New Roman" fo:color="#000000" fo:letter-spacing="0.0006in"/>
    </style:style>
    <style:style style:name="T249" style:parent-style-name="Policepardéfaut" style:family="text">
      <style:text-properties style:font-name="Times New Roman" style:font-name-asian="Times New Roman" style:font-name-complex="Times New Roman" fo:color="#000000"/>
    </style:style>
    <style:style style:name="T250" style:parent-style-name="Policepardéfaut" style:family="text">
      <style:text-properties style:font-name="Times New Roman" style:font-name-asian="Times New Roman" style:font-name-complex="Times New Roman" fo:color="#000000" fo:letter-spacing="-0.0006in"/>
    </style:style>
    <style:style style:name="T251" style:parent-style-name="Policepardéfaut" style:family="text">
      <style:text-properties style:font-name="Times New Roman" style:font-name-asian="Times New Roman" style:font-name-complex="Times New Roman" fo:color="#000000"/>
    </style:style>
    <style:style style:name="T252" style:parent-style-name="Policepardéfaut" style:family="text">
      <style:text-properties style:font-name="Times New Roman" style:font-name-asian="Times New Roman" style:font-name-complex="Times New Roman" fo:color="#000000" fo:letter-spacing="0.0013in"/>
    </style:style>
    <style:style style:name="T253" style:parent-style-name="Policepardéfaut" style:family="text">
      <style:text-properties style:font-name="Times New Roman" style:font-name-asian="Times New Roman" style:font-name-complex="Times New Roman" fo:color="#000000" fo:letter-spacing="0.0006in"/>
    </style:style>
    <style:style style:name="T254" style:parent-style-name="Policepardéfaut" style:family="text">
      <style:text-properties style:font-name="Times New Roman" style:font-name-asian="Times New Roman" style:font-name-complex="Times New Roman" fo:color="#000000"/>
    </style:style>
    <style:style style:name="T255" style:parent-style-name="Policepardéfaut" style:family="text">
      <style:text-properties style:font-name="Times New Roman" style:font-name-asian="Times New Roman" style:font-name-complex="Times New Roman" fo:color="#000000" fo:letter-spacing="0.0006in"/>
    </style:style>
    <style:style style:name="T256" style:parent-style-name="Policepardéfaut" style:family="text">
      <style:text-properties style:font-name="Times New Roman" style:font-name-asian="Times New Roman" style:font-name-complex="Times New Roman" fo:color="#000000"/>
    </style:style>
    <style:style style:name="T257" style:parent-style-name="Policepardéfaut" style:family="text">
      <style:text-properties style:font-name="Times New Roman" style:font-name-asian="Times New Roman" style:font-name-complex="Times New Roman" fo:color="#000000" fo:letter-spacing="-0.0006in"/>
    </style:style>
    <style:style style:name="T258" style:parent-style-name="Policepardéfaut" style:family="text">
      <style:text-properties style:font-name="Times New Roman" style:font-name-asian="Times New Roman" style:font-name-complex="Times New Roman" fo:color="#000000"/>
    </style:style>
    <style:style style:name="T259" style:parent-style-name="Policepardéfaut" style:family="text">
      <style:text-properties style:font-name="Times New Roman" style:font-name-asian="Times New Roman" style:font-name-complex="Times New Roman" fo:color="#000000" fo:letter-spacing="-0.0006in"/>
    </style:style>
    <style:style style:name="T260" style:parent-style-name="Policepardéfaut" style:family="text">
      <style:text-properties style:font-name="Times New Roman" style:font-name-asian="Times New Roman" style:font-name-complex="Times New Roman" fo:color="#000000"/>
    </style:style>
    <style:style style:name="T261" style:parent-style-name="Policepardéfaut" style:family="text">
      <style:text-properties style:font-name="Times New Roman" style:font-name-asian="Times New Roman" style:font-name-complex="Times New Roman" fo:color="#000000" fo:letter-spacing="0.0006in"/>
    </style:style>
    <style:style style:name="T262" style:parent-style-name="Policepardéfaut" style:family="text">
      <style:text-properties style:font-name="Times New Roman" style:font-name-asian="Times New Roman" style:font-name-complex="Times New Roman" fo:color="#000000"/>
    </style:style>
    <style:style style:name="T263" style:parent-style-name="Policepardéfaut" style:family="text">
      <style:text-properties style:font-name="Times New Roman" style:font-name-asian="Times New Roman" style:font-name-complex="Times New Roman" fo:color="#000000" fo:letter-spacing="0.0006in"/>
    </style:style>
    <style:style style:name="T264" style:parent-style-name="Policepardéfaut" style:family="text">
      <style:text-properties style:font-name="Times New Roman" style:font-name-asian="Times New Roman" style:font-name-complex="Times New Roman" fo:color="#000000"/>
    </style:style>
    <style:style style:name="T265" style:parent-style-name="Policepardéfaut" style:family="text">
      <style:text-properties style:font-name="Times New Roman" style:font-name-asian="Times New Roman" style:font-name-complex="Times New Roman" fo:color="#000000" fo:letter-spacing="0.0013in"/>
    </style:style>
    <style:style style:name="T266" style:parent-style-name="Policepardéfaut" style:family="text">
      <style:text-properties style:font-name="Times New Roman" style:font-name-asian="Times New Roman" style:font-name-complex="Times New Roman" fo:color="#000000"/>
    </style:style>
    <style:style style:name="T267" style:parent-style-name="Policepardéfaut" style:family="text">
      <style:text-properties style:font-name="Times New Roman" style:font-name-asian="Times New Roman" style:font-name-complex="Times New Roman" fo:color="#000000" fo:letter-spacing="0.0006in"/>
    </style:style>
    <style:style style:name="T268" style:parent-style-name="Policepardéfaut" style:family="text">
      <style:text-properties style:font-name="Times New Roman" style:font-name-asian="Times New Roman" style:font-name-complex="Times New Roman" fo:color="#000000"/>
    </style:style>
    <style:style style:name="T269" style:parent-style-name="Policepardéfaut" style:family="text">
      <style:text-properties style:font-name="Times New Roman" style:font-name-asian="Times New Roman" style:font-name-complex="Times New Roman" fo:color="#000000" fo:letter-spacing="-0.0006in"/>
    </style:style>
    <style:style style:name="T270" style:parent-style-name="Policepardéfaut" style:family="text">
      <style:text-properties style:font-name="Times New Roman" style:font-name-asian="Times New Roman" style:font-name-complex="Times New Roman" fo:color="#000000"/>
    </style:style>
    <style:style style:name="T271" style:parent-style-name="Policepardéfaut" style:family="text">
      <style:text-properties style:font-name="Times New Roman" style:font-name-asian="Times New Roman" style:font-name-complex="Times New Roman" fo:color="#000000" fo:letter-spacing="-0.0006in"/>
    </style:style>
    <style:style style:name="T272" style:parent-style-name="Policepardéfaut" style:family="text">
      <style:text-properties style:font-name="Times New Roman" style:font-name-asian="Times New Roman" style:font-name-complex="Times New Roman" fo:color="#000000"/>
    </style:style>
    <style:style style:name="T273" style:parent-style-name="Policepardéfaut" style:family="text">
      <style:text-properties style:font-name="Times New Roman" style:font-name-asian="Times New Roman" style:font-name-complex="Times New Roman" fo:color="#000000" fo:letter-spacing="-0.0006in"/>
    </style:style>
    <style:style style:name="T274" style:parent-style-name="Policepardéfaut" style:family="text">
      <style:text-properties style:font-name="Times New Roman" style:font-name-asian="Times New Roman" style:font-name-complex="Times New Roman" fo:color="#000000"/>
    </style:style>
    <style:style style:name="T275" style:parent-style-name="Policepardéfaut" style:family="text">
      <style:text-properties style:font-name="Times New Roman" style:font-name-asian="Times New Roman" style:font-name-complex="Times New Roman" fo:color="#000000" fo:letter-spacing="0.0013in"/>
    </style:style>
    <style:style style:name="T276" style:parent-style-name="Policepardéfaut" style:family="text">
      <style:text-properties style:font-name="Times New Roman" style:font-name-asian="Times New Roman" style:font-name-complex="Times New Roman" fo:color="#000000"/>
    </style:style>
    <style:style style:name="T277" style:parent-style-name="Policepardéfaut" style:family="text">
      <style:text-properties style:font-name="Times New Roman" style:font-name-asian="Times New Roman" style:font-name-complex="Times New Roman" fo:color="#000000" fo:letter-spacing="0.0013in"/>
    </style:style>
    <style:style style:name="T278" style:parent-style-name="Policepardéfaut" style:family="text">
      <style:text-properties style:font-name="Times New Roman" style:font-name-asian="Times New Roman" style:font-name-complex="Times New Roman" fo:color="#000000"/>
    </style:style>
    <style:style style:name="T279" style:parent-style-name="Policepardéfaut" style:family="text">
      <style:text-properties style:font-name="Times New Roman" style:font-name-asian="Times New Roman" style:font-name-complex="Times New Roman" fo:color="#000000" fo:letter-spacing="-0.0006in"/>
    </style:style>
    <style:style style:name="T280" style:parent-style-name="Policepardéfaut" style:family="text">
      <style:text-properties style:font-name="Times New Roman" style:font-name-asian="Times New Roman" style:font-name-complex="Times New Roman" fo:color="#000000"/>
    </style:style>
    <style:style style:name="T281" style:parent-style-name="Policepardéfaut" style:family="text">
      <style:text-properties style:font-name="Times New Roman" style:font-name-asian="Times New Roman" style:font-name-complex="Times New Roman" fo:color="#000000" fo:letter-spacing="0.0006in"/>
    </style:style>
    <style:style style:name="T282" style:parent-style-name="Policepardéfaut" style:family="text">
      <style:text-properties style:font-name="Times New Roman" style:font-name-asian="Times New Roman" style:font-name-complex="Times New Roman" fo:color="#000000"/>
    </style:style>
    <style:style style:name="T283" style:parent-style-name="Policepardéfaut" style:family="text">
      <style:text-properties style:font-name="Times New Roman" style:font-name-asian="Times New Roman" style:font-name-complex="Times New Roman" fo:color="#000000" fo:letter-spacing="0.0006in"/>
    </style:style>
    <style:style style:name="T284" style:parent-style-name="Policepardéfaut" style:family="text">
      <style:text-properties style:font-name="Times New Roman" style:font-name-asian="Times New Roman" style:font-name-complex="Times New Roman" fo:color="#000000"/>
    </style:style>
    <style:style style:name="T285" style:parent-style-name="Policepardéfaut" style:family="text">
      <style:text-properties style:font-name="Times New Roman" style:font-name-asian="Times New Roman" style:font-name-complex="Times New Roman" fo:color="#000000" fo:letter-spacing="-0.0006in"/>
    </style:style>
    <style:style style:name="T286" style:parent-style-name="Policepardéfaut" style:family="text">
      <style:text-properties style:font-name="Times New Roman" style:font-name-asian="Times New Roman" style:font-name-complex="Times New Roman" fo:color="#000000"/>
    </style:style>
    <style:style style:name="P287" style:parent-style-name="Normal" style:family="paragraph">
      <style:paragraph-properties fo:text-align="justify" fo:line-height="0.1666in"/>
      <style:text-properties style:font-name="Times New Roman" style:font-name-asian="Times New Roman" style:font-name-complex="Times New Roman"/>
    </style:style>
    <style:style style:name="P288" style:parent-style-name="Normal" style:family="paragraph">
      <style:paragraph-properties fo:text-align="justify" fo:line-height="0.1666in"/>
      <style:text-properties style:font-name="Times New Roman" style:font-name-asian="Times New Roman" style:font-name-complex="Times New Roman"/>
    </style:style>
    <style:style style:name="P289" style:parent-style-name="Normal" style:family="paragraph">
      <style:paragraph-properties fo:text-align="justify" fo:margin-bottom="0.0118in" fo:line-height="0.0833in"/>
      <style:text-properties style:font-name="Times New Roman" style:font-name-asian="Times New Roman" style:font-name-complex="Times New Roman" fo:font-size="6pt" style:font-size-asian="6pt" style:font-size-complex="6pt"/>
    </style:style>
    <style:style style:name="P290" style:parent-style-name="Normal" style:family="paragraph">
      <style:paragraph-properties fo:widows="0" fo:orphans="0" fo:text-align="justify" fo:margin-right="0.4812in"/>
    </style:style>
    <style:style style:name="T291" style:parent-style-name="Policepardéfaut" style:family="text">
      <style:text-properties style:font-name="Times New Roman" style:font-name-asian="Times New Roman" style:font-name-complex="Times New Roman" fo:color="#000000"/>
    </style:style>
    <style:style style:name="T292" style:parent-style-name="Policepardéfaut" style:family="text">
      <style:text-properties style:font-name="Times New Roman" style:font-name-asian="Times New Roman" style:font-name-complex="Times New Roman" fo:color="#000000" fo:letter-spacing="-0.0006in"/>
    </style:style>
    <style:style style:name="T293" style:parent-style-name="Policepardéfaut" style:family="text">
      <style:text-properties style:font-name="Times New Roman" style:font-name-asian="Times New Roman" style:font-name-complex="Times New Roman" fo:color="#000000"/>
    </style:style>
    <style:style style:name="T294" style:parent-style-name="Policepardéfaut" style:family="text">
      <style:text-properties style:font-name="Times New Roman" style:font-name-asian="Times New Roman" style:font-name-complex="Times New Roman" fo:color="#000000" fo:letter-spacing="-0.0006in"/>
    </style:style>
    <style:style style:name="T295" style:parent-style-name="Policepardéfaut" style:family="text">
      <style:text-properties style:font-name="Times New Roman" style:font-name-asian="Times New Roman" style:font-name-complex="Times New Roman" fo:color="#000000"/>
    </style:style>
    <style:style style:name="T296" style:parent-style-name="Policepardéfaut" style:family="text">
      <style:text-properties style:font-name="Times New Roman" style:font-name-asian="Times New Roman" style:font-name-complex="Times New Roman" fo:color="#000000" fo:letter-spacing="0.0006in"/>
    </style:style>
    <style:style style:name="T297" style:parent-style-name="Policepardéfaut" style:family="text">
      <style:text-properties style:font-name="Times New Roman" style:font-name-asian="Times New Roman" style:font-name-complex="Times New Roman" fo:color="#000000"/>
    </style:style>
    <style:style style:name="T298" style:parent-style-name="Policepardéfaut" style:family="text">
      <style:text-properties style:font-name="Times New Roman" style:font-name-asian="Times New Roman" style:font-name-complex="Times New Roman" fo:color="#000000" fo:letter-spacing="0.0006in"/>
    </style:style>
    <style:style style:name="T299" style:parent-style-name="Policepardéfaut" style:family="text">
      <style:text-properties style:font-name="Times New Roman" style:font-name-asian="Times New Roman" style:font-name-complex="Times New Roman" fo:color="#000000"/>
    </style:style>
    <style:style style:name="T300" style:parent-style-name="Policepardéfaut" style:family="text">
      <style:text-properties style:font-name="Times New Roman" style:font-name-asian="Times New Roman" style:font-name-complex="Times New Roman" fo:color="#000000" fo:letter-spacing="-0.0006in"/>
    </style:style>
    <style:style style:name="T301" style:parent-style-name="Policepardéfaut" style:family="text">
      <style:text-properties style:font-name="Times New Roman" style:font-name-asian="Times New Roman" style:font-name-complex="Times New Roman" fo:color="#000000"/>
    </style:style>
    <style:style style:name="T302" style:parent-style-name="Policepardéfaut" style:family="text">
      <style:text-properties style:font-name="Times New Roman" style:font-name-asian="Times New Roman" style:font-name-complex="Times New Roman" fo:color="#000000" fo:letter-spacing="-0.0006in"/>
    </style:style>
    <style:style style:name="T303" style:parent-style-name="Policepardéfaut" style:family="text">
      <style:text-properties style:font-name="Times New Roman" style:font-name-asian="Times New Roman" style:font-name-complex="Times New Roman" fo:color="#000000"/>
    </style:style>
    <style:style style:name="T304" style:parent-style-name="Policepardéfaut" style:family="text">
      <style:text-properties style:font-name="Times New Roman" style:font-name-asian="Times New Roman" style:font-name-complex="Times New Roman" fo:color="#000000" fo:letter-spacing="0.0013in"/>
    </style:style>
    <style:style style:name="T305" style:parent-style-name="Policepardéfaut" style:family="text">
      <style:text-properties style:font-name="Times New Roman" style:font-name-asian="Times New Roman" style:font-name-complex="Times New Roman" fo:color="#000000"/>
    </style:style>
    <style:style style:name="T306" style:parent-style-name="Policepardéfaut" style:family="text">
      <style:text-properties style:font-name="Times New Roman" style:font-name-asian="Times New Roman" style:font-name-complex="Times New Roman" fo:color="#000000" fo:letter-spacing="0.0006in"/>
    </style:style>
    <style:style style:name="T307" style:parent-style-name="Policepardéfaut" style:family="text">
      <style:text-properties style:font-name="Times New Roman" style:font-name-asian="Times New Roman" style:font-name-complex="Times New Roman" fo:color="#000000"/>
    </style:style>
    <style:style style:name="T308" style:parent-style-name="Policepardéfaut" style:family="text">
      <style:text-properties style:font-name="Times New Roman" style:font-name-asian="Times New Roman" style:font-name-complex="Times New Roman" fo:color="#000000" fo:letter-spacing="-0.0006in"/>
    </style:style>
    <style:style style:name="T309" style:parent-style-name="Policepardéfaut" style:family="text">
      <style:text-properties style:font-name="Times New Roman" style:font-name-asian="Times New Roman" style:font-name-complex="Times New Roman" fo:color="#000000"/>
    </style:style>
    <style:style style:name="T310" style:parent-style-name="Policepardéfaut" style:family="text">
      <style:text-properties style:font-name="Times New Roman" style:font-name-asian="Times New Roman" style:font-name-complex="Times New Roman" fo:color="#000000" fo:letter-spacing="0.0006in"/>
    </style:style>
    <style:style style:name="T311" style:parent-style-name="Policepardéfaut" style:family="text">
      <style:text-properties style:font-name="Times New Roman" style:font-name-asian="Times New Roman" style:font-name-complex="Times New Roman" fo:color="#000000"/>
    </style:style>
    <style:style style:name="T312" style:parent-style-name="Policepardéfaut" style:family="text">
      <style:text-properties style:font-name="Times New Roman" style:font-name-asian="Times New Roman" style:font-name-complex="Times New Roman" fo:color="#000000" fo:letter-spacing="0.0006in"/>
    </style:style>
    <style:style style:name="T313" style:parent-style-name="Policepardéfaut" style:family="text">
      <style:text-properties style:font-name="Times New Roman" style:font-name-asian="Times New Roman" style:font-name-complex="Times New Roman" fo:color="#000000"/>
    </style:style>
    <style:style style:name="T314" style:parent-style-name="Policepardéfaut" style:family="text">
      <style:text-properties style:font-name="Times New Roman" style:font-name-asian="Times New Roman" style:font-name-complex="Times New Roman" fo:color="#000000" fo:letter-spacing="0.0006in"/>
    </style:style>
    <style:style style:name="T315" style:parent-style-name="Policepardéfaut" style:family="text">
      <style:text-properties style:font-name="Times New Roman" style:font-name-asian="Times New Roman" style:font-name-complex="Times New Roman" fo:color="#000000"/>
    </style:style>
    <style:style style:name="T316" style:parent-style-name="Policepardéfaut" style:family="text">
      <style:text-properties style:font-name="Times New Roman" style:font-name-asian="Times New Roman" style:font-name-complex="Times New Roman" fo:color="#000000" fo:letter-spacing="-0.0006in"/>
    </style:style>
    <style:style style:name="T317" style:parent-style-name="Policepardéfaut" style:family="text">
      <style:text-properties style:font-name="Times New Roman" style:font-name-asian="Times New Roman" style:font-name-complex="Times New Roman" fo:color="#000000"/>
    </style:style>
    <style:style style:name="T318" style:parent-style-name="Policepardéfaut" style:family="text">
      <style:text-properties style:font-name="Times New Roman" style:font-name-asian="Times New Roman" style:font-name-complex="Times New Roman" fo:color="#000000" fo:letter-spacing="-0.0006in"/>
    </style:style>
    <style:style style:name="T319" style:parent-style-name="Policepardéfaut" style:family="text">
      <style:text-properties style:font-name="Times New Roman" style:font-name-asian="Times New Roman" style:font-name-complex="Times New Roman" fo:color="#000000"/>
    </style:style>
    <style:style style:name="T320" style:parent-style-name="Policepardéfaut" style:family="text">
      <style:text-properties style:font-name="Times New Roman" style:font-name-asian="Times New Roman" style:font-name-complex="Times New Roman" fo:color="#000000" fo:letter-spacing="-0.0006in"/>
    </style:style>
    <style:style style:name="T321" style:parent-style-name="Policepardéfaut" style:family="text">
      <style:text-properties style:font-name="Times New Roman" style:font-name-asian="Times New Roman" style:font-name-complex="Times New Roman" fo:color="#000000"/>
    </style:style>
    <style:style style:name="T322" style:parent-style-name="Policepardéfaut" style:family="text">
      <style:text-properties style:font-name="Times New Roman" style:font-name-asian="Times New Roman" style:font-name-complex="Times New Roman" fo:color="#000000" fo:letter-spacing="0.0013in"/>
    </style:style>
    <style:style style:name="T323" style:parent-style-name="Policepardéfaut" style:family="text">
      <style:text-properties style:font-name="Times New Roman" style:font-name-asian="Times New Roman" style:font-name-complex="Times New Roman" fo:color="#000000"/>
    </style:style>
    <style:style style:name="T324" style:parent-style-name="Policepardéfaut" style:family="text">
      <style:text-properties style:font-name="Times New Roman" style:font-name-asian="Times New Roman" style:font-name-complex="Times New Roman" fo:color="#000000" fo:letter-spacing="0.0006in"/>
    </style:style>
    <style:style style:name="T325" style:parent-style-name="Policepardéfaut" style:family="text">
      <style:text-properties style:font-name="Times New Roman" style:font-name-asian="Times New Roman" style:font-name-complex="Times New Roman" fo:color="#000000"/>
    </style:style>
    <style:style style:name="T326" style:parent-style-name="Policepardéfaut" style:family="text">
      <style:text-properties style:font-name="Times New Roman" style:font-name-asian="Times New Roman" style:font-name-complex="Times New Roman" fo:color="#000000" fo:letter-spacing="0.0006in"/>
    </style:style>
    <style:style style:name="T327" style:parent-style-name="Policepardéfaut" style:family="text">
      <style:text-properties style:font-name="Times New Roman" style:font-name-asian="Times New Roman" style:font-name-complex="Times New Roman" fo:color="#000000"/>
    </style:style>
    <style:style style:name="T328" style:parent-style-name="Policepardéfaut" style:family="text">
      <style:text-properties style:font-name="Times New Roman" style:font-name-asian="Times New Roman" style:font-name-complex="Times New Roman" fo:color="#000000" fo:letter-spacing="-0.0006in"/>
    </style:style>
    <style:style style:name="T329" style:parent-style-name="Policepardéfaut" style:family="text">
      <style:text-properties style:font-name="Times New Roman" style:font-name-asian="Times New Roman" style:font-name-complex="Times New Roman" fo:color="#000000"/>
    </style:style>
    <style:style style:name="T330" style:parent-style-name="Policepardéfaut" style:family="text">
      <style:text-properties style:font-name="Times New Roman" style:font-name-asian="Times New Roman" style:font-name-complex="Times New Roman" fo:color="#000000" fo:letter-spacing="-0.0006in"/>
    </style:style>
    <style:style style:name="T331" style:parent-style-name="Policepardéfaut" style:family="text">
      <style:text-properties style:font-name="Times New Roman" style:font-name-asian="Times New Roman" style:font-name-complex="Times New Roman" fo:color="#000000"/>
    </style:style>
    <style:style style:name="T332" style:parent-style-name="Policepardéfaut" style:family="text">
      <style:text-properties style:font-name="Times New Roman" style:font-name-asian="Times New Roman" style:font-name-complex="Times New Roman" fo:color="#000000" fo:letter-spacing="-0.0006in"/>
    </style:style>
    <style:style style:name="T333" style:parent-style-name="Policepardéfaut" style:family="text">
      <style:text-properties style:font-name="Times New Roman" style:font-name-asian="Times New Roman" style:font-name-complex="Times New Roman" fo:color="#000000"/>
    </style:style>
    <style:style style:name="T334" style:parent-style-name="Policepardéfaut" style:family="text">
      <style:text-properties style:font-name="Times New Roman" style:font-name-asian="Times New Roman" style:font-name-complex="Times New Roman" fo:color="#000000" fo:letter-spacing="0.0013in"/>
    </style:style>
    <style:style style:name="T335" style:parent-style-name="Policepardéfaut" style:family="text">
      <style:text-properties style:font-name="Times New Roman" style:font-name-asian="Times New Roman" style:font-name-complex="Times New Roman" fo:color="#000000"/>
    </style:style>
    <style:style style:name="T336" style:parent-style-name="Policepardéfaut" style:family="text">
      <style:text-properties style:font-name="Times New Roman" style:font-name-asian="Times New Roman" style:font-name-complex="Times New Roman" fo:color="#000000" fo:letter-spacing="-0.0006in"/>
    </style:style>
    <style:style style:name="T337" style:parent-style-name="Policepardéfaut" style:family="text">
      <style:text-properties style:font-name="Times New Roman" style:font-name-asian="Times New Roman" style:font-name-complex="Times New Roman" fo:color="#000000"/>
    </style:style>
    <style:style style:name="T338" style:parent-style-name="Policepardéfaut" style:family="text">
      <style:text-properties style:font-name="Times New Roman" style:font-name-asian="Times New Roman" style:font-name-complex="Times New Roman" fo:color="#000000" fo:letter-spacing="0.0006in"/>
    </style:style>
    <style:style style:name="T339" style:parent-style-name="Policepardéfaut" style:family="text">
      <style:text-properties style:font-name="Times New Roman" style:font-name-asian="Times New Roman" style:font-name-complex="Times New Roman" fo:color="#000000"/>
    </style:style>
    <style:style style:name="T340" style:parent-style-name="Policepardéfaut" style:family="text">
      <style:text-properties style:font-name="Times New Roman" style:font-name-asian="Times New Roman" style:font-name-complex="Times New Roman" fo:color="#000000" fo:letter-spacing="0.0006in"/>
    </style:style>
    <style:style style:name="T341" style:parent-style-name="Policepardéfaut" style:family="text">
      <style:text-properties style:font-name="Times New Roman" style:font-name-asian="Times New Roman" style:font-name-complex="Times New Roman" fo:color="#000000"/>
    </style:style>
    <style:style style:name="T342" style:parent-style-name="Policepardéfaut" style:family="text">
      <style:text-properties style:font-name="Times New Roman" style:font-name-asian="Times New Roman" style:font-name-complex="Times New Roman" fo:color="#000000" fo:letter-spacing="0.0006in"/>
    </style:style>
    <style:style style:name="T343" style:parent-style-name="Policepardéfaut" style:family="text">
      <style:text-properties style:font-name="Times New Roman" style:font-name-asian="Times New Roman" style:font-name-complex="Times New Roman" fo:color="#000000"/>
    </style:style>
    <style:style style:name="T344" style:parent-style-name="Policepardéfaut" style:family="text">
      <style:text-properties style:font-name="Times New Roman" style:font-name-asian="Times New Roman" style:font-name-complex="Times New Roman" fo:color="#000000" fo:letter-spacing="0.0006in"/>
    </style:style>
    <style:style style:name="T345" style:parent-style-name="Policepardéfaut" style:family="text">
      <style:text-properties style:font-name="Times New Roman" style:font-name-asian="Times New Roman" style:font-name-complex="Times New Roman" fo:color="#000000"/>
    </style:style>
    <style:style style:name="T346" style:parent-style-name="Policepardéfaut" style:family="text">
      <style:text-properties style:font-name="Times New Roman" style:font-name-asian="Times New Roman" style:font-name-complex="Times New Roman" fo:color="#000000"/>
    </style:style>
    <style:style style:name="T347" style:parent-style-name="Policepardéfaut" style:family="text">
      <style:text-properties style:font-name="Times New Roman" style:font-name-asian="Times New Roman" style:font-name-complex="Times New Roman" fo:color="#000000"/>
    </style:style>
    <style:style style:name="T348" style:parent-style-name="Policepardéfaut" style:family="text">
      <style:text-properties style:font-name="Times New Roman" style:font-name-asian="Times New Roman" style:font-name-complex="Times New Roman" fo:color="#000000" fo:letter-spacing="0.0006in"/>
    </style:style>
    <style:style style:name="T349" style:parent-style-name="Policepardéfaut" style:family="text">
      <style:text-properties style:font-name="Times New Roman" style:font-name-asian="Times New Roman" style:font-name-complex="Times New Roman" fo:color="#000000"/>
    </style:style>
    <style:style style:name="T350" style:parent-style-name="Policepardéfaut" style:family="text">
      <style:text-properties style:font-name="Times New Roman" style:font-name-asian="Times New Roman" style:font-name-complex="Times New Roman" fo:color="#000000" fo:letter-spacing="-0.0006in"/>
    </style:style>
    <style:style style:name="T351" style:parent-style-name="Policepardéfaut" style:family="text">
      <style:text-properties style:font-name="Times New Roman" style:font-name-asian="Times New Roman" style:font-name-complex="Times New Roman" fo:color="#000000"/>
    </style:style>
    <style:style style:name="P352" style:parent-style-name="Normal" style:family="paragraph">
      <style:paragraph-properties fo:text-align="justify" fo:line-height="0.1666in"/>
      <style:text-properties style:font-name="Times New Roman" style:font-name-asian="Times New Roman" style:font-name-complex="Times New Roman"/>
    </style:style>
    <style:style style:name="P353" style:parent-style-name="Normal" style:family="paragraph">
      <style:paragraph-properties fo:text-align="justify" fo:line-height="0.1666in"/>
      <style:text-properties style:font-name="Times New Roman" style:font-name-asian="Times New Roman" style:font-name-complex="Times New Roman"/>
    </style:style>
    <style:style style:name="P354" style:parent-style-name="Normal" style:family="paragraph">
      <style:paragraph-properties fo:text-align="justify" fo:margin-bottom="0.0104in" fo:line-height="0.0833in"/>
      <style:text-properties style:font-name="Times New Roman" style:font-name-asian="Times New Roman" style:font-name-complex="Times New Roman" fo:font-size="6pt" style:font-size-asian="6pt" style:font-size-complex="6pt"/>
    </style:style>
    <style:style style:name="P355" style:parent-style-name="Normal" style:family="paragraph">
      <style:paragraph-properties fo:widows="0" fo:orphans="0" fo:text-align="justify" fo:line-height="107%" fo:margin-right="0.4145in"/>
    </style:style>
    <style:style style:name="T356" style:parent-style-name="Policepardéfaut" style:family="text">
      <style:text-properties style:font-name="Times New Roman" style:font-name-asian="Times New Roman" style:font-name-complex="Times New Roman" fo:color="#000000"/>
    </style:style>
    <style:style style:name="T357" style:parent-style-name="Policepardéfaut" style:family="text">
      <style:text-properties style:font-name="Times New Roman" style:font-name-asian="Times New Roman" style:font-name-complex="Times New Roman" fo:color="#000000" fo:letter-spacing="-0.0006in"/>
    </style:style>
    <style:style style:name="T358" style:parent-style-name="Policepardéfaut" style:family="text">
      <style:text-properties style:font-name="Times New Roman" style:font-name-asian="Times New Roman" style:font-name-complex="Times New Roman" fo:color="#000000"/>
    </style:style>
    <style:style style:name="T359" style:parent-style-name="Policepardéfaut" style:family="text">
      <style:text-properties style:font-name="Times New Roman" style:font-name-asian="Times New Roman" style:font-name-complex="Times New Roman" fo:color="#000000" fo:letter-spacing="0.0013in"/>
    </style:style>
    <style:style style:name="T360" style:parent-style-name="Policepardéfaut" style:family="text">
      <style:text-properties style:font-name="Times New Roman" style:font-name-asian="Times New Roman" style:font-name-complex="Times New Roman" fo:color="#000000"/>
    </style:style>
    <style:style style:name="T361" style:parent-style-name="Policepardéfaut" style:family="text">
      <style:text-properties style:font-name="Times New Roman" style:font-name-asian="Times New Roman" style:font-name-complex="Times New Roman" fo:color="#000000" fo:letter-spacing="-0.0006in"/>
    </style:style>
    <style:style style:name="T362" style:parent-style-name="Policepardéfaut" style:family="text">
      <style:text-properties style:font-name="Times New Roman" style:font-name-asian="Times New Roman" style:font-name-complex="Times New Roman" fo:color="#000000"/>
    </style:style>
    <style:style style:name="T363" style:parent-style-name="Policepardéfaut" style:family="text">
      <style:text-properties style:font-name="Times New Roman" style:font-name-asian="Times New Roman" style:font-name-complex="Times New Roman" fo:color="#000000" fo:letter-spacing="0.0013in"/>
    </style:style>
    <style:style style:name="T364" style:parent-style-name="Policepardéfaut" style:family="text">
      <style:text-properties style:font-name="Times New Roman" style:font-name-asian="Times New Roman" style:font-name-complex="Times New Roman" fo:color="#000000"/>
    </style:style>
    <style:style style:name="T365" style:parent-style-name="Policepardéfaut" style:family="text">
      <style:text-properties style:font-name="Times New Roman" style:font-name-asian="Times New Roman" style:font-name-complex="Times New Roman" fo:color="#000000" fo:letter-spacing="0.0006in"/>
    </style:style>
    <style:style style:name="T366" style:parent-style-name="Policepardéfaut" style:family="text">
      <style:text-properties style:font-name="Times New Roman" style:font-name-asian="Times New Roman" style:font-name-complex="Times New Roman" fo:color="#000000"/>
    </style:style>
    <style:style style:name="T367" style:parent-style-name="Policepardéfaut" style:family="text">
      <style:text-properties style:font-name="Times New Roman" style:font-name-asian="Times New Roman" style:font-name-complex="Times New Roman" fo:color="#000000" fo:letter-spacing="0.0006in"/>
    </style:style>
    <style:style style:name="T368" style:parent-style-name="Policepardéfaut" style:family="text">
      <style:text-properties style:font-name="Times New Roman" style:font-name-asian="Times New Roman" style:font-name-complex="Times New Roman" fo:color="#000000"/>
    </style:style>
    <style:style style:name="T369" style:parent-style-name="Policepardéfaut" style:family="text">
      <style:text-properties style:font-name="Times New Roman" style:font-name-asian="Times New Roman" style:font-name-complex="Times New Roman" fo:color="#000000" fo:letter-spacing="-0.0006in"/>
    </style:style>
    <style:style style:name="T370" style:parent-style-name="Policepardéfaut" style:family="text">
      <style:text-properties style:font-name="Times New Roman" style:font-name-asian="Times New Roman" style:font-name-complex="Times New Roman" fo:color="#000000"/>
    </style:style>
    <style:style style:name="T371" style:parent-style-name="Policepardéfaut" style:family="text">
      <style:text-properties style:font-name="Times New Roman" style:font-name-asian="Times New Roman" style:font-name-complex="Times New Roman" fo:color="#000000" fo:letter-spacing="0.0006in"/>
    </style:style>
    <style:style style:name="T372" style:parent-style-name="Policepardéfaut" style:family="text">
      <style:text-properties style:font-name="Times New Roman" style:font-name-asian="Times New Roman" style:font-name-complex="Times New Roman" fo:color="#000000" fo:letter-spacing="0.0013in"/>
    </style:style>
    <style:style style:name="T373" style:parent-style-name="Policepardéfaut" style:family="text">
      <style:text-properties style:font-name="Times New Roman" style:font-name-asian="Times New Roman" style:font-name-complex="Times New Roman" fo:color="#000000" fo:letter-spacing="-0.0013in"/>
    </style:style>
    <style:style style:name="T374" style:parent-style-name="Policepardéfaut" style:family="text">
      <style:text-properties style:font-name="Times New Roman" style:font-name-asian="Times New Roman" style:font-name-complex="Times New Roman" fo:color="#000000"/>
    </style:style>
    <style:style style:name="T375" style:parent-style-name="Policepardéfaut" style:family="text">
      <style:text-properties style:font-name="Times New Roman" style:font-name-asian="Times New Roman" style:font-name-complex="Times New Roman" fo:color="#000000"/>
    </style:style>
    <style:style style:name="T376" style:parent-style-name="Policepardéfaut" style:family="text">
      <style:text-properties style:font-name="Times New Roman" style:font-name-asian="Times New Roman" style:font-name-complex="Times New Roman" fo:color="#000000"/>
    </style:style>
    <style:style style:name="T377" style:parent-style-name="Policepardéfaut" style:family="text">
      <style:text-properties style:font-name="Times New Roman" style:font-name-asian="Times New Roman" style:font-name-complex="Times New Roman" fo:color="#000000" fo:letter-spacing="0.0006in"/>
    </style:style>
    <style:style style:name="T378" style:parent-style-name="Policepardéfaut" style:family="text">
      <style:text-properties style:font-name="Times New Roman" style:font-name-asian="Times New Roman" style:font-name-complex="Times New Roman" fo:color="#000000"/>
    </style:style>
    <style:style style:name="T379" style:parent-style-name="Policepardéfaut" style:family="text">
      <style:text-properties style:font-name="Times New Roman" style:font-name-asian="Times New Roman" style:font-name-complex="Times New Roman" fo:color="#000000" fo:letter-spacing="-0.0006in"/>
    </style:style>
    <style:style style:name="T380" style:parent-style-name="Policepardéfaut" style:family="text">
      <style:text-properties style:font-name="Times New Roman" style:font-name-asian="Times New Roman" style:font-name-complex="Times New Roman" fo:color="#000000"/>
    </style:style>
    <style:style style:name="T381" style:parent-style-name="Policepardéfaut" style:family="text">
      <style:text-properties style:font-name="Times New Roman" style:font-name-asian="Times New Roman" style:font-name-complex="Times New Roman" fo:color="#000000" fo:letter-spacing="0.0013in"/>
    </style:style>
    <style:style style:name="T382" style:parent-style-name="Policepardéfaut" style:family="text">
      <style:text-properties style:font-name="Times New Roman" style:font-name-asian="Times New Roman" style:font-name-complex="Times New Roman" fo:color="#000000"/>
    </style:style>
    <style:style style:name="T383" style:parent-style-name="Policepardéfaut" style:family="text">
      <style:text-properties style:font-name="Times New Roman" style:font-name-asian="Times New Roman" style:font-name-complex="Times New Roman" fo:color="#000000" fo:letter-spacing="0.0013in"/>
    </style:style>
    <style:style style:name="T384" style:parent-style-name="Policepardéfaut" style:family="text">
      <style:text-properties style:font-name="Times New Roman" style:font-name-asian="Times New Roman" style:font-name-complex="Times New Roman" fo:color="#000000"/>
    </style:style>
    <style:style style:name="T385" style:parent-style-name="Policepardéfaut" style:family="text">
      <style:text-properties style:font-name="Times New Roman" style:font-name-asian="Times New Roman" style:font-name-complex="Times New Roman" fo:color="#000000" fo:letter-spacing="-0.0006in"/>
    </style:style>
    <style:style style:name="T386" style:parent-style-name="Policepardéfaut" style:family="text">
      <style:text-properties style:font-name="Times New Roman" style:font-name-asian="Times New Roman" style:font-name-complex="Times New Roman" fo:color="#000000"/>
    </style:style>
    <style:style style:name="T387" style:parent-style-name="Policepardéfaut" style:family="text">
      <style:text-properties style:font-name="Times New Roman" style:font-name-asian="Times New Roman" style:font-name-complex="Times New Roman" fo:color="#000000" fo:letter-spacing="-0.0006in"/>
    </style:style>
    <style:style style:name="T388" style:parent-style-name="Policepardéfaut" style:family="text">
      <style:text-properties style:font-name="Times New Roman" style:font-name-asian="Times New Roman" style:font-name-complex="Times New Roman" fo:color="#000000" fo:letter-spacing="0.0013in"/>
    </style:style>
    <style:style style:name="T389" style:parent-style-name="Policepardéfaut" style:family="text">
      <style:text-properties style:font-name="Times New Roman" style:font-name-asian="Times New Roman" style:font-name-complex="Times New Roman" fo:color="#000000"/>
    </style:style>
    <style:style style:name="T390" style:parent-style-name="Policepardéfaut" style:family="text">
      <style:text-properties style:font-name="Times New Roman" style:font-name-asian="Times New Roman" style:font-name-complex="Times New Roman" fo:color="#000000" fo:letter-spacing="0.0006in"/>
    </style:style>
    <style:style style:name="T391" style:parent-style-name="Policepardéfaut" style:family="text">
      <style:text-properties style:font-name="Times New Roman" style:font-name-asian="Times New Roman" style:font-name-complex="Times New Roman" fo:color="#000000"/>
    </style:style>
    <style:style style:name="T392" style:parent-style-name="Policepardéfaut" style:family="text">
      <style:text-properties style:font-name="Times New Roman" style:font-name-asian="Times New Roman" style:font-name-complex="Times New Roman" fo:color="#000000" fo:letter-spacing="-0.0006in"/>
    </style:style>
    <style:style style:name="T393" style:parent-style-name="Policepardéfaut" style:family="text">
      <style:text-properties style:font-name="Times New Roman" style:font-name-asian="Times New Roman" style:font-name-complex="Times New Roman" fo:color="#000000"/>
    </style:style>
    <style:style style:name="T394" style:parent-style-name="Policepardéfaut" style:family="text">
      <style:text-properties style:font-name="Times New Roman" style:font-name-asian="Times New Roman" style:font-name-complex="Times New Roman" fo:color="#000000" fo:letter-spacing="0.0006in"/>
    </style:style>
    <style:style style:name="T395" style:parent-style-name="Policepardéfaut" style:family="text">
      <style:text-properties style:font-name="Times New Roman" style:font-name-asian="Times New Roman" style:font-name-complex="Times New Roman" fo:color="#000000"/>
    </style:style>
    <style:style style:name="T396" style:parent-style-name="Policepardéfaut" style:family="text">
      <style:text-properties style:font-name="Times New Roman" style:font-name-asian="Times New Roman" style:font-name-complex="Times New Roman" fo:color="#000000" fo:letter-spacing="0.0006in"/>
    </style:style>
    <style:style style:name="T397" style:parent-style-name="Policepardéfaut" style:family="text">
      <style:text-properties style:font-name="Times New Roman" style:font-name-asian="Times New Roman" style:font-name-complex="Times New Roman" fo:color="#000000"/>
    </style:style>
    <style:style style:name="T398" style:parent-style-name="Policepardéfaut" style:family="text">
      <style:text-properties style:font-name="Times New Roman" style:font-name-asian="Times New Roman" style:font-name-complex="Times New Roman" fo:color="#000000" fo:letter-spacing="-0.0006in"/>
    </style:style>
    <style:style style:name="T399" style:parent-style-name="Policepardéfaut" style:family="text">
      <style:text-properties style:font-name="Times New Roman" style:font-name-asian="Times New Roman" style:font-name-complex="Times New Roman" fo:color="#000000" fo:letter-spacing="0.0006in"/>
    </style:style>
    <style:style style:name="T400" style:parent-style-name="Policepardéfaut" style:family="text">
      <style:text-properties style:font-name="Times New Roman" style:font-name-asian="Times New Roman" style:font-name-complex="Times New Roman" fo:color="#000000"/>
    </style:style>
    <style:style style:name="P401" style:parent-style-name="Normal" style:family="paragraph">
      <style:paragraph-properties fo:text-align="justify" fo:line-height="0.1666in"/>
      <style:text-properties style:font-name="Times New Roman" style:font-name-asian="Times New Roman" style:font-name-complex="Times New Roman"/>
    </style:style>
    <style:style style:name="P402" style:parent-style-name="Normal" style:family="paragraph">
      <style:paragraph-properties fo:text-align="justify" fo:line-height="0.1666in"/>
      <style:text-properties style:font-name="Times New Roman" style:font-name-asian="Times New Roman" style:font-name-complex="Times New Roman"/>
    </style:style>
    <style:style style:name="P403" style:parent-style-name="Normal" style:family="paragraph">
      <style:paragraph-properties fo:text-align="justify" fo:line-height="0.0972in"/>
      <style:text-properties style:font-name="Times New Roman" style:font-name-asian="Times New Roman" style:font-name-complex="Times New Roman" fo:font-size="7pt" style:font-size-asian="7pt" style:font-size-complex="7pt"/>
    </style:style>
    <style:style style:name="P404" style:parent-style-name="Normal" style:family="paragraph">
      <style:paragraph-properties fo:widows="0" fo:orphans="0" fo:text-align="justify" fo:line-height="107%" fo:margin-right="0.4402in"/>
    </style:style>
    <style:style style:name="T405" style:parent-style-name="Policepardéfaut" style:family="text">
      <style:text-properties style:font-name="Aptos" style:font-name-asian="Yu Mincho" style:font-name-complex="Arial" fo:color="#000000"/>
    </style:style>
    <style:style style:name="P406" style:parent-style-name="Normal" style:family="paragraph">
      <style:text-properties style:font-name="Times New Roman" style:font-name-asian="Times New Roman" style:font-name-complex="Times New Roman" fo:font-size="12pt" style:font-size-asian="12pt" style:font-size-complex="12pt"/>
    </style:style>
    <style:style style:name="P407" style:parent-style-name="Normal" style:family="paragraph">
      <style:text-properties style:font-name="Times New Roman" style:font-name-asian="Times New Roman" style:font-name-complex="Times New Roman" fo:font-size="12pt" style:font-size-asian="12pt" style:font-size-complex="12pt"/>
    </style:style>
    <style:style style:name="P408" style:parent-style-name="Normal" style:family="paragraph">
      <style:text-properties style:font-name="Times New Roman" style:font-name-asian="Times New Roman" style:font-name-complex="Times New Roman" fo:font-size="12pt" style:font-size-asian="12pt" style:font-size-complex="12pt"/>
    </style:style>
    <style:style style:name="P409" style:parent-style-name="Normal" style:family="paragraph">
      <style:text-properties style:font-name="Times New Roman" style:font-name-asian="Times New Roman" style:font-name-complex="Times New Roman" fo:font-size="12pt" style:font-size-asian="12pt" style:font-size-complex="12pt"/>
    </style:style>
    <style:style style:name="P410" style:parent-style-name="Normal" style:family="paragraph">
      <style:text-properties style:font-name="Times New Roman" style:font-name-asian="Times New Roman" style:font-name-complex="Times New Roman" fo:font-size="12pt" style:font-size-asian="12pt" style:font-size-complex="12pt"/>
    </style:style>
    <style:style style:name="P411" style:parent-style-name="Normal" style:family="paragraph">
      <style:text-properties style:font-name="Times New Roman" style:font-name-asian="Times New Roman" style:font-name-complex="Times New Roman" fo:font-size="12pt" style:font-size-asian="12pt" style:font-size-complex="12pt"/>
    </style:style>
    <style:style style:name="P412" style:parent-style-name="Normal" style:family="paragraph">
      <style:text-properties style:font-name="Times New Roman" style:font-name-asian="Times New Roman" style:font-name-complex="Times New Roman" fo:font-size="12pt" style:font-size-asian="12pt" style:font-size-complex="12pt"/>
    </style:style>
    <style:style style:name="P413" style:parent-style-name="Normal" style:family="paragraph">
      <style:text-properties style:font-name="Times New Roman" style:font-name-asian="Times New Roman" style:font-name-complex="Times New Roman" fo:font-size="12pt" style:font-size-asian="12pt" style:font-size-complex="12pt"/>
    </style:style>
    <style:style style:name="P414" style:parent-style-name="Normal" style:family="paragraph">
      <style:text-properties style:font-name="Times New Roman" style:font-name-asian="Times New Roman" style:font-name-complex="Times New Roman" fo:font-size="12pt" style:font-size-asian="12pt" style:font-size-complex="12pt"/>
    </style:style>
    <style:style style:name="P415" style:parent-style-name="Normal" style:family="paragraph">
      <style:text-properties style:font-name="Times New Roman" style:font-name-asian="Times New Roman" style:font-name-complex="Times New Roman" fo:font-size="12pt" style:font-size-asian="12pt" style:font-size-complex="12pt"/>
    </style:style>
    <style:style style:name="P416" style:parent-style-name="Normal" style:family="paragraph">
      <style:text-properties style:font-name="Times New Roman" style:font-name-asian="Times New Roman" style:font-name-complex="Times New Roman" fo:font-size="12pt" style:font-size-asian="12pt" style:font-size-complex="12pt"/>
    </style:style>
    <style:style style:name="P417" style:parent-style-name="Normal" style:family="paragraph">
      <style:text-properties style:font-name="Times New Roman" style:font-name-asian="Times New Roman" style:font-name-complex="Times New Roman" fo:font-size="12pt" style:font-size-asian="12pt" style:font-size-complex="12pt"/>
    </style:style>
    <style:style style:name="P418" style:parent-style-name="Normal" style:family="paragraph">
      <style:text-properties style:font-name="Times New Roman" style:font-name-asian="Times New Roman" style:font-name-complex="Times New Roman" fo:font-size="12pt" style:font-size-asian="12pt" style:font-size-complex="12pt"/>
    </style:style>
    <style:style style:name="P419" style:parent-style-name="Normal" style:family="paragraph">
      <style:text-properties style:font-name="Times New Roman" style:font-name-asian="Times New Roman" style:font-name-complex="Times New Roman" fo:font-size="12pt" style:font-size-asian="12pt" style:font-size-complex="12pt"/>
    </style:style>
    <style:style style:name="P420" style:parent-style-name="Normal" style:family="paragraph">
      <style:paragraph-properties fo:margin-bottom="0.1111in" fo:line-height="115%"/>
      <style:text-properties style:font-name="Times New Roman" style:font-name-asian="Times New Roman" style:font-name-complex="Times New Roman" fo:font-size="12pt" style:font-size-asian="12pt" style:font-size-complex="12pt"/>
    </style:style>
    <style:style style:name="P421" style:parent-style-name="Normal" style:family="paragraph">
      <style:paragraph-properties fo:margin-bottom="0.1111in" fo:line-height="115%"/>
      <style:text-properties style:font-name="Times New Roman" style:font-name-asian="Times New Roman" style:font-name-complex="Times New Roman" fo:font-size="12pt" style:font-size-asian="12pt" style:font-size-complex="12pt"/>
    </style:style>
    <style:style style:name="P422" style:parent-style-name="Normal" style:family="paragraph">
      <style:paragraph-properties fo:margin-bottom="0.1111in" fo:line-height="115%"/>
      <style:text-properties style:font-name="Times New Roman" style:font-name-asian="Times New Roman" style:font-name-complex="Times New Roman" fo:font-size="12pt" style:font-size-asian="12pt" style:font-size-complex="12pt"/>
    </style:style>
    <style:style style:name="P423" style:parent-style-name="Normal" style:family="paragraph">
      <style:paragraph-properties fo:margin-bottom="0.1111in" fo:line-height="115%"/>
      <style:text-properties style:font-name="Times New Roman" style:font-name-asian="Times New Roman" style:font-name-complex="Times New Roman" fo:font-size="12pt" style:font-size-asian="12pt" style:font-size-complex="12pt"/>
    </style:style>
    <style:style style:name="P424" style:parent-style-name="Normal" style:family="paragraph">
      <style:paragraph-properties fo:margin-bottom="0.1111in" fo:line-height="115%"/>
      <style:text-properties style:font-name="Times New Roman" style:font-name-asian="Times New Roman" style:font-name-complex="Times New Roman" fo:font-size="12pt" style:font-size-asian="12pt" style:font-size-complex="12pt"/>
    </style:style>
    <style:style style:name="T425" style:parent-style-name="Policepardéfaut" style:family="text">
      <style:text-properties fo:font-size="20pt" style:font-size-asian="20pt" style:font-size-complex="20pt"/>
    </style:style>
    <style:style style:name="T426" style:parent-style-name="Policepardéfaut" style:family="text">
      <style:text-properties fo:font-size="18pt" style:font-size-asian="18pt" style:font-size-complex="18pt"/>
    </style:style>
    <style:style style:name="P427" style:parent-style-name="Normal" style:family="paragraph">
      <style:text-properties fo:font-size="18pt" style:font-size-asian="18pt" style:font-size-complex="18pt"/>
    </style:style>
    <style:style style:name="P428" style:parent-style-name="TM1" style:family="paragraph">
      <style:paragraph-properties>
        <style:tab-stops>
          <style:tab-stop style:type="left" style:position="0.302in"/>
          <style:tab-stop style:type="right" style:leader-style="dotted" style:leader-text="." style:position="6.2916in"/>
        </style:tab-stops>
      </style:paragraph-properties>
    </style:style>
    <style:style style:name="P429" style:parent-style-name="TM1" style:family="paragraph">
      <style:paragraph-properties>
        <style:tab-stops>
          <style:tab-stop style:type="left" style:position="0.302in"/>
          <style:tab-stop style:type="right" style:leader-style="dotted" style:leader-text="." style:position="6.2916in"/>
        </style:tab-stops>
      </style:paragraph-properties>
    </style:style>
    <style:style style:name="P430" style:parent-style-name="TM1" style:family="paragraph">
      <style:paragraph-properties>
        <style:tab-stops>
          <style:tab-stop style:type="left" style:position="0.302in"/>
          <style:tab-stop style:type="right" style:leader-style="dotted" style:leader-text="." style:position="6.2916in"/>
        </style:tab-stops>
      </style:paragraph-properties>
    </style:style>
    <style:style style:name="P431" style:parent-style-name="TM1" style:family="paragraph">
      <style:paragraph-properties>
        <style:tab-stops>
          <style:tab-stop style:type="left" style:position="0.302in"/>
          <style:tab-stop style:type="right" style:leader-style="dotted" style:leader-text="." style:position="6.2916in"/>
        </style:tab-stops>
      </style:paragraph-properties>
    </style:style>
    <style:style style:name="P432" style:parent-style-name="TM1" style:family="paragraph">
      <style:paragraph-properties>
        <style:tab-stops>
          <style:tab-stop style:type="left" style:position="0.302in"/>
          <style:tab-stop style:type="right" style:leader-style="dotted" style:leader-text="." style:position="6.2916in"/>
        </style:tab-stops>
      </style:paragraph-properties>
    </style:style>
    <style:style style:name="P433" style:parent-style-name="TM1" style:family="paragraph">
      <style:paragraph-properties>
        <style:tab-stops>
          <style:tab-stop style:type="left" style:position="0.302in"/>
          <style:tab-stop style:type="right" style:leader-style="dotted" style:leader-text="." style:position="6.2916in"/>
        </style:tab-stops>
      </style:paragraph-properties>
    </style:style>
    <style:style style:name="P434" style:parent-style-name="TM1" style:family="paragraph">
      <style:paragraph-properties>
        <style:tab-stops>
          <style:tab-stop style:type="left" style:position="0.302in"/>
          <style:tab-stop style:type="right" style:leader-style="dotted" style:leader-text="." style:position="6.2916in"/>
        </style:tab-stops>
      </style:paragraph-properties>
    </style:style>
    <style:style style:name="P435" style:parent-style-name="TM1" style:family="paragraph">
      <style:paragraph-properties>
        <style:tab-stops>
          <style:tab-stop style:type="left" style:position="0.302in"/>
          <style:tab-stop style:type="right" style:leader-style="dotted" style:leader-text="." style:position="6.2916in"/>
        </style:tab-stops>
      </style:paragraph-properties>
    </style:style>
    <style:style style:name="P436" style:parent-style-name="TM1" style:family="paragraph">
      <style:paragraph-properties>
        <style:tab-stops>
          <style:tab-stop style:type="left" style:position="0.302in"/>
          <style:tab-stop style:type="right" style:leader-style="dotted" style:leader-text="." style:position="6.2916in"/>
        </style:tab-stops>
      </style:paragraph-properties>
    </style:style>
    <style:style style:name="P437" style:parent-style-name="TM1" style:family="paragraph">
      <style:paragraph-properties>
        <style:tab-stops>
          <style:tab-stop style:type="left" style:position="0.302in"/>
          <style:tab-stop style:type="right" style:leader-style="dotted" style:leader-text="." style:position="6.2916in"/>
        </style:tab-stops>
      </style:paragraph-properties>
    </style:style>
    <style:style style:name="P438" style:parent-style-name="Normal" style:family="paragraph">
      <style:paragraph-properties fo:margin-bottom="0.1111in" fo:line-height="115%"/>
      <style:text-properties style:font-name="Times New Roman" style:font-name-asian="Times New Roman" style:font-name-complex="Times New Roman" fo:color="#215E99" fo:font-size="20pt" style:font-size-asian="20pt" style:font-size-complex="20pt"/>
    </style:style>
    <style:style style:name="P439" style:parent-style-name="Normal" style:family="paragraph">
      <style:paragraph-properties fo:margin-bottom="0.1111in" fo:line-height="115%"/>
      <style:text-properties style:font-name="Times New Roman" style:font-name-asian="Times New Roman" style:font-name-complex="Times New Roman" fo:color="#215E99" fo:font-size="20pt" style:font-size-asian="20pt" style:font-size-complex="20pt"/>
    </style:style>
    <style:style style:name="P440" style:parent-style-name="Normal" style:family="paragraph">
      <style:paragraph-properties fo:margin-bottom="0.1111in" fo:line-height="115%"/>
      <style:text-properties style:font-name="Times New Roman" style:font-name-asian="Times New Roman" style:font-name-complex="Times New Roman" fo:color="#215E99" fo:font-size="20pt" style:font-size-asian="20pt" style:font-size-complex="20pt"/>
    </style:style>
    <style:style style:name="P441" style:parent-style-name="Normal" style:family="paragraph">
      <style:paragraph-properties fo:margin-bottom="0.1111in" fo:line-height="115%"/>
      <style:text-properties style:font-name="Times New Roman" style:font-name-asian="Times New Roman" style:font-name-complex="Times New Roman" fo:color="#215E99" fo:font-size="20pt" style:font-size-asian="20pt" style:font-size-complex="20pt"/>
    </style:style>
    <style:style style:name="P442" style:parent-style-name="Normal" style:family="paragraph">
      <style:paragraph-properties fo:margin-bottom="0.1111in" fo:line-height="115%"/>
      <style:text-properties style:font-name="Times New Roman" style:font-name-asian="Times New Roman" style:font-name-complex="Times New Roman" fo:color="#215E99" fo:font-size="20pt" style:font-size-asian="20pt" style:font-size-complex="20pt"/>
    </style:style>
    <style:style style:name="P443" style:parent-style-name="Normal" style:family="paragraph">
      <style:paragraph-properties fo:margin-bottom="0.1111in" fo:line-height="115%"/>
      <style:text-properties style:font-name="Times New Roman" style:font-name-asian="Times New Roman" style:font-name-complex="Times New Roman" fo:color="#215E99" fo:font-size="20pt" style:font-size-asian="20pt" style:font-size-complex="20pt"/>
    </style:style>
    <style:style style:name="P444" style:parent-style-name="Normal" style:family="paragraph">
      <style:paragraph-properties fo:margin-bottom="0.1111in" fo:line-height="115%"/>
      <style:text-properties style:font-name="Times New Roman" style:font-name-asian="Times New Roman" style:font-name-complex="Times New Roman" fo:color="#215E99" fo:font-size="20pt" style:font-size-asian="20pt" style:font-size-complex="20pt"/>
    </style:style>
    <style:style style:name="P445" style:parent-style-name="Titre1" style:list-style-name="LFO18" style:family="paragraph">
      <style:paragraph-properties fo:text-align="justify"/>
      <style:text-properties style:font-name-asian="Times New Roman"/>
    </style:style>
    <style:style style:name="P446" style:parent-style-name="Paragraphedeliste" style:family="paragraph">
      <style:paragraph-properties fo:text-align="justify" fo:margin-left="0.6437in">
        <style:tab-stops/>
      </style:paragraph-properties>
      <style:text-properties style:font-name="Times New Roman" style:font-name-asian="Times New Roman" style:font-name-complex="Times New Roman" fo:color="#215E99" fo:font-size="20pt" style:font-size-asian="20pt" style:font-size-complex="20pt"/>
    </style:style>
    <style:style style:name="T447" style:parent-style-name="Policepardéfaut" style:family="text">
      <style:text-properties style:font-name="GPAFJ+Aptos" style:font-name-asian="GPAFJ+Aptos" style:font-name-complex="GPAFJ+Aptos" fo:color="#000000"/>
    </style:style>
    <style:style style:name="T448" style:parent-style-name="Policepardéfaut" style:family="text">
      <style:text-properties style:font-name="GPAFJ+Aptos" style:font-name-asian="GPAFJ+Aptos" style:font-name-complex="GPAFJ+Aptos" fo:color="#000000" style:text-scale="101%"/>
    </style:style>
    <style:style style:name="T449" style:parent-style-name="Policepardéfaut" style:family="text">
      <style:text-properties style:font-name="GPAFJ+Aptos" style:font-name-asian="GPAFJ+Aptos" style:font-name-complex="GPAFJ+Aptos" fo:color="#000000" fo:letter-spacing="0.0006in"/>
    </style:style>
    <style:style style:name="T450" style:parent-style-name="Policepardéfaut" style:family="text">
      <style:text-properties style:font-name="GPAFJ+Aptos" style:font-name-asian="GPAFJ+Aptos" style:font-name-complex="GPAFJ+Aptos" fo:color="#000000" style:text-scale="101%"/>
    </style:style>
    <style:style style:name="T451" style:parent-style-name="Policepardéfaut" style:family="text">
      <style:text-properties style:font-name="GPAFJ+Aptos" style:font-name-asian="GPAFJ+Aptos" style:font-name-complex="GPAFJ+Aptos" fo:color="#000000"/>
    </style:style>
    <style:style style:name="T452" style:parent-style-name="Policepardéfaut" style:family="text">
      <style:text-properties style:font-name="GPAFJ+Aptos" style:font-name-asian="GPAFJ+Aptos" style:font-name-complex="GPAFJ+Aptos" fo:color="#000000" fo:letter-spacing="-0.0006in"/>
    </style:style>
    <style:style style:name="T453" style:parent-style-name="Policepardéfaut" style:family="text">
      <style:text-properties style:font-name="GPAFJ+Aptos" style:font-name-asian="GPAFJ+Aptos" style:font-name-complex="GPAFJ+Aptos" fo:color="#000000" style:text-scale="101%"/>
    </style:style>
    <style:style style:name="T454" style:parent-style-name="Policepardéfaut" style:family="text">
      <style:text-properties style:font-name="GPAFJ+Aptos" style:font-name-asian="GPAFJ+Aptos" style:font-name-complex="GPAFJ+Aptos" fo:color="#000000" fo:letter-spacing="-0.0006in"/>
    </style:style>
    <style:style style:name="T455" style:parent-style-name="Policepardéfaut" style:family="text">
      <style:text-properties style:font-name="GPAFJ+Aptos" style:font-name-asian="GPAFJ+Aptos" style:font-name-complex="GPAFJ+Aptos" fo:color="#000000" style:text-scale="101%"/>
    </style:style>
    <style:style style:name="T456" style:parent-style-name="Policepardéfaut" style:family="text">
      <style:text-properties style:font-name="GPAFJ+Aptos" style:font-name-asian="GPAFJ+Aptos" style:font-name-complex="GPAFJ+Aptos" fo:color="#000000"/>
    </style:style>
    <style:style style:name="T457" style:parent-style-name="Policepardéfaut" style:family="text">
      <style:text-properties style:font-name="GPAFJ+Aptos" style:font-name-asian="GPAFJ+Aptos" style:font-name-complex="GPAFJ+Aptos" fo:color="#000000" fo:letter-spacing="-0.0006in"/>
    </style:style>
    <style:style style:name="T458" style:parent-style-name="Policepardéfaut" style:family="text">
      <style:text-properties style:font-name="GPAFJ+Aptos" style:font-name-asian="GPAFJ+Aptos" style:font-name-complex="GPAFJ+Aptos" fo:color="#000000" style:text-scale="101%"/>
    </style:style>
    <style:style style:name="T459" style:parent-style-name="Policepardéfaut" style:family="text">
      <style:text-properties style:font-name="GPAFJ+Aptos" style:font-name-asian="GPAFJ+Aptos" style:font-name-complex="GPAFJ+Aptos" fo:color="#000000"/>
    </style:style>
    <style:style style:name="T460" style:parent-style-name="Policepardéfaut" style:family="text">
      <style:text-properties style:font-name="GPAFJ+Aptos" style:font-name-asian="GPAFJ+Aptos" style:font-name-complex="GPAFJ+Aptos" fo:color="#000000" fo:letter-spacing="-0.0006in" style:text-scale="101%"/>
    </style:style>
    <style:style style:name="T461" style:parent-style-name="Policepardéfaut" style:family="text">
      <style:text-properties style:font-name="GPAFJ+Aptos" style:font-name-asian="GPAFJ+Aptos" style:font-name-complex="GPAFJ+Aptos" fo:color="#000000" style:text-scale="101%"/>
    </style:style>
    <style:style style:name="T462" style:parent-style-name="Policepardéfaut" style:family="text">
      <style:text-properties style:font-name="GPAFJ+Aptos" style:font-name-asian="GPAFJ+Aptos" style:font-name-complex="GPAFJ+Aptos" fo:color="#000000"/>
    </style:style>
    <style:style style:name="T463" style:parent-style-name="Policepardéfaut" style:family="text">
      <style:text-properties style:font-name="GPAFJ+Aptos" style:font-name-asian="GPAFJ+Aptos" style:font-name-complex="GPAFJ+Aptos" fo:color="#000000" fo:letter-spacing="-0.0013in" style:text-scale="101%"/>
    </style:style>
    <style:style style:name="T464" style:parent-style-name="Policepardéfaut" style:family="text">
      <style:text-properties style:font-name="GPAFJ+Aptos" style:font-name-asian="GPAFJ+Aptos" style:font-name-complex="GPAFJ+Aptos" fo:color="#000000"/>
    </style:style>
    <style:style style:name="T465" style:parent-style-name="Policepardéfaut" style:family="text">
      <style:text-properties style:font-name="GPAFJ+Aptos" style:font-name-asian="GPAFJ+Aptos" style:font-name-complex="GPAFJ+Aptos" fo:color="#000000" style:text-scale="101%"/>
    </style:style>
    <style:style style:name="T466" style:parent-style-name="Policepardéfaut" style:family="text">
      <style:text-properties style:font-name="GPAFJ+Aptos" style:font-name-asian="GPAFJ+Aptos" style:font-name-complex="GPAFJ+Aptos" fo:color="#000000" fo:letter-spacing="-0.0013in" style:text-scale="101%"/>
    </style:style>
    <style:style style:name="T467" style:parent-style-name="Policepardéfaut" style:family="text">
      <style:text-properties style:font-name="GPAFJ+Aptos" style:font-name-asian="GPAFJ+Aptos" style:font-name-complex="GPAFJ+Aptos" fo:color="#000000"/>
    </style:style>
    <style:style style:name="T468" style:parent-style-name="Policepardéfaut" style:family="text">
      <style:text-properties style:font-name="GPAFJ+Aptos" style:font-name-asian="GPAFJ+Aptos" style:font-name-complex="GPAFJ+Aptos" fo:color="#000000" style:text-scale="101%"/>
    </style:style>
    <style:style style:name="T469" style:parent-style-name="Policepardéfaut" style:family="text">
      <style:text-properties style:font-name="GPAFJ+Aptos" style:font-name-asian="GPAFJ+Aptos" style:font-name-complex="GPAFJ+Aptos" fo:color="#000000"/>
    </style:style>
    <style:style style:name="T470" style:parent-style-name="Policepardéfaut" style:family="text">
      <style:text-properties style:font-name="GPAFJ+Aptos" style:font-name-asian="GPAFJ+Aptos" style:font-name-complex="GPAFJ+Aptos" fo:color="#000000" style:text-scale="101%"/>
    </style:style>
    <style:style style:name="T471" style:parent-style-name="Policepardéfaut" style:family="text">
      <style:text-properties style:font-name="GPAFJ+Aptos" style:font-name-asian="GPAFJ+Aptos" style:font-name-complex="GPAFJ+Aptos" fo:color="#000000" fo:letter-spacing="-0.0013in"/>
    </style:style>
    <style:style style:name="T472" style:parent-style-name="Policepardéfaut" style:family="text">
      <style:text-properties style:font-name="GPAFJ+Aptos" style:font-name-asian="GPAFJ+Aptos" style:font-name-complex="GPAFJ+Aptos" fo:color="#000000" style:text-scale="101%"/>
    </style:style>
    <style:style style:name="T473" style:parent-style-name="Policepardéfaut" style:family="text">
      <style:text-properties style:font-name="GPAFJ+Aptos" style:font-name-asian="GPAFJ+Aptos" style:font-name-complex="GPAFJ+Aptos" fo:color="#000000" fo:letter-spacing="-0.0006in"/>
    </style:style>
    <style:style style:name="T474" style:parent-style-name="Policepardéfaut" style:family="text">
      <style:text-properties style:font-name="GPAFJ+Aptos" style:font-name-asian="GPAFJ+Aptos" style:font-name-complex="GPAFJ+Aptos" fo:color="#000000"/>
    </style:style>
    <style:style style:name="T475" style:parent-style-name="Policepardéfaut" style:family="text">
      <style:text-properties style:font-name="GPAFJ+Aptos" style:font-name-asian="GPAFJ+Aptos" style:font-name-complex="GPAFJ+Aptos" fo:color="#000000" fo:letter-spacing="-0.0006in"/>
    </style:style>
    <style:style style:name="T476" style:parent-style-name="Policepardéfaut" style:family="text">
      <style:text-properties style:font-name="GPAFJ+Aptos" style:font-name-asian="GPAFJ+Aptos" style:font-name-complex="GPAFJ+Aptos" fo:color="#000000" style:text-scale="101%"/>
    </style:style>
    <style:style style:name="T477" style:parent-style-name="Policepardéfaut" style:family="text">
      <style:text-properties style:font-name="GPAFJ+Aptos" style:font-name-asian="GPAFJ+Aptos" style:font-name-complex="GPAFJ+Aptos" fo:color="#000000" fo:letter-spacing="0.0006in" style:text-scale="101%"/>
    </style:style>
    <style:style style:name="T478" style:parent-style-name="Policepardéfaut" style:family="text">
      <style:text-properties style:font-name="GPAFJ+Aptos" style:font-name-asian="GPAFJ+Aptos" style:font-name-complex="GPAFJ+Aptos" fo:color="#000000" fo:letter-spacing="-0.0006in" style:text-scale="101%"/>
    </style:style>
    <style:style style:name="T479" style:parent-style-name="Policepardéfaut" style:family="text">
      <style:text-properties style:font-name="GPAFJ+Aptos" style:font-name-asian="GPAFJ+Aptos" style:font-name-complex="GPAFJ+Aptos" fo:color="#000000"/>
    </style:style>
    <style:style style:name="T480" style:parent-style-name="Policepardéfaut" style:family="text">
      <style:text-properties style:font-name="GPAFJ+Aptos" style:font-name-asian="GPAFJ+Aptos" style:font-name-complex="GPAFJ+Aptos" fo:color="#000000" fo:letter-spacing="-0.0013in" style:text-scale="101%"/>
    </style:style>
    <style:style style:name="T481" style:parent-style-name="Policepardéfaut" style:family="text">
      <style:text-properties style:font-name="GPAFJ+Aptos" style:font-name-asian="GPAFJ+Aptos" style:font-name-complex="GPAFJ+Aptos" fo:color="#000000" style:text-scale="101%"/>
    </style:style>
    <style:style style:name="T482" style:parent-style-name="Policepardéfaut" style:family="text">
      <style:text-properties style:font-name="GPAFJ+Aptos" style:font-name-asian="GPAFJ+Aptos" style:font-name-complex="GPAFJ+Aptos" fo:color="#000000" fo:letter-spacing="0.0006in"/>
    </style:style>
    <style:style style:name="T483" style:parent-style-name="Policepardéfaut" style:family="text">
      <style:text-properties style:font-name="GPAFJ+Aptos" style:font-name-asian="GPAFJ+Aptos" style:font-name-complex="GPAFJ+Aptos" fo:color="#000000"/>
    </style:style>
    <style:style style:name="T484" style:parent-style-name="Policepardéfaut" style:family="text">
      <style:text-properties style:font-name="GPAFJ+Aptos" style:font-name-asian="GPAFJ+Aptos" style:font-name-complex="GPAFJ+Aptos" fo:color="#000000" fo:letter-spacing="-0.0006in"/>
    </style:style>
    <style:style style:name="T485" style:parent-style-name="Policepardéfaut" style:family="text">
      <style:text-properties style:font-name="GPAFJ+Aptos" style:font-name-asian="GPAFJ+Aptos" style:font-name-complex="GPAFJ+Aptos" fo:color="#000000" style:text-scale="101%"/>
    </style:style>
    <style:style style:name="T486" style:parent-style-name="Policepardéfaut" style:family="text">
      <style:text-properties style:font-name="GPAFJ+Aptos" style:font-name-asian="GPAFJ+Aptos" style:font-name-complex="GPAFJ+Aptos" fo:color="#000000" fo:letter-spacing="-0.0006in" style:text-scale="101%"/>
    </style:style>
    <style:style style:name="T487" style:parent-style-name="Policepardéfaut" style:family="text">
      <style:text-properties style:font-name="GPAFJ+Aptos" style:font-name-asian="GPAFJ+Aptos" style:font-name-complex="GPAFJ+Aptos" fo:color="#000000" fo:letter-spacing="-0.0006in"/>
    </style:style>
    <style:style style:name="T488" style:parent-style-name="Policepardéfaut" style:family="text">
      <style:text-properties style:font-name="GPAFJ+Aptos" style:font-name-asian="GPAFJ+Aptos" style:font-name-complex="GPAFJ+Aptos" fo:color="#000000"/>
    </style:style>
    <style:style style:name="T489" style:parent-style-name="Policepardéfaut" style:family="text">
      <style:text-properties style:font-name="GPAFJ+Aptos" style:font-name-asian="GPAFJ+Aptos" style:font-name-complex="GPAFJ+Aptos" fo:color="#000000" fo:letter-spacing="-0.0013in" style:text-scale="101%"/>
    </style:style>
    <style:style style:name="T490" style:parent-style-name="Policepardéfaut" style:family="text">
      <style:text-properties style:font-name="GPAFJ+Aptos" style:font-name-asian="GPAFJ+Aptos" style:font-name-complex="GPAFJ+Aptos" fo:color="#000000" style:text-scale="101%"/>
    </style:style>
    <style:style style:name="T491" style:parent-style-name="Policepardéfaut" style:family="text">
      <style:text-properties style:font-name="GPAFJ+Aptos" style:font-name-asian="GPAFJ+Aptos" style:font-name-complex="GPAFJ+Aptos" fo:color="#000000"/>
    </style:style>
    <style:style style:name="T492" style:parent-style-name="Policepardéfaut" style:family="text">
      <style:text-properties style:font-name="GPAFJ+Aptos" style:font-name-asian="GPAFJ+Aptos" style:font-name-complex="GPAFJ+Aptos" fo:color="#000000" fo:letter-spacing="-0.0006in" style:text-scale="101%"/>
    </style:style>
    <style:style style:name="T493" style:parent-style-name="Policepardéfaut" style:family="text">
      <style:text-properties style:font-name="GPAFJ+Aptos" style:font-name-asian="GPAFJ+Aptos" style:font-name-complex="GPAFJ+Aptos" fo:color="#000000"/>
    </style:style>
    <style:style style:name="T494" style:parent-style-name="Policepardéfaut" style:family="text">
      <style:text-properties style:font-name="GPAFJ+Aptos" style:font-name-asian="GPAFJ+Aptos" style:font-name-complex="GPAFJ+Aptos" fo:color="#000000" fo:letter-spacing="-0.0006in"/>
    </style:style>
    <style:style style:name="T495" style:parent-style-name="Policepardéfaut" style:family="text">
      <style:text-properties style:font-name="GPAFJ+Aptos" style:font-name-asian="GPAFJ+Aptos" style:font-name-complex="GPAFJ+Aptos" fo:color="#000000"/>
    </style:style>
    <style:style style:name="T496" style:parent-style-name="Policepardéfaut" style:family="text">
      <style:text-properties style:font-name="GPAFJ+Aptos" style:font-name-asian="GPAFJ+Aptos" style:font-name-complex="GPAFJ+Aptos" fo:color="#000000" style:text-scale="101%"/>
    </style:style>
    <style:style style:name="T497" style:parent-style-name="Policepardéfaut" style:family="text">
      <style:text-properties style:font-name="GPAFJ+Aptos" style:font-name-asian="GPAFJ+Aptos" style:font-name-complex="GPAFJ+Aptos" fo:color="#000000" fo:letter-spacing="-0.0006in"/>
    </style:style>
    <style:style style:name="T498" style:parent-style-name="Policepardéfaut" style:family="text">
      <style:text-properties style:font-name="GPAFJ+Aptos" style:font-name-asian="GPAFJ+Aptos" style:font-name-complex="GPAFJ+Aptos" fo:color="#000000" fo:letter-spacing="-0.0006in" style:text-scale="101%"/>
    </style:style>
    <style:style style:name="T499" style:parent-style-name="Policepardéfaut" style:family="text">
      <style:text-properties style:font-name="GPAFJ+Aptos" style:font-name-asian="GPAFJ+Aptos" style:font-name-complex="GPAFJ+Aptos" fo:color="#000000"/>
    </style:style>
    <style:style style:name="T500" style:parent-style-name="Policepardéfaut" style:family="text">
      <style:text-properties style:font-name="GPAFJ+Aptos" style:font-name-asian="GPAFJ+Aptos" style:font-name-complex="GPAFJ+Aptos" fo:color="#000000" fo:letter-spacing="-0.0006in" style:text-scale="101%"/>
    </style:style>
    <style:style style:name="T501" style:parent-style-name="Policepardéfaut" style:family="text">
      <style:text-properties style:font-name="GPAFJ+Aptos" style:font-name-asian="GPAFJ+Aptos" style:font-name-complex="GPAFJ+Aptos" fo:color="#000000" style:text-scale="101%"/>
    </style:style>
    <style:style style:name="T502" style:parent-style-name="Policepardéfaut" style:family="text">
      <style:text-properties style:font-name="GPAFJ+Aptos" style:font-name-asian="GPAFJ+Aptos" style:font-name-complex="GPAFJ+Aptos" fo:color="#000000" fo:letter-spacing="-0.0013in"/>
    </style:style>
    <style:style style:name="T503" style:parent-style-name="Policepardéfaut" style:family="text">
      <style:text-properties style:font-name="GPAFJ+Aptos" style:font-name-asian="GPAFJ+Aptos" style:font-name-complex="GPAFJ+Aptos" fo:color="#000000" style:text-scale="101%"/>
    </style:style>
    <style:style style:name="T504" style:parent-style-name="Policepardéfaut" style:family="text">
      <style:text-properties style:font-name="GPAFJ+Aptos" style:font-name-asian="GPAFJ+Aptos" style:font-name-complex="GPAFJ+Aptos" fo:color="#000000"/>
    </style:style>
    <style:style style:name="T505" style:parent-style-name="Policepardéfaut" style:family="text">
      <style:text-properties style:font-name="GPAFJ+Aptos" style:font-name-asian="GPAFJ+Aptos" style:font-name-complex="GPAFJ+Aptos" fo:color="#000000" fo:letter-spacing="-0.0006in" style:text-scale="101%"/>
    </style:style>
    <style:style style:name="T506" style:parent-style-name="Policepardéfaut" style:family="text">
      <style:text-properties style:font-name="GPAFJ+Aptos" style:font-name-asian="GPAFJ+Aptos" style:font-name-complex="GPAFJ+Aptos" fo:color="#000000"/>
    </style:style>
    <style:style style:name="T507" style:parent-style-name="Policepardéfaut" style:family="text">
      <style:text-properties style:font-name="GPAFJ+Aptos" style:font-name-asian="GPAFJ+Aptos" style:font-name-complex="GPAFJ+Aptos" fo:color="#000000" fo:letter-spacing="-0.0006in"/>
    </style:style>
    <style:style style:name="T508" style:parent-style-name="Policepardéfaut" style:family="text">
      <style:text-properties style:font-name="GPAFJ+Aptos" style:font-name-asian="GPAFJ+Aptos" style:font-name-complex="GPAFJ+Aptos" fo:color="#000000"/>
    </style:style>
    <style:style style:name="T509" style:parent-style-name="Policepardéfaut" style:family="text">
      <style:text-properties style:font-name="GPAFJ+Aptos" style:font-name-asian="GPAFJ+Aptos" style:font-name-complex="GPAFJ+Aptos" fo:color="#000000" style:text-scale="101%"/>
    </style:style>
    <style:style style:name="T510" style:parent-style-name="Policepardéfaut" style:family="text">
      <style:text-properties style:font-name="GPAFJ+Aptos" style:font-name-asian="GPAFJ+Aptos" style:font-name-complex="GPAFJ+Aptos" fo:color="#000000"/>
    </style:style>
    <style:style style:name="T511" style:parent-style-name="Policepardéfaut" style:family="text">
      <style:text-properties style:font-name="GPAFJ+Aptos" style:font-name-asian="GPAFJ+Aptos" style:font-name-complex="GPAFJ+Aptos" fo:color="#000000" fo:letter-spacing="0.0006in" style:text-scale="101%"/>
    </style:style>
    <style:style style:name="T512" style:parent-style-name="Policepardéfaut" style:family="text">
      <style:text-properties style:font-name="GPAFJ+Aptos" style:font-name-asian="GPAFJ+Aptos" style:font-name-complex="GPAFJ+Aptos" fo:color="#000000"/>
    </style:style>
    <style:style style:name="T513" style:parent-style-name="Policepardéfaut" style:family="text">
      <style:text-properties style:font-name="GPAFJ+Aptos" style:font-name-asian="GPAFJ+Aptos" style:font-name-complex="GPAFJ+Aptos" fo:color="#000000" fo:letter-spacing="-0.0006in"/>
    </style:style>
    <style:style style:name="T514" style:parent-style-name="Policepardéfaut" style:family="text">
      <style:text-properties style:font-name="GPAFJ+Aptos" style:font-name-asian="GPAFJ+Aptos" style:font-name-complex="GPAFJ+Aptos" fo:color="#000000" fo:letter-spacing="-0.0006in" style:text-scale="101%"/>
    </style:style>
    <style:style style:name="T515" style:parent-style-name="Policepardéfaut" style:family="text">
      <style:text-properties style:font-name="GPAFJ+Aptos" style:font-name-asian="GPAFJ+Aptos" style:font-name-complex="GPAFJ+Aptos" fo:color="#000000" fo:letter-spacing="0.0006in"/>
    </style:style>
    <style:style style:name="T516" style:parent-style-name="Policepardéfaut" style:family="text">
      <style:text-properties style:font-name="GPAFJ+Aptos" style:font-name-asian="GPAFJ+Aptos" style:font-name-complex="GPAFJ+Aptos" fo:color="#000000" fo:letter-spacing="-0.0006in"/>
    </style:style>
    <style:style style:name="T517" style:parent-style-name="Policepardéfaut" style:family="text">
      <style:text-properties style:font-name="GPAFJ+Aptos" style:font-name-asian="GPAFJ+Aptos" style:font-name-complex="GPAFJ+Aptos" fo:color="#000000"/>
    </style:style>
    <style:style style:name="T518" style:parent-style-name="Policepardéfaut" style:family="text">
      <style:text-properties style:font-name="GPAFJ+Aptos" style:font-name-asian="GPAFJ+Aptos" style:font-name-complex="GPAFJ+Aptos" fo:color="#000000" fo:letter-spacing="-0.0006in"/>
    </style:style>
    <style:style style:name="T519" style:parent-style-name="Policepardéfaut" style:family="text">
      <style:text-properties style:font-name="GPAFJ+Aptos" style:font-name-asian="GPAFJ+Aptos" style:font-name-complex="GPAFJ+Aptos" fo:color="#000000" fo:letter-spacing="0.0006in" style:text-scale="101%"/>
    </style:style>
    <style:style style:name="T520" style:parent-style-name="Policepardéfaut" style:family="text">
      <style:text-properties style:font-name="GPAFJ+Aptos" style:font-name-asian="GPAFJ+Aptos" style:font-name-complex="GPAFJ+Aptos" fo:color="#000000" fo:letter-spacing="-0.0006in"/>
    </style:style>
    <style:style style:name="T521" style:parent-style-name="Policepardéfaut" style:family="text">
      <style:text-properties style:font-name="GPAFJ+Aptos" style:font-name-asian="GPAFJ+Aptos" style:font-name-complex="GPAFJ+Aptos" fo:color="#000000"/>
    </style:style>
    <style:style style:name="T522" style:parent-style-name="Policepardéfaut" style:family="text">
      <style:text-properties style:font-name="GPAFJ+Aptos" style:font-name-asian="GPAFJ+Aptos" style:font-name-complex="GPAFJ+Aptos" fo:color="#000000" style:text-scale="101%"/>
    </style:style>
    <style:style style:name="T523" style:parent-style-name="Policepardéfaut" style:family="text">
      <style:text-properties style:font-name="GPAFJ+Aptos" style:font-name-asian="GPAFJ+Aptos" style:font-name-complex="GPAFJ+Aptos" fo:color="#000000" fo:letter-spacing="-0.0006in"/>
    </style:style>
    <style:style style:name="T524" style:parent-style-name="Policepardéfaut" style:family="text">
      <style:text-properties style:font-name="GPAFJ+Aptos" style:font-name-asian="GPAFJ+Aptos" style:font-name-complex="GPAFJ+Aptos" fo:color="#000000" fo:letter-spacing="0.0006in" style:text-scale="101%"/>
    </style:style>
    <style:style style:name="T525" style:parent-style-name="Policepardéfaut" style:family="text">
      <style:text-properties style:font-name="GPAFJ+Aptos" style:font-name-asian="GPAFJ+Aptos" style:font-name-complex="GPAFJ+Aptos" fo:color="#000000" style:text-scale="101%"/>
    </style:style>
    <style:style style:name="T526" style:parent-style-name="Policepardéfaut" style:family="text">
      <style:text-properties style:font-name="GPAFJ+Aptos" style:font-name-asian="GPAFJ+Aptos" style:font-name-complex="GPAFJ+Aptos" fo:color="#000000" fo:letter-spacing="-0.0013in"/>
    </style:style>
    <style:style style:name="T527" style:parent-style-name="Policepardéfaut" style:family="text">
      <style:text-properties style:font-name="GPAFJ+Aptos" style:font-name-asian="GPAFJ+Aptos" style:font-name-complex="GPAFJ+Aptos" fo:color="#000000" style:text-scale="101%"/>
    </style:style>
    <style:style style:name="T528" style:parent-style-name="Policepardéfaut" style:family="text">
      <style:text-properties style:font-name="GPAFJ+Aptos" style:font-name-asian="GPAFJ+Aptos" style:font-name-complex="GPAFJ+Aptos" fo:color="#000000"/>
    </style:style>
    <style:style style:name="T529" style:parent-style-name="Policepardéfaut" style:family="text">
      <style:text-properties style:font-name="GPAFJ+Aptos" style:font-name-asian="GPAFJ+Aptos" style:font-name-complex="GPAFJ+Aptos" fo:color="#000000" style:text-scale="101%"/>
    </style:style>
    <style:style style:name="T530" style:parent-style-name="Policepardéfaut" style:family="text">
      <style:text-properties style:font-name="GPAFJ+Aptos" style:font-name-asian="GPAFJ+Aptos" style:font-name-complex="GPAFJ+Aptos" fo:color="#000000" fo:letter-spacing="-0.0006in"/>
    </style:style>
    <style:style style:name="T531" style:parent-style-name="Policepardéfaut" style:family="text">
      <style:text-properties style:font-name="GPAFJ+Aptos" style:font-name-asian="GPAFJ+Aptos" style:font-name-complex="GPAFJ+Aptos" fo:color="#000000"/>
    </style:style>
    <style:style style:name="T532" style:parent-style-name="Policepardéfaut" style:family="text">
      <style:text-properties style:font-name="GPAFJ+Aptos" style:font-name-asian="GPAFJ+Aptos" style:font-name-complex="GPAFJ+Aptos" fo:color="#000000" fo:letter-spacing="-0.0013in"/>
    </style:style>
    <style:style style:name="T533" style:parent-style-name="Policepardéfaut" style:family="text">
      <style:text-properties style:font-name="GPAFJ+Aptos" style:font-name-asian="GPAFJ+Aptos" style:font-name-complex="GPAFJ+Aptos" fo:color="#000000" fo:letter-spacing="-0.0006in" style:text-scale="101%"/>
    </style:style>
    <style:style style:name="T534" style:parent-style-name="Policepardéfaut" style:family="text">
      <style:text-properties style:font-name="GPAFJ+Aptos" style:font-name-asian="GPAFJ+Aptos" style:font-name-complex="GPAFJ+Aptos" fo:color="#000000" style:text-scale="101%"/>
    </style:style>
    <style:style style:name="T535" style:parent-style-name="Policepardéfaut" style:family="text">
      <style:text-properties style:font-name="GPAFJ+Aptos" style:font-name-asian="GPAFJ+Aptos" style:font-name-complex="GPAFJ+Aptos" fo:color="#000000"/>
    </style:style>
    <style:style style:name="T536" style:parent-style-name="Policepardéfaut" style:family="text">
      <style:text-properties style:font-name="GPAFJ+Aptos" style:font-name-asian="GPAFJ+Aptos" style:font-name-complex="GPAFJ+Aptos" fo:color="#000000" style:text-scale="101%"/>
    </style:style>
    <style:style style:name="T537" style:parent-style-name="Policepardéfaut" style:family="text">
      <style:text-properties style:font-name="GPAFJ+Aptos" style:font-name-asian="GPAFJ+Aptos" style:font-name-complex="GPAFJ+Aptos" fo:color="#000000"/>
    </style:style>
    <style:style style:name="T538" style:parent-style-name="Policepardéfaut" style:family="text">
      <style:text-properties style:font-name="GPAFJ+Aptos" style:font-name-asian="GPAFJ+Aptos" style:font-name-complex="GPAFJ+Aptos" fo:color="#000000" fo:letter-spacing="-0.0006in"/>
    </style:style>
    <style:style style:name="T539" style:parent-style-name="Policepardéfaut" style:family="text">
      <style:text-properties style:font-name="GPAFJ+Aptos" style:font-name-asian="GPAFJ+Aptos" style:font-name-complex="GPAFJ+Aptos" fo:color="#000000"/>
    </style:style>
    <style:style style:name="T540" style:parent-style-name="Policepardéfaut" style:family="text">
      <style:text-properties style:font-name="GPAFJ+Aptos" style:font-name-asian="GPAFJ+Aptos" style:font-name-complex="GPAFJ+Aptos" fo:color="#000000" style:text-scale="101%"/>
    </style:style>
    <style:style style:name="T541" style:parent-style-name="Policepardéfaut" style:family="text">
      <style:text-properties style:font-name="GPAFJ+Aptos" style:font-name-asian="GPAFJ+Aptos" style:font-name-complex="GPAFJ+Aptos" fo:color="#000000" fo:letter-spacing="-0.002in"/>
    </style:style>
    <style:style style:name="T542" style:parent-style-name="Policepardéfaut" style:family="text">
      <style:text-properties style:font-name="GPAFJ+Aptos" style:font-name-asian="GPAFJ+Aptos" style:font-name-complex="GPAFJ+Aptos" fo:color="#000000" style:text-scale="101%"/>
    </style:style>
    <style:style style:name="T543" style:parent-style-name="Policepardéfaut" style:family="text">
      <style:text-properties style:font-name="GPAFJ+Aptos" style:font-name-asian="GPAFJ+Aptos" style:font-name-complex="GPAFJ+Aptos" fo:color="#000000"/>
    </style:style>
    <style:style style:name="T544" style:parent-style-name="Policepardéfaut" style:family="text">
      <style:text-properties style:font-name="GPAFJ+Aptos" style:font-name-asian="GPAFJ+Aptos" style:font-name-complex="GPAFJ+Aptos" fo:color="#000000" fo:letter-spacing="-0.0013in" style:text-scale="101%"/>
    </style:style>
    <style:style style:name="T545" style:parent-style-name="Policepardéfaut" style:family="text">
      <style:text-properties style:font-name="GPAFJ+Aptos" style:font-name-asian="GPAFJ+Aptos" style:font-name-complex="GPAFJ+Aptos" fo:color="#000000" fo:letter-spacing="-0.0006in" style:text-scale="101%"/>
    </style:style>
    <style:style style:name="T546" style:parent-style-name="Policepardéfaut" style:family="text">
      <style:text-properties style:font-name="GPAFJ+Aptos" style:font-name-asian="GPAFJ+Aptos" style:font-name-complex="GPAFJ+Aptos" fo:color="#000000" fo:letter-spacing="0.0006in"/>
    </style:style>
    <style:style style:name="T547" style:parent-style-name="Policepardéfaut" style:family="text">
      <style:text-properties style:font-name="GPAFJ+Aptos" style:font-name-asian="GPAFJ+Aptos" style:font-name-complex="GPAFJ+Aptos" fo:color="#000000" style:text-scale="101%"/>
    </style:style>
    <style:style style:name="T548" style:parent-style-name="Policepardéfaut" style:family="text">
      <style:text-properties style:font-name="GPAFJ+Aptos" style:font-name-asian="GPAFJ+Aptos" style:font-name-complex="GPAFJ+Aptos" fo:color="#000000"/>
    </style:style>
    <style:style style:name="T549" style:parent-style-name="Policepardéfaut" style:family="text">
      <style:text-properties style:font-name="GPAFJ+Aptos" style:font-name-asian="GPAFJ+Aptos" style:font-name-complex="GPAFJ+Aptos" fo:color="#000000" fo:letter-spacing="0.002in"/>
    </style:style>
    <style:style style:name="T550" style:parent-style-name="Policepardéfaut" style:family="text">
      <style:text-properties style:font-name="GPAFJ+Aptos" style:font-name-asian="GPAFJ+Aptos" style:font-name-complex="GPAFJ+Aptos" fo:color="#000000" fo:letter-spacing="-0.0006in"/>
    </style:style>
    <style:style style:name="T551" style:parent-style-name="Policepardéfaut" style:family="text">
      <style:text-properties style:font-name="GPAFJ+Aptos" style:font-name-asian="GPAFJ+Aptos" style:font-name-complex="GPAFJ+Aptos" fo:color="#000000" fo:letter-spacing="-0.0006in" style:text-scale="101%"/>
    </style:style>
    <style:style style:name="T552" style:parent-style-name="Policepardéfaut" style:family="text">
      <style:text-properties style:font-name="GPAFJ+Aptos" style:font-name-asian="GPAFJ+Aptos" style:font-name-complex="GPAFJ+Aptos" fo:color="#000000"/>
    </style:style>
    <style:style style:name="T553" style:parent-style-name="Policepardéfaut" style:family="text">
      <style:text-properties style:font-name="GPAFJ+Aptos" style:font-name-asian="GPAFJ+Aptos" style:font-name-complex="GPAFJ+Aptos" fo:color="#000000" style:text-scale="101%"/>
    </style:style>
    <style:style style:name="T554" style:parent-style-name="Policepardéfaut" style:family="text">
      <style:text-properties style:font-name="GPAFJ+Aptos" style:font-name-asian="GPAFJ+Aptos" style:font-name-complex="GPAFJ+Aptos" fo:color="#000000" fo:letter-spacing="-0.0013in"/>
    </style:style>
    <style:style style:name="T555" style:parent-style-name="Policepardéfaut" style:family="text">
      <style:text-properties style:font-name="GPAFJ+Aptos" style:font-name-asian="GPAFJ+Aptos" style:font-name-complex="GPAFJ+Aptos" fo:color="#000000"/>
    </style:style>
    <style:style style:name="T556" style:parent-style-name="Policepardéfaut" style:family="text">
      <style:text-properties style:font-name="GPAFJ+Aptos" style:font-name-asian="GPAFJ+Aptos" style:font-name-complex="GPAFJ+Aptos" fo:color="#000000" style:text-scale="101%"/>
    </style:style>
    <style:style style:name="T557" style:parent-style-name="Policepardéfaut" style:family="text">
      <style:text-properties style:font-name="GPAFJ+Aptos" style:font-name-asian="GPAFJ+Aptos" style:font-name-complex="GPAFJ+Aptos" fo:color="#000000"/>
    </style:style>
    <style:style style:name="T558" style:parent-style-name="Policepardéfaut" style:family="text">
      <style:text-properties style:font-name="GPAFJ+Aptos" style:font-name-asian="GPAFJ+Aptos" style:font-name-complex="GPAFJ+Aptos" fo:color="#000000" fo:letter-spacing="-0.0006in" style:text-scale="101%"/>
    </style:style>
    <style:style style:name="T559" style:parent-style-name="Policepardéfaut" style:family="text">
      <style:text-properties style:font-name="GPAFJ+Aptos" style:font-name-asian="GPAFJ+Aptos" style:font-name-complex="GPAFJ+Aptos" fo:color="#000000"/>
    </style:style>
    <style:style style:name="T560" style:parent-style-name="Policepardéfaut" style:family="text">
      <style:text-properties style:font-name="GPAFJ+Aptos" style:font-name-asian="GPAFJ+Aptos" style:font-name-complex="GPAFJ+Aptos" fo:color="#000000" fo:letter-spacing="0.0006in"/>
    </style:style>
    <style:style style:name="T561" style:parent-style-name="Policepardéfaut" style:family="text">
      <style:text-properties style:font-name="GPAFJ+Aptos" style:font-name-asian="GPAFJ+Aptos" style:font-name-complex="GPAFJ+Aptos" fo:color="#000000"/>
    </style:style>
    <style:style style:name="T562" style:parent-style-name="Policepardéfaut" style:family="text">
      <style:text-properties style:font-name="GPAFJ+Aptos" style:font-name-asian="GPAFJ+Aptos" style:font-name-complex="GPAFJ+Aptos" fo:color="#000000" style:text-scale="101%"/>
    </style:style>
    <style:style style:name="T563" style:parent-style-name="Policepardéfaut" style:family="text">
      <style:text-properties style:font-name="GPAFJ+Aptos" style:font-name-asian="GPAFJ+Aptos" style:font-name-complex="GPAFJ+Aptos" fo:color="#000000" fo:letter-spacing="-0.0006in"/>
    </style:style>
    <style:style style:name="T564" style:parent-style-name="Policepardéfaut" style:family="text">
      <style:text-properties style:font-name="GPAFJ+Aptos" style:font-name-asian="GPAFJ+Aptos" style:font-name-complex="GPAFJ+Aptos" fo:color="#000000"/>
    </style:style>
    <style:style style:name="T565" style:parent-style-name="Policepardéfaut" style:family="text">
      <style:text-properties style:font-name="GPAFJ+Aptos" style:font-name-asian="GPAFJ+Aptos" style:font-name-complex="GPAFJ+Aptos" fo:color="#000000" fo:letter-spacing="-0.0006in"/>
    </style:style>
    <style:style style:name="T566" style:parent-style-name="Policepardéfaut" style:family="text">
      <style:text-properties style:font-name="GPAFJ+Aptos" style:font-name-asian="GPAFJ+Aptos" style:font-name-complex="GPAFJ+Aptos" fo:color="#000000"/>
    </style:style>
    <style:style style:name="T567" style:parent-style-name="Policepardéfaut" style:family="text">
      <style:text-properties style:font-name="GPAFJ+Aptos" style:font-name-asian="GPAFJ+Aptos" style:font-name-complex="GPAFJ+Aptos" fo:color="#000000" style:text-scale="101%"/>
    </style:style>
    <style:style style:name="T568" style:parent-style-name="Policepardéfaut" style:family="text">
      <style:text-properties style:font-name="GPAFJ+Aptos" style:font-name-asian="GPAFJ+Aptos" style:font-name-complex="GPAFJ+Aptos" fo:color="#000000"/>
    </style:style>
    <style:style style:name="T569" style:parent-style-name="Policepardéfaut" style:family="text">
      <style:text-properties style:font-name="GPAFJ+Aptos" style:font-name-asian="GPAFJ+Aptos" style:font-name-complex="GPAFJ+Aptos" fo:color="#000000" style:text-scale="101%"/>
    </style:style>
    <style:style style:name="T570" style:parent-style-name="Policepardéfaut" style:family="text">
      <style:text-properties style:font-name="GPAFJ+Aptos" style:font-name-asian="GPAFJ+Aptos" style:font-name-complex="GPAFJ+Aptos" fo:color="#000000" fo:letter-spacing="-0.0013in"/>
    </style:style>
    <style:style style:name="T571" style:parent-style-name="Policepardéfaut" style:family="text">
      <style:text-properties style:font-name="GPAFJ+Aptos" style:font-name-asian="GPAFJ+Aptos" style:font-name-complex="GPAFJ+Aptos" fo:color="#000000" fo:letter-spacing="-0.0006in" style:text-scale="101%"/>
    </style:style>
    <style:style style:name="T572" style:parent-style-name="Policepardéfaut" style:family="text">
      <style:text-properties style:font-name="GPAFJ+Aptos" style:font-name-asian="GPAFJ+Aptos" style:font-name-complex="GPAFJ+Aptos" fo:color="#000000" style:text-scale="101%"/>
    </style:style>
    <style:style style:name="T573" style:parent-style-name="Policepardéfaut" style:family="text">
      <style:text-properties style:font-name="GPAFJ+Aptos" style:font-name-asian="GPAFJ+Aptos" style:font-name-complex="GPAFJ+Aptos" fo:color="#000000"/>
    </style:style>
    <style:style style:name="T574" style:parent-style-name="Policepardéfaut" style:family="text">
      <style:text-properties style:font-name="GPAFJ+Aptos" style:font-name-asian="GPAFJ+Aptos" style:font-name-complex="GPAFJ+Aptos" fo:color="#000000" fo:letter-spacing="-0.0006in" style:text-scale="101%"/>
    </style:style>
    <style:style style:name="T575" style:parent-style-name="Policepardéfaut" style:family="text">
      <style:text-properties style:font-name="GPAFJ+Aptos" style:font-name-asian="GPAFJ+Aptos" style:font-name-complex="GPAFJ+Aptos" fo:color="#000000"/>
    </style:style>
    <style:style style:name="T576" style:parent-style-name="Policepardéfaut" style:family="text">
      <style:text-properties style:font-name="GPAFJ+Aptos" style:font-name-asian="GPAFJ+Aptos" style:font-name-complex="GPAFJ+Aptos" fo:color="#000000" style:text-scale="101%"/>
    </style:style>
    <style:style style:name="T577" style:parent-style-name="Policepardéfaut" style:family="text">
      <style:text-properties style:font-name="GPAFJ+Aptos" style:font-name-asian="GPAFJ+Aptos" style:font-name-complex="GPAFJ+Aptos" fo:color="#000000" fo:letter-spacing="-0.0013in"/>
    </style:style>
    <style:style style:name="T578" style:parent-style-name="Policepardéfaut" style:family="text">
      <style:text-properties style:font-name="GPAFJ+Aptos" style:font-name-asian="GPAFJ+Aptos" style:font-name-complex="GPAFJ+Aptos" fo:color="#000000" fo:letter-spacing="-0.0006in" style:text-scale="101%"/>
    </style:style>
    <style:style style:name="T579" style:parent-style-name="Policepardéfaut" style:family="text">
      <style:text-properties style:font-name="GPAFJ+Aptos" style:font-name-asian="GPAFJ+Aptos" style:font-name-complex="GPAFJ+Aptos" fo:color="#000000"/>
    </style:style>
    <style:style style:name="T580" style:parent-style-name="Policepardéfaut" style:family="text">
      <style:text-properties style:font-name="GPAFJ+Aptos" style:font-name-asian="GPAFJ+Aptos" style:font-name-complex="GPAFJ+Aptos" fo:color="#000000" style:text-scale="101%"/>
    </style:style>
    <style:style style:name="T581" style:parent-style-name="Policepardéfaut" style:family="text">
      <style:text-properties style:font-name="GPAFJ+Aptos" style:font-name-asian="GPAFJ+Aptos" style:font-name-complex="GPAFJ+Aptos" fo:color="#000000"/>
    </style:style>
    <style:style style:name="T582" style:parent-style-name="Policepardéfaut" style:family="text">
      <style:text-properties style:font-name="GPAFJ+Aptos" style:font-name-asian="GPAFJ+Aptos" style:font-name-complex="GPAFJ+Aptos" fo:color="#000000" style:text-scale="101%"/>
    </style:style>
    <style:style style:name="T583" style:parent-style-name="Policepardéfaut" style:family="text">
      <style:text-properties style:font-name="GPAFJ+Aptos" style:font-name-asian="GPAFJ+Aptos" style:font-name-complex="GPAFJ+Aptos" fo:color="#000000" fo:letter-spacing="-0.0006in"/>
    </style:style>
    <style:style style:name="T584" style:parent-style-name="Policepardéfaut" style:family="text">
      <style:text-properties style:font-name="GPAFJ+Aptos" style:font-name-asian="GPAFJ+Aptos" style:font-name-complex="GPAFJ+Aptos" fo:color="#000000" style:text-scale="101%"/>
    </style:style>
    <style:style style:name="T585" style:parent-style-name="Policepardéfaut" style:family="text">
      <style:text-properties style:font-name="GPAFJ+Aptos" style:font-name-asian="GPAFJ+Aptos" style:font-name-complex="GPAFJ+Aptos" fo:color="#000000"/>
    </style:style>
    <style:style style:name="T586" style:parent-style-name="Policepardéfaut" style:family="text">
      <style:text-properties style:font-name="GPAFJ+Aptos" style:font-name-asian="GPAFJ+Aptos" style:font-name-complex="GPAFJ+Aptos" fo:color="#000000" fo:letter-spacing="-0.0006in" style:text-scale="101%"/>
    </style:style>
    <style:style style:name="T587" style:parent-style-name="Policepardéfaut" style:family="text">
      <style:text-properties style:font-name="GPAFJ+Aptos" style:font-name-asian="GPAFJ+Aptos" style:font-name-complex="GPAFJ+Aptos" fo:color="#000000" style:text-scale="101%"/>
    </style:style>
    <style:style style:name="T588" style:parent-style-name="Policepardéfaut" style:family="text">
      <style:text-properties style:font-name="GPAFJ+Aptos" style:font-name-asian="GPAFJ+Aptos" style:font-name-complex="GPAFJ+Aptos" fo:color="#000000"/>
    </style:style>
    <style:style style:name="T589" style:parent-style-name="Policepardéfaut" style:family="text">
      <style:text-properties style:font-name="GPAFJ+Aptos" style:font-name-asian="GPAFJ+Aptos" style:font-name-complex="GPAFJ+Aptos" fo:color="#000000" style:text-scale="101%"/>
    </style:style>
    <style:style style:name="T590" style:parent-style-name="Policepardéfaut" style:family="text">
      <style:text-properties style:font-name="GPAFJ+Aptos" style:font-name-asian="GPAFJ+Aptos" style:font-name-complex="GPAFJ+Aptos" fo:color="#000000" fo:letter-spacing="-0.0013in"/>
    </style:style>
    <style:style style:name="T591" style:parent-style-name="Policepardéfaut" style:family="text">
      <style:text-properties style:font-name="GPAFJ+Aptos" style:font-name-asian="GPAFJ+Aptos" style:font-name-complex="GPAFJ+Aptos" fo:color="#000000"/>
    </style:style>
    <style:style style:name="T592" style:parent-style-name="Policepardéfaut" style:family="text">
      <style:text-properties style:font-name="GPAFJ+Aptos" style:font-name-asian="GPAFJ+Aptos" style:font-name-complex="GPAFJ+Aptos" fo:color="#000000" style:text-scale="101%"/>
    </style:style>
    <style:style style:name="T593" style:parent-style-name="Policepardéfaut" style:family="text">
      <style:text-properties style:font-name="GPAFJ+Aptos" style:font-name-asian="GPAFJ+Aptos" style:font-name-complex="GPAFJ+Aptos" fo:color="#000000"/>
    </style:style>
    <style:style style:name="T594" style:parent-style-name="Policepardéfaut" style:family="text">
      <style:text-properties style:font-name="GPAFJ+Aptos" style:font-name-asian="GPAFJ+Aptos" style:font-name-complex="GPAFJ+Aptos" fo:color="#000000" fo:letter-spacing="-0.0006in"/>
    </style:style>
    <style:style style:name="T595" style:parent-style-name="Policepardéfaut" style:family="text">
      <style:text-properties style:font-name="GPAFJ+Aptos" style:font-name-asian="GPAFJ+Aptos" style:font-name-complex="GPAFJ+Aptos" fo:color="#000000" style:text-scale="101%"/>
    </style:style>
    <style:style style:name="T596" style:parent-style-name="Policepardéfaut" style:family="text">
      <style:text-properties style:font-name="GPAFJ+Aptos" style:font-name-asian="GPAFJ+Aptos" style:font-name-complex="GPAFJ+Aptos" fo:color="#000000"/>
    </style:style>
    <style:style style:name="T597" style:parent-style-name="Policepardéfaut" style:family="text">
      <style:text-properties style:font-name="GPAFJ+Aptos" style:font-name-asian="GPAFJ+Aptos" style:font-name-complex="GPAFJ+Aptos" fo:color="#000000" fo:letter-spacing="-0.0006in"/>
    </style:style>
    <style:style style:name="T598" style:parent-style-name="Policepardéfaut" style:family="text">
      <style:text-properties style:font-name="GPAFJ+Aptos" style:font-name-asian="GPAFJ+Aptos" style:font-name-complex="GPAFJ+Aptos" fo:color="#000000"/>
    </style:style>
    <style:style style:name="T599" style:parent-style-name="Policepardéfaut" style:family="text">
      <style:text-properties style:font-name="GPAFJ+Aptos" style:font-name-asian="GPAFJ+Aptos" style:font-name-complex="GPAFJ+Aptos" fo:color="#000000" style:text-scale="101%"/>
    </style:style>
    <style:style style:name="T600" style:parent-style-name="Policepardéfaut" style:family="text">
      <style:text-properties style:font-name="GPAFJ+Aptos" style:font-name-asian="GPAFJ+Aptos" style:font-name-complex="GPAFJ+Aptos" fo:color="#000000" fo:letter-spacing="-0.0006in"/>
    </style:style>
    <style:style style:name="T601" style:parent-style-name="Policepardéfaut" style:family="text">
      <style:text-properties style:font-name="GPAFJ+Aptos" style:font-name-asian="GPAFJ+Aptos" style:font-name-complex="GPAFJ+Aptos" fo:color="#000000" style:text-scale="101%"/>
    </style:style>
    <style:style style:name="T602" style:parent-style-name="Policepardéfaut" style:family="text">
      <style:text-properties style:font-name="GPAFJ+Aptos" style:font-name-asian="GPAFJ+Aptos" style:font-name-complex="GPAFJ+Aptos" fo:color="#000000" fo:letter-spacing="-0.0006in"/>
    </style:style>
    <style:style style:name="T603" style:parent-style-name="Policepardéfaut" style:family="text">
      <style:text-properties style:font-name="GPAFJ+Aptos" style:font-name-asian="GPAFJ+Aptos" style:font-name-complex="GPAFJ+Aptos" fo:color="#000000" style:text-scale="101%"/>
    </style:style>
    <style:style style:name="T604" style:parent-style-name="Policepardéfaut" style:family="text">
      <style:text-properties style:font-name="GPAFJ+Aptos" style:font-name-asian="GPAFJ+Aptos" style:font-name-complex="GPAFJ+Aptos" fo:color="#000000" fo:letter-spacing="-0.0006in" style:text-scale="101%"/>
    </style:style>
    <style:style style:name="T605" style:parent-style-name="Policepardéfaut" style:family="text">
      <style:text-properties style:font-name="GPAFJ+Aptos" style:font-name-asian="GPAFJ+Aptos" style:font-name-complex="GPAFJ+Aptos" fo:color="#000000" style:text-scale="101%"/>
    </style:style>
    <style:style style:name="T606" style:parent-style-name="Policepardéfaut" style:family="text">
      <style:text-properties style:font-name="GPAFJ+Aptos" style:font-name-asian="GPAFJ+Aptos" style:font-name-complex="GPAFJ+Aptos" fo:color="#000000" fo:letter-spacing="0.0006in"/>
    </style:style>
    <style:style style:name="T607" style:parent-style-name="Policepardéfaut" style:family="text">
      <style:text-properties style:font-name="GPAFJ+Aptos" style:font-name-asian="GPAFJ+Aptos" style:font-name-complex="GPAFJ+Aptos" fo:color="#000000" style:text-scale="101%"/>
    </style:style>
    <style:style style:name="T608" style:parent-style-name="Policepardéfaut" style:family="text">
      <style:text-properties style:font-name="GPAFJ+Aptos" style:font-name-asian="GPAFJ+Aptos" style:font-name-complex="GPAFJ+Aptos" fo:color="#000000" fo:letter-spacing="-0.0013in"/>
    </style:style>
    <style:style style:name="T609" style:parent-style-name="Policepardéfaut" style:family="text">
      <style:text-properties style:font-name="GPAFJ+Aptos" style:font-name-asian="GPAFJ+Aptos" style:font-name-complex="GPAFJ+Aptos" fo:color="#000000" style:text-scale="101%"/>
    </style:style>
    <style:style style:name="T610" style:parent-style-name="Policepardéfaut" style:family="text">
      <style:text-properties style:font-name="GPAFJ+Aptos" style:font-name-asian="GPAFJ+Aptos" style:font-name-complex="GPAFJ+Aptos" fo:color="#000000" fo:letter-spacing="-0.0013in"/>
    </style:style>
    <style:style style:name="T611" style:parent-style-name="Policepardéfaut" style:family="text">
      <style:text-properties style:font-name="GPAFJ+Aptos" style:font-name-asian="GPAFJ+Aptos" style:font-name-complex="GPAFJ+Aptos" fo:color="#000000" style:text-scale="101%"/>
    </style:style>
    <style:style style:name="T612" style:parent-style-name="Policepardéfaut" style:family="text">
      <style:text-properties style:font-name="GPAFJ+Aptos" style:font-name-asian="GPAFJ+Aptos" style:font-name-complex="GPAFJ+Aptos" fo:color="#000000"/>
    </style:style>
    <style:style style:name="T613" style:parent-style-name="Policepardéfaut" style:family="text">
      <style:text-properties style:font-name="GPAFJ+Aptos" style:font-name-asian="GPAFJ+Aptos" style:font-name-complex="GPAFJ+Aptos" fo:color="#000000" fo:letter-spacing="-0.0006in"/>
    </style:style>
    <style:style style:name="T614" style:parent-style-name="Policepardéfaut" style:family="text">
      <style:text-properties style:font-name="GPAFJ+Aptos" style:font-name-asian="GPAFJ+Aptos" style:font-name-complex="GPAFJ+Aptos" fo:color="#000000"/>
    </style:style>
    <style:style style:name="T615" style:parent-style-name="Policepardéfaut" style:family="text">
      <style:text-properties style:font-name="GPAFJ+Aptos" style:font-name-asian="GPAFJ+Aptos" style:font-name-complex="GPAFJ+Aptos" fo:color="#000000" fo:letter-spacing="-0.0006in" style:text-scale="101%"/>
    </style:style>
    <style:style style:name="T616" style:parent-style-name="Policepardéfaut" style:family="text">
      <style:text-properties style:font-name="GPAFJ+Aptos" style:font-name-asian="GPAFJ+Aptos" style:font-name-complex="GPAFJ+Aptos" fo:color="#000000" style:text-scale="101%"/>
    </style:style>
    <style:style style:name="T617" style:parent-style-name="Policepardéfaut" style:family="text">
      <style:text-properties style:font-name="GPAFJ+Aptos" style:font-name-asian="GPAFJ+Aptos" style:font-name-complex="GPAFJ+Aptos" fo:color="#000000" fo:letter-spacing="-0.0006in"/>
    </style:style>
    <style:style style:name="T618" style:parent-style-name="Policepardéfaut" style:family="text">
      <style:text-properties style:font-name="GPAFJ+Aptos" style:font-name-asian="GPAFJ+Aptos" style:font-name-complex="GPAFJ+Aptos" fo:color="#000000" style:text-scale="101%"/>
    </style:style>
    <style:style style:name="T619" style:parent-style-name="Policepardéfaut" style:family="text">
      <style:text-properties style:font-name="GPAFJ+Aptos" style:font-name-asian="GPAFJ+Aptos" style:font-name-complex="GPAFJ+Aptos" fo:color="#000000" fo:letter-spacing="-0.002in" style:text-scale="101%"/>
    </style:style>
    <style:style style:name="T620" style:parent-style-name="Policepardéfaut" style:family="text">
      <style:text-properties style:font-name="GPAFJ+Aptos" style:font-name-asian="GPAFJ+Aptos" style:font-name-complex="GPAFJ+Aptos" fo:color="#000000" style:text-scale="101%"/>
    </style:style>
    <style:style style:name="T621" style:parent-style-name="Policepardéfaut" style:family="text">
      <style:text-properties style:font-name="GPAFJ+Aptos" style:font-name-asian="GPAFJ+Aptos" style:font-name-complex="GPAFJ+Aptos" fo:color="#000000"/>
    </style:style>
    <style:style style:name="T622" style:parent-style-name="Policepardéfaut" style:family="text">
      <style:text-properties style:font-name="GPAFJ+Aptos" style:font-name-asian="GPAFJ+Aptos" style:font-name-complex="GPAFJ+Aptos" fo:color="#000000" style:text-scale="101%"/>
    </style:style>
    <style:style style:name="T623" style:parent-style-name="Policepardéfaut" style:family="text">
      <style:text-properties style:font-name="GPAFJ+Aptos" style:font-name-asian="GPAFJ+Aptos" style:font-name-complex="GPAFJ+Aptos" fo:color="#000000" fo:letter-spacing="-0.0006in"/>
    </style:style>
    <style:style style:name="T624" style:parent-style-name="Policepardéfaut" style:family="text">
      <style:text-properties style:font-name="GPAFJ+Aptos" style:font-name-asian="GPAFJ+Aptos" style:font-name-complex="GPAFJ+Aptos" fo:color="#000000" fo:letter-spacing="0.0006in"/>
    </style:style>
    <style:style style:name="T625" style:parent-style-name="Policepardéfaut" style:family="text">
      <style:text-properties style:font-name="GPAFJ+Aptos" style:font-name-asian="GPAFJ+Aptos" style:font-name-complex="GPAFJ+Aptos" fo:color="#000000" fo:letter-spacing="-0.0006in"/>
    </style:style>
    <style:style style:name="T626" style:parent-style-name="Policepardéfaut" style:family="text">
      <style:text-properties style:font-name="GPAFJ+Aptos" style:font-name-asian="GPAFJ+Aptos" style:font-name-complex="GPAFJ+Aptos" fo:color="#000000" style:text-scale="101%"/>
    </style:style>
    <style:style style:name="T627" style:parent-style-name="Policepardéfaut" style:family="text">
      <style:text-properties style:font-name="GPAFJ+Aptos" style:font-name-asian="GPAFJ+Aptos" style:font-name-complex="GPAFJ+Aptos" fo:color="#000000" fo:letter-spacing="-0.0006in"/>
    </style:style>
    <style:style style:name="T628" style:parent-style-name="Policepardéfaut" style:family="text">
      <style:text-properties style:font-name="GPAFJ+Aptos" style:font-name-asian="GPAFJ+Aptos" style:font-name-complex="GPAFJ+Aptos" fo:color="#000000" style:text-scale="101%"/>
    </style:style>
    <style:style style:name="T629" style:parent-style-name="Policepardéfaut" style:family="text">
      <style:text-properties style:font-name="GPAFJ+Aptos" style:font-name-asian="GPAFJ+Aptos" style:font-name-complex="GPAFJ+Aptos" fo:color="#000000" fo:letter-spacing="-0.0013in"/>
    </style:style>
    <style:style style:name="T630" style:parent-style-name="Policepardéfaut" style:family="text">
      <style:text-properties style:font-name="GPAFJ+Aptos" style:font-name-asian="GPAFJ+Aptos" style:font-name-complex="GPAFJ+Aptos" fo:color="#000000"/>
    </style:style>
    <style:style style:name="T631" style:parent-style-name="Policepardéfaut" style:family="text">
      <style:text-properties style:font-name="GPAFJ+Aptos" style:font-name-asian="GPAFJ+Aptos" style:font-name-complex="GPAFJ+Aptos" fo:color="#000000" fo:letter-spacing="0.0006in" style:text-scale="101%"/>
    </style:style>
    <style:style style:name="T632" style:parent-style-name="Policepardéfaut" style:family="text">
      <style:text-properties style:font-name="GPAFJ+Aptos" style:font-name-asian="GPAFJ+Aptos" style:font-name-complex="GPAFJ+Aptos" fo:color="#000000" style:text-scale="101%"/>
    </style:style>
    <style:style style:name="T633" style:parent-style-name="Policepardéfaut" style:family="text">
      <style:text-properties style:font-name="GPAFJ+Aptos" style:font-name-asian="GPAFJ+Aptos" style:font-name-complex="GPAFJ+Aptos" fo:color="#000000" fo:letter-spacing="-0.0013in"/>
    </style:style>
    <style:style style:name="T634" style:parent-style-name="Policepardéfaut" style:family="text">
      <style:text-properties style:font-name="GPAFJ+Aptos" style:font-name-asian="GPAFJ+Aptos" style:font-name-complex="GPAFJ+Aptos" fo:color="#000000"/>
    </style:style>
    <style:style style:name="T635" style:parent-style-name="Policepardéfaut" style:family="text">
      <style:text-properties style:font-name="GPAFJ+Aptos" style:font-name-asian="GPAFJ+Aptos" style:font-name-complex="GPAFJ+Aptos" fo:color="#000000" fo:letter-spacing="-0.0006in" style:text-scale="101%"/>
    </style:style>
    <style:style style:name="T636" style:parent-style-name="Policepardéfaut" style:family="text">
      <style:text-properties style:font-name="GPAFJ+Aptos" style:font-name-asian="GPAFJ+Aptos" style:font-name-complex="GPAFJ+Aptos" fo:color="#000000"/>
    </style:style>
    <style:style style:name="T637" style:parent-style-name="Policepardéfaut" style:family="text">
      <style:text-properties style:font-name="GPAFJ+Aptos" style:font-name-asian="GPAFJ+Aptos" style:font-name-complex="GPAFJ+Aptos" fo:color="#000000" fo:letter-spacing="-0.0013in" style:text-scale="101%"/>
    </style:style>
    <style:style style:name="T638" style:parent-style-name="Policepardéfaut" style:family="text">
      <style:text-properties style:font-name="GPAFJ+Aptos" style:font-name-asian="GPAFJ+Aptos" style:font-name-complex="GPAFJ+Aptos" fo:color="#000000" style:text-scale="101%"/>
    </style:style>
    <style:style style:name="T639" style:parent-style-name="Policepardéfaut" style:family="text">
      <style:text-properties style:font-name="GPAFJ+Aptos" style:font-name-asian="GPAFJ+Aptos" style:font-name-complex="GPAFJ+Aptos" fo:color="#000000"/>
    </style:style>
    <style:style style:name="T640" style:parent-style-name="Policepardéfaut" style:family="text">
      <style:text-properties style:font-name="GPAFJ+Aptos" style:font-name-asian="GPAFJ+Aptos" style:font-name-complex="GPAFJ+Aptos" fo:color="#000000" style:text-scale="101%"/>
    </style:style>
    <style:style style:name="T641" style:parent-style-name="Policepardéfaut" style:family="text">
      <style:text-properties style:font-name="GPAFJ+Aptos" style:font-name-asian="GPAFJ+Aptos" style:font-name-complex="GPAFJ+Aptos" fo:color="#000000"/>
    </style:style>
    <style:style style:name="T642" style:parent-style-name="Policepardéfaut" style:family="text">
      <style:text-properties style:font-name="GPAFJ+Aptos" style:font-name-asian="GPAFJ+Aptos" style:font-name-complex="GPAFJ+Aptos" fo:color="#000000" fo:letter-spacing="-0.0013in"/>
    </style:style>
    <style:style style:name="T643" style:parent-style-name="Policepardéfaut" style:family="text">
      <style:text-properties style:font-name="GPAFJ+Aptos" style:font-name-asian="GPAFJ+Aptos" style:font-name-complex="GPAFJ+Aptos" fo:color="#000000"/>
    </style:style>
    <style:style style:name="T644" style:parent-style-name="Policepardéfaut" style:family="text">
      <style:text-properties style:font-name="GPAFJ+Aptos" style:font-name-asian="GPAFJ+Aptos" style:font-name-complex="GPAFJ+Aptos" fo:color="#000000" style:text-scale="101%"/>
    </style:style>
    <style:style style:name="T645" style:parent-style-name="Policepardéfaut" style:family="text">
      <style:text-properties style:font-name="GPAFJ+Aptos" style:font-name-asian="GPAFJ+Aptos" style:font-name-complex="GPAFJ+Aptos" fo:color="#000000"/>
    </style:style>
    <style:style style:name="T646" style:parent-style-name="Policepardéfaut" style:family="text">
      <style:text-properties style:font-name="GPAFJ+Aptos" style:font-name-asian="GPAFJ+Aptos" style:font-name-complex="GPAFJ+Aptos" fo:color="#000000" style:text-scale="101%"/>
    </style:style>
    <style:style style:name="T647" style:parent-style-name="Policepardéfaut" style:family="text">
      <style:text-properties style:font-name="GPAFJ+Aptos" style:font-name-asian="GPAFJ+Aptos" style:font-name-complex="GPAFJ+Aptos" fo:color="#000000"/>
    </style:style>
    <style:style style:name="T648" style:parent-style-name="Policepardéfaut" style:family="text">
      <style:text-properties style:font-name="GPAFJ+Aptos" style:font-name-asian="GPAFJ+Aptos" style:font-name-complex="GPAFJ+Aptos" fo:color="#000000" fo:letter-spacing="-0.0006in"/>
    </style:style>
    <style:style style:name="T649" style:parent-style-name="Policepardéfaut" style:family="text">
      <style:text-properties style:font-name="GPAFJ+Aptos" style:font-name-asian="GPAFJ+Aptos" style:font-name-complex="GPAFJ+Aptos" fo:color="#000000"/>
    </style:style>
    <style:style style:name="T650" style:parent-style-name="Policepardéfaut" style:family="text">
      <style:text-properties style:font-name="GPAFJ+Aptos" style:font-name-asian="GPAFJ+Aptos" style:font-name-complex="GPAFJ+Aptos" fo:color="#000000" style:text-scale="101%"/>
    </style:style>
    <style:style style:name="T651" style:parent-style-name="Policepardéfaut" style:family="text">
      <style:text-properties style:font-name="GPAFJ+Aptos" style:font-name-asian="GPAFJ+Aptos" style:font-name-complex="GPAFJ+Aptos" fo:color="#000000" fo:letter-spacing="-0.0006in"/>
    </style:style>
    <style:style style:name="T652" style:parent-style-name="Policepardéfaut" style:family="text">
      <style:text-properties style:font-name="GPAFJ+Aptos" style:font-name-asian="GPAFJ+Aptos" style:font-name-complex="GPAFJ+Aptos" fo:color="#000000"/>
    </style:style>
    <style:style style:name="T653" style:parent-style-name="Policepardéfaut" style:family="text">
      <style:text-properties style:font-name="GPAFJ+Aptos" style:font-name-asian="GPAFJ+Aptos" style:font-name-complex="GPAFJ+Aptos" fo:color="#000000" style:text-scale="101%"/>
    </style:style>
    <style:style style:name="T654" style:parent-style-name="Policepardéfaut" style:family="text">
      <style:text-properties style:font-name="GPAFJ+Aptos" style:font-name-asian="GPAFJ+Aptos" style:font-name-complex="GPAFJ+Aptos" fo:color="#000000" fo:letter-spacing="-0.0006in" style:text-scale="101%"/>
    </style:style>
    <style:style style:name="T655" style:parent-style-name="Policepardéfaut" style:family="text">
      <style:text-properties style:font-name="GPAFJ+Aptos" style:font-name-asian="GPAFJ+Aptos" style:font-name-complex="GPAFJ+Aptos" fo:color="#000000" style:text-scale="101%"/>
    </style:style>
    <style:style style:name="T656" style:parent-style-name="Policepardéfaut" style:family="text">
      <style:text-properties style:font-name="GPAFJ+Aptos" style:font-name-asian="GPAFJ+Aptos" style:font-name-complex="GPAFJ+Aptos" fo:color="#000000"/>
    </style:style>
    <style:style style:name="T657" style:parent-style-name="Policepardéfaut" style:family="text">
      <style:text-properties style:font-name="GPAFJ+Aptos" style:font-name-asian="GPAFJ+Aptos" style:font-name-complex="GPAFJ+Aptos" fo:color="#000000" fo:letter-spacing="0.0006in" style:text-scale="101%"/>
    </style:style>
    <style:style style:name="T658" style:parent-style-name="Policepardéfaut" style:family="text">
      <style:text-properties style:font-name="GPAFJ+Aptos" style:font-name-asian="GPAFJ+Aptos" style:font-name-complex="GPAFJ+Aptos" fo:color="#000000" style:text-scale="101%"/>
    </style:style>
    <style:style style:name="T659" style:parent-style-name="Policepardéfaut" style:family="text">
      <style:text-properties style:font-name="GPAFJ+Aptos" style:font-name-asian="GPAFJ+Aptos" style:font-name-complex="GPAFJ+Aptos" fo:color="#000000" fo:letter-spacing="-0.0006in" style:text-scale="101%"/>
    </style:style>
    <style:style style:name="T660" style:parent-style-name="Policepardéfaut" style:family="text">
      <style:text-properties style:font-name="GPAFJ+Aptos" style:font-name-asian="GPAFJ+Aptos" style:font-name-complex="GPAFJ+Aptos" fo:color="#000000" fo:letter-spacing="-0.0013in"/>
    </style:style>
    <style:style style:name="T661" style:parent-style-name="Policepardéfaut" style:family="text">
      <style:text-properties style:font-name="GPAFJ+Aptos" style:font-name-asian="GPAFJ+Aptos" style:font-name-complex="GPAFJ+Aptos" fo:color="#000000"/>
    </style:style>
    <style:style style:name="T662" style:parent-style-name="Policepardéfaut" style:family="text">
      <style:text-properties style:font-name="GPAFJ+Aptos" style:font-name-asian="GPAFJ+Aptos" style:font-name-complex="GPAFJ+Aptos" fo:color="#000000" fo:letter-spacing="-0.0013in" style:text-scale="101%"/>
    </style:style>
    <style:style style:name="T663" style:parent-style-name="Policepardéfaut" style:family="text">
      <style:text-properties style:font-name="GPAFJ+Aptos" style:font-name-asian="GPAFJ+Aptos" style:font-name-complex="GPAFJ+Aptos" fo:color="#000000" style:text-scale="101%"/>
    </style:style>
    <style:style style:name="T664" style:parent-style-name="Policepardéfaut" style:family="text">
      <style:text-properties style:font-name="GPAFJ+Aptos" style:font-name-asian="GPAFJ+Aptos" style:font-name-complex="GPAFJ+Aptos" fo:color="#000000"/>
    </style:style>
    <style:style style:name="T665" style:parent-style-name="Policepardéfaut" style:family="text">
      <style:text-properties style:font-name="GPAFJ+Aptos" style:font-name-asian="GPAFJ+Aptos" style:font-name-complex="GPAFJ+Aptos" fo:color="#000000" fo:letter-spacing="-0.0006in" style:text-scale="101%"/>
    </style:style>
    <style:style style:name="T666" style:parent-style-name="Policepardéfaut" style:family="text">
      <style:text-properties style:font-name="GPAFJ+Aptos" style:font-name-asian="GPAFJ+Aptos" style:font-name-complex="GPAFJ+Aptos" fo:color="#000000"/>
    </style:style>
    <style:style style:name="T667" style:parent-style-name="Policepardéfaut" style:family="text">
      <style:text-properties style:font-name="GPAFJ+Aptos" style:font-name-asian="GPAFJ+Aptos" style:font-name-complex="GPAFJ+Aptos" fo:color="#000000" fo:letter-spacing="-0.0006in"/>
    </style:style>
    <style:style style:name="T668" style:parent-style-name="Policepardéfaut" style:family="text">
      <style:text-properties style:font-name="GPAFJ+Aptos" style:font-name-asian="GPAFJ+Aptos" style:font-name-complex="GPAFJ+Aptos" fo:color="#000000"/>
    </style:style>
    <style:style style:name="T669" style:parent-style-name="Policepardéfaut" style:family="text">
      <style:text-properties style:font-name="GPAFJ+Aptos" style:font-name-asian="GPAFJ+Aptos" style:font-name-complex="GPAFJ+Aptos" fo:color="#000000" fo:letter-spacing="-0.0006in" style:text-scale="101%"/>
    </style:style>
    <style:style style:name="T670" style:parent-style-name="Policepardéfaut" style:family="text">
      <style:text-properties style:font-name="GPAFJ+Aptos" style:font-name-asian="GPAFJ+Aptos" style:font-name-complex="GPAFJ+Aptos" fo:color="#000000"/>
    </style:style>
    <style:style style:name="T671" style:parent-style-name="Policepardéfaut" style:family="text">
      <style:text-properties style:font-name="GPAFJ+Aptos" style:font-name-asian="GPAFJ+Aptos" style:font-name-complex="GPAFJ+Aptos" fo:color="#000000" fo:letter-spacing="0.0006in" style:text-scale="101%"/>
    </style:style>
    <style:style style:name="T672" style:parent-style-name="Policepardéfaut" style:family="text">
      <style:text-properties style:font-name="GPAFJ+Aptos" style:font-name-asian="GPAFJ+Aptos" style:font-name-complex="GPAFJ+Aptos" fo:color="#000000" fo:letter-spacing="-0.002in" style:text-scale="101%"/>
    </style:style>
    <style:style style:name="T673" style:parent-style-name="Policepardéfaut" style:family="text">
      <style:text-properties style:font-name="GPAFJ+Aptos" style:font-name-asian="GPAFJ+Aptos" style:font-name-complex="GPAFJ+Aptos" fo:color="#000000"/>
    </style:style>
    <style:style style:name="T674" style:parent-style-name="Policepardéfaut" style:family="text">
      <style:text-properties style:font-name="GPAFJ+Aptos" style:font-name-asian="GPAFJ+Aptos" style:font-name-complex="GPAFJ+Aptos" fo:color="#000000" style:text-scale="101%"/>
    </style:style>
    <style:style style:name="T675" style:parent-style-name="Policepardéfaut" style:family="text">
      <style:text-properties style:font-name="GPAFJ+Aptos" style:font-name-asian="GPAFJ+Aptos" style:font-name-complex="GPAFJ+Aptos" fo:color="#000000"/>
    </style:style>
    <style:style style:name="T676" style:parent-style-name="Policepardéfaut" style:family="text">
      <style:text-properties style:font-name="GPAFJ+Aptos" style:font-name-asian="GPAFJ+Aptos" style:font-name-complex="GPAFJ+Aptos" fo:color="#000000" style:text-scale="101%"/>
    </style:style>
    <style:style style:name="T677" style:parent-style-name="Policepardéfaut" style:family="text">
      <style:text-properties style:font-name="GPAFJ+Aptos" style:font-name-asian="GPAFJ+Aptos" style:font-name-complex="GPAFJ+Aptos" fo:color="#000000"/>
    </style:style>
    <style:style style:name="T678" style:parent-style-name="Policepardéfaut" style:family="text">
      <style:text-properties style:font-name="GPAFJ+Aptos" style:font-name-asian="GPAFJ+Aptos" style:font-name-complex="GPAFJ+Aptos" fo:color="#000000" fo:letter-spacing="-0.002in" style:text-scale="101%"/>
    </style:style>
    <style:style style:name="T679" style:parent-style-name="Policepardéfaut" style:family="text">
      <style:text-properties style:font-name="GPAFJ+Aptos" style:font-name-asian="GPAFJ+Aptos" style:font-name-complex="GPAFJ+Aptos" fo:color="#000000" style:text-scale="101%"/>
    </style:style>
    <style:style style:name="T680" style:parent-style-name="Policepardéfaut" style:family="text">
      <style:text-properties style:font-name="GPAFJ+Aptos" style:font-name-asian="GPAFJ+Aptos" style:font-name-complex="GPAFJ+Aptos" fo:color="#000000" fo:letter-spacing="-0.0013in" style:text-scale="101%"/>
    </style:style>
    <style:style style:name="T681" style:parent-style-name="Policepardéfaut" style:family="text">
      <style:text-properties style:font-name="GPAFJ+Aptos" style:font-name-asian="GPAFJ+Aptos" style:font-name-complex="GPAFJ+Aptos" fo:color="#000000"/>
    </style:style>
    <style:style style:name="T682" style:parent-style-name="Policepardéfaut" style:family="text">
      <style:text-properties style:font-name="GPAFJ+Aptos" style:font-name-asian="GPAFJ+Aptos" style:font-name-complex="GPAFJ+Aptos" fo:color="#000000" fo:letter-spacing="0.0006in"/>
    </style:style>
    <style:style style:name="T683" style:parent-style-name="Policepardéfaut" style:family="text">
      <style:text-properties style:font-name="GPAFJ+Aptos" style:font-name-asian="GPAFJ+Aptos" style:font-name-complex="GPAFJ+Aptos" fo:color="#000000"/>
    </style:style>
    <style:style style:name="T684" style:parent-style-name="Policepardéfaut" style:family="text">
      <style:text-properties style:font-name="GPAFJ+Aptos" style:font-name-asian="GPAFJ+Aptos" style:font-name-complex="GPAFJ+Aptos" fo:color="#000000" fo:letter-spacing="-0.0006in"/>
    </style:style>
    <style:style style:name="T685" style:parent-style-name="Policepardéfaut" style:family="text">
      <style:text-properties style:font-name="GPAFJ+Aptos" style:font-name-asian="GPAFJ+Aptos" style:font-name-complex="GPAFJ+Aptos" fo:color="#000000" style:text-scale="101%"/>
    </style:style>
    <style:style style:name="T686" style:parent-style-name="Policepardéfaut" style:family="text">
      <style:text-properties style:font-name="GPAFJ+Aptos" style:font-name-asian="GPAFJ+Aptos" style:font-name-complex="GPAFJ+Aptos" fo:color="#000000"/>
    </style:style>
    <style:style style:name="T687" style:parent-style-name="Policepardéfaut" style:family="text">
      <style:text-properties style:font-name="GPAFJ+Aptos" style:font-name-asian="GPAFJ+Aptos" style:font-name-complex="GPAFJ+Aptos" fo:color="#000000" fo:letter-spacing="-0.0013in" style:text-scale="101%"/>
    </style:style>
    <style:style style:name="T688" style:parent-style-name="Policepardéfaut" style:family="text">
      <style:text-properties style:font-name="GPAFJ+Aptos" style:font-name-asian="GPAFJ+Aptos" style:font-name-complex="GPAFJ+Aptos" fo:color="#000000" style:text-scale="101%"/>
    </style:style>
    <style:style style:name="T689" style:parent-style-name="Policepardéfaut" style:family="text">
      <style:text-properties style:font-name="GPAFJ+Aptos" style:font-name-asian="GPAFJ+Aptos" style:font-name-complex="GPAFJ+Aptos" fo:color="#000000" fo:letter-spacing="-0.0006in"/>
    </style:style>
    <style:style style:name="T690" style:parent-style-name="Policepardéfaut" style:family="text">
      <style:text-properties style:font-name="GPAFJ+Aptos" style:font-name-asian="GPAFJ+Aptos" style:font-name-complex="GPAFJ+Aptos" fo:color="#000000" style:text-scale="101%"/>
    </style:style>
    <style:style style:name="T691" style:parent-style-name="Policepardéfaut" style:family="text">
      <style:text-properties style:font-name="GPAFJ+Aptos" style:font-name-asian="GPAFJ+Aptos" style:font-name-complex="GPAFJ+Aptos" fo:color="#000000" fo:letter-spacing="-0.0013in"/>
    </style:style>
    <style:style style:name="T692" style:parent-style-name="Policepardéfaut" style:family="text">
      <style:text-properties style:font-name="GPAFJ+Aptos" style:font-name-asian="GPAFJ+Aptos" style:font-name-complex="GPAFJ+Aptos" fo:color="#000000" fo:letter-spacing="-0.0006in" style:text-scale="101%"/>
    </style:style>
    <style:style style:name="T693" style:parent-style-name="Policepardéfaut" style:family="text">
      <style:text-properties style:font-name="GPAFJ+Aptos" style:font-name-asian="GPAFJ+Aptos" style:font-name-complex="GPAFJ+Aptos" fo:color="#000000"/>
    </style:style>
    <style:style style:name="T694" style:parent-style-name="Policepardéfaut" style:family="text">
      <style:text-properties style:font-name="GPAFJ+Aptos" style:font-name-asian="GPAFJ+Aptos" style:font-name-complex="GPAFJ+Aptos" fo:color="#000000" style:text-scale="101%"/>
    </style:style>
    <style:style style:name="T695" style:parent-style-name="Policepardéfaut" style:family="text">
      <style:text-properties style:font-name="GPAFJ+Aptos" style:font-name-asian="GPAFJ+Aptos" style:font-name-complex="GPAFJ+Aptos" fo:color="#000000"/>
    </style:style>
    <style:style style:name="T696" style:parent-style-name="Policepardéfaut" style:family="text">
      <style:text-properties style:font-name="GPAFJ+Aptos" style:font-name-asian="GPAFJ+Aptos" style:font-name-complex="GPAFJ+Aptos" fo:color="#000000" fo:letter-spacing="0.0006in"/>
    </style:style>
    <style:style style:name="T697" style:parent-style-name="Policepardéfaut" style:family="text">
      <style:text-properties style:font-name="GPAFJ+Aptos" style:font-name-asian="GPAFJ+Aptos" style:font-name-complex="GPAFJ+Aptos" fo:color="#000000" fo:letter-spacing="-0.002in" style:text-scale="101%"/>
    </style:style>
    <style:style style:name="T698" style:parent-style-name="Policepardéfaut" style:family="text">
      <style:text-properties style:font-name="GPAFJ+Aptos" style:font-name-asian="GPAFJ+Aptos" style:font-name-complex="GPAFJ+Aptos" fo:color="#000000"/>
    </style:style>
    <style:style style:name="T699" style:parent-style-name="Policepardéfaut" style:family="text">
      <style:text-properties style:font-name="GPAFJ+Aptos" style:font-name-asian="GPAFJ+Aptos" style:font-name-complex="GPAFJ+Aptos" fo:color="#000000" fo:letter-spacing="-0.0013in" style:text-scale="101%"/>
    </style:style>
    <style:style style:name="T700" style:parent-style-name="Policepardéfaut" style:family="text">
      <style:text-properties style:font-name="GPAFJ+Aptos" style:font-name-asian="GPAFJ+Aptos" style:font-name-complex="GPAFJ+Aptos" fo:color="#000000"/>
    </style:style>
    <style:style style:name="T701" style:parent-style-name="Policepardéfaut" style:family="text">
      <style:text-properties style:font-name="GPAFJ+Aptos" style:font-name-asian="GPAFJ+Aptos" style:font-name-complex="GPAFJ+Aptos" fo:color="#000000" style:text-scale="101%"/>
    </style:style>
    <style:style style:name="T702" style:parent-style-name="Policepardéfaut" style:family="text">
      <style:text-properties style:font-name="GPAFJ+Aptos" style:font-name-asian="GPAFJ+Aptos" style:font-name-complex="GPAFJ+Aptos" fo:color="#000000"/>
    </style:style>
    <style:style style:name="T703" style:parent-style-name="Policepardéfaut" style:family="text">
      <style:text-properties style:font-name="GPAFJ+Aptos" style:font-name-asian="GPAFJ+Aptos" style:font-name-complex="GPAFJ+Aptos" fo:color="#000000" fo:letter-spacing="-0.0006in"/>
    </style:style>
    <style:style style:name="T704" style:parent-style-name="Policepardéfaut" style:family="text">
      <style:text-properties style:font-name="GPAFJ+Aptos" style:font-name-asian="GPAFJ+Aptos" style:font-name-complex="GPAFJ+Aptos" fo:color="#000000" style:text-scale="101%"/>
    </style:style>
    <style:style style:name="T705" style:parent-style-name="Policepardéfaut" style:family="text">
      <style:text-properties style:font-name="GPAFJ+Aptos" style:font-name-asian="GPAFJ+Aptos" style:font-name-complex="GPAFJ+Aptos" fo:color="#000000" fo:letter-spacing="-0.0013in" style:text-scale="101%"/>
    </style:style>
    <style:style style:name="T706" style:parent-style-name="Policepardéfaut" style:family="text">
      <style:text-properties style:font-name="GPAFJ+Aptos" style:font-name-asian="GPAFJ+Aptos" style:font-name-complex="GPAFJ+Aptos" fo:color="#000000" fo:letter-spacing="-0.0006in"/>
    </style:style>
    <style:style style:name="T707" style:parent-style-name="Policepardéfaut" style:family="text">
      <style:text-properties style:font-name="GPAFJ+Aptos" style:font-name-asian="GPAFJ+Aptos" style:font-name-complex="GPAFJ+Aptos" fo:color="#000000" style:text-scale="101%"/>
    </style:style>
    <style:style style:name="T708" style:parent-style-name="Policepardéfaut" style:family="text">
      <style:text-properties style:font-name="GPAFJ+Aptos" style:font-name-asian="GPAFJ+Aptos" style:font-name-complex="GPAFJ+Aptos" fo:color="#000000"/>
    </style:style>
    <style:style style:name="T709" style:parent-style-name="Policepardéfaut" style:family="text">
      <style:text-properties style:font-name="GPAFJ+Aptos" style:font-name-asian="GPAFJ+Aptos" style:font-name-complex="GPAFJ+Aptos" fo:color="#000000" fo:letter-spacing="-0.0006in" style:text-scale="101%"/>
    </style:style>
    <style:style style:name="T710" style:parent-style-name="Policepardéfaut" style:family="text">
      <style:text-properties style:font-name="GPAFJ+Aptos" style:font-name-asian="GPAFJ+Aptos" style:font-name-complex="GPAFJ+Aptos" fo:color="#000000"/>
    </style:style>
    <style:style style:name="T711" style:parent-style-name="Policepardéfaut" style:family="text">
      <style:text-properties style:font-name="GPAFJ+Aptos" style:font-name-asian="GPAFJ+Aptos" style:font-name-complex="GPAFJ+Aptos" fo:color="#000000" fo:letter-spacing="-0.0006in" style:text-scale="101%"/>
    </style:style>
    <style:style style:name="T712" style:parent-style-name="Policepardéfaut" style:family="text">
      <style:text-properties style:font-name="GPAFJ+Aptos" style:font-name-asian="GPAFJ+Aptos" style:font-name-complex="GPAFJ+Aptos" fo:color="#000000" style:text-scale="101%"/>
    </style:style>
    <style:style style:name="T713" style:parent-style-name="Policepardéfaut" style:family="text">
      <style:text-properties style:font-name="GPAFJ+Aptos" style:font-name-asian="GPAFJ+Aptos" style:font-name-complex="GPAFJ+Aptos" fo:color="#000000" fo:letter-spacing="-0.0013in"/>
    </style:style>
    <style:style style:name="T714" style:parent-style-name="Policepardéfaut" style:family="text">
      <style:text-properties style:font-name="GPAFJ+Aptos" style:font-name-asian="GPAFJ+Aptos" style:font-name-complex="GPAFJ+Aptos" fo:color="#000000" fo:letter-spacing="-0.0006in" style:text-scale="101%"/>
    </style:style>
    <style:style style:name="T715" style:parent-style-name="Policepardéfaut" style:family="text">
      <style:text-properties style:font-name="GPAFJ+Aptos" style:font-name-asian="GPAFJ+Aptos" style:font-name-complex="GPAFJ+Aptos" fo:color="#000000" style:text-scale="101%"/>
    </style:style>
    <style:style style:name="T716" style:parent-style-name="Policepardéfaut" style:family="text">
      <style:text-properties style:font-name="GPAFJ+Aptos" style:font-name-asian="GPAFJ+Aptos" style:font-name-complex="GPAFJ+Aptos" fo:color="#000000"/>
    </style:style>
    <style:style style:name="T717" style:parent-style-name="Policepardéfaut" style:family="text">
      <style:text-properties style:font-name="GPAFJ+Aptos" style:font-name-asian="GPAFJ+Aptos" style:font-name-complex="GPAFJ+Aptos" fo:color="#000000" fo:letter-spacing="0.0006in"/>
    </style:style>
    <style:style style:name="T718" style:parent-style-name="Policepardéfaut" style:family="text">
      <style:text-properties style:font-name="GPAFJ+Aptos" style:font-name-asian="GPAFJ+Aptos" style:font-name-complex="GPAFJ+Aptos" fo:color="#000000" fo:letter-spacing="-0.0006in"/>
    </style:style>
    <style:style style:name="T719" style:parent-style-name="Policepardéfaut" style:family="text">
      <style:text-properties style:font-name="GPAFJ+Aptos" style:font-name-asian="GPAFJ+Aptos" style:font-name-complex="GPAFJ+Aptos" fo:color="#000000"/>
    </style:style>
    <style:style style:name="T720" style:parent-style-name="Policepardéfaut" style:family="text">
      <style:text-properties style:font-name="GPAFJ+Aptos" style:font-name-asian="GPAFJ+Aptos" style:font-name-complex="GPAFJ+Aptos" fo:color="#000000" style:text-scale="101%"/>
    </style:style>
    <style:style style:name="T721" style:parent-style-name="Policepardéfaut" style:family="text">
      <style:text-properties style:font-name="GPAFJ+Aptos" style:font-name-asian="GPAFJ+Aptos" style:font-name-complex="GPAFJ+Aptos" fo:color="#000000"/>
    </style:style>
    <style:style style:name="T722" style:parent-style-name="Policepardéfaut" style:family="text">
      <style:text-properties style:font-name="GPAFJ+Aptos" style:font-name-asian="GPAFJ+Aptos" style:font-name-complex="GPAFJ+Aptos" fo:color="#000000" style:text-scale="101%"/>
    </style:style>
    <style:style style:name="T723" style:parent-style-name="Policepardéfaut" style:family="text">
      <style:text-properties style:font-name="GPAFJ+Aptos" style:font-name-asian="GPAFJ+Aptos" style:font-name-complex="GPAFJ+Aptos" fo:color="#000000" fo:letter-spacing="-0.002in"/>
    </style:style>
    <style:style style:name="T724" style:parent-style-name="Policepardéfaut" style:family="text">
      <style:text-properties style:font-name="GPAFJ+Aptos" style:font-name-asian="GPAFJ+Aptos" style:font-name-complex="GPAFJ+Aptos" fo:color="#000000"/>
    </style:style>
    <style:style style:name="T725" style:parent-style-name="Policepardéfaut" style:family="text">
      <style:text-properties style:font-name="GPAFJ+Aptos" style:font-name-asian="GPAFJ+Aptos" style:font-name-complex="GPAFJ+Aptos" fo:color="#000000" style:text-scale="101%"/>
    </style:style>
    <style:style style:name="T726" style:parent-style-name="Policepardéfaut" style:family="text">
      <style:text-properties style:font-name="GPAFJ+Aptos" style:font-name-asian="GPAFJ+Aptos" style:font-name-complex="GPAFJ+Aptos" fo:color="#000000"/>
    </style:style>
    <style:style style:name="T727" style:parent-style-name="Policepardéfaut" style:family="text">
      <style:text-properties style:font-name="GPAFJ+Aptos" style:font-name-asian="GPAFJ+Aptos" style:font-name-complex="GPAFJ+Aptos" fo:color="#000000" fo:letter-spacing="-0.0006in" style:text-scale="101%"/>
    </style:style>
    <style:style style:name="T728" style:parent-style-name="Policepardéfaut" style:family="text">
      <style:text-properties style:font-name="GPAFJ+Aptos" style:font-name-asian="GPAFJ+Aptos" style:font-name-complex="GPAFJ+Aptos" fo:color="#000000" style:text-scale="101%"/>
    </style:style>
    <style:style style:name="T729" style:parent-style-name="Policepardéfaut" style:family="text">
      <style:text-properties style:font-name="GPAFJ+Aptos" style:font-name-asian="GPAFJ+Aptos" style:font-name-complex="GPAFJ+Aptos" fo:color="#000000" fo:letter-spacing="-0.0006in"/>
    </style:style>
    <style:style style:name="T730" style:parent-style-name="Policepardéfaut" style:family="text">
      <style:text-properties style:font-name="GPAFJ+Aptos" style:font-name-asian="GPAFJ+Aptos" style:font-name-complex="GPAFJ+Aptos" fo:color="#000000" style:text-scale="101%"/>
    </style:style>
    <style:style style:name="T731" style:parent-style-name="Policepardéfaut" style:family="text">
      <style:text-properties style:font-name="GPAFJ+Aptos" style:font-name-asian="GPAFJ+Aptos" style:font-name-complex="GPAFJ+Aptos" fo:color="#000000"/>
    </style:style>
    <style:style style:name="T732" style:parent-style-name="Policepardéfaut" style:family="text">
      <style:text-properties style:font-name="GPAFJ+Aptos" style:font-name-asian="GPAFJ+Aptos" style:font-name-complex="GPAFJ+Aptos" fo:color="#000000" fo:letter-spacing="-0.0013in"/>
    </style:style>
    <style:style style:name="T733" style:parent-style-name="Policepardéfaut" style:family="text">
      <style:text-properties style:font-name="GPAFJ+Aptos" style:font-name-asian="GPAFJ+Aptos" style:font-name-complex="GPAFJ+Aptos" fo:color="#000000" fo:letter-spacing="0.0006in"/>
    </style:style>
    <style:style style:name="T734" style:parent-style-name="Policepardéfaut" style:family="text">
      <style:text-properties style:font-name="GPAFJ+Aptos" style:font-name-asian="GPAFJ+Aptos" style:font-name-complex="GPAFJ+Aptos" fo:color="#000000" style:text-scale="101%"/>
    </style:style>
    <style:style style:name="T735" style:parent-style-name="Policepardéfaut" style:family="text">
      <style:text-properties style:font-name="GPAFJ+Aptos" style:font-name-asian="GPAFJ+Aptos" style:font-name-complex="GPAFJ+Aptos" fo:color="#000000" fo:letter-spacing="-0.0006in"/>
    </style:style>
    <style:style style:name="T736" style:parent-style-name="Policepardéfaut" style:family="text">
      <style:text-properties style:font-name="GPAFJ+Aptos" style:font-name-asian="GPAFJ+Aptos" style:font-name-complex="GPAFJ+Aptos" fo:color="#000000"/>
    </style:style>
    <style:style style:name="T737" style:parent-style-name="Policepardéfaut" style:family="text">
      <style:text-properties style:font-name="GPAFJ+Aptos" style:font-name-asian="GPAFJ+Aptos" style:font-name-complex="GPAFJ+Aptos" fo:color="#000000" style:text-scale="101%"/>
    </style:style>
    <style:style style:name="T738" style:parent-style-name="Policepardéfaut" style:family="text">
      <style:text-properties style:font-name="GPAFJ+Aptos" style:font-name-asian="GPAFJ+Aptos" style:font-name-complex="GPAFJ+Aptos" fo:color="#000000"/>
    </style:style>
    <style:style style:name="T739" style:parent-style-name="Policepardéfaut" style:family="text">
      <style:text-properties style:font-name="GPAFJ+Aptos" style:font-name-asian="GPAFJ+Aptos" style:font-name-complex="GPAFJ+Aptos" fo:color="#000000" style:text-scale="101%"/>
    </style:style>
    <style:style style:name="T740" style:parent-style-name="Policepardéfaut" style:family="text">
      <style:text-properties style:font-name="GPAFJ+Aptos" style:font-name-asian="GPAFJ+Aptos" style:font-name-complex="GPAFJ+Aptos" fo:color="#000000"/>
    </style:style>
    <style:style style:name="T741" style:parent-style-name="Policepardéfaut" style:family="text">
      <style:text-properties style:font-name="GPAFJ+Aptos" style:font-name-asian="GPAFJ+Aptos" style:font-name-complex="GPAFJ+Aptos" fo:color="#000000" style:text-scale="101%"/>
    </style:style>
    <style:style style:name="T742" style:parent-style-name="Policepardéfaut" style:family="text">
      <style:text-properties style:font-name="GPAFJ+Aptos" style:font-name-asian="GPAFJ+Aptos" style:font-name-complex="GPAFJ+Aptos" fo:color="#000000"/>
    </style:style>
    <style:style style:name="T743" style:parent-style-name="Policepardéfaut" style:family="text">
      <style:text-properties style:font-name="GPAFJ+Aptos" style:font-name-asian="GPAFJ+Aptos" style:font-name-complex="GPAFJ+Aptos" fo:color="#000000" fo:letter-spacing="-0.0006in" style:text-scale="101%"/>
    </style:style>
    <style:style style:name="T744" style:parent-style-name="Policepardéfaut" style:family="text">
      <style:text-properties style:font-name="GPAFJ+Aptos" style:font-name-asian="GPAFJ+Aptos" style:font-name-complex="GPAFJ+Aptos" fo:color="#000000"/>
    </style:style>
    <style:style style:name="T745" style:parent-style-name="Policepardéfaut" style:family="text">
      <style:text-properties style:font-name="GPAFJ+Aptos" style:font-name-asian="GPAFJ+Aptos" style:font-name-complex="GPAFJ+Aptos" fo:color="#000000" fo:letter-spacing="-0.0013in" style:text-scale="101%"/>
    </style:style>
    <style:style style:name="T746" style:parent-style-name="Policepardéfaut" style:family="text">
      <style:text-properties style:font-name="GPAFJ+Aptos" style:font-name-asian="GPAFJ+Aptos" style:font-name-complex="GPAFJ+Aptos" fo:color="#000000" style:text-scale="101%"/>
    </style:style>
    <style:style style:name="T747" style:parent-style-name="Policepardéfaut" style:family="text">
      <style:text-properties style:font-name="GPAFJ+Aptos" style:font-name-asian="GPAFJ+Aptos" style:font-name-complex="GPAFJ+Aptos" fo:color="#000000"/>
    </style:style>
    <style:style style:name="T748" style:parent-style-name="Policepardéfaut" style:family="text">
      <style:text-properties style:font-name="GPAFJ+Aptos" style:font-name-asian="GPAFJ+Aptos" style:font-name-complex="GPAFJ+Aptos" fo:color="#000000" fo:letter-spacing="-0.0006in"/>
    </style:style>
    <style:style style:name="T749" style:parent-style-name="Policepardéfaut" style:family="text">
      <style:text-properties style:font-name="GPAFJ+Aptos" style:font-name-asian="GPAFJ+Aptos" style:font-name-complex="GPAFJ+Aptos" fo:color="#000000" style:text-scale="101%"/>
    </style:style>
    <style:style style:name="T750" style:parent-style-name="Policepardéfaut" style:family="text">
      <style:text-properties style:font-name="GPAFJ+Aptos" style:font-name-asian="GPAFJ+Aptos" style:font-name-complex="GPAFJ+Aptos" fo:color="#000000"/>
    </style:style>
    <style:style style:name="T751" style:parent-style-name="Policepardéfaut" style:family="text">
      <style:text-properties style:font-name="GPAFJ+Aptos" style:font-name-asian="GPAFJ+Aptos" style:font-name-complex="GPAFJ+Aptos" fo:color="#000000"/>
    </style:style>
    <style:style style:name="T752" style:parent-style-name="Policepardéfaut" style:family="text">
      <style:text-properties style:font-name="GPAFJ+Aptos" style:font-name-asian="GPAFJ+Aptos" style:font-name-complex="GPAFJ+Aptos" fo:color="#000000" fo:letter-spacing="-0.0006in"/>
    </style:style>
    <style:style style:name="T753" style:parent-style-name="Policepardéfaut" style:family="text">
      <style:text-properties style:font-name="GPAFJ+Aptos" style:font-name-asian="GPAFJ+Aptos" style:font-name-complex="GPAFJ+Aptos" fo:color="#000000"/>
    </style:style>
    <style:style style:name="T754" style:parent-style-name="Policepardéfaut" style:family="text">
      <style:text-properties style:font-name="GPAFJ+Aptos" style:font-name-asian="GPAFJ+Aptos" style:font-name-complex="GPAFJ+Aptos" fo:color="#000000" style:text-scale="101%"/>
    </style:style>
    <style:style style:name="T755" style:parent-style-name="Policepardéfaut" style:family="text">
      <style:text-properties style:font-name="GPAFJ+Aptos" style:font-name-asian="GPAFJ+Aptos" style:font-name-complex="GPAFJ+Aptos" fo:color="#000000" fo:letter-spacing="-0.0006in"/>
    </style:style>
    <style:style style:name="T756" style:parent-style-name="Policepardéfaut" style:family="text">
      <style:text-properties style:font-name="GPAFJ+Aptos" style:font-name-asian="GPAFJ+Aptos" style:font-name-complex="GPAFJ+Aptos" fo:color="#000000"/>
    </style:style>
    <style:style style:name="T757" style:parent-style-name="Policepardéfaut" style:family="text">
      <style:text-properties style:font-name="GPAFJ+Aptos" style:font-name-asian="GPAFJ+Aptos" style:font-name-complex="GPAFJ+Aptos" fo:color="#000000" fo:letter-spacing="-0.0006in"/>
    </style:style>
    <style:style style:name="T758" style:parent-style-name="Policepardéfaut" style:family="text">
      <style:text-properties style:font-name="GPAFJ+Aptos" style:font-name-asian="GPAFJ+Aptos" style:font-name-complex="GPAFJ+Aptos" fo:color="#000000"/>
    </style:style>
    <style:style style:name="T759" style:parent-style-name="Policepardéfaut" style:family="text">
      <style:text-properties style:font-name="GPAFJ+Aptos" style:font-name-asian="GPAFJ+Aptos" style:font-name-complex="GPAFJ+Aptos" fo:color="#000000" style:text-scale="101%"/>
    </style:style>
    <style:style style:name="T760" style:parent-style-name="Policepardéfaut" style:family="text">
      <style:text-properties style:font-name="GPAFJ+Aptos" style:font-name-asian="GPAFJ+Aptos" style:font-name-complex="GPAFJ+Aptos" fo:color="#000000" fo:letter-spacing="0.0006in"/>
    </style:style>
    <style:style style:name="T761" style:parent-style-name="Policepardéfaut" style:family="text">
      <style:text-properties style:font-name="GPAFJ+Aptos" style:font-name-asian="GPAFJ+Aptos" style:font-name-complex="GPAFJ+Aptos" fo:color="#000000" style:text-scale="101%"/>
    </style:style>
    <style:style style:name="T762" style:parent-style-name="Policepardéfaut" style:family="text">
      <style:text-properties style:font-name="GPAFJ+Aptos" style:font-name-asian="GPAFJ+Aptos" style:font-name-complex="GPAFJ+Aptos" fo:color="#000000"/>
    </style:style>
    <style:style style:name="T763" style:parent-style-name="Policepardéfaut" style:family="text">
      <style:text-properties style:font-name="GPAFJ+Aptos" style:font-name-asian="GPAFJ+Aptos" style:font-name-complex="GPAFJ+Aptos" fo:color="#000000" fo:letter-spacing="-0.0006in"/>
    </style:style>
    <style:style style:name="T764" style:parent-style-name="Policepardéfaut" style:family="text">
      <style:text-properties style:font-name="GPAFJ+Aptos" style:font-name-asian="GPAFJ+Aptos" style:font-name-complex="GPAFJ+Aptos" fo:color="#000000" style:text-scale="101%"/>
    </style:style>
    <style:style style:name="T765" style:parent-style-name="Policepardéfaut" style:family="text">
      <style:text-properties style:font-name="GPAFJ+Aptos" style:font-name-asian="GPAFJ+Aptos" style:font-name-complex="GPAFJ+Aptos" fo:color="#000000" fo:letter-spacing="-0.0006in"/>
    </style:style>
    <style:style style:name="T766" style:parent-style-name="Policepardéfaut" style:family="text">
      <style:text-properties style:font-name="GPAFJ+Aptos" style:font-name-asian="GPAFJ+Aptos" style:font-name-complex="GPAFJ+Aptos" fo:color="#000000" style:text-scale="101%"/>
    </style:style>
    <style:style style:name="T767" style:parent-style-name="Policepardéfaut" style:family="text">
      <style:text-properties style:font-name="GPAFJ+Aptos" style:font-name-asian="GPAFJ+Aptos" style:font-name-complex="GPAFJ+Aptos" fo:color="#000000"/>
    </style:style>
    <style:style style:name="T768" style:parent-style-name="Policepardéfaut" style:family="text">
      <style:text-properties style:font-name="GPAFJ+Aptos" style:font-name-asian="GPAFJ+Aptos" style:font-name-complex="GPAFJ+Aptos" fo:color="#000000" fo:letter-spacing="-0.0006in"/>
    </style:style>
    <style:style style:name="T769" style:parent-style-name="Policepardéfaut" style:family="text">
      <style:text-properties style:font-name="GPAFJ+Aptos" style:font-name-asian="GPAFJ+Aptos" style:font-name-complex="GPAFJ+Aptos" fo:color="#000000" style:text-scale="101%"/>
    </style:style>
    <style:style style:name="T770" style:parent-style-name="Policepardéfaut" style:family="text">
      <style:text-properties style:font-name="GPAFJ+Aptos" style:font-name-asian="GPAFJ+Aptos" style:font-name-complex="GPAFJ+Aptos" fo:color="#000000" fo:letter-spacing="-0.0006in"/>
    </style:style>
    <style:style style:name="T771" style:parent-style-name="Policepardéfaut" style:family="text">
      <style:text-properties style:font-name="GPAFJ+Aptos" style:font-name-asian="GPAFJ+Aptos" style:font-name-complex="GPAFJ+Aptos" fo:color="#000000"/>
    </style:style>
    <style:style style:name="T772" style:parent-style-name="Policepardéfaut" style:family="text">
      <style:text-properties style:font-name="GPAFJ+Aptos" style:font-name-asian="GPAFJ+Aptos" style:font-name-complex="GPAFJ+Aptos" fo:color="#000000" fo:letter-spacing="0.0006in"/>
    </style:style>
    <style:style style:name="T773" style:parent-style-name="Policepardéfaut" style:family="text">
      <style:text-properties style:font-name="GPAFJ+Aptos" style:font-name-asian="GPAFJ+Aptos" style:font-name-complex="GPAFJ+Aptos" fo:color="#000000" fo:letter-spacing="-0.0006in"/>
    </style:style>
    <style:style style:name="T774" style:parent-style-name="Policepardéfaut" style:family="text">
      <style:text-properties style:font-name="GPAFJ+Aptos" style:font-name-asian="GPAFJ+Aptos" style:font-name-complex="GPAFJ+Aptos" fo:color="#000000" style:text-scale="101%"/>
    </style:style>
    <style:style style:name="T775" style:parent-style-name="Policepardéfaut" style:family="text">
      <style:text-properties style:font-name="GPAFJ+Aptos" style:font-name-asian="GPAFJ+Aptos" style:font-name-complex="GPAFJ+Aptos" fo:color="#000000" fo:letter-spacing="-0.0006in"/>
    </style:style>
    <style:style style:name="T776" style:parent-style-name="Policepardéfaut" style:family="text">
      <style:text-properties style:font-name="GPAFJ+Aptos" style:font-name-asian="GPAFJ+Aptos" style:font-name-complex="GPAFJ+Aptos" fo:color="#000000"/>
    </style:style>
    <style:style style:name="T777" style:parent-style-name="Policepardéfaut" style:family="text">
      <style:text-properties style:font-name="GPAFJ+Aptos" style:font-name-asian="GPAFJ+Aptos" style:font-name-complex="GPAFJ+Aptos" fo:color="#000000" fo:letter-spacing="-0.0013in" style:text-scale="101%"/>
    </style:style>
    <style:style style:name="T778" style:parent-style-name="Policepardéfaut" style:family="text">
      <style:text-properties style:font-name="GPAFJ+Aptos" style:font-name-asian="GPAFJ+Aptos" style:font-name-complex="GPAFJ+Aptos" fo:color="#000000" style:text-scale="101%"/>
    </style:style>
    <style:style style:name="T779" style:parent-style-name="Policepardéfaut" style:family="text">
      <style:text-properties style:font-name="GPAFJ+Aptos" style:font-name-asian="GPAFJ+Aptos" style:font-name-complex="GPAFJ+Aptos" fo:color="#000000" fo:letter-spacing="-0.0006in"/>
    </style:style>
    <style:style style:name="T780" style:parent-style-name="Policepardéfaut" style:family="text">
      <style:text-properties style:font-name="GPAFJ+Aptos" style:font-name-asian="GPAFJ+Aptos" style:font-name-complex="GPAFJ+Aptos" fo:color="#000000" fo:letter-spacing="-0.0006in" style:text-scale="101%"/>
    </style:style>
    <style:style style:name="T781" style:parent-style-name="Policepardéfaut" style:family="text">
      <style:text-properties style:font-name="GPAFJ+Aptos" style:font-name-asian="GPAFJ+Aptos" style:font-name-complex="GPAFJ+Aptos" fo:color="#000000"/>
    </style:style>
    <style:style style:name="T782" style:parent-style-name="Policepardéfaut" style:family="text">
      <style:text-properties style:font-name="GPAFJ+Aptos" style:font-name-asian="GPAFJ+Aptos" style:font-name-complex="GPAFJ+Aptos" fo:color="#000000" fo:letter-spacing="-0.0013in" style:text-scale="101%"/>
    </style:style>
    <style:style style:name="T783" style:parent-style-name="Policepardéfaut" style:family="text">
      <style:text-properties style:font-name="GPAFJ+Aptos" style:font-name-asian="GPAFJ+Aptos" style:font-name-complex="GPAFJ+Aptos" fo:color="#000000"/>
    </style:style>
    <style:style style:name="T784" style:parent-style-name="Policepardéfaut" style:family="text">
      <style:text-properties style:font-name="GPAFJ+Aptos" style:font-name-asian="GPAFJ+Aptos" style:font-name-complex="GPAFJ+Aptos" fo:color="#000000" style:text-scale="101%"/>
    </style:style>
    <style:style style:name="T785" style:parent-style-name="Policepardéfaut" style:family="text">
      <style:text-properties style:font-name="GPAFJ+Aptos" style:font-name-asian="GPAFJ+Aptos" style:font-name-complex="GPAFJ+Aptos" fo:color="#000000"/>
    </style:style>
    <style:style style:name="T786" style:parent-style-name="Policepardéfaut" style:family="text">
      <style:text-properties style:font-name="GPAFJ+Aptos" style:font-name-asian="GPAFJ+Aptos" style:font-name-complex="GPAFJ+Aptos" fo:color="#000000" fo:letter-spacing="-0.0006in"/>
    </style:style>
    <style:style style:name="T787" style:parent-style-name="Policepardéfaut" style:family="text">
      <style:text-properties style:font-name="GPAFJ+Aptos" style:font-name-asian="GPAFJ+Aptos" style:font-name-complex="GPAFJ+Aptos" fo:color="#000000"/>
    </style:style>
    <style:style style:name="T788" style:parent-style-name="Policepardéfaut" style:family="text">
      <style:text-properties style:font-name="GPAFJ+Aptos" style:font-name-asian="GPAFJ+Aptos" style:font-name-complex="GPAFJ+Aptos" fo:color="#000000" style:text-scale="101%"/>
    </style:style>
    <style:style style:name="T789" style:parent-style-name="Policepardéfaut" style:family="text">
      <style:text-properties style:font-name="GPAFJ+Aptos" style:font-name-asian="GPAFJ+Aptos" style:font-name-complex="GPAFJ+Aptos" fo:color="#000000"/>
    </style:style>
    <style:style style:name="T790" style:parent-style-name="Policepardéfaut" style:family="text">
      <style:text-properties style:font-name="GPAFJ+Aptos" style:font-name-asian="GPAFJ+Aptos" style:font-name-complex="GPAFJ+Aptos" fo:color="#000000" style:text-scale="101%"/>
    </style:style>
    <style:style style:name="T791" style:parent-style-name="Policepardéfaut" style:family="text">
      <style:text-properties style:font-name="GPAFJ+Aptos" style:font-name-asian="GPAFJ+Aptos" style:font-name-complex="GPAFJ+Aptos" fo:color="#000000"/>
    </style:style>
    <style:style style:name="T792" style:parent-style-name="Policepardéfaut" style:family="text">
      <style:text-properties style:font-name="GPAFJ+Aptos" style:font-name-asian="GPAFJ+Aptos" style:font-name-complex="GPAFJ+Aptos" fo:color="#000000" style:text-scale="101%"/>
    </style:style>
    <style:style style:name="T793" style:parent-style-name="Policepardéfaut" style:family="text">
      <style:text-properties style:font-name="GPAFJ+Aptos" style:font-name-asian="GPAFJ+Aptos" style:font-name-complex="GPAFJ+Aptos" fo:color="#000000" fo:letter-spacing="-0.0006in"/>
    </style:style>
    <style:style style:name="T794" style:parent-style-name="Policepardéfaut" style:family="text">
      <style:text-properties style:font-name="GPAFJ+Aptos" style:font-name-asian="GPAFJ+Aptos" style:font-name-complex="GPAFJ+Aptos" fo:color="#000000" style:text-scale="101%"/>
    </style:style>
    <style:style style:name="T795" style:parent-style-name="Policepardéfaut" style:family="text">
      <style:text-properties style:font-name="GPAFJ+Aptos" style:font-name-asian="GPAFJ+Aptos" style:font-name-complex="GPAFJ+Aptos" fo:color="#000000"/>
    </style:style>
    <style:style style:name="T796" style:parent-style-name="Policepardéfaut" style:family="text">
      <style:text-properties style:font-name="GPAFJ+Aptos" style:font-name-asian="GPAFJ+Aptos" style:font-name-complex="GPAFJ+Aptos" fo:color="#000000" fo:letter-spacing="-0.0013in" style:text-scale="101%"/>
    </style:style>
    <style:style style:name="T797" style:parent-style-name="Policepardéfaut" style:family="text">
      <style:text-properties style:font-name="GPAFJ+Aptos" style:font-name-asian="GPAFJ+Aptos" style:font-name-complex="GPAFJ+Aptos" fo:color="#000000" style:text-scale="101%"/>
    </style:style>
    <style:style style:name="T798" style:parent-style-name="Policepardéfaut" style:family="text">
      <style:text-properties style:font-name="GPAFJ+Aptos" style:font-name-asian="GPAFJ+Aptos" style:font-name-complex="GPAFJ+Aptos" fo:color="#000000" fo:letter-spacing="0.0006in"/>
    </style:style>
    <style:style style:name="T799" style:parent-style-name="Policepardéfaut" style:family="text">
      <style:text-properties style:font-name="GPAFJ+Aptos" style:font-name-asian="GPAFJ+Aptos" style:font-name-complex="GPAFJ+Aptos" fo:color="#000000"/>
    </style:style>
    <style:style style:name="T800" style:parent-style-name="Policepardéfaut" style:family="text">
      <style:text-properties style:font-name="GPAFJ+Aptos" style:font-name-asian="GPAFJ+Aptos" style:font-name-complex="GPAFJ+Aptos" fo:color="#000000" style:text-scale="101%"/>
    </style:style>
    <style:style style:name="T801" style:parent-style-name="Policepardéfaut" style:family="text">
      <style:text-properties style:font-name="GPAFJ+Aptos" style:font-name-asian="GPAFJ+Aptos" style:font-name-complex="GPAFJ+Aptos" fo:color="#000000"/>
    </style:style>
    <style:style style:name="T802" style:parent-style-name="Policepardéfaut" style:family="text">
      <style:text-properties style:font-name="GPAFJ+Aptos" style:font-name-asian="GPAFJ+Aptos" style:font-name-complex="GPAFJ+Aptos" fo:color="#000000" fo:letter-spacing="-0.0006in"/>
    </style:style>
    <style:style style:name="T803" style:parent-style-name="Policepardéfaut" style:family="text">
      <style:text-properties style:font-name="GPAFJ+Aptos" style:font-name-asian="GPAFJ+Aptos" style:font-name-complex="GPAFJ+Aptos" fo:color="#000000" style:text-scale="101%"/>
    </style:style>
    <style:style style:name="T804" style:parent-style-name="Policepardéfaut" style:family="text">
      <style:text-properties style:font-name="GPAFJ+Aptos" style:font-name-asian="GPAFJ+Aptos" style:font-name-complex="GPAFJ+Aptos" fo:color="#000000"/>
    </style:style>
    <style:style style:name="T805" style:parent-style-name="Policepardéfaut" style:family="text">
      <style:text-properties style:font-name="GPAFJ+Aptos" style:font-name-asian="GPAFJ+Aptos" style:font-name-complex="GPAFJ+Aptos" fo:color="#000000" style:text-scale="101%"/>
    </style:style>
    <style:style style:name="T806" style:parent-style-name="Policepardéfaut" style:family="text">
      <style:text-properties style:font-name="GPAFJ+Aptos" style:font-name-asian="GPAFJ+Aptos" style:font-name-complex="GPAFJ+Aptos" fo:color="#000000" fo:letter-spacing="-0.0006in"/>
    </style:style>
    <style:style style:name="T807" style:parent-style-name="Policepardéfaut" style:family="text">
      <style:text-properties style:font-name="GPAFJ+Aptos" style:font-name-asian="GPAFJ+Aptos" style:font-name-complex="GPAFJ+Aptos" fo:color="#000000"/>
    </style:style>
    <style:style style:name="T808" style:parent-style-name="Policepardéfaut" style:family="text">
      <style:text-properties style:font-name="GPAFJ+Aptos" style:font-name-asian="GPAFJ+Aptos" style:font-name-complex="GPAFJ+Aptos" fo:color="#000000" style:text-scale="101%"/>
    </style:style>
    <style:style style:name="T809" style:parent-style-name="Policepardéfaut" style:family="text">
      <style:text-properties style:font-name="GPAFJ+Aptos" style:font-name-asian="GPAFJ+Aptos" style:font-name-complex="GPAFJ+Aptos" fo:color="#000000" fo:letter-spacing="-0.0006in"/>
    </style:style>
    <style:style style:name="T810" style:parent-style-name="Policepardéfaut" style:family="text">
      <style:text-properties style:font-name="GPAFJ+Aptos" style:font-name-asian="GPAFJ+Aptos" style:font-name-complex="GPAFJ+Aptos" fo:color="#000000" style:text-scale="101%"/>
    </style:style>
    <style:style style:name="T811" style:parent-style-name="Policepardéfaut" style:family="text">
      <style:text-properties style:font-name="GPAFJ+Aptos" style:font-name-asian="GPAFJ+Aptos" style:font-name-complex="GPAFJ+Aptos" fo:color="#000000" fo:letter-spacing="-0.0006in"/>
    </style:style>
    <style:style style:name="T812" style:parent-style-name="Policepardéfaut" style:family="text">
      <style:text-properties style:font-name="GPAFJ+Aptos" style:font-name-asian="GPAFJ+Aptos" style:font-name-complex="GPAFJ+Aptos" fo:color="#000000" style:text-scale="101%"/>
    </style:style>
    <style:style style:name="T813" style:parent-style-name="Policepardéfaut" style:family="text">
      <style:text-properties style:font-name="GPAFJ+Aptos" style:font-name-asian="GPAFJ+Aptos" style:font-name-complex="GPAFJ+Aptos" fo:color="#000000" fo:letter-spacing="-0.0013in"/>
    </style:style>
    <style:style style:name="T814" style:parent-style-name="Policepardéfaut" style:family="text">
      <style:text-properties style:font-name="GPAFJ+Aptos" style:font-name-asian="GPAFJ+Aptos" style:font-name-complex="GPAFJ+Aptos" fo:color="#000000" style:text-scale="101%"/>
    </style:style>
    <style:style style:name="T815" style:parent-style-name="Policepardéfaut" style:family="text">
      <style:text-properties style:font-name="GPAFJ+Aptos" style:font-name-asian="GPAFJ+Aptos" style:font-name-complex="GPAFJ+Aptos" fo:color="#000000" fo:letter-spacing="-0.0006in"/>
    </style:style>
    <style:style style:name="T816" style:parent-style-name="Policepardéfaut" style:family="text">
      <style:text-properties style:font-name="GPAFJ+Aptos" style:font-name-asian="GPAFJ+Aptos" style:font-name-complex="GPAFJ+Aptos" fo:color="#000000" style:text-scale="101%"/>
    </style:style>
    <style:style style:name="T817" style:parent-style-name="Policepardéfaut" style:family="text">
      <style:text-properties style:font-name="GPAFJ+Aptos" style:font-name-asian="GPAFJ+Aptos" style:font-name-complex="GPAFJ+Aptos" fo:color="#000000" fo:letter-spacing="-0.0006in"/>
    </style:style>
    <style:style style:name="T818" style:parent-style-name="Policepardéfaut" style:family="text">
      <style:text-properties style:font-name="GPAFJ+Aptos" style:font-name-asian="GPAFJ+Aptos" style:font-name-complex="GPAFJ+Aptos" fo:color="#000000"/>
    </style:style>
    <style:style style:name="T819" style:parent-style-name="Policepardéfaut" style:family="text">
      <style:text-properties style:font-name="GPAFJ+Aptos" style:font-name-asian="GPAFJ+Aptos" style:font-name-complex="GPAFJ+Aptos" fo:color="#000000" style:text-scale="101%"/>
    </style:style>
    <style:style style:name="T820" style:parent-style-name="Policepardéfaut" style:family="text">
      <style:text-properties style:font-name="GPAFJ+Aptos" style:font-name-asian="GPAFJ+Aptos" style:font-name-complex="GPAFJ+Aptos" fo:color="#000000" fo:letter-spacing="-0.0006in"/>
    </style:style>
    <style:style style:name="T821" style:parent-style-name="Policepardéfaut" style:family="text">
      <style:text-properties style:font-name="GPAFJ+Aptos" style:font-name-asian="GPAFJ+Aptos" style:font-name-complex="GPAFJ+Aptos" fo:color="#000000"/>
    </style:style>
    <style:style style:name="T822" style:parent-style-name="Policepardéfaut" style:family="text">
      <style:text-properties style:font-name="GPAFJ+Aptos" style:font-name-asian="GPAFJ+Aptos" style:font-name-complex="GPAFJ+Aptos" fo:color="#000000" style:text-scale="101%"/>
    </style:style>
    <style:style style:name="T823" style:parent-style-name="Policepardéfaut" style:family="text">
      <style:text-properties style:font-name="GPAFJ+Aptos" style:font-name-asian="GPAFJ+Aptos" style:font-name-complex="GPAFJ+Aptos" fo:color="#000000"/>
    </style:style>
    <style:style style:name="T824" style:parent-style-name="Policepardéfaut" style:family="text">
      <style:text-properties style:font-name="GPAFJ+Aptos" style:font-name-asian="GPAFJ+Aptos" style:font-name-complex="GPAFJ+Aptos" fo:color="#000000" fo:letter-spacing="-0.0013in" style:text-scale="101%"/>
    </style:style>
    <style:style style:name="T825" style:parent-style-name="Policepardéfaut" style:family="text">
      <style:text-properties style:font-name="GPAFJ+Aptos" style:font-name-asian="GPAFJ+Aptos" style:font-name-complex="GPAFJ+Aptos" fo:color="#000000" style:text-scale="101%"/>
    </style:style>
    <style:style style:name="T826" style:parent-style-name="Policepardéfaut" style:family="text">
      <style:text-properties style:font-name="GPAFJ+Aptos" style:font-name-asian="GPAFJ+Aptos" style:font-name-complex="GPAFJ+Aptos" fo:color="#000000" fo:letter-spacing="-0.0013in"/>
    </style:style>
    <style:style style:name="T827" style:parent-style-name="Policepardéfaut" style:family="text">
      <style:text-properties style:font-name="GPAFJ+Aptos" style:font-name-asian="GPAFJ+Aptos" style:font-name-complex="GPAFJ+Aptos" fo:color="#000000" style:text-scale="101%"/>
    </style:style>
    <style:style style:name="T828" style:parent-style-name="Policepardéfaut" style:family="text">
      <style:text-properties style:font-name="GPAFJ+Aptos" style:font-name-asian="GPAFJ+Aptos" style:font-name-complex="GPAFJ+Aptos" fo:color="#000000" fo:letter-spacing="-0.0006in" style:text-scale="101%"/>
    </style:style>
    <style:style style:name="T829" style:parent-style-name="Policepardéfaut" style:family="text">
      <style:text-properties style:font-name="GPAFJ+Aptos" style:font-name-asian="GPAFJ+Aptos" style:font-name-complex="GPAFJ+Aptos" fo:color="#000000"/>
    </style:style>
    <style:style style:name="T830" style:parent-style-name="Policepardéfaut" style:family="text">
      <style:text-properties style:font-name="GPAFJ+Aptos" style:font-name-asian="GPAFJ+Aptos" style:font-name-complex="GPAFJ+Aptos" fo:color="#000000" fo:letter-spacing="-0.0013in" style:text-scale="101%"/>
    </style:style>
    <style:style style:name="T831" style:parent-style-name="Policepardéfaut" style:family="text">
      <style:text-properties style:font-name="GPAFJ+Aptos" style:font-name-asian="GPAFJ+Aptos" style:font-name-complex="GPAFJ+Aptos" fo:color="#000000" style:text-scale="101%"/>
    </style:style>
    <style:style style:name="T832" style:parent-style-name="Policepardéfaut" style:family="text">
      <style:text-properties style:font-name="GPAFJ+Aptos" style:font-name-asian="GPAFJ+Aptos" style:font-name-complex="GPAFJ+Aptos" fo:color="#000000" fo:letter-spacing="0.0006in"/>
    </style:style>
    <style:style style:name="T833" style:parent-style-name="Policepardéfaut" style:family="text">
      <style:text-properties style:font-name="GPAFJ+Aptos" style:font-name-asian="GPAFJ+Aptos" style:font-name-complex="GPAFJ+Aptos" fo:color="#000000"/>
    </style:style>
    <style:style style:name="T834" style:parent-style-name="Policepardéfaut" style:family="text">
      <style:text-properties style:font-name="GPAFJ+Aptos" style:font-name-asian="GPAFJ+Aptos" style:font-name-complex="GPAFJ+Aptos" fo:color="#000000" fo:letter-spacing="-0.0013in"/>
    </style:style>
    <style:style style:name="T835" style:parent-style-name="Policepardéfaut" style:family="text">
      <style:text-properties style:font-name="GPAFJ+Aptos" style:font-name-asian="GPAFJ+Aptos" style:font-name-complex="GPAFJ+Aptos" fo:color="#000000" style:text-scale="101%"/>
    </style:style>
    <style:style style:name="T836" style:parent-style-name="Policepardéfaut" style:family="text">
      <style:text-properties style:font-name="GPAFJ+Aptos" style:font-name-asian="GPAFJ+Aptos" style:font-name-complex="GPAFJ+Aptos" fo:color="#000000" fo:letter-spacing="-0.0006in" style:text-scale="101%"/>
    </style:style>
    <style:style style:name="T837" style:parent-style-name="Policepardéfaut" style:family="text">
      <style:text-properties style:font-name="GPAFJ+Aptos" style:font-name-asian="GPAFJ+Aptos" style:font-name-complex="GPAFJ+Aptos" fo:color="#000000" fo:letter-spacing="-0.0013in"/>
    </style:style>
    <style:style style:name="T838" style:parent-style-name="Policepardéfaut" style:family="text">
      <style:text-properties style:font-name="GPAFJ+Aptos" style:font-name-asian="GPAFJ+Aptos" style:font-name-complex="GPAFJ+Aptos" fo:color="#000000"/>
    </style:style>
    <style:style style:name="T839" style:parent-style-name="Policepardéfaut" style:family="text">
      <style:text-properties style:font-name="GPAFJ+Aptos" style:font-name-asian="GPAFJ+Aptos" style:font-name-complex="GPAFJ+Aptos" fo:color="#000000" fo:letter-spacing="0.0006in"/>
    </style:style>
    <style:style style:name="T840" style:parent-style-name="Policepardéfaut" style:family="text">
      <style:text-properties style:font-name="GPAFJ+Aptos" style:font-name-asian="GPAFJ+Aptos" style:font-name-complex="GPAFJ+Aptos" fo:color="#000000" fo:letter-spacing="-0.0013in" style:text-scale="101%"/>
    </style:style>
    <style:style style:name="T841" style:parent-style-name="Policepardéfaut" style:family="text">
      <style:text-properties style:font-name="GPAFJ+Aptos" style:font-name-asian="GPAFJ+Aptos" style:font-name-complex="GPAFJ+Aptos" fo:color="#000000" style:text-scale="101%"/>
    </style:style>
    <style:style style:name="T842" style:parent-style-name="Policepardéfaut" style:family="text">
      <style:text-properties style:font-name="GPAFJ+Aptos" style:font-name-asian="GPAFJ+Aptos" style:font-name-complex="GPAFJ+Aptos" fo:color="#000000"/>
    </style:style>
    <style:style style:name="T843" style:parent-style-name="Policepardéfaut" style:family="text">
      <style:text-properties style:font-name="GPAFJ+Aptos" style:font-name-asian="GPAFJ+Aptos" style:font-name-complex="GPAFJ+Aptos" fo:color="#000000" style:text-scale="101%"/>
    </style:style>
    <style:style style:name="T844" style:parent-style-name="Policepardéfaut" style:family="text">
      <style:text-properties style:font-name="GPAFJ+Aptos" style:font-name-asian="GPAFJ+Aptos" style:font-name-complex="GPAFJ+Aptos" fo:color="#000000"/>
    </style:style>
    <style:style style:name="T845" style:parent-style-name="Policepardéfaut" style:family="text">
      <style:text-properties style:font-name="GPAFJ+Aptos" style:font-name-asian="GPAFJ+Aptos" style:font-name-complex="GPAFJ+Aptos" fo:color="#000000" fo:letter-spacing="-0.0006in"/>
    </style:style>
    <style:style style:name="T846" style:parent-style-name="Policepardéfaut" style:family="text">
      <style:text-properties style:font-name="GPAFJ+Aptos" style:font-name-asian="GPAFJ+Aptos" style:font-name-complex="GPAFJ+Aptos" fo:color="#000000" style:text-scale="101%"/>
    </style:style>
    <style:style style:name="T847" style:parent-style-name="Policepardéfaut" style:family="text">
      <style:text-properties style:font-name="GPAFJ+Aptos" style:font-name-asian="GPAFJ+Aptos" style:font-name-complex="GPAFJ+Aptos" fo:color="#000000" fo:letter-spacing="-0.0006in"/>
    </style:style>
    <style:style style:name="T848" style:parent-style-name="Policepardéfaut" style:family="text">
      <style:text-properties style:font-name="GPAFJ+Aptos" style:font-name-asian="GPAFJ+Aptos" style:font-name-complex="GPAFJ+Aptos" fo:color="#000000"/>
    </style:style>
    <style:style style:name="T849" style:parent-style-name="Policepardéfaut" style:family="text">
      <style:text-properties style:font-name="GPAFJ+Aptos" style:font-name-asian="GPAFJ+Aptos" style:font-name-complex="GPAFJ+Aptos" fo:color="#000000" style:text-scale="101%"/>
    </style:style>
    <style:style style:name="T850" style:parent-style-name="Policepardéfaut" style:family="text">
      <style:text-properties style:font-name="GPAFJ+Aptos" style:font-name-asian="GPAFJ+Aptos" style:font-name-complex="GPAFJ+Aptos" fo:color="#000000"/>
    </style:style>
    <style:style style:name="T851" style:parent-style-name="Policepardéfaut" style:family="text">
      <style:text-properties style:font-name="GPAFJ+Aptos" style:font-name-asian="GPAFJ+Aptos" style:font-name-complex="GPAFJ+Aptos" fo:color="#000000" style:text-scale="101%"/>
    </style:style>
    <style:style style:name="T852" style:parent-style-name="Policepardéfaut" style:family="text">
      <style:text-properties style:font-name="GPAFJ+Aptos" style:font-name-asian="GPAFJ+Aptos" style:font-name-complex="GPAFJ+Aptos" fo:color="#000000" fo:letter-spacing="-0.0006in" style:text-scale="101%"/>
    </style:style>
    <style:style style:name="T853" style:parent-style-name="Policepardéfaut" style:family="text">
      <style:text-properties style:font-name="GPAFJ+Aptos" style:font-name-asian="GPAFJ+Aptos" style:font-name-complex="GPAFJ+Aptos" fo:color="#000000"/>
    </style:style>
    <style:style style:name="T854" style:parent-style-name="Policepardéfaut" style:family="text">
      <style:text-properties style:font-name="GPAFJ+Aptos" style:font-name-asian="GPAFJ+Aptos" style:font-name-complex="GPAFJ+Aptos" fo:color="#000000" style:text-scale="101%"/>
    </style:style>
    <style:style style:name="T855" style:parent-style-name="Policepardéfaut" style:family="text">
      <style:text-properties style:font-name="GPAFJ+Aptos" style:font-name-asian="GPAFJ+Aptos" style:font-name-complex="GPAFJ+Aptos" fo:color="#000000"/>
    </style:style>
    <style:style style:name="T856" style:parent-style-name="Policepardéfaut" style:family="text">
      <style:text-properties style:font-name="GPAFJ+Aptos" style:font-name-asian="GPAFJ+Aptos" style:font-name-complex="GPAFJ+Aptos" fo:color="#000000" style:text-scale="101%"/>
    </style:style>
    <style:style style:name="T857" style:parent-style-name="Policepardéfaut" style:family="text">
      <style:text-properties style:font-name="GPAFJ+Aptos" style:font-name-asian="GPAFJ+Aptos" style:font-name-complex="GPAFJ+Aptos" fo:color="#000000"/>
    </style:style>
    <style:style style:name="T858" style:parent-style-name="Policepardéfaut" style:family="text">
      <style:text-properties style:font-name="GPAFJ+Aptos" style:font-name-asian="GPAFJ+Aptos" style:font-name-complex="GPAFJ+Aptos" fo:color="#000000" fo:letter-spacing="-0.0013in"/>
    </style:style>
    <style:style style:name="T859" style:parent-style-name="Policepardéfaut" style:family="text">
      <style:text-properties style:font-name="GPAFJ+Aptos" style:font-name-asian="GPAFJ+Aptos" style:font-name-complex="GPAFJ+Aptos" fo:color="#000000"/>
    </style:style>
    <style:style style:name="T860" style:parent-style-name="Policepardéfaut" style:family="text">
      <style:text-properties style:font-name="GPAFJ+Aptos" style:font-name-asian="GPAFJ+Aptos" style:font-name-complex="GPAFJ+Aptos" fo:color="#000000" style:text-scale="101%"/>
    </style:style>
    <style:style style:name="T861" style:parent-style-name="Policepardéfaut" style:family="text">
      <style:text-properties style:font-name="GPAFJ+Aptos" style:font-name-asian="GPAFJ+Aptos" style:font-name-complex="GPAFJ+Aptos" fo:color="#000000"/>
    </style:style>
    <style:style style:name="T862" style:parent-style-name="Policepardéfaut" style:family="text">
      <style:text-properties style:font-name="GPAFJ+Aptos" style:font-name-asian="GPAFJ+Aptos" style:font-name-complex="GPAFJ+Aptos" fo:color="#000000" style:text-scale="101%"/>
    </style:style>
    <style:style style:name="T863" style:parent-style-name="Policepardéfaut" style:family="text">
      <style:text-properties style:font-name="GPAFJ+Aptos" style:font-name-asian="GPAFJ+Aptos" style:font-name-complex="GPAFJ+Aptos" fo:color="#000000"/>
    </style:style>
    <style:style style:name="T864" style:parent-style-name="Policepardéfaut" style:family="text">
      <style:text-properties style:font-name="GPAFJ+Aptos" style:font-name-asian="GPAFJ+Aptos" style:font-name-complex="GPAFJ+Aptos" fo:color="#000000" fo:letter-spacing="-0.0006in"/>
    </style:style>
    <style:style style:name="T865" style:parent-style-name="Policepardéfaut" style:family="text">
      <style:text-properties style:font-name="GPAFJ+Aptos" style:font-name-asian="GPAFJ+Aptos" style:font-name-complex="GPAFJ+Aptos" fo:color="#000000" style:text-scale="101%"/>
    </style:style>
    <style:style style:name="T866" style:parent-style-name="Policepardéfaut" style:family="text">
      <style:text-properties style:font-name="GPAFJ+Aptos" style:font-name-asian="GPAFJ+Aptos" style:font-name-complex="GPAFJ+Aptos" fo:color="#000000"/>
    </style:style>
    <style:style style:name="T867" style:parent-style-name="Policepardéfaut" style:family="text">
      <style:text-properties style:font-name="GPAFJ+Aptos" style:font-name-asian="GPAFJ+Aptos" style:font-name-complex="GPAFJ+Aptos" fo:color="#000000" style:text-scale="101%"/>
    </style:style>
    <style:style style:name="T868" style:parent-style-name="Policepardéfaut" style:family="text">
      <style:text-properties style:font-name="GPAFJ+Aptos" style:font-name-asian="GPAFJ+Aptos" style:font-name-complex="GPAFJ+Aptos" fo:color="#000000"/>
    </style:style>
    <style:style style:name="T869" style:parent-style-name="Policepardéfaut" style:family="text">
      <style:text-properties style:font-name="GPAFJ+Aptos" style:font-name-asian="GPAFJ+Aptos" style:font-name-complex="GPAFJ+Aptos" fo:color="#000000" style:text-scale="101%"/>
    </style:style>
    <style:style style:name="T870" style:parent-style-name="Policepardéfaut" style:family="text">
      <style:text-properties style:font-name="GPAFJ+Aptos" style:font-name-asian="GPAFJ+Aptos" style:font-name-complex="GPAFJ+Aptos" fo:color="#000000" fo:letter-spacing="-0.0013in"/>
    </style:style>
    <style:style style:name="T871" style:parent-style-name="Policepardéfaut" style:family="text">
      <style:text-properties style:font-name="GPAFJ+Aptos" style:font-name-asian="GPAFJ+Aptos" style:font-name-complex="GPAFJ+Aptos" fo:color="#000000" style:text-scale="101%"/>
    </style:style>
    <style:style style:name="T872" style:parent-style-name="Policepardéfaut" style:family="text">
      <style:text-properties style:font-name="GPAFJ+Aptos" style:font-name-asian="GPAFJ+Aptos" style:font-name-complex="GPAFJ+Aptos" fo:color="#000000" fo:letter-spacing="-0.0006in"/>
    </style:style>
    <style:style style:name="T873" style:parent-style-name="Policepardéfaut" style:family="text">
      <style:text-properties style:font-name="GPAFJ+Aptos" style:font-name-asian="GPAFJ+Aptos" style:font-name-complex="GPAFJ+Aptos" fo:color="#000000" fo:letter-spacing="-0.0013in" style:text-scale="101%"/>
    </style:style>
    <style:style style:name="T874" style:parent-style-name="Policepardéfaut" style:family="text">
      <style:text-properties style:font-name="GPAFJ+Aptos" style:font-name-asian="GPAFJ+Aptos" style:font-name-complex="GPAFJ+Aptos" fo:color="#000000" style:text-scale="101%"/>
    </style:style>
    <style:style style:name="T875" style:parent-style-name="Policepardéfaut" style:family="text">
      <style:text-properties style:font-name="GPAFJ+Aptos" style:font-name-asian="GPAFJ+Aptos" style:font-name-complex="GPAFJ+Aptos" fo:color="#000000" fo:letter-spacing="0.0006in"/>
    </style:style>
    <style:style style:name="T876" style:parent-style-name="Policepardéfaut" style:family="text">
      <style:text-properties style:font-name="GPAFJ+Aptos" style:font-name-asian="GPAFJ+Aptos" style:font-name-complex="GPAFJ+Aptos" fo:color="#000000" style:text-scale="101%"/>
    </style:style>
    <style:style style:name="T877" style:parent-style-name="Policepardéfaut" style:family="text">
      <style:text-properties style:font-name="GPAFJ+Aptos" style:font-name-asian="GPAFJ+Aptos" style:font-name-complex="GPAFJ+Aptos" fo:color="#000000" fo:letter-spacing="-0.0013in" style:text-scale="101%"/>
    </style:style>
    <style:style style:name="T878" style:parent-style-name="Policepardéfaut" style:family="text">
      <style:text-properties style:font-name="GPAFJ+Aptos" style:font-name-asian="GPAFJ+Aptos" style:font-name-complex="GPAFJ+Aptos" fo:color="#000000"/>
    </style:style>
    <style:style style:name="T879" style:parent-style-name="Policepardéfaut" style:family="text">
      <style:text-properties style:font-name="GPAFJ+Aptos" style:font-name-asian="GPAFJ+Aptos" style:font-name-complex="GPAFJ+Aptos" fo:color="#000000" style:text-scale="101%"/>
    </style:style>
    <style:style style:name="T880" style:parent-style-name="Policepardéfaut" style:family="text">
      <style:text-properties style:font-name="GPAFJ+Aptos" style:font-name-asian="GPAFJ+Aptos" style:font-name-complex="GPAFJ+Aptos" fo:color="#000000" fo:letter-spacing="-0.0013in" style:text-scale="101%"/>
    </style:style>
    <style:style style:name="T881" style:parent-style-name="Policepardéfaut" style:family="text">
      <style:text-properties style:font-name="GPAFJ+Aptos" style:font-name-asian="GPAFJ+Aptos" style:font-name-complex="GPAFJ+Aptos" fo:color="#000000"/>
    </style:style>
    <style:style style:name="T882" style:parent-style-name="Policepardéfaut" style:family="text">
      <style:text-properties style:font-name="GPAFJ+Aptos" style:font-name-asian="GPAFJ+Aptos" style:font-name-complex="GPAFJ+Aptos" fo:color="#000000" fo:letter-spacing="-0.0013in" style:text-scale="101%"/>
    </style:style>
    <style:style style:name="T883" style:parent-style-name="Policepardéfaut" style:family="text">
      <style:text-properties style:font-name="GPAFJ+Aptos" style:font-name-asian="GPAFJ+Aptos" style:font-name-complex="GPAFJ+Aptos" fo:color="#000000" style:text-scale="101%"/>
    </style:style>
    <style:style style:name="T884" style:parent-style-name="Policepardéfaut" style:family="text">
      <style:text-properties style:font-name="GPAFJ+Aptos" style:font-name-asian="GPAFJ+Aptos" style:font-name-complex="GPAFJ+Aptos" fo:color="#000000" fo:letter-spacing="0.0006in"/>
    </style:style>
    <style:style style:name="T885" style:parent-style-name="Policepardéfaut" style:family="text">
      <style:text-properties style:font-name="GPAFJ+Aptos" style:font-name-asian="GPAFJ+Aptos" style:font-name-complex="GPAFJ+Aptos" fo:color="#000000" style:text-scale="101%"/>
    </style:style>
    <style:style style:name="T886" style:parent-style-name="Policepardéfaut" style:family="text">
      <style:text-properties style:font-name="GPAFJ+Aptos" style:font-name-asian="GPAFJ+Aptos" style:font-name-complex="GPAFJ+Aptos" fo:color="#000000"/>
    </style:style>
    <style:style style:name="T887" style:parent-style-name="Policepardéfaut" style:family="text">
      <style:text-properties style:font-name="GPAFJ+Aptos" style:font-name-asian="GPAFJ+Aptos" style:font-name-complex="GPAFJ+Aptos" fo:color="#000000" fo:letter-spacing="-0.0013in" style:text-scale="101%"/>
    </style:style>
    <style:style style:name="T888" style:parent-style-name="Policepardéfaut" style:family="text">
      <style:text-properties style:font-name="GPAFJ+Aptos" style:font-name-asian="GPAFJ+Aptos" style:font-name-complex="GPAFJ+Aptos" fo:color="#000000" style:text-scale="101%"/>
    </style:style>
    <style:style style:name="T889" style:parent-style-name="Policepardéfaut" style:family="text">
      <style:text-properties style:font-name="GPAFJ+Aptos" style:font-name-asian="GPAFJ+Aptos" style:font-name-complex="GPAFJ+Aptos" fo:color="#000000" fo:letter-spacing="-0.002in"/>
    </style:style>
    <style:style style:name="T890" style:parent-style-name="Policepardéfaut" style:family="text">
      <style:text-properties style:font-name="GPAFJ+Aptos" style:font-name-asian="GPAFJ+Aptos" style:font-name-complex="GPAFJ+Aptos" fo:color="#000000"/>
    </style:style>
    <style:style style:name="T891" style:parent-style-name="Policepardéfaut" style:family="text">
      <style:text-properties style:font-name="GPAFJ+Aptos" style:font-name-asian="GPAFJ+Aptos" style:font-name-complex="GPAFJ+Aptos" fo:color="#000000" fo:letter-spacing="0.0013in" style:text-scale="101%"/>
    </style:style>
    <style:style style:name="T892" style:parent-style-name="Policepardéfaut" style:family="text">
      <style:text-properties style:font-name="GPAFJ+Aptos" style:font-name-asian="GPAFJ+Aptos" style:font-name-complex="GPAFJ+Aptos" fo:color="#000000" fo:letter-spacing="-0.0013in"/>
    </style:style>
    <style:style style:name="T893" style:parent-style-name="Policepardéfaut" style:family="text">
      <style:text-properties style:font-name="GPAFJ+Aptos" style:font-name-asian="GPAFJ+Aptos" style:font-name-complex="GPAFJ+Aptos" fo:color="#000000"/>
    </style:style>
    <style:style style:name="T894" style:parent-style-name="Policepardéfaut" style:family="text">
      <style:text-properties style:font-name="GPAFJ+Aptos" style:font-name-asian="GPAFJ+Aptos" style:font-name-complex="GPAFJ+Aptos" fo:color="#000000" fo:letter-spacing="0.0006in"/>
    </style:style>
    <style:style style:name="T895" style:parent-style-name="Policepardéfaut" style:family="text">
      <style:text-properties style:font-name="GPAFJ+Aptos" style:font-name-asian="GPAFJ+Aptos" style:font-name-complex="GPAFJ+Aptos" fo:color="#000000" fo:letter-spacing="-0.0006in" style:text-scale="101%"/>
    </style:style>
    <style:style style:name="T896" style:parent-style-name="Policepardéfaut" style:family="text">
      <style:text-properties style:font-name="GPAFJ+Aptos" style:font-name-asian="GPAFJ+Aptos" style:font-name-complex="GPAFJ+Aptos" fo:color="#000000"/>
    </style:style>
    <style:style style:name="T897" style:parent-style-name="Policepardéfaut" style:family="text">
      <style:text-properties style:font-name="GPAFJ+Aptos" style:font-name-asian="GPAFJ+Aptos" style:font-name-complex="GPAFJ+Aptos" fo:color="#000000" style:text-scale="101%"/>
    </style:style>
    <style:style style:name="T898" style:parent-style-name="Policepardéfaut" style:family="text">
      <style:text-properties style:font-name="GPAFJ+Aptos" style:font-name-asian="GPAFJ+Aptos" style:font-name-complex="GPAFJ+Aptos" fo:color="#000000" fo:letter-spacing="-0.0006in"/>
    </style:style>
    <style:style style:name="T899" style:parent-style-name="Policepardéfaut" style:family="text">
      <style:text-properties style:font-name="GPAFJ+Aptos" style:font-name-asian="GPAFJ+Aptos" style:font-name-complex="GPAFJ+Aptos" fo:color="#000000" style:text-scale="101%"/>
    </style:style>
    <style:style style:name="T900" style:parent-style-name="Policepardéfaut" style:family="text">
      <style:text-properties style:font-name="GPAFJ+Aptos" style:font-name-asian="GPAFJ+Aptos" style:font-name-complex="GPAFJ+Aptos" fo:color="#000000" fo:letter-spacing="-0.0013in" style:text-scale="101%"/>
    </style:style>
    <style:style style:name="T901" style:parent-style-name="Policepardéfaut" style:family="text">
      <style:text-properties style:font-name="GPAFJ+Aptos" style:font-name-asian="GPAFJ+Aptos" style:font-name-complex="GPAFJ+Aptos" fo:color="#000000"/>
    </style:style>
    <style:style style:name="T902" style:parent-style-name="Policepardéfaut" style:family="text">
      <style:text-properties style:font-name="GPAFJ+Aptos" style:font-name-asian="GPAFJ+Aptos" style:font-name-complex="GPAFJ+Aptos" fo:color="#000000" fo:letter-spacing="-0.0013in"/>
    </style:style>
    <style:style style:name="T903" style:parent-style-name="Policepardéfaut" style:family="text">
      <style:text-properties style:font-name="GPAFJ+Aptos" style:font-name-asian="GPAFJ+Aptos" style:font-name-complex="GPAFJ+Aptos" fo:color="#000000" style:text-scale="101%"/>
    </style:style>
    <style:style style:name="T904" style:parent-style-name="Policepardéfaut" style:family="text">
      <style:text-properties style:font-name="GPAFJ+Aptos" style:font-name-asian="GPAFJ+Aptos" style:font-name-complex="GPAFJ+Aptos" fo:color="#000000" fo:letter-spacing="-0.0006in"/>
    </style:style>
    <style:style style:name="T905" style:parent-style-name="Policepardéfaut" style:family="text">
      <style:text-properties style:font-name="GPAFJ+Aptos" style:font-name-asian="GPAFJ+Aptos" style:font-name-complex="GPAFJ+Aptos" fo:color="#000000" fo:letter-spacing="0.0006in" style:text-scale="101%"/>
    </style:style>
    <style:style style:name="T906" style:parent-style-name="Policepardéfaut" style:family="text">
      <style:text-properties style:font-name="GPAFJ+Aptos" style:font-name-asian="GPAFJ+Aptos" style:font-name-complex="GPAFJ+Aptos" fo:color="#000000"/>
    </style:style>
    <style:style style:name="T907" style:parent-style-name="Policepardéfaut" style:family="text">
      <style:text-properties style:font-name="GPAFJ+Aptos" style:font-name-asian="GPAFJ+Aptos" style:font-name-complex="GPAFJ+Aptos" fo:color="#000000" fo:letter-spacing="-0.0006in"/>
    </style:style>
    <style:style style:name="T908" style:parent-style-name="Policepardéfaut" style:family="text">
      <style:text-properties style:font-name="GPAFJ+Aptos" style:font-name-asian="GPAFJ+Aptos" style:font-name-complex="GPAFJ+Aptos" fo:color="#000000"/>
    </style:style>
    <style:style style:name="T909" style:parent-style-name="Policepardéfaut" style:family="text">
      <style:text-properties style:font-name="GPAFJ+Aptos" style:font-name-asian="GPAFJ+Aptos" style:font-name-complex="GPAFJ+Aptos" fo:color="#000000" style:text-scale="101%"/>
    </style:style>
    <style:style style:name="T910" style:parent-style-name="Policepardéfaut" style:family="text">
      <style:text-properties style:font-name="GPAFJ+Aptos" style:font-name-asian="GPAFJ+Aptos" style:font-name-complex="GPAFJ+Aptos" fo:color="#000000"/>
    </style:style>
    <style:style style:name="T911" style:parent-style-name="Policepardéfaut" style:family="text">
      <style:text-properties style:font-name="GPAFJ+Aptos" style:font-name-asian="GPAFJ+Aptos" style:font-name-complex="GPAFJ+Aptos" fo:color="#000000" style:text-scale="101%"/>
    </style:style>
    <style:style style:name="T912" style:parent-style-name="Policepardéfaut" style:family="text">
      <style:text-properties style:font-name="GPAFJ+Aptos" style:font-name-asian="GPAFJ+Aptos" style:font-name-complex="GPAFJ+Aptos" fo:color="#000000" fo:letter-spacing="-0.0013in"/>
    </style:style>
    <style:style style:name="T913" style:parent-style-name="Policepardéfaut" style:family="text">
      <style:text-properties style:font-name="GPAFJ+Aptos" style:font-name-asian="GPAFJ+Aptos" style:font-name-complex="GPAFJ+Aptos" fo:color="#000000" style:text-scale="101%"/>
    </style:style>
    <style:style style:name="T914" style:parent-style-name="Policepardéfaut" style:family="text">
      <style:text-properties style:font-name="GPAFJ+Aptos" style:font-name-asian="GPAFJ+Aptos" style:font-name-complex="GPAFJ+Aptos" fo:color="#000000"/>
    </style:style>
    <style:style style:name="T915" style:parent-style-name="Policepardéfaut" style:family="text">
      <style:text-properties style:font-name="GPAFJ+Aptos" style:font-name-asian="GPAFJ+Aptos" style:font-name-complex="GPAFJ+Aptos" fo:color="#000000" fo:letter-spacing="-0.0006in"/>
    </style:style>
    <style:style style:name="T916" style:parent-style-name="Policepardéfaut" style:family="text">
      <style:text-properties style:font-name="GPAFJ+Aptos" style:font-name-asian="GPAFJ+Aptos" style:font-name-complex="GPAFJ+Aptos" fo:color="#000000" style:text-scale="101%"/>
    </style:style>
    <style:style style:name="T917" style:parent-style-name="Policepardéfaut" style:family="text">
      <style:text-properties style:font-name="GPAFJ+Aptos" style:font-name-asian="GPAFJ+Aptos" style:font-name-complex="GPAFJ+Aptos" fo:color="#000000" fo:letter-spacing="-0.0013in"/>
    </style:style>
    <style:style style:name="T918" style:parent-style-name="Policepardéfaut" style:family="text">
      <style:text-properties style:font-name="GPAFJ+Aptos" style:font-name-asian="GPAFJ+Aptos" style:font-name-complex="GPAFJ+Aptos" fo:color="#000000" style:text-scale="101%"/>
    </style:style>
    <style:style style:name="T919" style:parent-style-name="Policepardéfaut" style:family="text">
      <style:text-properties style:font-name="GPAFJ+Aptos" style:font-name-asian="GPAFJ+Aptos" style:font-name-complex="GPAFJ+Aptos" fo:color="#000000"/>
    </style:style>
    <style:style style:name="T920" style:parent-style-name="Policepardéfaut" style:family="text">
      <style:text-properties style:font-name="GPAFJ+Aptos" style:font-name-asian="GPAFJ+Aptos" style:font-name-complex="GPAFJ+Aptos" fo:color="#000000" style:text-scale="101%"/>
    </style:style>
    <style:style style:name="T921" style:parent-style-name="Policepardéfaut" style:family="text">
      <style:text-properties style:font-name="GPAFJ+Aptos" style:font-name-asian="GPAFJ+Aptos" style:font-name-complex="GPAFJ+Aptos" fo:color="#000000" fo:letter-spacing="-0.0006in"/>
    </style:style>
    <style:style style:name="T922" style:parent-style-name="Policepardéfaut" style:family="text">
      <style:text-properties style:font-name="GPAFJ+Aptos" style:font-name-asian="GPAFJ+Aptos" style:font-name-complex="GPAFJ+Aptos" fo:color="#000000" style:text-scale="101%"/>
    </style:style>
    <style:style style:name="T923" style:parent-style-name="Policepardéfaut" style:family="text">
      <style:text-properties style:font-name="GPAFJ+Aptos" style:font-name-asian="GPAFJ+Aptos" style:font-name-complex="GPAFJ+Aptos" fo:color="#000000" fo:letter-spacing="-0.0013in" style:text-scale="101%"/>
    </style:style>
    <style:style style:name="T924" style:parent-style-name="Policepardéfaut" style:family="text">
      <style:text-properties style:font-name="GPAFJ+Aptos" style:font-name-asian="GPAFJ+Aptos" style:font-name-complex="GPAFJ+Aptos" fo:color="#000000" style:text-scale="101%"/>
    </style:style>
    <style:style style:name="T925" style:parent-style-name="Policepardéfaut" style:family="text">
      <style:text-properties style:font-name="GPAFJ+Aptos" style:font-name-asian="GPAFJ+Aptos" style:font-name-complex="GPAFJ+Aptos" fo:color="#000000"/>
    </style:style>
    <style:style style:name="T926" style:parent-style-name="Policepardéfaut" style:family="text">
      <style:text-properties style:font-name="GPAFJ+Aptos" style:font-name-asian="GPAFJ+Aptos" style:font-name-complex="GPAFJ+Aptos" fo:color="#000000" fo:letter-spacing="-0.0013in" style:text-scale="101%"/>
    </style:style>
    <style:style style:name="T927" style:parent-style-name="Policepardéfaut" style:family="text">
      <style:text-properties style:font-name="GPAFJ+Aptos" style:font-name-asian="GPAFJ+Aptos" style:font-name-complex="GPAFJ+Aptos" fo:color="#000000"/>
    </style:style>
    <style:style style:name="T928" style:parent-style-name="Policepardéfaut" style:family="text">
      <style:text-properties style:font-name="GPAFJ+Aptos" style:font-name-asian="GPAFJ+Aptos" style:font-name-complex="GPAFJ+Aptos" fo:color="#000000" fo:letter-spacing="-0.0006in" style:text-scale="101%"/>
    </style:style>
    <style:style style:name="T929" style:parent-style-name="Policepardéfaut" style:family="text">
      <style:text-properties style:font-name="GPAFJ+Aptos" style:font-name-asian="GPAFJ+Aptos" style:font-name-complex="GPAFJ+Aptos" fo:color="#000000" style:text-scale="101%"/>
    </style:style>
    <style:style style:name="T930" style:parent-style-name="Policepardéfaut" style:family="text">
      <style:text-properties style:font-name="GPAFJ+Aptos" style:font-name-asian="GPAFJ+Aptos" style:font-name-complex="GPAFJ+Aptos" fo:color="#000000" fo:letter-spacing="-0.0006in"/>
    </style:style>
    <style:style style:name="T931" style:parent-style-name="Policepardéfaut" style:family="text">
      <style:text-properties style:font-name="GPAFJ+Aptos" style:font-name-asian="GPAFJ+Aptos" style:font-name-complex="GPAFJ+Aptos" fo:color="#000000"/>
    </style:style>
    <style:style style:name="T932" style:parent-style-name="Policepardéfaut" style:family="text">
      <style:text-properties style:font-name="GPAFJ+Aptos" style:font-name-asian="GPAFJ+Aptos" style:font-name-complex="GPAFJ+Aptos" fo:color="#000000" fo:letter-spacing="-0.0006in"/>
    </style:style>
    <style:style style:name="T933" style:parent-style-name="Policepardéfaut" style:family="text">
      <style:text-properties style:font-name="GPAFJ+Aptos" style:font-name-asian="GPAFJ+Aptos" style:font-name-complex="GPAFJ+Aptos" fo:color="#000000"/>
    </style:style>
    <style:style style:name="T934" style:parent-style-name="Policepardéfaut" style:family="text">
      <style:text-properties style:font-name="GPAFJ+Aptos" style:font-name-asian="GPAFJ+Aptos" style:font-name-complex="GPAFJ+Aptos" fo:color="#000000" fo:letter-spacing="0.0006in"/>
    </style:style>
    <style:style style:name="T935" style:parent-style-name="Policepardéfaut" style:family="text">
      <style:text-properties style:font-name="GPAFJ+Aptos" style:font-name-asian="GPAFJ+Aptos" style:font-name-complex="GPAFJ+Aptos" fo:color="#000000" fo:letter-spacing="0.0006in" style:text-scale="101%"/>
    </style:style>
    <style:style style:name="T936" style:parent-style-name="Policepardéfaut" style:family="text">
      <style:text-properties style:font-name="GPAFJ+Aptos" style:font-name-asian="GPAFJ+Aptos" style:font-name-complex="GPAFJ+Aptos" fo:color="#000000"/>
    </style:style>
    <style:style style:name="T937" style:parent-style-name="Policepardéfaut" style:family="text">
      <style:text-properties style:font-name="GPAFJ+Aptos" style:font-name-asian="GPAFJ+Aptos" style:font-name-complex="GPAFJ+Aptos" fo:color="#000000" fo:letter-spacing="-0.0006in" style:text-scale="101%"/>
    </style:style>
    <style:style style:name="T938" style:parent-style-name="Policepardéfaut" style:family="text">
      <style:text-properties style:font-name="GPAFJ+Aptos" style:font-name-asian="GPAFJ+Aptos" style:font-name-complex="GPAFJ+Aptos" fo:color="#000000" fo:letter-spacing="-0.0013in"/>
    </style:style>
    <style:style style:name="T939" style:parent-style-name="Policepardéfaut" style:family="text">
      <style:text-properties style:font-name="GPAFJ+Aptos" style:font-name-asian="GPAFJ+Aptos" style:font-name-complex="GPAFJ+Aptos" fo:color="#000000"/>
    </style:style>
    <style:style style:name="T940" style:parent-style-name="Policepardéfaut" style:family="text">
      <style:text-properties style:font-name="GPAFJ+Aptos" style:font-name-asian="GPAFJ+Aptos" style:font-name-complex="GPAFJ+Aptos" fo:color="#000000" style:text-scale="101%"/>
    </style:style>
    <style:style style:name="T941" style:parent-style-name="Policepardéfaut" style:family="text">
      <style:text-properties style:font-name="GPAFJ+Aptos" style:font-name-asian="GPAFJ+Aptos" style:font-name-complex="GPAFJ+Aptos" fo:color="#000000" fo:letter-spacing="-0.0006in"/>
    </style:style>
    <style:style style:name="T942" style:parent-style-name="Policepardéfaut" style:family="text">
      <style:text-properties style:font-name="GPAFJ+Aptos" style:font-name-asian="GPAFJ+Aptos" style:font-name-complex="GPAFJ+Aptos" fo:color="#000000" style:text-scale="101%"/>
    </style:style>
    <style:style style:name="T943" style:parent-style-name="Policepardéfaut" style:family="text">
      <style:text-properties style:font-name="GPAFJ+Aptos" style:font-name-asian="GPAFJ+Aptos" style:font-name-complex="GPAFJ+Aptos" fo:color="#000000"/>
    </style:style>
    <style:style style:name="T944" style:parent-style-name="Policepardéfaut" style:family="text">
      <style:text-properties style:font-name="GPAFJ+Aptos" style:font-name-asian="GPAFJ+Aptos" style:font-name-complex="GPAFJ+Aptos" fo:color="#000000" style:text-scale="101%"/>
    </style:style>
    <style:style style:name="T945" style:parent-style-name="Policepardéfaut" style:family="text">
      <style:text-properties style:font-name="GPAFJ+Aptos" style:font-name-asian="GPAFJ+Aptos" style:font-name-complex="GPAFJ+Aptos" fo:color="#000000"/>
    </style:style>
    <style:style style:name="T946" style:parent-style-name="Policepardéfaut" style:family="text">
      <style:text-properties style:font-name="GPAFJ+Aptos" style:font-name-asian="GPAFJ+Aptos" style:font-name-complex="GPAFJ+Aptos" fo:color="#000000" style:text-scale="101%"/>
    </style:style>
    <style:style style:name="T947" style:parent-style-name="Policepardéfaut" style:family="text">
      <style:text-properties style:font-name="GPAFJ+Aptos" style:font-name-asian="GPAFJ+Aptos" style:font-name-complex="GPAFJ+Aptos" fo:color="#000000"/>
    </style:style>
    <style:style style:name="T948" style:parent-style-name="Policepardéfaut" style:family="text">
      <style:text-properties style:font-name="GPAFJ+Aptos" style:font-name-asian="GPAFJ+Aptos" style:font-name-complex="GPAFJ+Aptos" fo:color="#000000" fo:letter-spacing="-0.0006in"/>
    </style:style>
    <style:style style:name="T949" style:parent-style-name="Policepardéfaut" style:family="text">
      <style:text-properties style:font-name="GPAFJ+Aptos" style:font-name-asian="GPAFJ+Aptos" style:font-name-complex="GPAFJ+Aptos" fo:color="#000000"/>
    </style:style>
    <style:style style:name="T950" style:parent-style-name="Policepardéfaut" style:family="text">
      <style:text-properties style:font-name="GPAFJ+Aptos" style:font-name-asian="GPAFJ+Aptos" style:font-name-complex="GPAFJ+Aptos" fo:color="#000000" style:text-scale="101%"/>
    </style:style>
    <style:style style:name="T951" style:parent-style-name="Policepardéfaut" style:family="text">
      <style:text-properties style:font-name="GPAFJ+Aptos" style:font-name-asian="GPAFJ+Aptos" style:font-name-complex="GPAFJ+Aptos" fo:color="#000000"/>
    </style:style>
    <style:style style:name="T952" style:parent-style-name="Policepardéfaut" style:family="text">
      <style:text-properties style:font-name="GPAFJ+Aptos" style:font-name-asian="GPAFJ+Aptos" style:font-name-complex="GPAFJ+Aptos" fo:color="#000000" style:text-scale="101%"/>
    </style:style>
    <style:style style:name="T953" style:parent-style-name="Policepardéfaut" style:family="text">
      <style:text-properties style:font-name="GPAFJ+Aptos" style:font-name-asian="GPAFJ+Aptos" style:font-name-complex="GPAFJ+Aptos" fo:color="#000000" fo:letter-spacing="-0.0013in"/>
    </style:style>
    <style:style style:name="T954" style:parent-style-name="Policepardéfaut" style:family="text">
      <style:text-properties style:font-name="GPAFJ+Aptos" style:font-name-asian="GPAFJ+Aptos" style:font-name-complex="GPAFJ+Aptos" fo:color="#000000" style:text-scale="101%"/>
    </style:style>
    <style:style style:name="T955" style:parent-style-name="Policepardéfaut" style:family="text">
      <style:text-properties style:font-name="GPAFJ+Aptos" style:font-name-asian="GPAFJ+Aptos" style:font-name-complex="GPAFJ+Aptos" fo:color="#000000" fo:letter-spacing="-0.0013in" style:text-scale="101%"/>
    </style:style>
    <style:style style:name="T956" style:parent-style-name="Policepardéfaut" style:family="text">
      <style:text-properties style:font-name="GPAFJ+Aptos" style:font-name-asian="GPAFJ+Aptos" style:font-name-complex="GPAFJ+Aptos" fo:color="#000000"/>
    </style:style>
    <style:style style:name="T957" style:parent-style-name="Policepardéfaut" style:family="text">
      <style:text-properties style:font-name="GPAFJ+Aptos" style:font-name-asian="GPAFJ+Aptos" style:font-name-complex="GPAFJ+Aptos" fo:color="#000000" fo:letter-spacing="0.0006in"/>
    </style:style>
    <style:style style:name="T958" style:parent-style-name="Policepardéfaut" style:family="text">
      <style:text-properties style:font-name="GPAFJ+Aptos" style:font-name-asian="GPAFJ+Aptos" style:font-name-complex="GPAFJ+Aptos" fo:color="#000000" fo:letter-spacing="-0.0006in" style:text-scale="101%"/>
    </style:style>
    <style:style style:name="T959" style:parent-style-name="Policepardéfaut" style:family="text">
      <style:text-properties style:font-name="GPAFJ+Aptos" style:font-name-asian="GPAFJ+Aptos" style:font-name-complex="GPAFJ+Aptos" fo:color="#000000"/>
    </style:style>
    <style:style style:name="T960" style:parent-style-name="Policepardéfaut" style:family="text">
      <style:text-properties style:font-name="GPAFJ+Aptos" style:font-name-asian="GPAFJ+Aptos" style:font-name-complex="GPAFJ+Aptos" fo:color="#000000" fo:letter-spacing="-0.0006in"/>
    </style:style>
    <style:style style:name="T961" style:parent-style-name="Policepardéfaut" style:family="text">
      <style:text-properties style:font-name="GPAFJ+Aptos" style:font-name-asian="GPAFJ+Aptos" style:font-name-complex="GPAFJ+Aptos" fo:color="#000000"/>
    </style:style>
    <style:style style:name="T962" style:parent-style-name="Policepardéfaut" style:family="text">
      <style:text-properties style:font-name="GPAFJ+Aptos" style:font-name-asian="GPAFJ+Aptos" style:font-name-complex="GPAFJ+Aptos" fo:color="#000000" fo:letter-spacing="-0.0006in" style:text-scale="101%"/>
    </style:style>
    <style:style style:name="T963" style:parent-style-name="Policepardéfaut" style:family="text">
      <style:text-properties style:font-name="GPAFJ+Aptos" style:font-name-asian="GPAFJ+Aptos" style:font-name-complex="GPAFJ+Aptos" fo:color="#000000"/>
    </style:style>
    <style:style style:name="T964" style:parent-style-name="Policepardéfaut" style:family="text">
      <style:text-properties style:font-name="GPAFJ+Aptos" style:font-name-asian="GPAFJ+Aptos" style:font-name-complex="GPAFJ+Aptos" fo:color="#000000" fo:letter-spacing="-0.0006in"/>
    </style:style>
    <style:style style:name="T965" style:parent-style-name="Policepardéfaut" style:family="text">
      <style:text-properties style:font-name="GPAFJ+Aptos" style:font-name-asian="GPAFJ+Aptos" style:font-name-complex="GPAFJ+Aptos" fo:color="#000000"/>
    </style:style>
    <style:style style:name="T966" style:parent-style-name="Policepardéfaut" style:family="text">
      <style:text-properties style:font-name="GPAFJ+Aptos" style:font-name-asian="GPAFJ+Aptos" style:font-name-complex="GPAFJ+Aptos" fo:color="#000000" style:text-scale="101%"/>
    </style:style>
    <style:style style:name="T967" style:parent-style-name="Policepardéfaut" style:family="text">
      <style:text-properties style:font-name="GPAFJ+Aptos" style:font-name-asian="GPAFJ+Aptos" style:font-name-complex="GPAFJ+Aptos" fo:color="#000000"/>
    </style:style>
    <style:style style:name="T968" style:parent-style-name="Policepardéfaut" style:family="text">
      <style:text-properties style:font-name="GPAFJ+Aptos" style:font-name-asian="GPAFJ+Aptos" style:font-name-complex="GPAFJ+Aptos" fo:color="#000000" style:text-scale="101%"/>
    </style:style>
    <style:style style:name="T969" style:parent-style-name="Policepardéfaut" style:family="text">
      <style:text-properties style:font-name="GPAFJ+Aptos" style:font-name-asian="GPAFJ+Aptos" style:font-name-complex="GPAFJ+Aptos" fo:color="#000000"/>
    </style:style>
    <style:style style:name="T970" style:parent-style-name="Policepardéfaut" style:family="text">
      <style:text-properties style:font-name="GPAFJ+Aptos" style:font-name-asian="GPAFJ+Aptos" style:font-name-complex="GPAFJ+Aptos" fo:color="#000000" fo:letter-spacing="-0.0013in" style:text-scale="101%"/>
    </style:style>
    <style:style style:name="T971" style:parent-style-name="Policepardéfaut" style:family="text">
      <style:text-properties style:font-name="GPAFJ+Aptos" style:font-name-asian="GPAFJ+Aptos" style:font-name-complex="GPAFJ+Aptos" fo:color="#000000" style:text-scale="101%"/>
    </style:style>
    <style:style style:name="T972" style:parent-style-name="Policepardéfaut" style:family="text">
      <style:text-properties style:font-name="GPAFJ+Aptos" style:font-name-asian="GPAFJ+Aptos" style:font-name-complex="GPAFJ+Aptos" fo:color="#000000" fo:letter-spacing="-0.0006in"/>
    </style:style>
    <style:style style:name="T973" style:parent-style-name="Policepardéfaut" style:family="text">
      <style:text-properties style:font-name="GPAFJ+Aptos" style:font-name-asian="GPAFJ+Aptos" style:font-name-complex="GPAFJ+Aptos" fo:color="#000000"/>
    </style:style>
    <style:style style:name="T974" style:parent-style-name="Policepardéfaut" style:family="text">
      <style:text-properties style:font-name="GPAFJ+Aptos" style:font-name-asian="GPAFJ+Aptos" style:font-name-complex="GPAFJ+Aptos" fo:color="#000000" style:text-scale="101%"/>
    </style:style>
    <style:style style:name="T975" style:parent-style-name="Policepardéfaut" style:family="text">
      <style:text-properties style:font-name="GPAFJ+Aptos" style:font-name-asian="GPAFJ+Aptos" style:font-name-complex="GPAFJ+Aptos" fo:color="#000000" fo:letter-spacing="-0.0006in"/>
    </style:style>
    <style:style style:name="T976" style:parent-style-name="Policepardéfaut" style:family="text">
      <style:text-properties style:font-name="GPAFJ+Aptos" style:font-name-asian="GPAFJ+Aptos" style:font-name-complex="GPAFJ+Aptos" fo:color="#000000" style:text-scale="101%"/>
    </style:style>
    <style:style style:name="T977" style:parent-style-name="Policepardéfaut" style:family="text">
      <style:text-properties style:font-name="GPAFJ+Aptos" style:font-name-asian="GPAFJ+Aptos" style:font-name-complex="GPAFJ+Aptos" fo:color="#000000" fo:letter-spacing="-0.0006in"/>
    </style:style>
    <style:style style:name="T978" style:parent-style-name="Policepardéfaut" style:family="text">
      <style:text-properties style:font-name="GPAFJ+Aptos" style:font-name-asian="GPAFJ+Aptos" style:font-name-complex="GPAFJ+Aptos" fo:color="#000000" fo:letter-spacing="-0.0006in" style:text-scale="101%"/>
    </style:style>
    <style:style style:name="T979" style:parent-style-name="Policepardéfaut" style:family="text">
      <style:text-properties style:font-name="GPAFJ+Aptos" style:font-name-asian="GPAFJ+Aptos" style:font-name-complex="GPAFJ+Aptos" fo:color="#000000" fo:letter-spacing="0.0006in"/>
    </style:style>
    <style:style style:name="T980" style:parent-style-name="Policepardéfaut" style:family="text">
      <style:text-properties style:font-name="GPAFJ+Aptos" style:font-name-asian="GPAFJ+Aptos" style:font-name-complex="GPAFJ+Aptos" fo:color="#000000" fo:letter-spacing="-0.0006in" style:text-scale="101%"/>
    </style:style>
    <style:style style:name="T981" style:parent-style-name="Policepardéfaut" style:family="text">
      <style:text-properties style:font-name="GPAFJ+Aptos" style:font-name-asian="GPAFJ+Aptos" style:font-name-complex="GPAFJ+Aptos" fo:color="#000000" style:text-scale="101%"/>
    </style:style>
    <style:style style:name="T982" style:parent-style-name="Policepardéfaut" style:family="text">
      <style:text-properties style:font-name="GPAFJ+Aptos" style:font-name-asian="GPAFJ+Aptos" style:font-name-complex="GPAFJ+Aptos" fo:color="#000000"/>
    </style:style>
    <style:style style:name="T983" style:parent-style-name="Policepardéfaut" style:family="text">
      <style:text-properties style:font-name="GPAFJ+Aptos" style:font-name-asian="GPAFJ+Aptos" style:font-name-complex="GPAFJ+Aptos" fo:color="#000000" fo:letter-spacing="-0.0013in" style:text-scale="101%"/>
    </style:style>
    <style:style style:name="T984" style:parent-style-name="Policepardéfaut" style:family="text">
      <style:text-properties style:font-name="GPAFJ+Aptos" style:font-name-asian="GPAFJ+Aptos" style:font-name-complex="GPAFJ+Aptos" fo:color="#000000" style:text-scale="101%"/>
    </style:style>
    <style:style style:name="T985" style:parent-style-name="Policepardéfaut" style:family="text">
      <style:text-properties style:font-name="GPAFJ+Aptos" style:font-name-asian="GPAFJ+Aptos" style:font-name-complex="GPAFJ+Aptos" fo:color="#000000"/>
    </style:style>
    <style:style style:name="T986" style:parent-style-name="Policepardéfaut" style:family="text">
      <style:text-properties style:font-name="GPAFJ+Aptos" style:font-name-asian="GPAFJ+Aptos" style:font-name-complex="GPAFJ+Aptos" fo:color="#000000" fo:letter-spacing="-0.0013in" style:text-scale="101%"/>
    </style:style>
    <style:style style:name="T987" style:parent-style-name="Policepardéfaut" style:family="text">
      <style:text-properties style:font-name="GPAFJ+Aptos" style:font-name-asian="GPAFJ+Aptos" style:font-name-complex="GPAFJ+Aptos" fo:color="#000000"/>
    </style:style>
    <style:style style:name="T988" style:parent-style-name="Policepardéfaut" style:family="text">
      <style:text-properties style:font-name="GPAFJ+Aptos" style:font-name-asian="GPAFJ+Aptos" style:font-name-complex="GPAFJ+Aptos" fo:color="#000000" fo:letter-spacing="0.0006in" style:text-scale="101%"/>
    </style:style>
    <style:style style:name="T989" style:parent-style-name="Policepardéfaut" style:family="text">
      <style:text-properties style:font-name="GPAFJ+Aptos" style:font-name-asian="GPAFJ+Aptos" style:font-name-complex="GPAFJ+Aptos" fo:color="#000000" style:text-scale="101%"/>
    </style:style>
    <style:style style:name="T990" style:parent-style-name="Policepardéfaut" style:family="text">
      <style:text-properties style:font-name="GPAFJ+Aptos" style:font-name-asian="GPAFJ+Aptos" style:font-name-complex="GPAFJ+Aptos" fo:color="#000000" fo:letter-spacing="-0.0013in"/>
    </style:style>
    <style:style style:name="T991" style:parent-style-name="Policepardéfaut" style:family="text">
      <style:text-properties style:font-name="GPAFJ+Aptos" style:font-name-asian="GPAFJ+Aptos" style:font-name-complex="GPAFJ+Aptos" fo:color="#000000" style:text-scale="101%"/>
    </style:style>
    <style:style style:name="T992" style:parent-style-name="Policepardéfaut" style:family="text">
      <style:text-properties style:font-name="GPAFJ+Aptos" style:font-name-asian="GPAFJ+Aptos" style:font-name-complex="GPAFJ+Aptos" fo:color="#000000" fo:letter-spacing="-0.002in"/>
    </style:style>
    <style:style style:name="T993" style:parent-style-name="Policepardéfaut" style:family="text">
      <style:text-properties style:font-name="GPAFJ+Aptos" style:font-name-asian="GPAFJ+Aptos" style:font-name-complex="GPAFJ+Aptos" fo:color="#000000" style:text-scale="101%"/>
    </style:style>
    <style:style style:name="T994" style:parent-style-name="Policepardéfaut" style:family="text">
      <style:text-properties style:font-name="GPAFJ+Aptos" style:font-name-asian="GPAFJ+Aptos" style:font-name-complex="GPAFJ+Aptos" fo:color="#000000" fo:letter-spacing="-0.0006in" style:text-scale="101%"/>
    </style:style>
    <style:style style:name="T995" style:parent-style-name="Policepardéfaut" style:family="text">
      <style:text-properties style:font-name="GPAFJ+Aptos" style:font-name-asian="GPAFJ+Aptos" style:font-name-complex="GPAFJ+Aptos" fo:color="#000000"/>
    </style:style>
    <style:style style:name="T996" style:parent-style-name="Policepardéfaut" style:family="text">
      <style:text-properties style:font-name="GPAFJ+Aptos" style:font-name-asian="GPAFJ+Aptos" style:font-name-complex="GPAFJ+Aptos" fo:color="#000000" style:text-scale="101%"/>
    </style:style>
    <style:style style:name="T997" style:parent-style-name="Policepardéfaut" style:family="text">
      <style:text-properties style:font-name="GPAFJ+Aptos" style:font-name-asian="GPAFJ+Aptos" style:font-name-complex="GPAFJ+Aptos" fo:color="#000000"/>
    </style:style>
    <style:style style:name="T998" style:parent-style-name="Policepardéfaut" style:family="text">
      <style:text-properties style:font-name="GPAFJ+Aptos" style:font-name-asian="GPAFJ+Aptos" style:font-name-complex="GPAFJ+Aptos" fo:color="#000000" style:text-scale="101%"/>
    </style:style>
    <style:style style:name="T999" style:parent-style-name="Policepardéfaut" style:family="text">
      <style:text-properties style:font-name="GPAFJ+Aptos" style:font-name-asian="GPAFJ+Aptos" style:font-name-complex="GPAFJ+Aptos" fo:color="#000000" fo:letter-spacing="-0.0013in"/>
    </style:style>
    <style:style style:name="T1000" style:parent-style-name="Policepardéfaut" style:family="text">
      <style:text-properties style:font-name="GPAFJ+Aptos" style:font-name-asian="GPAFJ+Aptos" style:font-name-complex="GPAFJ+Aptos" fo:color="#000000" style:text-scale="101%"/>
    </style:style>
    <style:style style:name="T1001" style:parent-style-name="Policepardéfaut" style:family="text">
      <style:text-properties style:font-name="GPAFJ+Aptos" style:font-name-asian="GPAFJ+Aptos" style:font-name-complex="GPAFJ+Aptos" fo:color="#000000" fo:letter-spacing="-0.0006in"/>
    </style:style>
    <style:style style:name="T1002" style:parent-style-name="Policepardéfaut" style:family="text">
      <style:text-properties style:font-name="GPAFJ+Aptos" style:font-name-asian="GPAFJ+Aptos" style:font-name-complex="GPAFJ+Aptos" fo:color="#000000"/>
    </style:style>
    <style:style style:name="T1003" style:parent-style-name="Policepardéfaut" style:family="text">
      <style:text-properties style:font-name="GPAFJ+Aptos" style:font-name-asian="GPAFJ+Aptos" style:font-name-complex="GPAFJ+Aptos" fo:color="#000000" fo:letter-spacing="-0.0006in"/>
    </style:style>
    <style:style style:name="T1004" style:parent-style-name="Policepardéfaut" style:family="text">
      <style:text-properties style:font-name="GPAFJ+Aptos" style:font-name-asian="GPAFJ+Aptos" style:font-name-complex="GPAFJ+Aptos" fo:color="#000000" style:text-scale="101%"/>
    </style:style>
    <style:style style:name="T1005" style:parent-style-name="Policepardéfaut" style:family="text">
      <style:text-properties style:font-name="GPAFJ+Aptos" style:font-name-asian="GPAFJ+Aptos" style:font-name-complex="GPAFJ+Aptos" fo:color="#000000" fo:letter-spacing="-0.0006in"/>
    </style:style>
    <style:style style:name="T1006" style:parent-style-name="Policepardéfaut" style:family="text">
      <style:text-properties style:font-name="GPAFJ+Aptos" style:font-name-asian="GPAFJ+Aptos" style:font-name-complex="GPAFJ+Aptos" fo:color="#000000"/>
    </style:style>
    <style:style style:name="T1007" style:parent-style-name="Policepardéfaut" style:family="text">
      <style:text-properties style:font-name="GPAFJ+Aptos" style:font-name-asian="GPAFJ+Aptos" style:font-name-complex="GPAFJ+Aptos" fo:color="#000000" style:text-scale="101%"/>
    </style:style>
    <style:style style:name="T1008" style:parent-style-name="Policepardéfaut" style:family="text">
      <style:text-properties style:font-name="GPAFJ+Aptos" style:font-name-asian="GPAFJ+Aptos" style:font-name-complex="GPAFJ+Aptos" fo:color="#000000" fo:letter-spacing="-0.0006in" style:text-scale="101%"/>
    </style:style>
    <style:style style:name="T1009" style:parent-style-name="Policepardéfaut" style:family="text">
      <style:text-properties style:font-name="GPAFJ+Aptos" style:font-name-asian="GPAFJ+Aptos" style:font-name-complex="GPAFJ+Aptos" fo:color="#000000" style:text-scale="101%"/>
    </style:style>
    <style:style style:name="T1010" style:parent-style-name="Policepardéfaut" style:family="text">
      <style:text-properties style:font-name="GPAFJ+Aptos" style:font-name-asian="GPAFJ+Aptos" style:font-name-complex="GPAFJ+Aptos" fo:color="#000000" fo:letter-spacing="-0.0013in"/>
    </style:style>
    <style:style style:name="T1011" style:parent-style-name="Policepardéfaut" style:family="text">
      <style:text-properties style:font-name="GPAFJ+Aptos" style:font-name-asian="GPAFJ+Aptos" style:font-name-complex="GPAFJ+Aptos" fo:color="#000000" style:text-scale="101%"/>
    </style:style>
    <style:style style:name="T1012" style:parent-style-name="Policepardéfaut" style:family="text">
      <style:text-properties style:font-name="GPAFJ+Aptos" style:font-name-asian="GPAFJ+Aptos" style:font-name-complex="GPAFJ+Aptos" fo:color="#000000"/>
    </style:style>
    <style:style style:name="T1013" style:parent-style-name="Policepardéfaut" style:family="text">
      <style:text-properties style:font-name="GPAFJ+Aptos" style:font-name-asian="GPAFJ+Aptos" style:font-name-complex="GPAFJ+Aptos" fo:color="#000000" fo:letter-spacing="-0.0013in"/>
    </style:style>
    <style:style style:name="T1014" style:parent-style-name="Policepardéfaut" style:family="text">
      <style:text-properties style:font-name="GPAFJ+Aptos" style:font-name-asian="GPAFJ+Aptos" style:font-name-complex="GPAFJ+Aptos" fo:color="#000000"/>
    </style:style>
    <style:style style:name="T1015" style:parent-style-name="Policepardéfaut" style:family="text">
      <style:text-properties style:font-name="GPAFJ+Aptos" style:font-name-asian="GPAFJ+Aptos" style:font-name-complex="GPAFJ+Aptos" fo:color="#000000" style:text-scale="101%"/>
    </style:style>
    <style:style style:name="T1016" style:parent-style-name="Policepardéfaut" style:family="text">
      <style:text-properties style:font-name="GPAFJ+Aptos" style:font-name-asian="GPAFJ+Aptos" style:font-name-complex="GPAFJ+Aptos" fo:color="#000000"/>
    </style:style>
    <style:style style:name="T1017" style:parent-style-name="Policepardéfaut" style:family="text">
      <style:text-properties style:font-name="GPAFJ+Aptos" style:font-name-asian="GPAFJ+Aptos" style:font-name-complex="GPAFJ+Aptos" fo:color="#000000" fo:letter-spacing="-0.0006in"/>
    </style:style>
    <style:style style:name="T1018" style:parent-style-name="Policepardéfaut" style:family="text">
      <style:text-properties style:font-name="GPAFJ+Aptos" style:font-name-asian="GPAFJ+Aptos" style:font-name-complex="GPAFJ+Aptos" fo:color="#000000"/>
    </style:style>
    <style:style style:name="T1019" style:parent-style-name="Policepardéfaut" style:family="text">
      <style:text-properties style:font-name="GPAFJ+Aptos" style:font-name-asian="GPAFJ+Aptos" style:font-name-complex="GPAFJ+Aptos" fo:color="#000000" style:text-scale="101%"/>
    </style:style>
    <style:style style:name="T1020" style:parent-style-name="Policepardéfaut" style:family="text">
      <style:text-properties style:font-name="GPAFJ+Aptos" style:font-name-asian="GPAFJ+Aptos" style:font-name-complex="GPAFJ+Aptos" fo:color="#000000"/>
    </style:style>
    <style:style style:name="T1021" style:parent-style-name="Policepardéfaut" style:family="text">
      <style:text-properties style:font-name="GPAFJ+Aptos" style:font-name-asian="GPAFJ+Aptos" style:font-name-complex="GPAFJ+Aptos" fo:color="#000000" style:text-scale="101%"/>
    </style:style>
    <style:style style:name="T1022" style:parent-style-name="Policepardéfaut" style:family="text">
      <style:text-properties style:font-name="GPAFJ+Aptos" style:font-name-asian="GPAFJ+Aptos" style:font-name-complex="GPAFJ+Aptos" fo:color="#000000"/>
    </style:style>
    <style:style style:name="T1023" style:parent-style-name="Policepardéfaut" style:family="text">
      <style:text-properties style:font-name="GPAFJ+Aptos" style:font-name-asian="GPAFJ+Aptos" style:font-name-complex="GPAFJ+Aptos" fo:color="#000000" style:text-scale="101%"/>
    </style:style>
    <style:style style:name="T1024" style:parent-style-name="Policepardéfaut" style:family="text">
      <style:text-properties style:font-name="GPAFJ+Aptos" style:font-name-asian="GPAFJ+Aptos" style:font-name-complex="GPAFJ+Aptos" fo:color="#000000"/>
    </style:style>
    <style:style style:name="T1025" style:parent-style-name="Policepardéfaut" style:family="text">
      <style:text-properties style:font-name="GPAFJ+Aptos" style:font-name-asian="GPAFJ+Aptos" style:font-name-complex="GPAFJ+Aptos" fo:color="#000000" style:text-scale="101%"/>
    </style:style>
    <style:style style:name="T1026" style:parent-style-name="Policepardéfaut" style:family="text">
      <style:text-properties style:font-name="GPAFJ+Aptos" style:font-name-asian="GPAFJ+Aptos" style:font-name-complex="GPAFJ+Aptos" fo:color="#000000"/>
    </style:style>
    <style:style style:name="T1027" style:parent-style-name="Policepardéfaut" style:family="text">
      <style:text-properties style:font-name="GPAFJ+Aptos" style:font-name-asian="GPAFJ+Aptos" style:font-name-complex="GPAFJ+Aptos" fo:color="#000000" fo:letter-spacing="-0.0006in"/>
    </style:style>
    <style:style style:name="T1028" style:parent-style-name="Policepardéfaut" style:family="text">
      <style:text-properties style:font-name="GPAFJ+Aptos" style:font-name-asian="GPAFJ+Aptos" style:font-name-complex="GPAFJ+Aptos" fo:color="#000000" style:text-scale="101%"/>
    </style:style>
    <style:style style:name="T1029" style:parent-style-name="Policepardéfaut" style:family="text">
      <style:text-properties style:font-name="GPAFJ+Aptos" style:font-name-asian="GPAFJ+Aptos" style:font-name-complex="GPAFJ+Aptos" fo:color="#000000"/>
    </style:style>
    <style:style style:name="T1030" style:parent-style-name="Policepardéfaut" style:family="text">
      <style:text-properties style:font-name="GPAFJ+Aptos" style:font-name-asian="GPAFJ+Aptos" style:font-name-complex="GPAFJ+Aptos" fo:color="#000000" fo:letter-spacing="-0.0006in" style:text-scale="101%"/>
    </style:style>
    <style:style style:name="T1031" style:parent-style-name="Policepardéfaut" style:family="text">
      <style:text-properties style:font-name="GPAFJ+Aptos" style:font-name-asian="GPAFJ+Aptos" style:font-name-complex="GPAFJ+Aptos" fo:color="#000000"/>
    </style:style>
    <style:style style:name="T1032" style:parent-style-name="Policepardéfaut" style:family="text">
      <style:text-properties style:font-name="GPAFJ+Aptos" style:font-name-asian="GPAFJ+Aptos" style:font-name-complex="GPAFJ+Aptos" fo:color="#000000" style:text-scale="101%"/>
    </style:style>
    <style:style style:name="T1033" style:parent-style-name="Policepardéfaut" style:family="text">
      <style:text-properties style:font-name="GPAFJ+Aptos" style:font-name-asian="GPAFJ+Aptos" style:font-name-complex="GPAFJ+Aptos" fo:color="#000000"/>
    </style:style>
    <style:style style:name="T1034" style:parent-style-name="Policepardéfaut" style:family="text">
      <style:text-properties style:font-name="GPAFJ+Aptos" style:font-name-asian="GPAFJ+Aptos" style:font-name-complex="GPAFJ+Aptos" fo:color="#000000" fo:letter-spacing="-0.0013in" style:text-scale="101%"/>
    </style:style>
    <style:style style:name="T1035" style:parent-style-name="Policepardéfaut" style:family="text">
      <style:text-properties style:font-name="GPAFJ+Aptos" style:font-name-asian="GPAFJ+Aptos" style:font-name-complex="GPAFJ+Aptos" fo:color="#000000" style:text-scale="101%"/>
    </style:style>
    <style:style style:name="T1036" style:parent-style-name="Policepardéfaut" style:family="text">
      <style:text-properties style:font-name="GPAFJ+Aptos" style:font-name-asian="GPAFJ+Aptos" style:font-name-complex="GPAFJ+Aptos" fo:color="#000000"/>
    </style:style>
    <style:style style:name="T1037" style:parent-style-name="Policepardéfaut" style:family="text">
      <style:text-properties style:font-name="GPAFJ+Aptos" style:font-name-asian="GPAFJ+Aptos" style:font-name-complex="GPAFJ+Aptos" fo:color="#000000" style:text-scale="101%"/>
    </style:style>
    <style:style style:name="T1038" style:parent-style-name="Policepardéfaut" style:family="text">
      <style:text-properties style:font-name="GPAFJ+Aptos" style:font-name-asian="GPAFJ+Aptos" style:font-name-complex="GPAFJ+Aptos" fo:color="#000000"/>
    </style:style>
    <style:style style:name="T1039" style:parent-style-name="Policepardéfaut" style:family="text">
      <style:text-properties style:font-name="GPAFJ+Aptos" style:font-name-asian="GPAFJ+Aptos" style:font-name-complex="GPAFJ+Aptos" fo:color="#000000" fo:letter-spacing="-0.0006in" style:text-scale="101%"/>
    </style:style>
    <style:style style:name="T1040" style:parent-style-name="Policepardéfaut" style:family="text">
      <style:text-properties style:font-name="GPAFJ+Aptos" style:font-name-asian="GPAFJ+Aptos" style:font-name-complex="GPAFJ+Aptos" fo:color="#000000"/>
    </style:style>
    <style:style style:name="T1041" style:parent-style-name="Policepardéfaut" style:family="text">
      <style:text-properties style:font-name="GPAFJ+Aptos" style:font-name-asian="GPAFJ+Aptos" style:font-name-complex="GPAFJ+Aptos" fo:color="#000000" style:text-scale="101%"/>
    </style:style>
    <style:style style:name="T1042" style:parent-style-name="Policepardéfaut" style:family="text">
      <style:text-properties style:font-name="GPAFJ+Aptos" style:font-name-asian="GPAFJ+Aptos" style:font-name-complex="GPAFJ+Aptos" fo:color="#000000" fo:letter-spacing="-0.0006in"/>
    </style:style>
    <style:style style:name="T1043" style:parent-style-name="Policepardéfaut" style:family="text">
      <style:text-properties style:font-name="GPAFJ+Aptos" style:font-name-asian="GPAFJ+Aptos" style:font-name-complex="GPAFJ+Aptos" fo:color="#000000" style:text-scale="101%"/>
    </style:style>
    <style:style style:name="T1044" style:parent-style-name="Policepardéfaut" style:family="text">
      <style:text-properties style:font-name="GPAFJ+Aptos" style:font-name-asian="GPAFJ+Aptos" style:font-name-complex="GPAFJ+Aptos" fo:color="#000000"/>
    </style:style>
    <style:style style:name="T1045" style:parent-style-name="Policepardéfaut" style:family="text">
      <style:text-properties style:font-name="GPAFJ+Aptos" style:font-name-asian="GPAFJ+Aptos" style:font-name-complex="GPAFJ+Aptos" fo:color="#000000" fo:letter-spacing="-0.0013in"/>
    </style:style>
    <style:style style:name="T1046" style:parent-style-name="Policepardéfaut" style:family="text">
      <style:text-properties style:font-name="GPAFJ+Aptos" style:font-name-asian="GPAFJ+Aptos" style:font-name-complex="GPAFJ+Aptos" fo:color="#000000" style:text-scale="101%"/>
    </style:style>
    <style:style style:name="T1047" style:parent-style-name="Policepardéfaut" style:family="text">
      <style:text-properties style:font-name="GPAFJ+Aptos" style:font-name-asian="GPAFJ+Aptos" style:font-name-complex="GPAFJ+Aptos" fo:color="#000000"/>
    </style:style>
    <style:style style:name="T1048" style:parent-style-name="Policepardéfaut" style:family="text">
      <style:text-properties style:font-name="GPAFJ+Aptos" style:font-name-asian="GPAFJ+Aptos" style:font-name-complex="GPAFJ+Aptos" fo:color="#000000" fo:letter-spacing="-0.0006in" style:text-scale="101%"/>
    </style:style>
    <style:style style:name="T1049" style:parent-style-name="Policepardéfaut" style:family="text">
      <style:text-properties style:font-name="GPAFJ+Aptos" style:font-name-asian="GPAFJ+Aptos" style:font-name-complex="GPAFJ+Aptos" fo:color="#000000" fo:letter-spacing="-0.0006in"/>
    </style:style>
    <style:style style:name="T1050" style:parent-style-name="Policepardéfaut" style:family="text">
      <style:text-properties style:font-name="GPAFJ+Aptos" style:font-name-asian="GPAFJ+Aptos" style:font-name-complex="GPAFJ+Aptos" fo:color="#000000"/>
    </style:style>
    <style:style style:name="T1051" style:parent-style-name="Policepardéfaut" style:family="text">
      <style:text-properties style:font-name="GPAFJ+Aptos" style:font-name-asian="GPAFJ+Aptos" style:font-name-complex="GPAFJ+Aptos" fo:color="#000000" style:text-scale="101%"/>
    </style:style>
    <style:style style:name="T1052" style:parent-style-name="Policepardéfaut" style:family="text">
      <style:text-properties style:font-name="GPAFJ+Aptos" style:font-name-asian="GPAFJ+Aptos" style:font-name-complex="GPAFJ+Aptos" fo:color="#000000" fo:letter-spacing="-0.0006in"/>
    </style:style>
    <style:style style:name="T1053" style:parent-style-name="Policepardéfaut" style:family="text">
      <style:text-properties style:font-name="GPAFJ+Aptos" style:font-name-asian="GPAFJ+Aptos" style:font-name-complex="GPAFJ+Aptos" fo:color="#000000" style:text-scale="101%"/>
    </style:style>
    <style:style style:name="T1054" style:parent-style-name="Policepardéfaut" style:family="text">
      <style:text-properties style:font-name="GPAFJ+Aptos" style:font-name-asian="GPAFJ+Aptos" style:font-name-complex="GPAFJ+Aptos" fo:color="#000000" fo:letter-spacing="-0.0013in"/>
    </style:style>
    <style:style style:name="T1055" style:parent-style-name="Policepardéfaut" style:family="text">
      <style:text-properties style:font-name="GPAFJ+Aptos" style:font-name-asian="GPAFJ+Aptos" style:font-name-complex="GPAFJ+Aptos" fo:color="#000000"/>
    </style:style>
    <style:style style:name="T1056" style:parent-style-name="Policepardéfaut" style:family="text">
      <style:text-properties style:font-name="GPAFJ+Aptos" style:font-name-asian="GPAFJ+Aptos" style:font-name-complex="GPAFJ+Aptos" fo:color="#000000" style:text-scale="101%"/>
    </style:style>
    <style:style style:name="T1057" style:parent-style-name="Policepardéfaut" style:family="text">
      <style:text-properties style:font-name="GPAFJ+Aptos" style:font-name-asian="GPAFJ+Aptos" style:font-name-complex="GPAFJ+Aptos" fo:color="#000000"/>
    </style:style>
    <style:style style:name="T1058" style:parent-style-name="Policepardéfaut" style:family="text">
      <style:text-properties style:font-name="GPAFJ+Aptos" style:font-name-asian="GPAFJ+Aptos" style:font-name-complex="GPAFJ+Aptos" fo:color="#000000" fo:letter-spacing="-0.0006in" style:text-scale="101%"/>
    </style:style>
    <style:style style:name="T1059" style:parent-style-name="Policepardéfaut" style:family="text">
      <style:text-properties style:font-name="GPAFJ+Aptos" style:font-name-asian="GPAFJ+Aptos" style:font-name-complex="GPAFJ+Aptos" fo:color="#000000" style:text-scale="101%"/>
    </style:style>
    <style:style style:name="T1060" style:parent-style-name="Policepardéfaut" style:family="text">
      <style:text-properties style:font-name="GPAFJ+Aptos" style:font-name-asian="GPAFJ+Aptos" style:font-name-complex="GPAFJ+Aptos" fo:color="#000000"/>
    </style:style>
    <style:style style:name="T1061" style:parent-style-name="Policepardéfaut" style:family="text">
      <style:text-properties style:font-name="GPAFJ+Aptos" style:font-name-asian="GPAFJ+Aptos" style:font-name-complex="GPAFJ+Aptos" fo:color="#000000" fo:letter-spacing="-0.0006in"/>
    </style:style>
    <style:style style:name="T1062" style:parent-style-name="Policepardéfaut" style:family="text">
      <style:text-properties style:font-name="GPAFJ+Aptos" style:font-name-asian="GPAFJ+Aptos" style:font-name-complex="GPAFJ+Aptos" fo:color="#000000" style:text-scale="101%"/>
    </style:style>
    <style:style style:name="T1063" style:parent-style-name="Policepardéfaut" style:family="text">
      <style:text-properties style:font-name="GPAFJ+Aptos" style:font-name-asian="GPAFJ+Aptos" style:font-name-complex="GPAFJ+Aptos" fo:color="#000000"/>
    </style:style>
    <style:style style:name="T1064" style:parent-style-name="Policepardéfaut" style:family="text">
      <style:text-properties style:font-name="GPAFJ+Aptos" style:font-name-asian="GPAFJ+Aptos" style:font-name-complex="GPAFJ+Aptos" fo:color="#000000" fo:letter-spacing="-0.0006in"/>
    </style:style>
    <style:style style:name="T1065" style:parent-style-name="Policepardéfaut" style:family="text">
      <style:text-properties style:font-name="GPAFJ+Aptos" style:font-name-asian="GPAFJ+Aptos" style:font-name-complex="GPAFJ+Aptos" fo:color="#000000" style:text-scale="101%"/>
    </style:style>
    <style:style style:name="T1066" style:parent-style-name="Policepardéfaut" style:family="text">
      <style:text-properties style:font-name="GPAFJ+Aptos" style:font-name-asian="GPAFJ+Aptos" style:font-name-complex="GPAFJ+Aptos" fo:color="#000000" fo:letter-spacing="-0.0006in"/>
    </style:style>
    <style:style style:name="T1067" style:parent-style-name="Policepardéfaut" style:family="text">
      <style:text-properties style:font-name="GPAFJ+Aptos" style:font-name-asian="GPAFJ+Aptos" style:font-name-complex="GPAFJ+Aptos" fo:color="#000000" style:text-scale="101%"/>
    </style:style>
    <style:style style:name="T1068" style:parent-style-name="Policepardéfaut" style:family="text">
      <style:text-properties style:font-name="GPAFJ+Aptos" style:font-name-asian="GPAFJ+Aptos" style:font-name-complex="GPAFJ+Aptos" fo:color="#000000"/>
    </style:style>
    <style:style style:name="T1069" style:parent-style-name="Policepardéfaut" style:family="text">
      <style:text-properties style:font-name="GPAFJ+Aptos" style:font-name-asian="GPAFJ+Aptos" style:font-name-complex="GPAFJ+Aptos" fo:color="#000000" style:text-scale="101%"/>
    </style:style>
    <style:style style:name="T1070" style:parent-style-name="Policepardéfaut" style:family="text">
      <style:text-properties style:font-name="GPAFJ+Aptos" style:font-name-asian="GPAFJ+Aptos" style:font-name-complex="GPAFJ+Aptos" fo:color="#000000"/>
    </style:style>
    <style:style style:name="T1071" style:parent-style-name="Policepardéfaut" style:family="text">
      <style:text-properties style:font-name="GPAFJ+Aptos" style:font-name-asian="GPAFJ+Aptos" style:font-name-complex="GPAFJ+Aptos" fo:color="#000000" fo:letter-spacing="-0.0006in"/>
    </style:style>
    <style:style style:name="T1072" style:parent-style-name="Policepardéfaut" style:family="text">
      <style:text-properties style:font-name="GPAFJ+Aptos" style:font-name-asian="GPAFJ+Aptos" style:font-name-complex="GPAFJ+Aptos" fo:color="#000000" fo:letter-spacing="-0.0006in" style:text-scale="101%"/>
    </style:style>
    <style:style style:name="T1073" style:parent-style-name="Policepardéfaut" style:family="text">
      <style:text-properties style:font-name="GPAFJ+Aptos" style:font-name-asian="GPAFJ+Aptos" style:font-name-complex="GPAFJ+Aptos" fo:color="#000000"/>
    </style:style>
    <style:style style:name="T1074" style:parent-style-name="Policepardéfaut" style:family="text">
      <style:text-properties style:font-name="GPAFJ+Aptos" style:font-name-asian="GPAFJ+Aptos" style:font-name-complex="GPAFJ+Aptos" fo:color="#000000" fo:letter-spacing="-0.0013in" style:text-scale="101%"/>
    </style:style>
    <style:style style:name="T1075" style:parent-style-name="Policepardéfaut" style:family="text">
      <style:text-properties style:font-name="GPAFJ+Aptos" style:font-name-asian="GPAFJ+Aptos" style:font-name-complex="GPAFJ+Aptos" fo:color="#000000" style:text-scale="101%"/>
    </style:style>
    <style:style style:name="T1076" style:parent-style-name="Policepardéfaut" style:family="text">
      <style:text-properties style:font-name="GPAFJ+Aptos" style:font-name-asian="GPAFJ+Aptos" style:font-name-complex="GPAFJ+Aptos" fo:color="#000000" fo:letter-spacing="-0.0006in"/>
    </style:style>
    <style:style style:name="T1077" style:parent-style-name="Policepardéfaut" style:family="text">
      <style:text-properties style:font-name="GPAFJ+Aptos" style:font-name-asian="GPAFJ+Aptos" style:font-name-complex="GPAFJ+Aptos" fo:color="#000000" fo:letter-spacing="0.0006in" style:text-scale="101%"/>
    </style:style>
    <style:style style:name="T1078" style:parent-style-name="Policepardéfaut" style:family="text">
      <style:text-properties style:font-name="GPAFJ+Aptos" style:font-name-asian="GPAFJ+Aptos" style:font-name-complex="GPAFJ+Aptos" fo:color="#000000" fo:letter-spacing="-0.0013in"/>
    </style:style>
    <style:style style:name="T1079" style:parent-style-name="Policepardéfaut" style:family="text">
      <style:text-properties style:font-name="GPAFJ+Aptos" style:font-name-asian="GPAFJ+Aptos" style:font-name-complex="GPAFJ+Aptos" fo:color="#000000" style:text-scale="101%"/>
    </style:style>
    <style:style style:name="T1080" style:parent-style-name="Policepardéfaut" style:family="text">
      <style:text-properties style:font-name="GPAFJ+Aptos" style:font-name-asian="GPAFJ+Aptos" style:font-name-complex="GPAFJ+Aptos" fo:color="#000000" fo:letter-spacing="-0.0006in"/>
    </style:style>
    <style:style style:name="T1081" style:parent-style-name="Policepardéfaut" style:family="text">
      <style:text-properties style:font-name="GPAFJ+Aptos" style:font-name-asian="GPAFJ+Aptos" style:font-name-complex="GPAFJ+Aptos" fo:color="#000000"/>
    </style:style>
    <style:style style:name="T1082" style:parent-style-name="Policepardéfaut" style:family="text">
      <style:text-properties style:font-name="GPAFJ+Aptos" style:font-name-asian="GPAFJ+Aptos" style:font-name-complex="GPAFJ+Aptos" fo:color="#000000" style:text-scale="101%"/>
    </style:style>
    <style:style style:name="T1083" style:parent-style-name="Policepardéfaut" style:family="text">
      <style:text-properties style:font-name="GPAFJ+Aptos" style:font-name-asian="GPAFJ+Aptos" style:font-name-complex="GPAFJ+Aptos" fo:color="#000000" fo:letter-spacing="-0.0006in"/>
    </style:style>
    <style:style style:name="T1084" style:parent-style-name="Policepardéfaut" style:family="text">
      <style:text-properties style:font-name="GPAFJ+Aptos" style:font-name-asian="GPAFJ+Aptos" style:font-name-complex="GPAFJ+Aptos" fo:color="#000000" style:text-scale="101%"/>
    </style:style>
    <style:style style:name="T1085" style:parent-style-name="Policepardéfaut" style:family="text">
      <style:text-properties style:font-name="GPAFJ+Aptos" style:font-name-asian="GPAFJ+Aptos" style:font-name-complex="GPAFJ+Aptos" fo:color="#000000" fo:letter-spacing="-0.0006in"/>
    </style:style>
    <style:style style:name="T1086" style:parent-style-name="Policepardéfaut" style:family="text">
      <style:text-properties style:font-name="GPAFJ+Aptos" style:font-name-asian="GPAFJ+Aptos" style:font-name-complex="GPAFJ+Aptos" fo:color="#000000"/>
    </style:style>
    <style:style style:name="T1087" style:parent-style-name="Policepardéfaut" style:family="text">
      <style:text-properties style:font-name="GPAFJ+Aptos" style:font-name-asian="GPAFJ+Aptos" style:font-name-complex="GPAFJ+Aptos" fo:color="#000000" style:text-scale="101%"/>
    </style:style>
    <style:style style:name="T1088" style:parent-style-name="Policepardéfaut" style:family="text">
      <style:text-properties style:font-name="GPAFJ+Aptos" style:font-name-asian="GPAFJ+Aptos" style:font-name-complex="GPAFJ+Aptos" fo:color="#000000" fo:letter-spacing="-0.0006in" style:text-scale="101%"/>
    </style:style>
    <style:style style:name="T1089" style:parent-style-name="Policepardéfaut" style:family="text">
      <style:text-properties style:font-name="GPAFJ+Aptos" style:font-name-asian="GPAFJ+Aptos" style:font-name-complex="GPAFJ+Aptos" fo:color="#000000"/>
    </style:style>
    <style:style style:name="T1090" style:parent-style-name="Policepardéfaut" style:family="text">
      <style:text-properties style:font-name="GPAFJ+Aptos" style:font-name-asian="GPAFJ+Aptos" style:font-name-complex="GPAFJ+Aptos" fo:color="#000000" fo:letter-spacing="-0.0006in"/>
    </style:style>
    <style:style style:name="T1091" style:parent-style-name="Policepardéfaut" style:family="text">
      <style:text-properties style:font-name="GPAFJ+Aptos" style:font-name-asian="GPAFJ+Aptos" style:font-name-complex="GPAFJ+Aptos" fo:color="#000000"/>
    </style:style>
    <style:style style:name="T1092" style:parent-style-name="Policepardéfaut" style:family="text">
      <style:text-properties style:font-name="GPAFJ+Aptos" style:font-name-asian="GPAFJ+Aptos" style:font-name-complex="GPAFJ+Aptos" fo:color="#000000" fo:letter-spacing="0.0006in" style:text-scale="101%"/>
    </style:style>
    <style:style style:name="T1093" style:parent-style-name="Policepardéfaut" style:family="text">
      <style:text-properties style:font-name="GPAFJ+Aptos" style:font-name-asian="GPAFJ+Aptos" style:font-name-complex="GPAFJ+Aptos" fo:color="#000000" style:text-scale="101%"/>
    </style:style>
    <style:style style:name="P1094" style:parent-style-name="Normal" style:family="paragraph">
      <style:text-properties style:font-name="Times New Roman" style:font-name-asian="Times New Roman" style:font-name-complex="Times New Roman" fo:font-size="12pt" style:font-size-asian="12pt" style:font-size-complex="12pt"/>
    </style:style>
    <style:style style:name="P1095" style:parent-style-name="Normal" style:family="paragraph">
      <style:paragraph-properties fo:widows="0" fo:orphans="0" fo:text-align="justify" fo:line-height="100%" fo:margin-right="-0.0138in"/>
    </style:style>
    <style:style style:name="T1096" style:parent-style-name="Policepardéfaut" style:family="text">
      <style:text-properties style:font-name="GPAFJ+Aptos" style:font-name-asian="GPAFJ+Aptos" style:font-name-complex="GPAFJ+Aptos" fo:color="#000000"/>
    </style:style>
    <style:style style:name="T1097" style:parent-style-name="Policepardéfaut" style:family="text">
      <style:text-properties style:font-name="GPAFJ+Aptos" style:font-name-asian="GPAFJ+Aptos" style:font-name-complex="GPAFJ+Aptos" fo:color="#000000" fo:letter-spacing="0.0006in" style:text-scale="101%"/>
    </style:style>
    <style:style style:name="T1098" style:parent-style-name="Policepardéfaut" style:family="text">
      <style:text-properties style:font-name="GPAFJ+Aptos" style:font-name-asian="GPAFJ+Aptos" style:font-name-complex="GPAFJ+Aptos" fo:color="#000000" style:text-scale="101%"/>
    </style:style>
    <style:style style:name="T1099" style:parent-style-name="Policepardéfaut" style:family="text">
      <style:text-properties style:font-name="GPAFJ+Aptos" style:font-name-asian="GPAFJ+Aptos" style:font-name-complex="GPAFJ+Aptos" fo:color="#000000" fo:letter-spacing="-0.0006in" style:text-scale="101%"/>
    </style:style>
    <style:style style:name="T1100" style:parent-style-name="Policepardéfaut" style:family="text">
      <style:text-properties style:font-name="GPAFJ+Aptos" style:font-name-asian="GPAFJ+Aptos" style:font-name-complex="GPAFJ+Aptos" fo:color="#000000" style:text-scale="101%"/>
    </style:style>
    <style:style style:name="T1101" style:parent-style-name="Policepardéfaut" style:family="text">
      <style:text-properties style:font-name="GPAFJ+Aptos" style:font-name-asian="GPAFJ+Aptos" style:font-name-complex="GPAFJ+Aptos" fo:color="#000000" fo:letter-spacing="-0.0013in"/>
    </style:style>
    <style:style style:name="T1102" style:parent-style-name="Policepardéfaut" style:family="text">
      <style:text-properties style:font-name="GPAFJ+Aptos" style:font-name-asian="GPAFJ+Aptos" style:font-name-complex="GPAFJ+Aptos" fo:color="#000000" style:text-scale="101%"/>
    </style:style>
    <style:style style:name="T1103" style:parent-style-name="Policepardéfaut" style:family="text">
      <style:text-properties style:font-name="GPAFJ+Aptos" style:font-name-asian="GPAFJ+Aptos" style:font-name-complex="GPAFJ+Aptos" fo:color="#000000" fo:letter-spacing="-0.0006in" style:text-scale="101%"/>
    </style:style>
    <style:style style:name="T1104" style:parent-style-name="Policepardéfaut" style:family="text">
      <style:text-properties style:font-name="GPAFJ+Aptos" style:font-name-asian="GPAFJ+Aptos" style:font-name-complex="GPAFJ+Aptos" fo:color="#000000" style:text-scale="101%"/>
    </style:style>
    <style:style style:name="T1105" style:parent-style-name="Policepardéfaut" style:family="text">
      <style:text-properties style:font-name="GPAFJ+Aptos" style:font-name-asian="GPAFJ+Aptos" style:font-name-complex="GPAFJ+Aptos" fo:color="#000000" fo:letter-spacing="-0.0013in"/>
    </style:style>
    <style:style style:name="T1106" style:parent-style-name="Policepardéfaut" style:family="text">
      <style:text-properties style:font-name="GPAFJ+Aptos" style:font-name-asian="GPAFJ+Aptos" style:font-name-complex="GPAFJ+Aptos" fo:color="#000000" style:text-scale="101%"/>
    </style:style>
    <style:style style:name="T1107" style:parent-style-name="Policepardéfaut" style:family="text">
      <style:text-properties style:font-name="GPAFJ+Aptos" style:font-name-asian="GPAFJ+Aptos" style:font-name-complex="GPAFJ+Aptos" fo:color="#000000" fo:letter-spacing="-0.002in" style:text-scale="101%"/>
    </style:style>
    <style:style style:name="T1108" style:parent-style-name="Policepardéfaut" style:family="text">
      <style:text-properties style:font-name="GPAFJ+Aptos" style:font-name-asian="GPAFJ+Aptos" style:font-name-complex="GPAFJ+Aptos" fo:color="#000000" style:text-scale="101%"/>
    </style:style>
    <style:style style:name="T1109" style:parent-style-name="Policepardéfaut" style:family="text">
      <style:text-properties style:font-name="GPAFJ+Aptos" style:font-name-asian="GPAFJ+Aptos" style:font-name-complex="GPAFJ+Aptos" fo:color="#000000"/>
    </style:style>
    <style:style style:name="T1110" style:parent-style-name="Policepardéfaut" style:family="text">
      <style:text-properties style:font-name="GPAFJ+Aptos" style:font-name-asian="GPAFJ+Aptos" style:font-name-complex="GPAFJ+Aptos" fo:color="#000000" fo:letter-spacing="-0.0006in" style:text-scale="101%"/>
    </style:style>
    <style:style style:name="T1111" style:parent-style-name="Policepardéfaut" style:family="text">
      <style:text-properties style:font-name="GPAFJ+Aptos" style:font-name-asian="GPAFJ+Aptos" style:font-name-complex="GPAFJ+Aptos" fo:color="#000000" style:text-scale="101%"/>
    </style:style>
    <style:style style:name="T1112" style:parent-style-name="Policepardéfaut" style:family="text">
      <style:text-properties style:font-name="GPAFJ+Aptos" style:font-name-asian="GPAFJ+Aptos" style:font-name-complex="GPAFJ+Aptos" fo:color="#000000"/>
    </style:style>
    <style:style style:name="T1113" style:parent-style-name="Policepardéfaut" style:family="text">
      <style:text-properties style:font-name="GPAFJ+Aptos" style:font-name-asian="GPAFJ+Aptos" style:font-name-complex="GPAFJ+Aptos" fo:color="#000000" fo:letter-spacing="-0.0006in"/>
    </style:style>
    <style:style style:name="T1114" style:parent-style-name="Policepardéfaut" style:family="text">
      <style:text-properties style:font-name="GPAFJ+Aptos" style:font-name-asian="GPAFJ+Aptos" style:font-name-complex="GPAFJ+Aptos" fo:color="#000000" style:text-scale="101%"/>
    </style:style>
    <style:style style:name="T1115" style:parent-style-name="Policepardéfaut" style:family="text">
      <style:text-properties style:font-name="GPAFJ+Aptos" style:font-name-asian="GPAFJ+Aptos" style:font-name-complex="GPAFJ+Aptos" fo:color="#000000"/>
    </style:style>
    <style:style style:name="T1116" style:parent-style-name="Policepardéfaut" style:family="text">
      <style:text-properties style:font-name="GPAFJ+Aptos" style:font-name-asian="GPAFJ+Aptos" style:font-name-complex="GPAFJ+Aptos" fo:color="#000000" style:text-scale="101%"/>
    </style:style>
    <style:style style:name="T1117" style:parent-style-name="Policepardéfaut" style:family="text">
      <style:text-properties style:font-name="GPAFJ+Aptos" style:font-name-asian="GPAFJ+Aptos" style:font-name-complex="GPAFJ+Aptos" fo:color="#000000" fo:letter-spacing="-0.0013in"/>
    </style:style>
    <style:style style:name="T1118" style:parent-style-name="Policepardéfaut" style:family="text">
      <style:text-properties style:font-name="GPAFJ+Aptos" style:font-name-asian="GPAFJ+Aptos" style:font-name-complex="GPAFJ+Aptos" fo:color="#000000" fo:letter-spacing="-0.0006in" style:text-scale="101%"/>
    </style:style>
    <style:style style:name="T1119" style:parent-style-name="Policepardéfaut" style:family="text">
      <style:text-properties style:font-name="GPAFJ+Aptos" style:font-name-asian="GPAFJ+Aptos" style:font-name-complex="GPAFJ+Aptos" fo:color="#000000" style:text-scale="101%"/>
    </style:style>
    <style:style style:name="T1120" style:parent-style-name="Policepardéfaut" style:family="text">
      <style:text-properties style:font-name="GPAFJ+Aptos" style:font-name-asian="GPAFJ+Aptos" style:font-name-complex="GPAFJ+Aptos" fo:color="#000000"/>
    </style:style>
    <style:style style:name="T1121" style:parent-style-name="Policepardéfaut" style:family="text">
      <style:text-properties style:font-name="GPAFJ+Aptos" style:font-name-asian="GPAFJ+Aptos" style:font-name-complex="GPAFJ+Aptos" fo:color="#000000" style:text-scale="101%"/>
    </style:style>
    <style:style style:name="P1122" style:parent-style-name="Normal" style:family="paragraph">
      <style:paragraph-properties fo:text-align="justify" fo:line-height="0.125in"/>
      <style:text-properties fo:font-size="9pt" style:font-size-asian="9pt" style:font-size-complex="9pt"/>
    </style:style>
    <style:style style:name="P1123" style:parent-style-name="Normal" style:family="paragraph">
      <style:paragraph-properties fo:widows="0" fo:orphans="0" fo:text-align="justify" fo:line-height="100%" fo:margin-left="0.25in" fo:margin-right="-0.0138in">
        <style:tab-stops>
          <style:tab-stop style:type="left" style:position="0.25in"/>
        </style:tab-stops>
      </style:paragraph-properties>
    </style:style>
    <style:style style:name="T1124" style:parent-style-name="Policepardéfaut" style:family="text">
      <style:text-properties style:font-name="Symbol" style:font-name-asian="Symbol" style:font-name-complex="Symbol" fo:color="#000000" fo:font-size="10pt" style:font-size-asian="10pt" style:font-size-complex="10pt"/>
    </style:style>
    <style:style style:name="T1125" style:parent-style-name="Policepardéfaut" style:family="text">
      <style:text-properties style:font-name="Symbol" style:font-name-asian="Symbol" style:font-name-complex="Symbol" fo:color="#000000" fo:font-size="10pt" style:font-size-asian="10pt" style:font-size-complex="10pt"/>
    </style:style>
    <style:style style:name="T1126" style:parent-style-name="Policepardéfaut" style:family="text">
      <style:text-properties style:font-name="WYAXW+Aptos" style:font-name-asian="WYAXW+Aptos" style:font-name-complex="WYAXW+Aptos" fo:font-weight="bold" style:font-weight-asian="bold" style:font-weight-complex="bold" fo:color="#000000"/>
    </style:style>
    <style:style style:name="T1127"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128" style:parent-style-name="Policepardéfaut" style:family="text">
      <style:text-properties style:font-name="WYAXW+Aptos" style:font-name-asian="WYAXW+Aptos" style:font-name-complex="WYAXW+Aptos" fo:font-weight="bold" style:font-weight-asian="bold" style:font-weight-complex="bold" fo:color="#000000"/>
    </style:style>
    <style:style style:name="T1129"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130"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131" style:parent-style-name="Policepardéfaut" style:family="text">
      <style:text-properties style:font-name="WYAXW+Aptos" style:font-name-asian="WYAXW+Aptos" style:font-name-complex="WYAXW+Aptos" fo:font-weight="bold" style:font-weight-asian="bold" style:font-weight-complex="bold" fo:color="#000000" fo:letter-spacing="-0.0006in" style:text-scale="101%"/>
    </style:style>
    <style:style style:name="T1132"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133" style:parent-style-name="Policepardéfaut" style:family="text">
      <style:text-properties style:font-name="WYAXW+Aptos" style:font-name-asian="WYAXW+Aptos" style:font-name-complex="WYAXW+Aptos" fo:font-weight="bold" style:font-weight-asian="bold" style:font-weight-complex="bold" fo:color="#000000"/>
    </style:style>
    <style:style style:name="T1134"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135" style:parent-style-name="Policepardéfaut" style:family="text">
      <style:text-properties style:font-name="WYAXW+Aptos" style:font-name-asian="WYAXW+Aptos" style:font-name-complex="WYAXW+Aptos" fo:font-weight="bold" style:font-weight-asian="bold" style:font-weight-complex="bold" fo:color="#000000" fo:letter-spacing="-0.0013in"/>
    </style:style>
    <style:style style:name="T1136" style:parent-style-name="Policepardéfaut" style:family="text">
      <style:text-properties style:font-name="WYAXW+Aptos" style:font-name-asian="WYAXW+Aptos" style:font-name-complex="WYAXW+Aptos" fo:font-weight="bold" style:font-weight-asian="bold" style:font-weight-complex="bold" fo:color="#000000"/>
    </style:style>
    <style:style style:name="T1137"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138"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139" style:parent-style-name="Policepardéfaut" style:family="text">
      <style:text-properties style:font-name="WYAXW+Aptos" style:font-name-asian="WYAXW+Aptos" style:font-name-complex="WYAXW+Aptos" fo:font-weight="bold" style:font-weight-asian="bold" style:font-weight-complex="bold" fo:color="#000000"/>
    </style:style>
    <style:style style:name="T1140"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141"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142" style:parent-style-name="Policepardéfaut" style:family="text">
      <style:text-properties style:font-name="WYAXW+Aptos" style:font-name-asian="WYAXW+Aptos" style:font-name-complex="WYAXW+Aptos" fo:font-weight="bold" style:font-weight-asian="bold" style:font-weight-complex="bold" fo:color="#000000" fo:letter-spacing="0.002in"/>
    </style:style>
    <style:style style:name="T1143" style:parent-style-name="Policepardéfaut" style:family="text">
      <style:text-properties style:font-name="GPAFJ+Aptos" style:font-name-asian="GPAFJ+Aptos" style:font-name-complex="GPAFJ+Aptos" fo:color="#000000"/>
    </style:style>
    <style:style style:name="T1144" style:parent-style-name="Policepardéfaut" style:family="text">
      <style:text-properties style:font-name="GPAFJ+Aptos" style:font-name-asian="GPAFJ+Aptos" style:font-name-complex="GPAFJ+Aptos" fo:color="#000000" fo:letter-spacing="-0.0013in" style:text-scale="101%"/>
    </style:style>
    <style:style style:name="T1145" style:parent-style-name="Policepardéfaut" style:family="text">
      <style:text-properties style:font-name="GPAFJ+Aptos" style:font-name-asian="GPAFJ+Aptos" style:font-name-complex="GPAFJ+Aptos" fo:color="#000000" style:text-scale="101%"/>
    </style:style>
    <style:style style:name="T1146" style:parent-style-name="Policepardéfaut" style:family="text">
      <style:text-properties style:font-name="GPAFJ+Aptos" style:font-name-asian="GPAFJ+Aptos" style:font-name-complex="GPAFJ+Aptos" fo:color="#000000"/>
    </style:style>
    <style:style style:name="T1147" style:parent-style-name="Policepardéfaut" style:family="text">
      <style:text-properties style:font-name="GPAFJ+Aptos" style:font-name-asian="GPAFJ+Aptos" style:font-name-complex="GPAFJ+Aptos" fo:color="#000000" style:text-scale="101%"/>
    </style:style>
    <style:style style:name="T1148" style:parent-style-name="Policepardéfaut" style:family="text">
      <style:text-properties style:font-name="GPAFJ+Aptos" style:font-name-asian="GPAFJ+Aptos" style:font-name-complex="GPAFJ+Aptos" fo:color="#000000"/>
    </style:style>
    <style:style style:name="T1149" style:parent-style-name="Policepardéfaut" style:family="text">
      <style:text-properties style:font-name="GPAFJ+Aptos" style:font-name-asian="GPAFJ+Aptos" style:font-name-complex="GPAFJ+Aptos" fo:color="#000000" fo:letter-spacing="-0.0006in"/>
    </style:style>
    <style:style style:name="T1150" style:parent-style-name="Policepardéfaut" style:family="text">
      <style:text-properties style:font-name="GPAFJ+Aptos" style:font-name-asian="GPAFJ+Aptos" style:font-name-complex="GPAFJ+Aptos" fo:color="#000000"/>
    </style:style>
    <style:style style:name="T1151" style:parent-style-name="Policepardéfaut" style:family="text">
      <style:text-properties style:font-name="GPAFJ+Aptos" style:font-name-asian="GPAFJ+Aptos" style:font-name-complex="GPAFJ+Aptos" fo:color="#000000" style:text-scale="101%"/>
    </style:style>
    <style:style style:name="T1152" style:parent-style-name="Policepardéfaut" style:family="text">
      <style:text-properties style:font-name="GPAFJ+Aptos" style:font-name-asian="GPAFJ+Aptos" style:font-name-complex="GPAFJ+Aptos" fo:color="#000000"/>
    </style:style>
    <style:style style:name="T1153" style:parent-style-name="Policepardéfaut" style:family="text">
      <style:text-properties style:font-name="GPAFJ+Aptos" style:font-name-asian="GPAFJ+Aptos" style:font-name-complex="GPAFJ+Aptos" fo:color="#000000" fo:letter-spacing="-0.0006in"/>
    </style:style>
    <style:style style:name="T1154" style:parent-style-name="Policepardéfaut" style:family="text">
      <style:text-properties style:font-name="GPAFJ+Aptos" style:font-name-asian="GPAFJ+Aptos" style:font-name-complex="GPAFJ+Aptos" fo:color="#000000"/>
    </style:style>
    <style:style style:name="T1155" style:parent-style-name="Policepardéfaut" style:family="text">
      <style:text-properties style:font-name="GPAFJ+Aptos" style:font-name-asian="GPAFJ+Aptos" style:font-name-complex="GPAFJ+Aptos" fo:color="#000000" fo:letter-spacing="-0.0006in" style:text-scale="101%"/>
    </style:style>
    <style:style style:name="T1156" style:parent-style-name="Policepardéfaut" style:family="text">
      <style:text-properties style:font-name="GPAFJ+Aptos" style:font-name-asian="GPAFJ+Aptos" style:font-name-complex="GPAFJ+Aptos" fo:color="#000000"/>
    </style:style>
    <style:style style:name="T1157" style:parent-style-name="Policepardéfaut" style:family="text">
      <style:text-properties style:font-name="GPAFJ+Aptos" style:font-name-asian="GPAFJ+Aptos" style:font-name-complex="GPAFJ+Aptos" fo:color="#000000" fo:letter-spacing="0.0006in"/>
    </style:style>
    <style:style style:name="T1158" style:parent-style-name="Policepardéfaut" style:family="text">
      <style:text-properties style:font-name="GPAFJ+Aptos" style:font-name-asian="GPAFJ+Aptos" style:font-name-complex="GPAFJ+Aptos" fo:color="#000000"/>
    </style:style>
    <style:style style:name="T1159" style:parent-style-name="Policepardéfaut" style:family="text">
      <style:text-properties style:font-name="GPAFJ+Aptos" style:font-name-asian="GPAFJ+Aptos" style:font-name-complex="GPAFJ+Aptos" fo:color="#000000" style:text-scale="101%"/>
    </style:style>
    <style:style style:name="T1160" style:parent-style-name="Policepardéfaut" style:family="text">
      <style:text-properties style:font-name="GPAFJ+Aptos" style:font-name-asian="GPAFJ+Aptos" style:font-name-complex="GPAFJ+Aptos" fo:color="#000000" fo:letter-spacing="-0.0006in" style:text-scale="101%"/>
    </style:style>
    <style:style style:name="T1161" style:parent-style-name="Policepardéfaut" style:family="text">
      <style:text-properties style:font-name="GPAFJ+Aptos" style:font-name-asian="GPAFJ+Aptos" style:font-name-complex="GPAFJ+Aptos" fo:color="#000000" fo:letter-spacing="-0.0013in"/>
    </style:style>
    <style:style style:name="T1162" style:parent-style-name="Policepardéfaut" style:family="text">
      <style:text-properties style:font-name="GPAFJ+Aptos" style:font-name-asian="GPAFJ+Aptos" style:font-name-complex="GPAFJ+Aptos" fo:color="#000000"/>
    </style:style>
    <style:style style:name="T1163" style:parent-style-name="Policepardéfaut" style:family="text">
      <style:text-properties style:font-name="GPAFJ+Aptos" style:font-name-asian="GPAFJ+Aptos" style:font-name-complex="GPAFJ+Aptos" fo:color="#000000" fo:letter-spacing="0.0006in"/>
    </style:style>
    <style:style style:name="T1164" style:parent-style-name="Policepardéfaut" style:family="text">
      <style:text-properties style:font-name="GPAFJ+Aptos" style:font-name-asian="GPAFJ+Aptos" style:font-name-complex="GPAFJ+Aptos" fo:color="#000000" fo:letter-spacing="-0.0013in" style:text-scale="101%"/>
    </style:style>
    <style:style style:name="T1165" style:parent-style-name="Policepardéfaut" style:family="text">
      <style:text-properties style:font-name="GPAFJ+Aptos" style:font-name-asian="GPAFJ+Aptos" style:font-name-complex="GPAFJ+Aptos" fo:color="#000000"/>
    </style:style>
    <style:style style:name="T1166" style:parent-style-name="Policepardéfaut" style:family="text">
      <style:text-properties style:font-name="GPAFJ+Aptos" style:font-name-asian="GPAFJ+Aptos" style:font-name-complex="GPAFJ+Aptos" fo:color="#000000" style:text-scale="101%"/>
    </style:style>
    <style:style style:name="P1167" style:parent-style-name="Normal" style:family="paragraph">
      <style:paragraph-properties fo:text-align="justify" fo:line-height="0.125in"/>
      <style:text-properties fo:font-size="9pt" style:font-size-asian="9pt" style:font-size-complex="9pt"/>
    </style:style>
    <style:style style:name="P1168" style:parent-style-name="Normal" style:family="paragraph">
      <style:paragraph-properties fo:widows="0" fo:orphans="0" fo:text-align="justify" fo:line-height="100%" fo:margin-left="0.25in" fo:margin-right="-0.0138in">
        <style:tab-stops>
          <style:tab-stop style:type="left" style:position="0.25in"/>
        </style:tab-stops>
      </style:paragraph-properties>
    </style:style>
    <style:style style:name="T1169" style:parent-style-name="Policepardéfaut" style:family="text">
      <style:text-properties style:font-name="Symbol" style:font-name-asian="Symbol" style:font-name-complex="Symbol" fo:color="#000000" fo:font-size="10pt" style:font-size-asian="10pt" style:font-size-complex="10pt"/>
    </style:style>
    <style:style style:name="T1170" style:parent-style-name="Policepardéfaut" style:family="text">
      <style:text-properties style:font-name="Symbol" style:font-name-asian="Symbol" style:font-name-complex="Symbol" fo:color="#000000" fo:font-size="10pt" style:font-size-asian="10pt" style:font-size-complex="10pt"/>
    </style:style>
    <style:style style:name="T1171"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172" style:parent-style-name="Policepardéfaut" style:family="text">
      <style:text-properties style:font-name="WYAXW+Aptos" style:font-name-asian="WYAXW+Aptos" style:font-name-complex="WYAXW+Aptos" fo:font-weight="bold" style:font-weight-asian="bold" style:font-weight-complex="bold" fo:color="#000000"/>
    </style:style>
    <style:style style:name="T1173"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174" style:parent-style-name="Policepardéfaut" style:family="text">
      <style:text-properties style:font-name="WYAXW+Aptos" style:font-name-asian="WYAXW+Aptos" style:font-name-complex="WYAXW+Aptos" fo:font-weight="bold" style:font-weight-asian="bold" style:font-weight-complex="bold" fo:color="#000000"/>
    </style:style>
    <style:style style:name="T1175"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176"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177"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178" style:parent-style-name="Policepardéfaut" style:family="text">
      <style:text-properties style:font-name="GPAFJ+Aptos" style:font-name-asian="GPAFJ+Aptos" style:font-name-complex="GPAFJ+Aptos" fo:color="#000000"/>
    </style:style>
    <style:style style:name="T1179" style:parent-style-name="Policepardéfaut" style:family="text">
      <style:text-properties style:font-name="GPAFJ+Aptos" style:font-name-asian="GPAFJ+Aptos" style:font-name-complex="GPAFJ+Aptos" fo:color="#000000" fo:letter-spacing="-0.0006in" style:text-scale="101%"/>
    </style:style>
    <style:style style:name="T1180" style:parent-style-name="Policepardéfaut" style:family="text">
      <style:text-properties style:font-name="GPAFJ+Aptos" style:font-name-asian="GPAFJ+Aptos" style:font-name-complex="GPAFJ+Aptos" fo:color="#000000" style:text-scale="101%"/>
    </style:style>
    <style:style style:name="T1181" style:parent-style-name="Policepardéfaut" style:family="text">
      <style:text-properties style:font-name="GPAFJ+Aptos" style:font-name-asian="GPAFJ+Aptos" style:font-name-complex="GPAFJ+Aptos" fo:color="#000000" fo:letter-spacing="-0.0006in" style:text-scale="101%"/>
    </style:style>
    <style:style style:name="T1182" style:parent-style-name="Policepardéfaut" style:family="text">
      <style:text-properties style:font-name="GPAFJ+Aptos" style:font-name-asian="GPAFJ+Aptos" style:font-name-complex="GPAFJ+Aptos" fo:color="#000000" fo:letter-spacing="-0.0013in"/>
    </style:style>
    <style:style style:name="T1183" style:parent-style-name="Policepardéfaut" style:family="text">
      <style:text-properties style:font-name="GPAFJ+Aptos" style:font-name-asian="GPAFJ+Aptos" style:font-name-complex="GPAFJ+Aptos" fo:color="#000000" style:text-scale="101%"/>
    </style:style>
    <style:style style:name="T1184" style:parent-style-name="Policepardéfaut" style:family="text">
      <style:text-properties style:font-name="GPAFJ+Aptos" style:font-name-asian="GPAFJ+Aptos" style:font-name-complex="GPAFJ+Aptos" fo:color="#000000" fo:letter-spacing="-0.0006in"/>
    </style:style>
    <style:style style:name="T1185" style:parent-style-name="Policepardéfaut" style:family="text">
      <style:text-properties style:font-name="GPAFJ+Aptos" style:font-name-asian="GPAFJ+Aptos" style:font-name-complex="GPAFJ+Aptos" fo:color="#000000"/>
    </style:style>
    <style:style style:name="T1186" style:parent-style-name="Policepardéfaut" style:family="text">
      <style:text-properties style:font-name="GPAFJ+Aptos" style:font-name-asian="GPAFJ+Aptos" style:font-name-complex="GPAFJ+Aptos" fo:color="#000000" style:text-scale="101%"/>
    </style:style>
    <style:style style:name="T1187" style:parent-style-name="Policepardéfaut" style:family="text">
      <style:text-properties style:font-name="GPAFJ+Aptos" style:font-name-asian="GPAFJ+Aptos" style:font-name-complex="GPAFJ+Aptos" fo:color="#000000" fo:letter-spacing="-0.0006in"/>
    </style:style>
    <style:style style:name="T1188" style:parent-style-name="Policepardéfaut" style:family="text">
      <style:text-properties style:font-name="GPAFJ+Aptos" style:font-name-asian="GPAFJ+Aptos" style:font-name-complex="GPAFJ+Aptos" fo:color="#000000" fo:letter-spacing="-0.0013in" style:text-scale="101%"/>
    </style:style>
    <style:style style:name="T1189" style:parent-style-name="Policepardéfaut" style:family="text">
      <style:text-properties style:font-name="GPAFJ+Aptos" style:font-name-asian="GPAFJ+Aptos" style:font-name-complex="GPAFJ+Aptos" fo:color="#000000" style:text-scale="101%"/>
    </style:style>
    <style:style style:name="T1190" style:parent-style-name="Policepardéfaut" style:family="text">
      <style:text-properties style:font-name="GPAFJ+Aptos" style:font-name-asian="GPAFJ+Aptos" style:font-name-complex="GPAFJ+Aptos" fo:color="#000000" fo:letter-spacing="0.0006in"/>
    </style:style>
    <style:style style:name="T1191" style:parent-style-name="Policepardéfaut" style:family="text">
      <style:text-properties style:font-name="GPAFJ+Aptos" style:font-name-asian="GPAFJ+Aptos" style:font-name-complex="GPAFJ+Aptos" fo:color="#000000"/>
    </style:style>
    <style:style style:name="T1192" style:parent-style-name="Policepardéfaut" style:family="text">
      <style:text-properties style:font-name="GPAFJ+Aptos" style:font-name-asian="GPAFJ+Aptos" style:font-name-complex="GPAFJ+Aptos" fo:color="#000000" fo:letter-spacing="-0.0006in"/>
    </style:style>
    <style:style style:name="T1193" style:parent-style-name="Policepardéfaut" style:family="text">
      <style:text-properties style:font-name="GPAFJ+Aptos" style:font-name-asian="GPAFJ+Aptos" style:font-name-complex="GPAFJ+Aptos" fo:color="#000000"/>
    </style:style>
    <style:style style:name="T1194" style:parent-style-name="Policepardéfaut" style:family="text">
      <style:text-properties style:font-name="GPAFJ+Aptos" style:font-name-asian="GPAFJ+Aptos" style:font-name-complex="GPAFJ+Aptos" fo:color="#000000" fo:letter-spacing="-0.0013in" style:text-scale="101%"/>
    </style:style>
    <style:style style:name="T1195" style:parent-style-name="Policepardéfaut" style:family="text">
      <style:text-properties style:font-name="GPAFJ+Aptos" style:font-name-asian="GPAFJ+Aptos" style:font-name-complex="GPAFJ+Aptos" fo:color="#000000"/>
    </style:style>
    <style:style style:name="T1196" style:parent-style-name="Policepardéfaut" style:family="text">
      <style:text-properties style:font-name="GPAFJ+Aptos" style:font-name-asian="GPAFJ+Aptos" style:font-name-complex="GPAFJ+Aptos" fo:color="#000000" style:text-scale="101%"/>
    </style:style>
    <style:style style:name="T1197" style:parent-style-name="Policepardéfaut" style:family="text">
      <style:text-properties style:font-name="GPAFJ+Aptos" style:font-name-asian="GPAFJ+Aptos" style:font-name-complex="GPAFJ+Aptos" fo:color="#000000" fo:letter-spacing="-0.0006in" style:text-scale="101%"/>
    </style:style>
    <style:style style:name="T1198" style:parent-style-name="Policepardéfaut" style:family="text">
      <style:text-properties style:font-name="GPAFJ+Aptos" style:font-name-asian="GPAFJ+Aptos" style:font-name-complex="GPAFJ+Aptos" fo:color="#000000"/>
    </style:style>
    <style:style style:name="T1199" style:parent-style-name="Policepardéfaut" style:family="text">
      <style:text-properties style:font-name="GPAFJ+Aptos" style:font-name-asian="GPAFJ+Aptos" style:font-name-complex="GPAFJ+Aptos" fo:color="#000000" style:text-scale="101%"/>
    </style:style>
    <style:style style:name="T1200" style:parent-style-name="Policepardéfaut" style:family="text">
      <style:text-properties style:font-name="GPAFJ+Aptos" style:font-name-asian="GPAFJ+Aptos" style:font-name-complex="GPAFJ+Aptos" fo:color="#000000"/>
    </style:style>
    <style:style style:name="T1201" style:parent-style-name="Policepardéfaut" style:family="text">
      <style:text-properties style:font-name="GPAFJ+Aptos" style:font-name-asian="GPAFJ+Aptos" style:font-name-complex="GPAFJ+Aptos" fo:color="#000000" fo:letter-spacing="-0.0013in" style:text-scale="101%"/>
    </style:style>
    <style:style style:name="T1202" style:parent-style-name="Policepardéfaut" style:family="text">
      <style:text-properties style:font-name="GPAFJ+Aptos" style:font-name-asian="GPAFJ+Aptos" style:font-name-complex="GPAFJ+Aptos" fo:color="#000000" style:text-scale="101%"/>
    </style:style>
    <style:style style:name="T1203" style:parent-style-name="Policepardéfaut" style:family="text">
      <style:text-properties style:font-name="GPAFJ+Aptos" style:font-name-asian="GPAFJ+Aptos" style:font-name-complex="GPAFJ+Aptos" fo:color="#000000" fo:letter-spacing="0.0006in"/>
    </style:style>
    <style:style style:name="T1204" style:parent-style-name="Policepardéfaut" style:family="text">
      <style:text-properties style:font-name="GPAFJ+Aptos" style:font-name-asian="GPAFJ+Aptos" style:font-name-complex="GPAFJ+Aptos" fo:color="#000000" style:text-scale="101%"/>
    </style:style>
    <style:style style:name="T1205" style:parent-style-name="Policepardéfaut" style:family="text">
      <style:text-properties style:font-name="GPAFJ+Aptos" style:font-name-asian="GPAFJ+Aptos" style:font-name-complex="GPAFJ+Aptos" fo:color="#000000"/>
    </style:style>
    <style:style style:name="T1206" style:parent-style-name="Policepardéfaut" style:family="text">
      <style:text-properties style:font-name="GPAFJ+Aptos" style:font-name-asian="GPAFJ+Aptos" style:font-name-complex="GPAFJ+Aptos" fo:color="#000000" fo:letter-spacing="-0.0013in" style:text-scale="101%"/>
    </style:style>
    <style:style style:name="T1207" style:parent-style-name="Policepardéfaut" style:family="text">
      <style:text-properties style:font-name="GPAFJ+Aptos" style:font-name-asian="GPAFJ+Aptos" style:font-name-complex="GPAFJ+Aptos" fo:color="#000000" fo:letter-spacing="-0.0006in" style:text-scale="101%"/>
    </style:style>
    <style:style style:name="T1208" style:parent-style-name="Policepardéfaut" style:family="text">
      <style:text-properties style:font-name="GPAFJ+Aptos" style:font-name-asian="GPAFJ+Aptos" style:font-name-complex="GPAFJ+Aptos" fo:color="#000000"/>
    </style:style>
    <style:style style:name="T1209" style:parent-style-name="Policepardéfaut" style:family="text">
      <style:text-properties style:font-name="GPAFJ+Aptos" style:font-name-asian="GPAFJ+Aptos" style:font-name-complex="GPAFJ+Aptos" fo:color="#000000" style:text-scale="101%"/>
    </style:style>
    <style:style style:name="T1210" style:parent-style-name="Policepardéfaut" style:family="text">
      <style:text-properties style:font-name="GPAFJ+Aptos" style:font-name-asian="GPAFJ+Aptos" style:font-name-complex="GPAFJ+Aptos" fo:color="#000000" fo:letter-spacing="-0.0006in"/>
    </style:style>
    <style:style style:name="T1211" style:parent-style-name="Policepardéfaut" style:family="text">
      <style:text-properties style:font-name="GPAFJ+Aptos" style:font-name-asian="GPAFJ+Aptos" style:font-name-complex="GPAFJ+Aptos" fo:color="#000000" style:text-scale="101%"/>
    </style:style>
    <style:style style:name="T1212" style:parent-style-name="Policepardéfaut" style:family="text">
      <style:text-properties style:font-name="GPAFJ+Aptos" style:font-name-asian="GPAFJ+Aptos" style:font-name-complex="GPAFJ+Aptos" fo:color="#000000" fo:letter-spacing="-0.0006in"/>
    </style:style>
    <style:style style:name="T1213" style:parent-style-name="Policepardéfaut" style:family="text">
      <style:text-properties style:font-name="GPAFJ+Aptos" style:font-name-asian="GPAFJ+Aptos" style:font-name-complex="GPAFJ+Aptos" fo:color="#000000" style:text-scale="101%"/>
    </style:style>
    <style:style style:name="T1214" style:parent-style-name="Policepardéfaut" style:family="text">
      <style:text-properties style:font-name="GPAFJ+Aptos" style:font-name-asian="GPAFJ+Aptos" style:font-name-complex="GPAFJ+Aptos" fo:color="#000000"/>
    </style:style>
    <style:style style:name="T1215" style:parent-style-name="Policepardéfaut" style:family="text">
      <style:text-properties style:font-name="GPAFJ+Aptos" style:font-name-asian="GPAFJ+Aptos" style:font-name-complex="GPAFJ+Aptos" fo:color="#000000" fo:letter-spacing="-0.0006in" style:text-scale="101%"/>
    </style:style>
    <style:style style:name="T1216" style:parent-style-name="Policepardéfaut" style:family="text">
      <style:text-properties style:font-name="GPAFJ+Aptos" style:font-name-asian="GPAFJ+Aptos" style:font-name-complex="GPAFJ+Aptos" fo:color="#000000"/>
    </style:style>
    <style:style style:name="T1217" style:parent-style-name="Policepardéfaut" style:family="text">
      <style:text-properties style:font-name="GPAFJ+Aptos" style:font-name-asian="GPAFJ+Aptos" style:font-name-complex="GPAFJ+Aptos" fo:color="#000000" style:text-scale="101%"/>
    </style:style>
    <style:style style:name="T1218" style:parent-style-name="Policepardéfaut" style:family="text">
      <style:text-properties style:font-name="GPAFJ+Aptos" style:font-name-asian="GPAFJ+Aptos" style:font-name-complex="GPAFJ+Aptos" fo:color="#000000"/>
    </style:style>
    <style:style style:name="T1219" style:parent-style-name="Policepardéfaut" style:family="text">
      <style:text-properties style:font-name="GPAFJ+Aptos" style:font-name-asian="GPAFJ+Aptos" style:font-name-complex="GPAFJ+Aptos" fo:color="#000000" fo:letter-spacing="-0.0013in" style:text-scale="101%"/>
    </style:style>
    <style:style style:name="T1220" style:parent-style-name="Policepardéfaut" style:family="text">
      <style:text-properties style:font-name="GPAFJ+Aptos" style:font-name-asian="GPAFJ+Aptos" style:font-name-complex="GPAFJ+Aptos" fo:color="#000000"/>
    </style:style>
    <style:style style:name="T1221" style:parent-style-name="Policepardéfaut" style:family="text">
      <style:text-properties style:font-name="GPAFJ+Aptos" style:font-name-asian="GPAFJ+Aptos" style:font-name-complex="GPAFJ+Aptos" fo:color="#000000" fo:letter-spacing="0.0006in"/>
    </style:style>
    <style:style style:name="T1222" style:parent-style-name="Policepardéfaut" style:family="text">
      <style:text-properties style:font-name="GPAFJ+Aptos" style:font-name-asian="GPAFJ+Aptos" style:font-name-complex="GPAFJ+Aptos" fo:color="#000000"/>
    </style:style>
    <style:style style:name="T1223" style:parent-style-name="Policepardéfaut" style:family="text">
      <style:text-properties style:font-name="GPAFJ+Aptos" style:font-name-asian="GPAFJ+Aptos" style:font-name-complex="GPAFJ+Aptos" fo:color="#000000" fo:letter-spacing="-0.0027in"/>
    </style:style>
    <style:style style:name="T1224" style:parent-style-name="Policepardéfaut" style:family="text">
      <style:text-properties style:font-name="GPAFJ+Aptos" style:font-name-asian="GPAFJ+Aptos" style:font-name-complex="GPAFJ+Aptos" fo:color="#000000" style:text-scale="101%"/>
    </style:style>
    <style:style style:name="T1225" style:parent-style-name="Policepardéfaut" style:family="text">
      <style:text-properties style:font-name="GPAFJ+Aptos" style:font-name-asian="GPAFJ+Aptos" style:font-name-complex="GPAFJ+Aptos" fo:color="#000000"/>
    </style:style>
    <style:style style:name="T1226" style:parent-style-name="Policepardéfaut" style:family="text">
      <style:text-properties style:font-name="GPAFJ+Aptos" style:font-name-asian="GPAFJ+Aptos" style:font-name-complex="GPAFJ+Aptos" fo:color="#000000" fo:letter-spacing="-0.0006in"/>
    </style:style>
    <style:style style:name="T1227" style:parent-style-name="Policepardéfaut" style:family="text">
      <style:text-properties style:font-name="GPAFJ+Aptos" style:font-name-asian="GPAFJ+Aptos" style:font-name-complex="GPAFJ+Aptos" fo:color="#000000"/>
    </style:style>
    <style:style style:name="T1228" style:parent-style-name="Policepardéfaut" style:family="text">
      <style:text-properties style:font-name="GPAFJ+Aptos" style:font-name-asian="GPAFJ+Aptos" style:font-name-complex="GPAFJ+Aptos" fo:color="#000000" style:text-scale="101%"/>
    </style:style>
    <style:style style:name="T1229" style:parent-style-name="Policepardéfaut" style:family="text">
      <style:text-properties style:font-name="GPAFJ+Aptos" style:font-name-asian="GPAFJ+Aptos" style:font-name-complex="GPAFJ+Aptos" fo:color="#000000"/>
    </style:style>
    <style:style style:name="T1230" style:parent-style-name="Policepardéfaut" style:family="text">
      <style:text-properties style:font-name="GPAFJ+Aptos" style:font-name-asian="GPAFJ+Aptos" style:font-name-complex="GPAFJ+Aptos" fo:color="#000000" style:text-scale="101%"/>
    </style:style>
    <style:style style:name="T1231" style:parent-style-name="Policepardéfaut" style:family="text">
      <style:text-properties style:font-name="GPAFJ+Aptos" style:font-name-asian="GPAFJ+Aptos" style:font-name-complex="GPAFJ+Aptos" fo:color="#000000" fo:letter-spacing="-0.0006in" style:text-scale="101%"/>
    </style:style>
    <style:style style:name="T1232" style:parent-style-name="Policepardéfaut" style:family="text">
      <style:text-properties style:font-name="GPAFJ+Aptos" style:font-name-asian="GPAFJ+Aptos" style:font-name-complex="GPAFJ+Aptos" fo:color="#000000" style:text-scale="101%"/>
    </style:style>
    <style:style style:name="P1233" style:parent-style-name="Normal" style:family="paragraph">
      <style:paragraph-properties fo:text-align="justify" fo:margin-bottom="0.002in" fo:line-height="0.125in"/>
      <style:text-properties fo:font-size="9pt" style:font-size-asian="9pt" style:font-size-complex="9pt"/>
    </style:style>
    <style:style style:name="P1234" style:parent-style-name="Normal" style:family="paragraph">
      <style:paragraph-properties fo:widows="0" fo:orphans="0" fo:text-align="justify" fo:line-height="100%" fo:margin-left="0.25in" fo:margin-right="-0.0138in">
        <style:tab-stops>
          <style:tab-stop style:type="left" style:position="0.25in"/>
        </style:tab-stops>
      </style:paragraph-properties>
    </style:style>
    <style:style style:name="T1235" style:parent-style-name="Policepardéfaut" style:family="text">
      <style:text-properties style:font-name="Symbol" style:font-name-asian="Symbol" style:font-name-complex="Symbol" fo:color="#000000" fo:font-size="10pt" style:font-size-asian="10pt" style:font-size-complex="10pt"/>
    </style:style>
    <style:style style:name="T1236" style:parent-style-name="Policepardéfaut" style:family="text">
      <style:text-properties style:font-name="Symbol" style:font-name-asian="Symbol" style:font-name-complex="Symbol" fo:color="#000000" fo:font-size="10pt" style:font-size-asian="10pt" style:font-size-complex="10pt"/>
    </style:style>
    <style:style style:name="T1237" style:parent-style-name="Policepardéfaut" style:family="text">
      <style:text-properties style:font-name="WYAXW+Aptos" style:font-name-asian="WYAXW+Aptos" style:font-name-complex="WYAXW+Aptos" fo:font-weight="bold" style:font-weight-asian="bold" style:font-weight-complex="bold" fo:color="#000000"/>
    </style:style>
    <style:style style:name="T1238"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239" style:parent-style-name="Policepardéfaut" style:family="text">
      <style:text-properties style:font-name="WYAXW+Aptos" style:font-name-asian="WYAXW+Aptos" style:font-name-complex="WYAXW+Aptos" fo:font-weight="bold" style:font-weight-asian="bold" style:font-weight-complex="bold" fo:color="#000000"/>
    </style:style>
    <style:style style:name="T1240"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241" style:parent-style-name="Policepardéfaut" style:family="text">
      <style:text-properties style:font-name="WYAXW+Aptos" style:font-name-asian="WYAXW+Aptos" style:font-name-complex="WYAXW+Aptos" fo:font-weight="bold" style:font-weight-asian="bold" style:font-weight-complex="bold" fo:color="#000000"/>
    </style:style>
    <style:style style:name="T1242"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243"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244" style:parent-style-name="Policepardéfaut" style:family="text">
      <style:text-properties style:font-name="WYAXW+Aptos" style:font-name-asian="WYAXW+Aptos" style:font-name-complex="WYAXW+Aptos" fo:font-weight="bold" style:font-weight-asian="bold" style:font-weight-complex="bold" fo:color="#000000"/>
    </style:style>
    <style:style style:name="T1245"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246"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247"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248" style:parent-style-name="Policepardéfaut" style:family="text">
      <style:text-properties style:font-name="GPAFJ+Aptos" style:font-name-asian="GPAFJ+Aptos" style:font-name-complex="GPAFJ+Aptos" fo:color="#000000" fo:letter-spacing="-0.0013in" style:text-scale="101%"/>
    </style:style>
    <style:style style:name="T1249" style:parent-style-name="Policepardéfaut" style:family="text">
      <style:text-properties style:font-name="GPAFJ+Aptos" style:font-name-asian="GPAFJ+Aptos" style:font-name-complex="GPAFJ+Aptos" fo:color="#000000" fo:letter-spacing="-0.0013in"/>
    </style:style>
    <style:style style:name="T1250" style:parent-style-name="Policepardéfaut" style:family="text">
      <style:text-properties style:font-name="GPAFJ+Aptos" style:font-name-asian="GPAFJ+Aptos" style:font-name-complex="GPAFJ+Aptos" fo:color="#000000" style:text-scale="101%"/>
    </style:style>
    <style:style style:name="T1251" style:parent-style-name="Policepardéfaut" style:family="text">
      <style:text-properties style:font-name="GPAFJ+Aptos" style:font-name-asian="GPAFJ+Aptos" style:font-name-complex="GPAFJ+Aptos" fo:color="#000000"/>
    </style:style>
    <style:style style:name="T1252" style:parent-style-name="Policepardéfaut" style:family="text">
      <style:text-properties style:font-name="GPAFJ+Aptos" style:font-name-asian="GPAFJ+Aptos" style:font-name-complex="GPAFJ+Aptos" fo:color="#000000" fo:letter-spacing="-0.0006in" style:text-scale="101%"/>
    </style:style>
    <style:style style:name="T1253" style:parent-style-name="Policepardéfaut" style:family="text">
      <style:text-properties style:font-name="GPAFJ+Aptos" style:font-name-asian="GPAFJ+Aptos" style:font-name-complex="GPAFJ+Aptos" fo:color="#000000" style:text-scale="101%"/>
    </style:style>
    <style:style style:name="T1254" style:parent-style-name="Policepardéfaut" style:family="text">
      <style:text-properties style:font-name="GPAFJ+Aptos" style:font-name-asian="GPAFJ+Aptos" style:font-name-complex="GPAFJ+Aptos" fo:color="#000000"/>
    </style:style>
    <style:style style:name="T1255" style:parent-style-name="Policepardéfaut" style:family="text">
      <style:text-properties style:font-name="GPAFJ+Aptos" style:font-name-asian="GPAFJ+Aptos" style:font-name-complex="GPAFJ+Aptos" fo:color="#000000" fo:letter-spacing="-0.0013in" style:text-scale="101%"/>
    </style:style>
    <style:style style:name="T1256" style:parent-style-name="Policepardéfaut" style:family="text">
      <style:text-properties style:font-name="GPAFJ+Aptos" style:font-name-asian="GPAFJ+Aptos" style:font-name-complex="GPAFJ+Aptos" fo:color="#000000" fo:letter-spacing="-0.0013in"/>
    </style:style>
    <style:style style:name="T1257" style:parent-style-name="Policepardéfaut" style:family="text">
      <style:text-properties style:font-name="GPAFJ+Aptos" style:font-name-asian="GPAFJ+Aptos" style:font-name-complex="GPAFJ+Aptos" fo:color="#000000"/>
    </style:style>
    <style:style style:name="T1258" style:parent-style-name="Policepardéfaut" style:family="text">
      <style:text-properties style:font-name="GPAFJ+Aptos" style:font-name-asian="GPAFJ+Aptos" style:font-name-complex="GPAFJ+Aptos" fo:color="#000000" style:text-scale="101%"/>
    </style:style>
    <style:style style:name="T1259" style:parent-style-name="Policepardéfaut" style:family="text">
      <style:text-properties style:font-name="GPAFJ+Aptos" style:font-name-asian="GPAFJ+Aptos" style:font-name-complex="GPAFJ+Aptos" fo:color="#000000" fo:letter-spacing="0.0006in"/>
    </style:style>
    <style:style style:name="T1260" style:parent-style-name="Policepardéfaut" style:family="text">
      <style:text-properties style:font-name="GPAFJ+Aptos" style:font-name-asian="GPAFJ+Aptos" style:font-name-complex="GPAFJ+Aptos" fo:color="#000000"/>
    </style:style>
    <style:style style:name="T1261" style:parent-style-name="Policepardéfaut" style:family="text">
      <style:text-properties style:font-name="GPAFJ+Aptos" style:font-name-asian="GPAFJ+Aptos" style:font-name-complex="GPAFJ+Aptos" fo:color="#000000" fo:letter-spacing="-0.0013in"/>
    </style:style>
    <style:style style:name="T1262" style:parent-style-name="Policepardéfaut" style:family="text">
      <style:text-properties style:font-name="GPAFJ+Aptos" style:font-name-asian="GPAFJ+Aptos" style:font-name-complex="GPAFJ+Aptos" fo:color="#000000" style:text-scale="101%"/>
    </style:style>
    <style:style style:name="T1263" style:parent-style-name="Policepardéfaut" style:family="text">
      <style:text-properties style:font-name="GPAFJ+Aptos" style:font-name-asian="GPAFJ+Aptos" style:font-name-complex="GPAFJ+Aptos" fo:color="#000000" fo:letter-spacing="-0.0006in"/>
    </style:style>
    <style:style style:name="T1264" style:parent-style-name="Policepardéfaut" style:family="text">
      <style:text-properties style:font-name="GPAFJ+Aptos" style:font-name-asian="GPAFJ+Aptos" style:font-name-complex="GPAFJ+Aptos" fo:color="#000000"/>
    </style:style>
    <style:style style:name="T1265" style:parent-style-name="Policepardéfaut" style:family="text">
      <style:text-properties style:font-name="GPAFJ+Aptos" style:font-name-asian="GPAFJ+Aptos" style:font-name-complex="GPAFJ+Aptos" fo:color="#000000" style:text-scale="101%"/>
    </style:style>
    <style:style style:name="T1266" style:parent-style-name="Policepardéfaut" style:family="text">
      <style:text-properties style:font-name="GPAFJ+Aptos" style:font-name-asian="GPAFJ+Aptos" style:font-name-complex="GPAFJ+Aptos" fo:color="#000000"/>
    </style:style>
    <style:style style:name="T1267" style:parent-style-name="Policepardéfaut" style:family="text">
      <style:text-properties style:font-name="GPAFJ+Aptos" style:font-name-asian="GPAFJ+Aptos" style:font-name-complex="GPAFJ+Aptos" fo:color="#000000" fo:letter-spacing="-0.0006in"/>
    </style:style>
    <style:style style:name="T1268" style:parent-style-name="Policepardéfaut" style:family="text">
      <style:text-properties style:font-name="GPAFJ+Aptos" style:font-name-asian="GPAFJ+Aptos" style:font-name-complex="GPAFJ+Aptos" fo:color="#000000" style:text-scale="101%"/>
    </style:style>
    <style:style style:name="T1269" style:parent-style-name="Policepardéfaut" style:family="text">
      <style:text-properties style:font-name="GPAFJ+Aptos" style:font-name-asian="GPAFJ+Aptos" style:font-name-complex="GPAFJ+Aptos" fo:color="#000000" fo:letter-spacing="-0.0006in"/>
    </style:style>
    <style:style style:name="T1270" style:parent-style-name="Policepardéfaut" style:family="text">
      <style:text-properties style:font-name="GPAFJ+Aptos" style:font-name-asian="GPAFJ+Aptos" style:font-name-complex="GPAFJ+Aptos" fo:color="#000000"/>
    </style:style>
    <style:style style:name="T1271" style:parent-style-name="Policepardéfaut" style:family="text">
      <style:text-properties style:font-name="GPAFJ+Aptos" style:font-name-asian="GPAFJ+Aptos" style:font-name-complex="GPAFJ+Aptos" fo:color="#000000" style:text-scale="101%"/>
    </style:style>
    <style:style style:name="T1272" style:parent-style-name="Policepardéfaut" style:family="text">
      <style:text-properties style:font-name="GPAFJ+Aptos" style:font-name-asian="GPAFJ+Aptos" style:font-name-complex="GPAFJ+Aptos" fo:color="#000000"/>
    </style:style>
    <style:style style:name="T1273" style:parent-style-name="Policepardéfaut" style:family="text">
      <style:text-properties style:font-name="GPAFJ+Aptos" style:font-name-asian="GPAFJ+Aptos" style:font-name-complex="GPAFJ+Aptos" fo:color="#000000" style:text-scale="101%"/>
    </style:style>
    <style:style style:name="T1274" style:parent-style-name="Policepardéfaut" style:family="text">
      <style:text-properties style:font-name="GPAFJ+Aptos" style:font-name-asian="GPAFJ+Aptos" style:font-name-complex="GPAFJ+Aptos" fo:color="#000000"/>
    </style:style>
    <style:style style:name="T1275" style:parent-style-name="Policepardéfaut" style:family="text">
      <style:text-properties style:font-name="GPAFJ+Aptos" style:font-name-asian="GPAFJ+Aptos" style:font-name-complex="GPAFJ+Aptos" fo:color="#000000" fo:letter-spacing="-0.0013in"/>
    </style:style>
    <style:style style:name="T1276" style:parent-style-name="Policepardéfaut" style:family="text">
      <style:text-properties style:font-name="GPAFJ+Aptos" style:font-name-asian="GPAFJ+Aptos" style:font-name-complex="GPAFJ+Aptos" fo:color="#000000"/>
    </style:style>
    <style:style style:name="T1277" style:parent-style-name="Policepardéfaut" style:family="text">
      <style:text-properties style:font-name="GPAFJ+Aptos" style:font-name-asian="GPAFJ+Aptos" style:font-name-complex="GPAFJ+Aptos" fo:color="#000000" style:text-scale="101%"/>
    </style:style>
    <style:style style:name="T1278" style:parent-style-name="Policepardéfaut" style:family="text">
      <style:text-properties style:font-name="GPAFJ+Aptos" style:font-name-asian="GPAFJ+Aptos" style:font-name-complex="GPAFJ+Aptos" fo:color="#000000" fo:letter-spacing="-0.0013in"/>
    </style:style>
    <style:style style:name="T1279" style:parent-style-name="Policepardéfaut" style:family="text">
      <style:text-properties style:font-name="GPAFJ+Aptos" style:font-name-asian="GPAFJ+Aptos" style:font-name-complex="GPAFJ+Aptos" fo:color="#000000"/>
    </style:style>
    <style:style style:name="T1280" style:parent-style-name="Policepardéfaut" style:family="text">
      <style:text-properties style:font-name="GPAFJ+Aptos" style:font-name-asian="GPAFJ+Aptos" style:font-name-complex="GPAFJ+Aptos" fo:color="#000000" fo:letter-spacing="-0.0006in"/>
    </style:style>
    <style:style style:name="T1281" style:parent-style-name="Policepardéfaut" style:family="text">
      <style:text-properties style:font-name="GPAFJ+Aptos" style:font-name-asian="GPAFJ+Aptos" style:font-name-complex="GPAFJ+Aptos" fo:color="#000000" style:text-scale="101%"/>
    </style:style>
    <style:style style:name="T1282" style:parent-style-name="Policepardéfaut" style:family="text">
      <style:text-properties style:font-name="GPAFJ+Aptos" style:font-name-asian="GPAFJ+Aptos" style:font-name-complex="GPAFJ+Aptos" fo:color="#000000"/>
    </style:style>
    <style:style style:name="T1283" style:parent-style-name="Policepardéfaut" style:family="text">
      <style:text-properties style:font-name="GPAFJ+Aptos" style:font-name-asian="GPAFJ+Aptos" style:font-name-complex="GPAFJ+Aptos" fo:color="#000000" style:text-scale="101%"/>
    </style:style>
    <style:style style:name="T1284" style:parent-style-name="Policepardéfaut" style:family="text">
      <style:text-properties style:font-name="GPAFJ+Aptos" style:font-name-asian="GPAFJ+Aptos" style:font-name-complex="GPAFJ+Aptos" fo:color="#000000"/>
    </style:style>
    <style:style style:name="T1285" style:parent-style-name="Policepardéfaut" style:family="text">
      <style:text-properties style:font-name="GPAFJ+Aptos" style:font-name-asian="GPAFJ+Aptos" style:font-name-complex="GPAFJ+Aptos" fo:color="#000000" fo:letter-spacing="-0.0006in"/>
    </style:style>
    <style:style style:name="T1286" style:parent-style-name="Policepardéfaut" style:family="text">
      <style:text-properties style:font-name="GPAFJ+Aptos" style:font-name-asian="GPAFJ+Aptos" style:font-name-complex="GPAFJ+Aptos" fo:color="#000000"/>
    </style:style>
    <style:style style:name="T1287" style:parent-style-name="Policepardéfaut" style:family="text">
      <style:text-properties style:font-name="GPAFJ+Aptos" style:font-name-asian="GPAFJ+Aptos" style:font-name-complex="GPAFJ+Aptos" fo:color="#000000" style:text-scale="101%"/>
    </style:style>
    <style:style style:name="T1288" style:parent-style-name="Policepardéfaut" style:family="text">
      <style:text-properties style:font-name="GPAFJ+Aptos" style:font-name-asian="GPAFJ+Aptos" style:font-name-complex="GPAFJ+Aptos" fo:color="#000000" fo:letter-spacing="-0.0006in"/>
    </style:style>
    <style:style style:name="T1289" style:parent-style-name="Policepardéfaut" style:family="text">
      <style:text-properties style:font-name="GPAFJ+Aptos" style:font-name-asian="GPAFJ+Aptos" style:font-name-complex="GPAFJ+Aptos" fo:color="#000000" style:text-scale="101%"/>
    </style:style>
    <style:style style:name="T1290" style:parent-style-name="Policepardéfaut" style:family="text">
      <style:text-properties style:font-name="GPAFJ+Aptos" style:font-name-asian="GPAFJ+Aptos" style:font-name-complex="GPAFJ+Aptos" fo:color="#000000" fo:letter-spacing="-0.0006in"/>
    </style:style>
    <style:style style:name="T1291" style:parent-style-name="Policepardéfaut" style:family="text">
      <style:text-properties style:font-name="GPAFJ+Aptos" style:font-name-asian="GPAFJ+Aptos" style:font-name-complex="GPAFJ+Aptos" fo:color="#000000"/>
    </style:style>
    <style:style style:name="T1292" style:parent-style-name="Policepardéfaut" style:family="text">
      <style:text-properties style:font-name="GPAFJ+Aptos" style:font-name-asian="GPAFJ+Aptos" style:font-name-complex="GPAFJ+Aptos" fo:color="#000000" fo:letter-spacing="0.0006in"/>
    </style:style>
    <style:style style:name="T1293" style:parent-style-name="Policepardéfaut" style:family="text">
      <style:text-properties style:font-name="GPAFJ+Aptos" style:font-name-asian="GPAFJ+Aptos" style:font-name-complex="GPAFJ+Aptos" fo:color="#000000" fo:letter-spacing="-0.0013in" style:text-scale="101%"/>
    </style:style>
    <style:style style:name="T1294" style:parent-style-name="Policepardéfaut" style:family="text">
      <style:text-properties style:font-name="GPAFJ+Aptos" style:font-name-asian="GPAFJ+Aptos" style:font-name-complex="GPAFJ+Aptos" fo:color="#000000" style:text-scale="101%"/>
    </style:style>
    <style:style style:name="P1295" style:parent-style-name="Normal" style:family="paragraph">
      <style:paragraph-properties fo:text-align="justify" fo:line-height="0.125in"/>
      <style:text-properties fo:font-size="9pt" style:font-size-asian="9pt" style:font-size-complex="9pt"/>
    </style:style>
    <style:style style:name="P1296" style:parent-style-name="Normal" style:family="paragraph">
      <style:paragraph-properties fo:widows="0" fo:orphans="0" fo:text-align="justify" fo:margin-left="0.5in" fo:margin-right="0.4659in" fo:text-indent="-0.2493in">
        <style:tab-stops/>
      </style:paragraph-properties>
    </style:style>
    <style:style style:name="T1297" style:parent-style-name="Policepardéfaut" style:family="text">
      <style:text-properties style:font-name="Symbol" style:font-name-asian="Symbol" style:font-name-complex="Symbol" fo:color="#000000" fo:font-size="10pt" style:font-size-asian="10pt" style:font-size-complex="10pt"/>
    </style:style>
    <style:style style:name="T1298" style:parent-style-name="Policepardéfaut" style:family="text">
      <style:text-properties style:font-name="Symbol" style:font-name-asian="Symbol" style:font-name-complex="Symbol" fo:color="#000000" fo:font-size="10pt" style:font-size-asian="10pt" style:font-size-complex="10pt"/>
    </style:style>
    <style:style style:name="T1299"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300"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301" style:parent-style-name="Policepardéfaut" style:family="text">
      <style:text-properties style:font-name="WYAXW+Aptos" style:font-name-asian="WYAXW+Aptos" style:font-name-complex="WYAXW+Aptos" fo:font-weight="bold" style:font-weight-asian="bold" style:font-weight-complex="bold" fo:color="#000000"/>
    </style:style>
    <style:style style:name="T1302"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303" style:parent-style-name="Policepardéfaut" style:family="text">
      <style:text-properties style:font-name="WYAXW+Aptos" style:font-name-asian="WYAXW+Aptos" style:font-name-complex="WYAXW+Aptos" fo:font-weight="bold" style:font-weight-asian="bold" style:font-weight-complex="bold" fo:color="#000000" fo:letter-spacing="0.0006in" style:text-scale="101%"/>
    </style:style>
    <style:style style:name="T1304" style:parent-style-name="Policepardéfaut" style:family="text">
      <style:text-properties style:font-name="WYAXW+Aptos" style:font-name-asian="WYAXW+Aptos" style:font-name-complex="WYAXW+Aptos" fo:font-weight="bold" style:font-weight-asian="bold" style:font-weight-complex="bold" fo:color="#000000"/>
    </style:style>
    <style:style style:name="T1305"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306"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307" style:parent-style-name="Policepardéfaut" style:family="text">
      <style:text-properties style:font-name="WYAXW+Aptos" style:font-name-asian="WYAXW+Aptos" style:font-name-complex="WYAXW+Aptos" fo:font-weight="bold" style:font-weight-asian="bold" style:font-weight-complex="bold" fo:color="#000000" fo:letter-spacing="-0.0013in" style:text-scale="101%"/>
    </style:style>
    <style:style style:name="T1308"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309" style:parent-style-name="Policepardéfaut" style:family="text">
      <style:text-properties style:font-name="WYAXW+Aptos" style:font-name-asian="WYAXW+Aptos" style:font-name-complex="WYAXW+Aptos" fo:font-weight="bold" style:font-weight-asian="bold" style:font-weight-complex="bold" fo:color="#000000" fo:letter-spacing="-0.0013in" style:text-scale="101%"/>
    </style:style>
    <style:style style:name="T1310" style:parent-style-name="Policepardéfaut" style:family="text">
      <style:text-properties style:font-name="WYAXW+Aptos" style:font-name-asian="WYAXW+Aptos" style:font-name-complex="WYAXW+Aptos" fo:font-weight="bold" style:font-weight-asian="bold" style:font-weight-complex="bold" fo:color="#000000"/>
    </style:style>
    <style:style style:name="T1311"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312" style:parent-style-name="Policepardéfaut" style:family="text">
      <style:text-properties style:font-name="WYAXW+Aptos" style:font-name-asian="WYAXW+Aptos" style:font-name-complex="WYAXW+Aptos" fo:font-weight="bold" style:font-weight-asian="bold" style:font-weight-complex="bold" fo:color="#000000"/>
    </style:style>
    <style:style style:name="T1313"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314" style:parent-style-name="Policepardéfaut" style:family="text">
      <style:text-properties style:font-name="WYAXW+Aptos" style:font-name-asian="WYAXW+Aptos" style:font-name-complex="WYAXW+Aptos" fo:font-weight="bold" style:font-weight-asian="bold" style:font-weight-complex="bold" fo:color="#000000"/>
    </style:style>
    <style:style style:name="T1315" style:parent-style-name="Policepardéfaut" style:family="text">
      <style:text-properties style:font-name="GPAFJ+Aptos" style:font-name-asian="GPAFJ+Aptos" style:font-name-complex="GPAFJ+Aptos" fo:color="#000000"/>
    </style:style>
    <style:style style:name="T1316" style:parent-style-name="Policepardéfaut" style:family="text">
      <style:text-properties style:font-name="GPAFJ+Aptos" style:font-name-asian="GPAFJ+Aptos" style:font-name-complex="GPAFJ+Aptos" fo:color="#000000" style:text-scale="101%"/>
    </style:style>
    <style:style style:name="T1317" style:parent-style-name="Policepardéfaut" style:family="text">
      <style:text-properties style:font-name="GPAFJ+Aptos" style:font-name-asian="GPAFJ+Aptos" style:font-name-complex="GPAFJ+Aptos" fo:color="#000000"/>
    </style:style>
    <style:style style:name="T1318" style:parent-style-name="Policepardéfaut" style:family="text">
      <style:text-properties style:font-name="GPAFJ+Aptos" style:font-name-asian="GPAFJ+Aptos" style:font-name-complex="GPAFJ+Aptos" fo:color="#000000" fo:letter-spacing="-0.0006in"/>
    </style:style>
    <style:style style:name="T1319" style:parent-style-name="Policepardéfaut" style:family="text">
      <style:text-properties style:font-name="GPAFJ+Aptos" style:font-name-asian="GPAFJ+Aptos" style:font-name-complex="GPAFJ+Aptos" fo:color="#000000"/>
    </style:style>
    <style:style style:name="T1320" style:parent-style-name="Policepardéfaut" style:family="text">
      <style:text-properties style:font-name="GPAFJ+Aptos" style:font-name-asian="GPAFJ+Aptos" style:font-name-complex="GPAFJ+Aptos" fo:color="#000000" style:text-scale="101%"/>
    </style:style>
    <style:style style:name="T1321" style:parent-style-name="Policepardéfaut" style:family="text">
      <style:text-properties style:font-name="GPAFJ+Aptos" style:font-name-asian="GPAFJ+Aptos" style:font-name-complex="GPAFJ+Aptos" fo:color="#000000"/>
    </style:style>
    <style:style style:name="T1322" style:parent-style-name="Policepardéfaut" style:family="text">
      <style:text-properties style:font-name="GPAFJ+Aptos" style:font-name-asian="GPAFJ+Aptos" style:font-name-complex="GPAFJ+Aptos" fo:color="#000000" style:text-scale="101%"/>
    </style:style>
    <style:style style:name="T1323" style:parent-style-name="Policepardéfaut" style:family="text">
      <style:text-properties style:font-name="GPAFJ+Aptos" style:font-name-asian="GPAFJ+Aptos" style:font-name-complex="GPAFJ+Aptos" fo:color="#000000"/>
    </style:style>
    <style:style style:name="T1324" style:parent-style-name="Policepardéfaut" style:family="text">
      <style:text-properties style:font-name="GPAFJ+Aptos" style:font-name-asian="GPAFJ+Aptos" style:font-name-complex="GPAFJ+Aptos" fo:color="#000000" fo:letter-spacing="-0.0006in"/>
    </style:style>
    <style:style style:name="T1325" style:parent-style-name="Policepardéfaut" style:family="text">
      <style:text-properties style:font-name="GPAFJ+Aptos" style:font-name-asian="GPAFJ+Aptos" style:font-name-complex="GPAFJ+Aptos" fo:color="#000000" style:text-scale="101%"/>
    </style:style>
    <style:style style:name="T1326" style:parent-style-name="Policepardéfaut" style:family="text">
      <style:text-properties style:font-name="GPAFJ+Aptos" style:font-name-asian="GPAFJ+Aptos" style:font-name-complex="GPAFJ+Aptos" fo:color="#000000" fo:letter-spacing="-0.0006in"/>
    </style:style>
    <style:style style:name="T1327" style:parent-style-name="Policepardéfaut" style:family="text">
      <style:text-properties style:font-name="GPAFJ+Aptos" style:font-name-asian="GPAFJ+Aptos" style:font-name-complex="GPAFJ+Aptos" fo:color="#000000" style:text-scale="101%"/>
    </style:style>
    <style:style style:name="T1328" style:parent-style-name="Policepardéfaut" style:family="text">
      <style:text-properties style:font-name="GPAFJ+Aptos" style:font-name-asian="GPAFJ+Aptos" style:font-name-complex="GPAFJ+Aptos" fo:color="#000000" fo:letter-spacing="-0.0006in"/>
    </style:style>
    <style:style style:name="T1329" style:parent-style-name="Policepardéfaut" style:family="text">
      <style:text-properties style:font-name="GPAFJ+Aptos" style:font-name-asian="GPAFJ+Aptos" style:font-name-complex="GPAFJ+Aptos" fo:color="#000000" style:text-scale="101%"/>
    </style:style>
    <style:style style:name="T1330" style:parent-style-name="Policepardéfaut" style:family="text">
      <style:text-properties style:font-name="GPAFJ+Aptos" style:font-name-asian="GPAFJ+Aptos" style:font-name-complex="GPAFJ+Aptos" fo:color="#000000" fo:letter-spacing="-0.002in" style:text-scale="101%"/>
    </style:style>
    <style:style style:name="T1331" style:parent-style-name="Policepardéfaut" style:family="text">
      <style:text-properties style:font-name="GPAFJ+Aptos" style:font-name-asian="GPAFJ+Aptos" style:font-name-complex="GPAFJ+Aptos" fo:color="#000000"/>
    </style:style>
    <style:style style:name="T1332" style:parent-style-name="Policepardéfaut" style:family="text">
      <style:text-properties style:font-name="GPAFJ+Aptos" style:font-name-asian="GPAFJ+Aptos" style:font-name-complex="GPAFJ+Aptos" fo:color="#000000" style:text-scale="101%"/>
    </style:style>
    <style:style style:name="T1333" style:parent-style-name="Policepardéfaut" style:family="text">
      <style:text-properties style:font-name="GPAFJ+Aptos" style:font-name-asian="GPAFJ+Aptos" style:font-name-complex="GPAFJ+Aptos" fo:color="#000000" fo:letter-spacing="-0.0006in"/>
    </style:style>
    <style:style style:name="T1334" style:parent-style-name="Policepardéfaut" style:family="text">
      <style:text-properties style:font-name="GPAFJ+Aptos" style:font-name-asian="GPAFJ+Aptos" style:font-name-complex="GPAFJ+Aptos" fo:color="#000000" fo:letter-spacing="-0.0013in" style:text-scale="101%"/>
    </style:style>
    <style:style style:name="T1335" style:parent-style-name="Policepardéfaut" style:family="text">
      <style:text-properties style:font-name="GPAFJ+Aptos" style:font-name-asian="GPAFJ+Aptos" style:font-name-complex="GPAFJ+Aptos" fo:color="#000000" style:text-scale="101%"/>
    </style:style>
    <style:style style:name="T1336" style:parent-style-name="Policepardéfaut" style:family="text">
      <style:text-properties style:font-name="GPAFJ+Aptos" style:font-name-asian="GPAFJ+Aptos" style:font-name-complex="GPAFJ+Aptos" fo:color="#000000" fo:letter-spacing="0.0006in"/>
    </style:style>
    <style:style style:name="T1337" style:parent-style-name="Policepardéfaut" style:family="text">
      <style:text-properties style:font-name="GPAFJ+Aptos" style:font-name-asian="GPAFJ+Aptos" style:font-name-complex="GPAFJ+Aptos" fo:color="#000000" fo:letter-spacing="-0.0013in" style:text-scale="101%"/>
    </style:style>
    <style:style style:name="T1338" style:parent-style-name="Policepardéfaut" style:family="text">
      <style:text-properties style:font-name="GPAFJ+Aptos" style:font-name-asian="GPAFJ+Aptos" style:font-name-complex="GPAFJ+Aptos" fo:color="#000000" style:text-scale="101%"/>
    </style:style>
    <style:style style:name="T1339" style:parent-style-name="Policepardéfaut" style:family="text">
      <style:text-properties style:font-name="GPAFJ+Aptos" style:font-name-asian="GPAFJ+Aptos" style:font-name-complex="GPAFJ+Aptos" fo:color="#000000"/>
    </style:style>
    <style:style style:name="T1340" style:parent-style-name="Policepardéfaut" style:family="text">
      <style:text-properties style:font-name="GPAFJ+Aptos" style:font-name-asian="GPAFJ+Aptos" style:font-name-complex="GPAFJ+Aptos" fo:color="#000000" fo:letter-spacing="-0.0013in"/>
    </style:style>
    <style:style style:name="T1341" style:parent-style-name="Policepardéfaut" style:family="text">
      <style:text-properties style:font-name="GPAFJ+Aptos" style:font-name-asian="GPAFJ+Aptos" style:font-name-complex="GPAFJ+Aptos" fo:color="#000000" fo:letter-spacing="-0.0006in" style:text-scale="101%"/>
    </style:style>
    <style:style style:name="T1342" style:parent-style-name="Policepardéfaut" style:family="text">
      <style:text-properties style:font-name="GPAFJ+Aptos" style:font-name-asian="GPAFJ+Aptos" style:font-name-complex="GPAFJ+Aptos" fo:color="#000000"/>
    </style:style>
    <style:style style:name="T1343" style:parent-style-name="Policepardéfaut" style:family="text">
      <style:text-properties style:font-name="GPAFJ+Aptos" style:font-name-asian="GPAFJ+Aptos" style:font-name-complex="GPAFJ+Aptos" fo:color="#000000" style:text-scale="101%"/>
    </style:style>
    <style:style style:name="T1344" style:parent-style-name="Policepardéfaut" style:family="text">
      <style:text-properties style:font-name="GPAFJ+Aptos" style:font-name-asian="GPAFJ+Aptos" style:font-name-complex="GPAFJ+Aptos" fo:color="#000000"/>
    </style:style>
    <style:style style:name="T1345" style:parent-style-name="Policepardéfaut" style:family="text">
      <style:text-properties style:font-name="GPAFJ+Aptos" style:font-name-asian="GPAFJ+Aptos" style:font-name-complex="GPAFJ+Aptos" fo:color="#000000" style:text-scale="101%"/>
    </style:style>
    <style:style style:name="T1346" style:parent-style-name="Policepardéfaut" style:family="text">
      <style:text-properties style:font-name="GPAFJ+Aptos" style:font-name-asian="GPAFJ+Aptos" style:font-name-complex="GPAFJ+Aptos" fo:color="#000000" fo:letter-spacing="-0.0006in"/>
    </style:style>
    <style:style style:name="T1347" style:parent-style-name="Policepardéfaut" style:family="text">
      <style:text-properties style:font-name="GPAFJ+Aptos" style:font-name-asian="GPAFJ+Aptos" style:font-name-complex="GPAFJ+Aptos" fo:color="#000000" style:text-scale="101%"/>
    </style:style>
    <style:style style:name="T1348" style:parent-style-name="Policepardéfaut" style:family="text">
      <style:text-properties style:font-name="GPAFJ+Aptos" style:font-name-asian="GPAFJ+Aptos" style:font-name-complex="GPAFJ+Aptos" fo:color="#000000"/>
    </style:style>
    <style:style style:name="T1349" style:parent-style-name="Policepardéfaut" style:family="text">
      <style:text-properties style:font-name="GPAFJ+Aptos" style:font-name-asian="GPAFJ+Aptos" style:font-name-complex="GPAFJ+Aptos" fo:color="#000000" fo:letter-spacing="-0.0006in" style:text-scale="101%"/>
    </style:style>
    <style:style style:name="T1350" style:parent-style-name="Policepardéfaut" style:family="text">
      <style:text-properties style:font-name="GPAFJ+Aptos" style:font-name-asian="GPAFJ+Aptos" style:font-name-complex="GPAFJ+Aptos" fo:color="#000000"/>
    </style:style>
    <style:style style:name="T1351" style:parent-style-name="Policepardéfaut" style:family="text">
      <style:text-properties style:font-name="GPAFJ+Aptos" style:font-name-asian="GPAFJ+Aptos" style:font-name-complex="GPAFJ+Aptos" fo:color="#000000" style:text-scale="101%"/>
    </style:style>
    <style:style style:name="T1352" style:parent-style-name="Policepardéfaut" style:family="text">
      <style:text-properties style:font-name="GPAFJ+Aptos" style:font-name-asian="GPAFJ+Aptos" style:font-name-complex="GPAFJ+Aptos" fo:color="#000000" fo:letter-spacing="-0.0013in"/>
    </style:style>
    <style:style style:name="T1353" style:parent-style-name="Policepardéfaut" style:family="text">
      <style:text-properties style:font-name="GPAFJ+Aptos" style:font-name-asian="GPAFJ+Aptos" style:font-name-complex="GPAFJ+Aptos" fo:color="#000000" style:text-scale="101%"/>
    </style:style>
    <style:style style:name="T1354" style:parent-style-name="Policepardéfaut" style:family="text">
      <style:text-properties style:font-name="GPAFJ+Aptos" style:font-name-asian="GPAFJ+Aptos" style:font-name-complex="GPAFJ+Aptos" fo:color="#000000" fo:letter-spacing="-0.0006in" style:text-scale="101%"/>
    </style:style>
    <style:style style:name="T1355" style:parent-style-name="Policepardéfaut" style:family="text">
      <style:text-properties style:font-name="GPAFJ+Aptos" style:font-name-asian="GPAFJ+Aptos" style:font-name-complex="GPAFJ+Aptos" fo:color="#000000"/>
    </style:style>
    <style:style style:name="T1356" style:parent-style-name="Policepardéfaut" style:family="text">
      <style:text-properties style:font-name="GPAFJ+Aptos" style:font-name-asian="GPAFJ+Aptos" style:font-name-complex="GPAFJ+Aptos" fo:color="#000000" fo:letter-spacing="-0.0013in"/>
    </style:style>
    <style:style style:name="T1357" style:parent-style-name="Policepardéfaut" style:family="text">
      <style:text-properties style:font-name="GPAFJ+Aptos" style:font-name-asian="GPAFJ+Aptos" style:font-name-complex="GPAFJ+Aptos" fo:color="#000000"/>
    </style:style>
    <style:style style:name="T1358" style:parent-style-name="Policepardéfaut" style:family="text">
      <style:text-properties style:font-name="GPAFJ+Aptos" style:font-name-asian="GPAFJ+Aptos" style:font-name-complex="GPAFJ+Aptos" fo:color="#000000" fo:letter-spacing="-0.0006in" style:text-scale="101%"/>
    </style:style>
    <style:style style:name="T1359" style:parent-style-name="Policepardéfaut" style:family="text">
      <style:text-properties style:font-name="GPAFJ+Aptos" style:font-name-asian="GPAFJ+Aptos" style:font-name-complex="GPAFJ+Aptos" fo:color="#000000"/>
    </style:style>
    <style:style style:name="T1360" style:parent-style-name="Policepardéfaut" style:family="text">
      <style:text-properties style:font-name="GPAFJ+Aptos" style:font-name-asian="GPAFJ+Aptos" style:font-name-complex="GPAFJ+Aptos" fo:color="#000000" fo:letter-spacing="0.0006in"/>
    </style:style>
    <style:style style:name="T1361" style:parent-style-name="Policepardéfaut" style:family="text">
      <style:text-properties style:font-name="GPAFJ+Aptos" style:font-name-asian="GPAFJ+Aptos" style:font-name-complex="GPAFJ+Aptos" fo:color="#000000" style:text-scale="101%"/>
    </style:style>
    <style:style style:name="T1362" style:parent-style-name="Policepardéfaut" style:family="text">
      <style:text-properties style:font-name="GPAFJ+Aptos" style:font-name-asian="GPAFJ+Aptos" style:font-name-complex="GPAFJ+Aptos" fo:color="#000000"/>
    </style:style>
    <style:style style:name="T1363" style:parent-style-name="Policepardéfaut" style:family="text">
      <style:text-properties style:font-name="GPAFJ+Aptos" style:font-name-asian="GPAFJ+Aptos" style:font-name-complex="GPAFJ+Aptos" fo:color="#000000" style:text-scale="101%"/>
    </style:style>
    <style:style style:name="T1364" style:parent-style-name="Policepardéfaut" style:family="text">
      <style:text-properties style:font-name="GPAFJ+Aptos" style:font-name-asian="GPAFJ+Aptos" style:font-name-complex="GPAFJ+Aptos" fo:color="#000000"/>
    </style:style>
    <style:style style:name="T1365" style:parent-style-name="Policepardéfaut" style:family="text">
      <style:text-properties style:font-name="GPAFJ+Aptos" style:font-name-asian="GPAFJ+Aptos" style:font-name-complex="GPAFJ+Aptos" fo:color="#000000" fo:letter-spacing="-0.0006in"/>
    </style:style>
    <style:style style:name="T1366" style:parent-style-name="Policepardéfaut" style:family="text">
      <style:text-properties style:font-name="GPAFJ+Aptos" style:font-name-asian="GPAFJ+Aptos" style:font-name-complex="GPAFJ+Aptos" fo:color="#000000" style:text-scale="101%"/>
    </style:style>
    <style:style style:name="T1367" style:parent-style-name="Policepardéfaut" style:family="text">
      <style:text-properties style:font-name="GPAFJ+Aptos" style:font-name-asian="GPAFJ+Aptos" style:font-name-complex="GPAFJ+Aptos" fo:color="#000000"/>
    </style:style>
    <style:style style:name="T1368" style:parent-style-name="Policepardéfaut" style:family="text">
      <style:text-properties style:font-name="GPAFJ+Aptos" style:font-name-asian="GPAFJ+Aptos" style:font-name-complex="GPAFJ+Aptos" fo:color="#000000" style:text-scale="101%"/>
    </style:style>
    <style:style style:name="T1369" style:parent-style-name="Policepardéfaut" style:family="text">
      <style:text-properties style:font-name="GPAFJ+Aptos" style:font-name-asian="GPAFJ+Aptos" style:font-name-complex="GPAFJ+Aptos" fo:color="#000000"/>
    </style:style>
    <style:style style:name="T1370" style:parent-style-name="Policepardéfaut" style:family="text">
      <style:text-properties style:font-name="GPAFJ+Aptos" style:font-name-asian="GPAFJ+Aptos" style:font-name-complex="GPAFJ+Aptos" fo:color="#000000" style:text-scale="101%"/>
    </style:style>
    <style:style style:name="T1371" style:parent-style-name="Policepardéfaut" style:family="text">
      <style:text-properties style:font-name="GPAFJ+Aptos" style:font-name-asian="GPAFJ+Aptos" style:font-name-complex="GPAFJ+Aptos" fo:color="#000000" fo:letter-spacing="-0.0013in"/>
    </style:style>
    <style:style style:name="T1372" style:parent-style-name="Policepardéfaut" style:family="text">
      <style:text-properties style:font-name="GPAFJ+Aptos" style:font-name-asian="GPAFJ+Aptos" style:font-name-complex="GPAFJ+Aptos" fo:color="#000000" style:text-scale="101%"/>
    </style:style>
    <style:style style:name="T1373" style:parent-style-name="Policepardéfaut" style:family="text">
      <style:text-properties style:font-name="GPAFJ+Aptos" style:font-name-asian="GPAFJ+Aptos" style:font-name-complex="GPAFJ+Aptos" fo:color="#000000" fo:letter-spacing="-0.0006in"/>
    </style:style>
    <style:style style:name="T1374" style:parent-style-name="Policepardéfaut" style:family="text">
      <style:text-properties style:font-name="GPAFJ+Aptos" style:font-name-asian="GPAFJ+Aptos" style:font-name-complex="GPAFJ+Aptos" fo:color="#000000" fo:letter-spacing="-0.0013in" style:text-scale="101%"/>
    </style:style>
    <style:style style:name="T1375" style:parent-style-name="Policepardéfaut" style:family="text">
      <style:text-properties style:font-name="GPAFJ+Aptos" style:font-name-asian="GPAFJ+Aptos" style:font-name-complex="GPAFJ+Aptos" fo:color="#000000" style:text-scale="101%"/>
    </style:style>
    <style:style style:name="T1376" style:parent-style-name="Policepardéfaut" style:family="text">
      <style:text-properties style:font-name="GPAFJ+Aptos" style:font-name-asian="GPAFJ+Aptos" style:font-name-complex="GPAFJ+Aptos" fo:color="#000000" fo:letter-spacing="0.0006in"/>
    </style:style>
    <style:style style:name="T1377" style:parent-style-name="Policepardéfaut" style:family="text">
      <style:text-properties style:font-name="GPAFJ+Aptos" style:font-name-asian="GPAFJ+Aptos" style:font-name-complex="GPAFJ+Aptos" fo:color="#000000" style:text-scale="101%"/>
    </style:style>
    <style:style style:name="T1378" style:parent-style-name="Policepardéfaut" style:family="text">
      <style:text-properties style:font-name="GPAFJ+Aptos" style:font-name-asian="GPAFJ+Aptos" style:font-name-complex="GPAFJ+Aptos" fo:color="#000000" fo:letter-spacing="-0.0013in" style:text-scale="101%"/>
    </style:style>
    <style:style style:name="T1379" style:parent-style-name="Policepardéfaut" style:family="text">
      <style:text-properties style:font-name="GPAFJ+Aptos" style:font-name-asian="GPAFJ+Aptos" style:font-name-complex="GPAFJ+Aptos" fo:color="#000000"/>
    </style:style>
    <style:style style:name="T1380" style:parent-style-name="Policepardéfaut" style:family="text">
      <style:text-properties style:font-name="GPAFJ+Aptos" style:font-name-asian="GPAFJ+Aptos" style:font-name-complex="GPAFJ+Aptos" fo:color="#000000" style:text-scale="101%"/>
    </style:style>
    <style:style style:name="T1381" style:parent-style-name="Policepardéfaut" style:family="text">
      <style:text-properties style:font-name="GPAFJ+Aptos" style:font-name-asian="GPAFJ+Aptos" style:font-name-complex="GPAFJ+Aptos" fo:color="#000000" fo:letter-spacing="-0.0013in" style:text-scale="101%"/>
    </style:style>
    <style:style style:name="T1382" style:parent-style-name="Policepardéfaut" style:family="text">
      <style:text-properties style:font-name="GPAFJ+Aptos" style:font-name-asian="GPAFJ+Aptos" style:font-name-complex="GPAFJ+Aptos" fo:color="#000000"/>
    </style:style>
    <style:style style:name="T1383" style:parent-style-name="Policepardéfaut" style:family="text">
      <style:text-properties style:font-name="GPAFJ+Aptos" style:font-name-asian="GPAFJ+Aptos" style:font-name-complex="GPAFJ+Aptos" fo:color="#000000" fo:letter-spacing="-0.0013in" style:text-scale="101%"/>
    </style:style>
    <style:style style:name="T1384" style:parent-style-name="Policepardéfaut" style:family="text">
      <style:text-properties style:font-name="GPAFJ+Aptos" style:font-name-asian="GPAFJ+Aptos" style:font-name-complex="GPAFJ+Aptos" fo:color="#000000" style:text-scale="101%"/>
    </style:style>
    <style:style style:name="T1385" style:parent-style-name="Policepardéfaut" style:family="text">
      <style:text-properties style:font-name="GPAFJ+Aptos" style:font-name-asian="GPAFJ+Aptos" style:font-name-complex="GPAFJ+Aptos" fo:color="#000000" fo:letter-spacing="0.0006in"/>
    </style:style>
    <style:style style:name="T1386" style:parent-style-name="Policepardéfaut" style:family="text">
      <style:text-properties style:font-name="GPAFJ+Aptos" style:font-name-asian="GPAFJ+Aptos" style:font-name-complex="GPAFJ+Aptos" fo:color="#000000" style:text-scale="101%"/>
    </style:style>
    <style:style style:name="T1387" style:parent-style-name="Policepardéfaut" style:family="text">
      <style:text-properties style:font-name="GPAFJ+Aptos" style:font-name-asian="GPAFJ+Aptos" style:font-name-complex="GPAFJ+Aptos" fo:color="#000000"/>
    </style:style>
    <style:style style:name="T1388" style:parent-style-name="Policepardéfaut" style:family="text">
      <style:text-properties style:font-name="GPAFJ+Aptos" style:font-name-asian="GPAFJ+Aptos" style:font-name-complex="GPAFJ+Aptos" fo:color="#000000" fo:letter-spacing="-0.0013in"/>
    </style:style>
    <style:style style:name="T1389" style:parent-style-name="Policepardéfaut" style:family="text">
      <style:text-properties style:font-name="GPAFJ+Aptos" style:font-name-asian="GPAFJ+Aptos" style:font-name-complex="GPAFJ+Aptos" fo:color="#000000" fo:letter-spacing="-0.0013in" style:text-scale="101%"/>
    </style:style>
    <style:style style:name="T1390" style:parent-style-name="Policepardéfaut" style:family="text">
      <style:text-properties style:font-name="GPAFJ+Aptos" style:font-name-asian="GPAFJ+Aptos" style:font-name-complex="GPAFJ+Aptos" fo:color="#000000" style:text-scale="101%"/>
    </style:style>
    <style:style style:name="T1391" style:parent-style-name="Policepardéfaut" style:family="text">
      <style:text-properties style:font-name="GPAFJ+Aptos" style:font-name-asian="GPAFJ+Aptos" style:font-name-complex="GPAFJ+Aptos" fo:color="#000000" fo:letter-spacing="-0.0006in" style:text-scale="101%"/>
    </style:style>
    <style:style style:name="T1392" style:parent-style-name="Policepardéfaut" style:family="text">
      <style:text-properties style:font-name="GPAFJ+Aptos" style:font-name-asian="GPAFJ+Aptos" style:font-name-complex="GPAFJ+Aptos" fo:color="#000000"/>
    </style:style>
    <style:style style:name="T1393" style:parent-style-name="Policepardéfaut" style:family="text">
      <style:text-properties style:font-name="GPAFJ+Aptos" style:font-name-asian="GPAFJ+Aptos" style:font-name-complex="GPAFJ+Aptos" fo:color="#000000" fo:letter-spacing="-0.0006in"/>
    </style:style>
    <style:style style:name="T1394" style:parent-style-name="Policepardéfaut" style:family="text">
      <style:text-properties style:font-name="GPAFJ+Aptos" style:font-name-asian="GPAFJ+Aptos" style:font-name-complex="GPAFJ+Aptos" fo:color="#000000"/>
    </style:style>
    <style:style style:name="T1395" style:parent-style-name="Policepardéfaut" style:family="text">
      <style:text-properties style:font-name="GPAFJ+Aptos" style:font-name-asian="GPAFJ+Aptos" style:font-name-complex="GPAFJ+Aptos" fo:color="#000000" fo:letter-spacing="-0.0006in" style:text-scale="101%"/>
    </style:style>
    <style:style style:name="T1396" style:parent-style-name="Policepardéfaut" style:family="text">
      <style:text-properties style:font-name="GPAFJ+Aptos" style:font-name-asian="GPAFJ+Aptos" style:font-name-complex="GPAFJ+Aptos" fo:color="#000000" style:text-scale="101%"/>
    </style:style>
    <style:style style:name="T1397" style:parent-style-name="Policepardéfaut" style:family="text">
      <style:text-properties style:font-name="GPAFJ+Aptos" style:font-name-asian="GPAFJ+Aptos" style:font-name-complex="GPAFJ+Aptos" fo:color="#000000"/>
    </style:style>
    <style:style style:name="T1398" style:parent-style-name="Policepardéfaut" style:family="text">
      <style:text-properties style:font-name="GPAFJ+Aptos" style:font-name-asian="GPAFJ+Aptos" style:font-name-complex="GPAFJ+Aptos" fo:color="#000000" fo:letter-spacing="-0.0013in"/>
    </style:style>
    <style:style style:name="T1399" style:parent-style-name="Policepardéfaut" style:family="text">
      <style:text-properties style:font-name="GPAFJ+Aptos" style:font-name-asian="GPAFJ+Aptos" style:font-name-complex="GPAFJ+Aptos" fo:color="#000000" fo:letter-spacing="0.0006in" style:text-scale="101%"/>
    </style:style>
    <style:style style:name="T1400" style:parent-style-name="Policepardéfaut" style:family="text">
      <style:text-properties style:font-name="GPAFJ+Aptos" style:font-name-asian="GPAFJ+Aptos" style:font-name-complex="GPAFJ+Aptos" fo:color="#000000" style:text-scale="101%"/>
    </style:style>
    <style:style style:name="P1401" style:parent-style-name="Normal" style:family="paragraph">
      <style:paragraph-properties fo:text-align="justify" fo:margin-bottom="0.0131in" fo:line-height="0.0972in"/>
      <style:text-properties fo:font-size="7pt" style:font-size-asian="7pt" style:font-size-complex="7pt"/>
    </style:style>
    <style:style style:name="P1402" style:parent-style-name="Normal" style:family="paragraph">
      <style:paragraph-properties fo:widows="0" fo:orphans="0" fo:text-align="justify" fo:line-height="100%" fo:margin-left="0.25in" fo:margin-right="-0.0138in">
        <style:tab-stops>
          <style:tab-stop style:type="left" style:position="0.25in"/>
        </style:tab-stops>
      </style:paragraph-properties>
    </style:style>
    <style:style style:name="T1403" style:parent-style-name="Policepardéfaut" style:family="text">
      <style:text-properties style:font-name="Symbol" style:font-name-asian="Symbol" style:font-name-complex="Symbol" fo:color="#000000" fo:font-size="10pt" style:font-size-asian="10pt" style:font-size-complex="10pt"/>
    </style:style>
    <style:style style:name="T1404" style:parent-style-name="Policepardéfaut" style:family="text">
      <style:text-properties style:font-name="Symbol" style:font-name-asian="Symbol" style:font-name-complex="Symbol" fo:color="#000000" fo:font-size="10pt" style:font-size-asian="10pt" style:font-size-complex="10pt"/>
    </style:style>
    <style:style style:name="T1405" style:parent-style-name="Policepardéfaut" style:family="text">
      <style:text-properties style:font-name="WYAXW+Aptos" style:font-name-asian="WYAXW+Aptos" style:font-name-complex="WYAXW+Aptos" fo:font-weight="bold" style:font-weight-asian="bold" style:font-weight-complex="bold" fo:color="#000000"/>
    </style:style>
    <style:style style:name="T1406"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407" style:parent-style-name="Policepardéfaut" style:family="text">
      <style:text-properties style:font-name="WYAXW+Aptos" style:font-name-asian="WYAXW+Aptos" style:font-name-complex="WYAXW+Aptos" fo:font-weight="bold" style:font-weight-asian="bold" style:font-weight-complex="bold" fo:color="#000000" fo:letter-spacing="0.0006in" style:text-scale="101%"/>
    </style:style>
    <style:style style:name="T1408" style:parent-style-name="Policepardéfaut" style:family="text">
      <style:text-properties style:font-name="WYAXW+Aptos" style:font-name-asian="WYAXW+Aptos" style:font-name-complex="WYAXW+Aptos" fo:font-weight="bold" style:font-weight-asian="bold" style:font-weight-complex="bold" fo:color="#000000" fo:letter-spacing="-0.0013in"/>
    </style:style>
    <style:style style:name="T1409"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410"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411" style:parent-style-name="Policepardéfaut" style:family="text">
      <style:text-properties style:font-name="WYAXW+Aptos" style:font-name-asian="WYAXW+Aptos" style:font-name-complex="WYAXW+Aptos" fo:font-weight="bold" style:font-weight-asian="bold" style:font-weight-complex="bold" fo:color="#000000"/>
    </style:style>
    <style:style style:name="T1412"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413" style:parent-style-name="Policepardéfaut" style:family="text">
      <style:text-properties style:font-name="WYAXW+Aptos" style:font-name-asian="WYAXW+Aptos" style:font-name-complex="WYAXW+Aptos" fo:font-weight="bold" style:font-weight-asian="bold" style:font-weight-complex="bold" fo:color="#000000"/>
    </style:style>
    <style:style style:name="T1414"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415"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416" style:parent-style-name="Policepardéfaut" style:family="text">
      <style:text-properties style:font-name="GPAFJ+Aptos" style:font-name-asian="GPAFJ+Aptos" style:font-name-complex="GPAFJ+Aptos" fo:color="#000000" fo:letter-spacing="-0.0006in"/>
    </style:style>
    <style:style style:name="T1417" style:parent-style-name="Policepardéfaut" style:family="text">
      <style:text-properties style:font-name="GPAFJ+Aptos" style:font-name-asian="GPAFJ+Aptos" style:font-name-complex="GPAFJ+Aptos" fo:color="#000000"/>
    </style:style>
    <style:style style:name="T1418" style:parent-style-name="Policepardéfaut" style:family="text">
      <style:text-properties style:font-name="GPAFJ+Aptos" style:font-name-asian="GPAFJ+Aptos" style:font-name-complex="GPAFJ+Aptos" fo:color="#000000" fo:letter-spacing="0.0006in"/>
    </style:style>
    <style:style style:name="T1419" style:parent-style-name="Policepardéfaut" style:family="text">
      <style:text-properties style:font-name="GPAFJ+Aptos" style:font-name-asian="GPAFJ+Aptos" style:font-name-complex="GPAFJ+Aptos" fo:color="#000000" fo:letter-spacing="-0.0006in" style:text-scale="101%"/>
    </style:style>
    <style:style style:name="T1420" style:parent-style-name="Policepardéfaut" style:family="text">
      <style:text-properties style:font-name="GPAFJ+Aptos" style:font-name-asian="GPAFJ+Aptos" style:font-name-complex="GPAFJ+Aptos" fo:color="#000000"/>
    </style:style>
    <style:style style:name="T1421" style:parent-style-name="Policepardéfaut" style:family="text">
      <style:text-properties style:font-name="GPAFJ+Aptos" style:font-name-asian="GPAFJ+Aptos" style:font-name-complex="GPAFJ+Aptos" fo:color="#000000" style:text-scale="101%"/>
    </style:style>
    <style:style style:name="T1422" style:parent-style-name="Policepardéfaut" style:family="text">
      <style:text-properties style:font-name="GPAFJ+Aptos" style:font-name-asian="GPAFJ+Aptos" style:font-name-complex="GPAFJ+Aptos" fo:color="#000000"/>
    </style:style>
    <style:style style:name="T1423" style:parent-style-name="Policepardéfaut" style:family="text">
      <style:text-properties style:font-name="GPAFJ+Aptos" style:font-name-asian="GPAFJ+Aptos" style:font-name-complex="GPAFJ+Aptos" fo:color="#000000" fo:letter-spacing="-0.0006in"/>
    </style:style>
    <style:style style:name="T1424" style:parent-style-name="Policepardéfaut" style:family="text">
      <style:text-properties style:font-name="GPAFJ+Aptos" style:font-name-asian="GPAFJ+Aptos" style:font-name-complex="GPAFJ+Aptos" fo:color="#000000" fo:letter-spacing="-0.002in" style:text-scale="101%"/>
    </style:style>
    <style:style style:name="T1425" style:parent-style-name="Policepardéfaut" style:family="text">
      <style:text-properties style:font-name="GPAFJ+Aptos" style:font-name-asian="GPAFJ+Aptos" style:font-name-complex="GPAFJ+Aptos" fo:color="#000000" style:text-scale="101%"/>
    </style:style>
    <style:style style:name="T1426" style:parent-style-name="Policepardéfaut" style:family="text">
      <style:text-properties style:font-name="GPAFJ+Aptos" style:font-name-asian="GPAFJ+Aptos" style:font-name-complex="GPAFJ+Aptos" fo:color="#000000"/>
    </style:style>
    <style:style style:name="T1427" style:parent-style-name="Policepardéfaut" style:family="text">
      <style:text-properties style:font-name="GPAFJ+Aptos" style:font-name-asian="GPAFJ+Aptos" style:font-name-complex="GPAFJ+Aptos" fo:color="#000000" fo:letter-spacing="-0.0006in"/>
    </style:style>
    <style:style style:name="T1428" style:parent-style-name="Policepardéfaut" style:family="text">
      <style:text-properties style:font-name="GPAFJ+Aptos" style:font-name-asian="GPAFJ+Aptos" style:font-name-complex="GPAFJ+Aptos" fo:color="#000000"/>
    </style:style>
    <style:style style:name="T1429" style:parent-style-name="Policepardéfaut" style:family="text">
      <style:text-properties style:font-name="GPAFJ+Aptos" style:font-name-asian="GPAFJ+Aptos" style:font-name-complex="GPAFJ+Aptos" fo:color="#000000" style:text-scale="101%"/>
    </style:style>
    <style:style style:name="T1430" style:parent-style-name="Policepardéfaut" style:family="text">
      <style:text-properties style:font-name="GPAFJ+Aptos" style:font-name-asian="GPAFJ+Aptos" style:font-name-complex="GPAFJ+Aptos" fo:color="#000000" fo:letter-spacing="-0.0006in"/>
    </style:style>
    <style:style style:name="T1431" style:parent-style-name="Policepardéfaut" style:family="text">
      <style:text-properties style:font-name="GPAFJ+Aptos" style:font-name-asian="GPAFJ+Aptos" style:font-name-complex="GPAFJ+Aptos" fo:color="#000000"/>
    </style:style>
    <style:style style:name="T1432" style:parent-style-name="Policepardéfaut" style:family="text">
      <style:text-properties style:font-name="GPAFJ+Aptos" style:font-name-asian="GPAFJ+Aptos" style:font-name-complex="GPAFJ+Aptos" fo:color="#000000" style:text-scale="101%"/>
    </style:style>
    <style:style style:name="T1433" style:parent-style-name="Policepardéfaut" style:family="text">
      <style:text-properties style:font-name="GPAFJ+Aptos" style:font-name-asian="GPAFJ+Aptos" style:font-name-complex="GPAFJ+Aptos" fo:color="#000000" fo:letter-spacing="-0.0006in" style:text-scale="101%"/>
    </style:style>
    <style:style style:name="T1434" style:parent-style-name="Policepardéfaut" style:family="text">
      <style:text-properties style:font-name="GPAFJ+Aptos" style:font-name-asian="GPAFJ+Aptos" style:font-name-complex="GPAFJ+Aptos" fo:color="#000000"/>
    </style:style>
    <style:style style:name="T1435" style:parent-style-name="Policepardéfaut" style:family="text">
      <style:text-properties style:font-name="GPAFJ+Aptos" style:font-name-asian="GPAFJ+Aptos" style:font-name-complex="GPAFJ+Aptos" fo:color="#000000" style:text-scale="101%"/>
    </style:style>
    <style:style style:name="P1436" style:parent-style-name="Normal" style:family="paragraph">
      <style:paragraph-properties fo:line-height="0.1666in"/>
      <style:text-properties fo:font-size="12pt" style:font-size-asian="12pt" style:font-size-complex="12pt"/>
    </style:style>
    <style:style style:name="P1437" style:parent-style-name="Normal" style:family="paragraph">
      <style:paragraph-properties fo:line-height="0.1666in"/>
      <style:text-properties fo:font-size="12pt" style:font-size-asian="12pt" style:font-size-complex="12pt"/>
    </style:style>
    <style:style style:name="P1438" style:parent-style-name="Normal" style:family="paragraph">
      <style:paragraph-properties fo:margin-bottom="0.0069in" fo:line-height="0.0833in"/>
      <style:text-properties fo:font-size="6pt" style:font-size-asian="6pt" style:font-size-complex="6pt"/>
    </style:style>
    <style:style style:name="P1439" style:parent-style-name="Normal" style:family="paragraph">
      <style:paragraph-properties fo:widows="0" fo:orphans="0" fo:text-align="justify" fo:line-height="107%" fo:margin-right="0.4687in"/>
    </style:style>
    <style:style style:name="T1440" style:parent-style-name="Policepardéfaut" style:family="text">
      <style:text-properties style:font-name="GPAFJ+Aptos" style:font-name-asian="GPAFJ+Aptos" style:font-name-complex="GPAFJ+Aptos" fo:color="#000000"/>
    </style:style>
    <style:style style:name="T1441" style:parent-style-name="Policepardéfaut" style:family="text">
      <style:text-properties style:font-name="GPAFJ+Aptos" style:font-name-asian="GPAFJ+Aptos" style:font-name-complex="GPAFJ+Aptos" fo:color="#000000" style:text-scale="101%"/>
    </style:style>
    <style:style style:name="T1442" style:parent-style-name="Policepardéfaut" style:family="text">
      <style:text-properties style:font-name="GPAFJ+Aptos" style:font-name-asian="GPAFJ+Aptos" style:font-name-complex="GPAFJ+Aptos" fo:color="#000000" fo:letter-spacing="0.0006in"/>
    </style:style>
    <style:style style:name="T1443" style:parent-style-name="Policepardéfaut" style:family="text">
      <style:text-properties style:font-name="GPAFJ+Aptos" style:font-name-asian="GPAFJ+Aptos" style:font-name-complex="GPAFJ+Aptos" fo:color="#000000" style:text-scale="101%"/>
    </style:style>
    <style:style style:name="T1444" style:parent-style-name="Policepardéfaut" style:family="text">
      <style:text-properties style:font-name="GPAFJ+Aptos" style:font-name-asian="GPAFJ+Aptos" style:font-name-complex="GPAFJ+Aptos" fo:color="#000000"/>
    </style:style>
    <style:style style:name="T1445" style:parent-style-name="Policepardéfaut" style:family="text">
      <style:text-properties style:font-name="GPAFJ+Aptos" style:font-name-asian="GPAFJ+Aptos" style:font-name-complex="GPAFJ+Aptos" fo:color="#000000" fo:letter-spacing="-0.0006in"/>
    </style:style>
    <style:style style:name="T1446" style:parent-style-name="Policepardéfaut" style:family="text">
      <style:text-properties style:font-name="GPAFJ+Aptos" style:font-name-asian="GPAFJ+Aptos" style:font-name-complex="GPAFJ+Aptos" fo:color="#000000" style:text-scale="101%"/>
    </style:style>
    <style:style style:name="T1447" style:parent-style-name="Policepardéfaut" style:family="text">
      <style:text-properties style:font-name="GPAFJ+Aptos" style:font-name-asian="GPAFJ+Aptos" style:font-name-complex="GPAFJ+Aptos" fo:color="#000000" fo:letter-spacing="-0.0006in"/>
    </style:style>
    <style:style style:name="T1448" style:parent-style-name="Policepardéfaut" style:family="text">
      <style:text-properties style:font-name="GPAFJ+Aptos" style:font-name-asian="GPAFJ+Aptos" style:font-name-complex="GPAFJ+Aptos" fo:color="#000000" style:text-scale="101%"/>
    </style:style>
    <style:style style:name="T1449" style:parent-style-name="Policepardéfaut" style:family="text">
      <style:text-properties style:font-name="GPAFJ+Aptos" style:font-name-asian="GPAFJ+Aptos" style:font-name-complex="GPAFJ+Aptos" fo:color="#000000"/>
    </style:style>
    <style:style style:name="T1450" style:parent-style-name="Policepardéfaut" style:family="text">
      <style:text-properties style:font-name="GPAFJ+Aptos" style:font-name-asian="GPAFJ+Aptos" style:font-name-complex="GPAFJ+Aptos" fo:color="#000000" fo:letter-spacing="-0.0006in"/>
    </style:style>
    <style:style style:name="T1451" style:parent-style-name="Policepardéfaut" style:family="text">
      <style:text-properties style:font-name="GPAFJ+Aptos" style:font-name-asian="GPAFJ+Aptos" style:font-name-complex="GPAFJ+Aptos" fo:color="#000000" style:text-scale="101%"/>
    </style:style>
    <style:style style:name="T1452" style:parent-style-name="Policepardéfaut" style:family="text">
      <style:text-properties style:font-name="GPAFJ+Aptos" style:font-name-asian="GPAFJ+Aptos" style:font-name-complex="GPAFJ+Aptos" fo:color="#000000"/>
    </style:style>
    <style:style style:name="T1453" style:parent-style-name="Policepardéfaut" style:family="text">
      <style:text-properties style:font-name="GPAFJ+Aptos" style:font-name-asian="GPAFJ+Aptos" style:font-name-complex="GPAFJ+Aptos" fo:color="#000000" fo:letter-spacing="-0.0006in" style:text-scale="101%"/>
    </style:style>
    <style:style style:name="T1454" style:parent-style-name="Policepardéfaut" style:family="text">
      <style:text-properties style:font-name="GPAFJ+Aptos" style:font-name-asian="GPAFJ+Aptos" style:font-name-complex="GPAFJ+Aptos" fo:color="#000000" style:text-scale="101%"/>
    </style:style>
    <style:style style:name="T1455" style:parent-style-name="Policepardéfaut" style:family="text">
      <style:text-properties style:font-name="GPAFJ+Aptos" style:font-name-asian="GPAFJ+Aptos" style:font-name-complex="GPAFJ+Aptos" fo:color="#000000"/>
    </style:style>
    <style:style style:name="T1456" style:parent-style-name="Policepardéfaut" style:family="text">
      <style:text-properties style:font-name="GPAFJ+Aptos" style:font-name-asian="GPAFJ+Aptos" style:font-name-complex="GPAFJ+Aptos" fo:color="#000000" fo:letter-spacing="-0.0013in" style:text-scale="101%"/>
    </style:style>
    <style:style style:name="T1457" style:parent-style-name="Policepardéfaut" style:family="text">
      <style:text-properties style:font-name="GPAFJ+Aptos" style:font-name-asian="GPAFJ+Aptos" style:font-name-complex="GPAFJ+Aptos" fo:color="#000000" fo:letter-spacing="-0.0013in"/>
    </style:style>
    <style:style style:name="T1458" style:parent-style-name="Policepardéfaut" style:family="text">
      <style:text-properties style:font-name="GPAFJ+Aptos" style:font-name-asian="GPAFJ+Aptos" style:font-name-complex="GPAFJ+Aptos" fo:color="#000000" style:text-scale="101%"/>
    </style:style>
    <style:style style:name="T1459" style:parent-style-name="Policepardéfaut" style:family="text">
      <style:text-properties style:font-name="GPAFJ+Aptos" style:font-name-asian="GPAFJ+Aptos" style:font-name-complex="GPAFJ+Aptos" fo:color="#000000"/>
    </style:style>
    <style:style style:name="T1460" style:parent-style-name="Policepardéfaut" style:family="text">
      <style:text-properties style:font-name="GPAFJ+Aptos" style:font-name-asian="GPAFJ+Aptos" style:font-name-complex="GPAFJ+Aptos" fo:color="#000000" style:text-scale="101%"/>
    </style:style>
    <style:style style:name="T1461" style:parent-style-name="Policepardéfaut" style:family="text">
      <style:text-properties style:font-name="GPAFJ+Aptos" style:font-name-asian="GPAFJ+Aptos" style:font-name-complex="GPAFJ+Aptos" fo:color="#000000" fo:letter-spacing="-0.0006in"/>
    </style:style>
    <style:style style:name="T1462" style:parent-style-name="Policepardéfaut" style:family="text">
      <style:text-properties style:font-name="GPAFJ+Aptos" style:font-name-asian="GPAFJ+Aptos" style:font-name-complex="GPAFJ+Aptos" fo:color="#000000"/>
    </style:style>
    <style:style style:name="T1463" style:parent-style-name="Policepardéfaut" style:family="text">
      <style:text-properties style:font-name="GPAFJ+Aptos" style:font-name-asian="GPAFJ+Aptos" style:font-name-complex="GPAFJ+Aptos" fo:color="#000000" fo:letter-spacing="-0.0006in"/>
    </style:style>
    <style:style style:name="T1464" style:parent-style-name="Policepardéfaut" style:family="text">
      <style:text-properties style:font-name="GPAFJ+Aptos" style:font-name-asian="GPAFJ+Aptos" style:font-name-complex="GPAFJ+Aptos" fo:color="#000000" style:text-scale="101%"/>
    </style:style>
    <style:style style:name="T1465" style:parent-style-name="Policepardéfaut" style:family="text">
      <style:text-properties style:font-name="GPAFJ+Aptos" style:font-name-asian="GPAFJ+Aptos" style:font-name-complex="GPAFJ+Aptos" fo:color="#000000" fo:letter-spacing="-0.0006in"/>
    </style:style>
    <style:style style:name="T1466" style:parent-style-name="Policepardéfaut" style:family="text">
      <style:text-properties style:font-name="GPAFJ+Aptos" style:font-name-asian="GPAFJ+Aptos" style:font-name-complex="GPAFJ+Aptos" fo:color="#000000"/>
    </style:style>
    <style:style style:name="T1467" style:parent-style-name="Policepardéfaut" style:family="text">
      <style:text-properties style:font-name="GPAFJ+Aptos" style:font-name-asian="GPAFJ+Aptos" style:font-name-complex="GPAFJ+Aptos" fo:color="#000000" style:text-scale="101%"/>
    </style:style>
    <style:style style:name="T1468" style:parent-style-name="Policepardéfaut" style:family="text">
      <style:text-properties style:font-name="GPAFJ+Aptos" style:font-name-asian="GPAFJ+Aptos" style:font-name-complex="GPAFJ+Aptos" fo:color="#000000" fo:letter-spacing="-0.0006in"/>
    </style:style>
    <style:style style:name="T1469" style:parent-style-name="Policepardéfaut" style:family="text">
      <style:text-properties style:font-name="GPAFJ+Aptos" style:font-name-asian="GPAFJ+Aptos" style:font-name-complex="GPAFJ+Aptos" fo:color="#000000"/>
    </style:style>
    <style:style style:name="T1470" style:parent-style-name="Policepardéfaut" style:family="text">
      <style:text-properties style:font-name="GPAFJ+Aptos" style:font-name-asian="GPAFJ+Aptos" style:font-name-complex="GPAFJ+Aptos" fo:color="#000000" style:text-scale="101%"/>
    </style:style>
    <style:style style:name="T1471" style:parent-style-name="Policepardéfaut" style:family="text">
      <style:text-properties style:font-name="GPAFJ+Aptos" style:font-name-asian="GPAFJ+Aptos" style:font-name-complex="GPAFJ+Aptos" fo:color="#000000"/>
    </style:style>
    <style:style style:name="T1472" style:parent-style-name="Policepardéfaut" style:family="text">
      <style:text-properties style:font-name="GPAFJ+Aptos" style:font-name-asian="GPAFJ+Aptos" style:font-name-complex="GPAFJ+Aptos" fo:color="#000000" style:text-scale="101%"/>
    </style:style>
    <style:style style:name="T1473" style:parent-style-name="Policepardéfaut" style:family="text">
      <style:text-properties style:font-name="GPAFJ+Aptos" style:font-name-asian="GPAFJ+Aptos" style:font-name-complex="GPAFJ+Aptos" fo:color="#000000" fo:letter-spacing="-0.0006in" style:text-scale="101%"/>
    </style:style>
    <style:style style:name="T1474" style:parent-style-name="Policepardéfaut" style:family="text">
      <style:text-properties style:font-name="GPAFJ+Aptos" style:font-name-asian="GPAFJ+Aptos" style:font-name-complex="GPAFJ+Aptos" fo:color="#000000" style:text-scale="101%"/>
    </style:style>
    <style:style style:name="T1475" style:parent-style-name="Policepardéfaut" style:family="text">
      <style:text-properties style:font-name="GPAFJ+Aptos" style:font-name-asian="GPAFJ+Aptos" style:font-name-complex="GPAFJ+Aptos" fo:color="#000000"/>
    </style:style>
    <style:style style:name="T1476" style:parent-style-name="Policepardéfaut" style:family="text">
      <style:text-properties style:font-name="GPAFJ+Aptos" style:font-name-asian="GPAFJ+Aptos" style:font-name-complex="GPAFJ+Aptos" fo:color="#000000" fo:letter-spacing="-0.0013in" style:text-scale="101%"/>
    </style:style>
    <style:style style:name="T1477" style:parent-style-name="Policepardéfaut" style:family="text">
      <style:text-properties style:font-name="GPAFJ+Aptos" style:font-name-asian="GPAFJ+Aptos" style:font-name-complex="GPAFJ+Aptos" fo:color="#000000"/>
    </style:style>
    <style:style style:name="T1478" style:parent-style-name="Policepardéfaut" style:family="text">
      <style:text-properties style:font-name="GPAFJ+Aptos" style:font-name-asian="GPAFJ+Aptos" style:font-name-complex="GPAFJ+Aptos" fo:color="#000000" style:text-scale="101%"/>
    </style:style>
    <style:style style:name="T1479" style:parent-style-name="Policepardéfaut" style:family="text">
      <style:text-properties style:font-name="GPAFJ+Aptos" style:font-name-asian="GPAFJ+Aptos" style:font-name-complex="GPAFJ+Aptos" fo:color="#000000"/>
    </style:style>
    <style:style style:name="T1480" style:parent-style-name="Policepardéfaut" style:family="text">
      <style:text-properties style:font-name="GPAFJ+Aptos" style:font-name-asian="GPAFJ+Aptos" style:font-name-complex="GPAFJ+Aptos" fo:color="#000000" fo:letter-spacing="-0.0006in"/>
    </style:style>
    <style:style style:name="T1481" style:parent-style-name="Policepardéfaut" style:family="text">
      <style:text-properties style:font-name="GPAFJ+Aptos" style:font-name-asian="GPAFJ+Aptos" style:font-name-complex="GPAFJ+Aptos" fo:color="#000000"/>
    </style:style>
    <style:style style:name="T1482" style:parent-style-name="Policepardéfaut" style:family="text">
      <style:text-properties style:font-name="GPAFJ+Aptos" style:font-name-asian="GPAFJ+Aptos" style:font-name-complex="GPAFJ+Aptos" fo:color="#000000" style:text-scale="101%"/>
    </style:style>
    <style:style style:name="T1483" style:parent-style-name="Policepardéfaut" style:family="text">
      <style:text-properties style:font-name="GPAFJ+Aptos" style:font-name-asian="GPAFJ+Aptos" style:font-name-complex="GPAFJ+Aptos" fo:color="#000000" fo:letter-spacing="-0.0006in" style:text-scale="101%"/>
    </style:style>
    <style:style style:name="T1484" style:parent-style-name="Policepardéfaut" style:family="text">
      <style:text-properties style:font-name="GPAFJ+Aptos" style:font-name-asian="GPAFJ+Aptos" style:font-name-complex="GPAFJ+Aptos" fo:color="#000000"/>
    </style:style>
    <style:style style:name="T1485" style:parent-style-name="Policepardéfaut" style:family="text">
      <style:text-properties style:font-name="GPAFJ+Aptos" style:font-name-asian="GPAFJ+Aptos" style:font-name-complex="GPAFJ+Aptos" fo:color="#000000" fo:letter-spacing="-0.0006in"/>
    </style:style>
    <style:style style:name="T1486" style:parent-style-name="Policepardéfaut" style:family="text">
      <style:text-properties style:font-name="GPAFJ+Aptos" style:font-name-asian="GPAFJ+Aptos" style:font-name-complex="GPAFJ+Aptos" fo:color="#000000" style:text-scale="101%"/>
    </style:style>
    <style:style style:name="T1487" style:parent-style-name="Policepardéfaut" style:family="text">
      <style:text-properties style:font-name="GPAFJ+Aptos" style:font-name-asian="GPAFJ+Aptos" style:font-name-complex="GPAFJ+Aptos" fo:color="#000000"/>
    </style:style>
    <style:style style:name="T1488" style:parent-style-name="Policepardéfaut" style:family="text">
      <style:text-properties style:font-name="GPAFJ+Aptos" style:font-name-asian="GPAFJ+Aptos" style:font-name-complex="GPAFJ+Aptos" fo:color="#000000" style:text-scale="101%"/>
    </style:style>
    <style:style style:name="T1489" style:parent-style-name="Policepardéfaut" style:family="text">
      <style:text-properties style:font-name="GPAFJ+Aptos" style:font-name-asian="GPAFJ+Aptos" style:font-name-complex="GPAFJ+Aptos" fo:color="#000000"/>
    </style:style>
    <style:style style:name="T1490" style:parent-style-name="Policepardéfaut" style:family="text">
      <style:text-properties style:font-name="GPAFJ+Aptos" style:font-name-asian="GPAFJ+Aptos" style:font-name-complex="GPAFJ+Aptos" fo:color="#000000" fo:letter-spacing="-0.0006in" style:text-scale="101%"/>
    </style:style>
    <style:style style:name="T1491" style:parent-style-name="Policepardéfaut" style:family="text">
      <style:text-properties style:font-name="GPAFJ+Aptos" style:font-name-asian="GPAFJ+Aptos" style:font-name-complex="GPAFJ+Aptos" fo:color="#000000" style:text-scale="101%"/>
    </style:style>
    <style:style style:name="T1492" style:parent-style-name="Policepardéfaut" style:family="text">
      <style:text-properties style:font-name="GPAFJ+Aptos" style:font-name-asian="GPAFJ+Aptos" style:font-name-complex="GPAFJ+Aptos" fo:color="#000000" fo:letter-spacing="-0.0006in" style:text-scale="101%"/>
    </style:style>
    <style:style style:name="T1493" style:parent-style-name="Policepardéfaut" style:family="text">
      <style:text-properties style:font-name="GPAFJ+Aptos" style:font-name-asian="GPAFJ+Aptos" style:font-name-complex="GPAFJ+Aptos" fo:color="#000000" fo:letter-spacing="-0.0006in"/>
    </style:style>
    <style:style style:name="T1494" style:parent-style-name="Policepardéfaut" style:family="text">
      <style:text-properties style:font-name="GPAFJ+Aptos" style:font-name-asian="GPAFJ+Aptos" style:font-name-complex="GPAFJ+Aptos" fo:color="#000000"/>
    </style:style>
    <style:style style:name="T1495" style:parent-style-name="Policepardéfaut" style:family="text">
      <style:text-properties style:font-name="GPAFJ+Aptos" style:font-name-asian="GPAFJ+Aptos" style:font-name-complex="GPAFJ+Aptos" fo:color="#000000" style:text-scale="101%"/>
    </style:style>
    <style:style style:name="T1496" style:parent-style-name="Policepardéfaut" style:family="text">
      <style:text-properties style:font-name="GPAFJ+Aptos" style:font-name-asian="GPAFJ+Aptos" style:font-name-complex="GPAFJ+Aptos" fo:color="#000000"/>
    </style:style>
    <style:style style:name="T1497" style:parent-style-name="Policepardéfaut" style:family="text">
      <style:text-properties style:font-name="GPAFJ+Aptos" style:font-name-asian="GPAFJ+Aptos" style:font-name-complex="GPAFJ+Aptos" fo:color="#000000" fo:letter-spacing="-0.0013in" style:text-scale="101%"/>
    </style:style>
    <style:style style:name="T1498" style:parent-style-name="Policepardéfaut" style:family="text">
      <style:text-properties style:font-name="GPAFJ+Aptos" style:font-name-asian="GPAFJ+Aptos" style:font-name-complex="GPAFJ+Aptos" fo:color="#000000" style:text-scale="101%"/>
    </style:style>
    <style:style style:name="T1499" style:parent-style-name="Policepardéfaut" style:family="text">
      <style:text-properties style:font-name="GPAFJ+Aptos" style:font-name-asian="GPAFJ+Aptos" style:font-name-complex="GPAFJ+Aptos" fo:color="#000000"/>
    </style:style>
    <style:style style:name="T1500" style:parent-style-name="Policepardéfaut" style:family="text">
      <style:text-properties style:font-name="GPAFJ+Aptos" style:font-name-asian="GPAFJ+Aptos" style:font-name-complex="GPAFJ+Aptos" fo:color="#000000" style:text-scale="101%"/>
    </style:style>
    <style:style style:name="T1501" style:parent-style-name="Policepardéfaut" style:family="text">
      <style:text-properties style:font-name="GPAFJ+Aptos" style:font-name-asian="GPAFJ+Aptos" style:font-name-complex="GPAFJ+Aptos" fo:color="#000000"/>
    </style:style>
    <style:style style:name="T1502" style:parent-style-name="Policepardéfaut" style:family="text">
      <style:text-properties style:font-name="GPAFJ+Aptos" style:font-name-asian="GPAFJ+Aptos" style:font-name-complex="GPAFJ+Aptos" fo:color="#000000" style:text-scale="101%"/>
    </style:style>
    <style:style style:name="T1503" style:parent-style-name="Policepardéfaut" style:family="text">
      <style:text-properties style:font-name="GPAFJ+Aptos" style:font-name-asian="GPAFJ+Aptos" style:font-name-complex="GPAFJ+Aptos" fo:color="#000000" fo:letter-spacing="-0.002in" style:text-scale="101%"/>
    </style:style>
    <style:style style:name="T1504" style:parent-style-name="Policepardéfaut" style:family="text">
      <style:text-properties style:font-name="GPAFJ+Aptos" style:font-name-asian="GPAFJ+Aptos" style:font-name-complex="GPAFJ+Aptos" fo:color="#000000" fo:letter-spacing="-0.0006in" style:text-scale="101%"/>
    </style:style>
    <style:style style:name="T1505" style:parent-style-name="Policepardéfaut" style:family="text">
      <style:text-properties style:font-name="GPAFJ+Aptos" style:font-name-asian="GPAFJ+Aptos" style:font-name-complex="GPAFJ+Aptos" fo:color="#000000"/>
    </style:style>
    <style:style style:name="T1506" style:parent-style-name="Policepardéfaut" style:family="text">
      <style:text-properties style:font-name="GPAFJ+Aptos" style:font-name-asian="GPAFJ+Aptos" style:font-name-complex="GPAFJ+Aptos" fo:color="#000000" style:text-scale="101%"/>
    </style:style>
    <style:style style:name="T1507" style:parent-style-name="Policepardéfaut" style:family="text">
      <style:text-properties style:font-name="GPAFJ+Aptos" style:font-name-asian="GPAFJ+Aptos" style:font-name-complex="GPAFJ+Aptos" fo:color="#000000"/>
    </style:style>
    <style:style style:name="T1508" style:parent-style-name="Policepardéfaut" style:family="text">
      <style:text-properties style:font-name="GPAFJ+Aptos" style:font-name-asian="GPAFJ+Aptos" style:font-name-complex="GPAFJ+Aptos" fo:color="#000000" fo:letter-spacing="-0.0013in" style:text-scale="101%"/>
    </style:style>
    <style:style style:name="T1509" style:parent-style-name="Policepardéfaut" style:family="text">
      <style:text-properties style:font-name="GPAFJ+Aptos" style:font-name-asian="GPAFJ+Aptos" style:font-name-complex="GPAFJ+Aptos" fo:color="#000000" style:text-scale="101%"/>
    </style:style>
    <style:style style:name="T1510" style:parent-style-name="Policepardéfaut" style:family="text">
      <style:text-properties style:font-name="GPAFJ+Aptos" style:font-name-asian="GPAFJ+Aptos" style:font-name-complex="GPAFJ+Aptos" fo:color="#000000"/>
    </style:style>
    <style:style style:name="T1511" style:parent-style-name="Policepardéfaut" style:family="text">
      <style:text-properties style:font-name="GPAFJ+Aptos" style:font-name-asian="GPAFJ+Aptos" style:font-name-complex="GPAFJ+Aptos" fo:color="#000000" fo:letter-spacing="0.0006in" style:text-scale="101%"/>
    </style:style>
    <style:style style:name="T1512" style:parent-style-name="Policepardéfaut" style:family="text">
      <style:text-properties style:font-name="GPAFJ+Aptos" style:font-name-asian="GPAFJ+Aptos" style:font-name-complex="GPAFJ+Aptos" fo:color="#000000" fo:letter-spacing="-0.0013in" style:text-scale="101%"/>
    </style:style>
    <style:style style:name="T1513" style:parent-style-name="Policepardéfaut" style:family="text">
      <style:text-properties style:font-name="GPAFJ+Aptos" style:font-name-asian="GPAFJ+Aptos" style:font-name-complex="GPAFJ+Aptos" fo:color="#000000"/>
    </style:style>
    <style:style style:name="T1514" style:parent-style-name="Policepardéfaut" style:family="text">
      <style:text-properties style:font-name="GPAFJ+Aptos" style:font-name-asian="GPAFJ+Aptos" style:font-name-complex="GPAFJ+Aptos" fo:color="#000000" fo:letter-spacing="0.0006in"/>
    </style:style>
    <style:style style:name="T1515" style:parent-style-name="Policepardéfaut" style:family="text">
      <style:text-properties style:font-name="GPAFJ+Aptos" style:font-name-asian="GPAFJ+Aptos" style:font-name-complex="GPAFJ+Aptos" fo:color="#000000"/>
    </style:style>
    <style:style style:name="T1516" style:parent-style-name="Policepardéfaut" style:family="text">
      <style:text-properties style:font-name="GPAFJ+Aptos" style:font-name-asian="GPAFJ+Aptos" style:font-name-complex="GPAFJ+Aptos" fo:color="#000000" fo:letter-spacing="-0.0006in" style:text-scale="101%"/>
    </style:style>
    <style:style style:name="T1517" style:parent-style-name="Policepardéfaut" style:family="text">
      <style:text-properties style:font-name="GPAFJ+Aptos" style:font-name-asian="GPAFJ+Aptos" style:font-name-complex="GPAFJ+Aptos" fo:color="#000000" style:text-scale="101%"/>
    </style:style>
    <style:style style:name="T1518" style:parent-style-name="Policepardéfaut" style:family="text">
      <style:text-properties style:font-name="GPAFJ+Aptos" style:font-name-asian="GPAFJ+Aptos" style:font-name-complex="GPAFJ+Aptos" fo:color="#000000"/>
    </style:style>
    <style:style style:name="T1519" style:parent-style-name="Policepardéfaut" style:family="text">
      <style:text-properties style:font-name="GPAFJ+Aptos" style:font-name-asian="GPAFJ+Aptos" style:font-name-complex="GPAFJ+Aptos" fo:color="#000000" fo:letter-spacing="-0.0013in"/>
    </style:style>
    <style:style style:name="T1520" style:parent-style-name="Policepardéfaut" style:family="text">
      <style:text-properties style:font-name="GPAFJ+Aptos" style:font-name-asian="GPAFJ+Aptos" style:font-name-complex="GPAFJ+Aptos" fo:color="#000000" style:text-scale="101%"/>
    </style:style>
    <style:style style:name="T1521" style:parent-style-name="Policepardéfaut" style:family="text">
      <style:text-properties style:font-name="GPAFJ+Aptos" style:font-name-asian="GPAFJ+Aptos" style:font-name-complex="GPAFJ+Aptos" fo:color="#000000"/>
    </style:style>
    <style:style style:name="T1522" style:parent-style-name="Policepardéfaut" style:family="text">
      <style:text-properties style:font-name="GPAFJ+Aptos" style:font-name-asian="GPAFJ+Aptos" style:font-name-complex="GPAFJ+Aptos" fo:color="#000000" fo:letter-spacing="-0.002in" style:text-scale="101%"/>
    </style:style>
    <style:style style:name="T1523" style:parent-style-name="Policepardéfaut" style:family="text">
      <style:text-properties style:font-name="GPAFJ+Aptos" style:font-name-asian="GPAFJ+Aptos" style:font-name-complex="GPAFJ+Aptos" fo:color="#000000"/>
    </style:style>
    <style:style style:name="T1524" style:parent-style-name="Policepardéfaut" style:family="text">
      <style:text-properties style:font-name="GPAFJ+Aptos" style:font-name-asian="GPAFJ+Aptos" style:font-name-complex="GPAFJ+Aptos" fo:color="#000000" fo:letter-spacing="0.0006in"/>
    </style:style>
    <style:style style:name="T1525" style:parent-style-name="Policepardéfaut" style:family="text">
      <style:text-properties style:font-name="GPAFJ+Aptos" style:font-name-asian="GPAFJ+Aptos" style:font-name-complex="GPAFJ+Aptos" fo:color="#000000" fo:letter-spacing="-0.0006in"/>
    </style:style>
    <style:style style:name="T1526" style:parent-style-name="Policepardéfaut" style:family="text">
      <style:text-properties style:font-name="GPAFJ+Aptos" style:font-name-asian="GPAFJ+Aptos" style:font-name-complex="GPAFJ+Aptos" fo:color="#000000" fo:letter-spacing="-0.0013in"/>
    </style:style>
    <style:style style:name="T1527" style:parent-style-name="Policepardéfaut" style:family="text">
      <style:text-properties style:font-name="GPAFJ+Aptos" style:font-name-asian="GPAFJ+Aptos" style:font-name-complex="GPAFJ+Aptos" fo:color="#000000" style:text-scale="101%"/>
    </style:style>
    <style:style style:name="T1528" style:parent-style-name="Policepardéfaut" style:family="text">
      <style:text-properties style:font-name="GPAFJ+Aptos" style:font-name-asian="GPAFJ+Aptos" style:font-name-complex="GPAFJ+Aptos" fo:color="#000000"/>
    </style:style>
    <style:style style:name="T1529" style:parent-style-name="Policepardéfaut" style:family="text">
      <style:text-properties style:font-name="GPAFJ+Aptos" style:font-name-asian="GPAFJ+Aptos" style:font-name-complex="GPAFJ+Aptos" fo:color="#000000" fo:letter-spacing="-0.0006in" style:text-scale="101%"/>
    </style:style>
    <style:style style:name="T1530" style:parent-style-name="Policepardéfaut" style:family="text">
      <style:text-properties style:font-name="GPAFJ+Aptos" style:font-name-asian="GPAFJ+Aptos" style:font-name-complex="GPAFJ+Aptos" fo:color="#000000" style:text-scale="101%"/>
    </style:style>
    <style:style style:name="T1531" style:parent-style-name="Policepardéfaut" style:family="text">
      <style:text-properties style:font-name="GPAFJ+Aptos" style:font-name-asian="GPAFJ+Aptos" style:font-name-complex="GPAFJ+Aptos" fo:color="#000000"/>
    </style:style>
    <style:style style:name="T1532" style:parent-style-name="Policepardéfaut" style:family="text">
      <style:text-properties style:font-name="GPAFJ+Aptos" style:font-name-asian="GPAFJ+Aptos" style:font-name-complex="GPAFJ+Aptos" fo:color="#000000" style:text-scale="101%"/>
    </style:style>
    <style:style style:name="T1533" style:parent-style-name="Policepardéfaut" style:family="text">
      <style:text-properties style:font-name="GPAFJ+Aptos" style:font-name-asian="GPAFJ+Aptos" style:font-name-complex="GPAFJ+Aptos" fo:color="#000000" fo:letter-spacing="-0.0006in"/>
    </style:style>
    <style:style style:name="T1534" style:parent-style-name="Policepardéfaut" style:family="text">
      <style:text-properties style:font-name="GPAFJ+Aptos" style:font-name-asian="GPAFJ+Aptos" style:font-name-complex="GPAFJ+Aptos" fo:color="#000000"/>
    </style:style>
    <style:style style:name="T1535" style:parent-style-name="Policepardéfaut" style:family="text">
      <style:text-properties style:font-name="GPAFJ+Aptos" style:font-name-asian="GPAFJ+Aptos" style:font-name-complex="GPAFJ+Aptos" fo:color="#000000" fo:letter-spacing="-0.0006in" style:text-scale="101%"/>
    </style:style>
    <style:style style:name="T1536" style:parent-style-name="Policepardéfaut" style:family="text">
      <style:text-properties style:font-name="GPAFJ+Aptos" style:font-name-asian="GPAFJ+Aptos" style:font-name-complex="GPAFJ+Aptos" fo:color="#000000"/>
    </style:style>
    <style:style style:name="T1537" style:parent-style-name="Policepardéfaut" style:family="text">
      <style:text-properties style:font-name="GPAFJ+Aptos" style:font-name-asian="GPAFJ+Aptos" style:font-name-complex="GPAFJ+Aptos" fo:color="#000000" fo:letter-spacing="-0.0006in"/>
    </style:style>
    <style:style style:name="T1538" style:parent-style-name="Policepardéfaut" style:family="text">
      <style:text-properties style:font-name="GPAFJ+Aptos" style:font-name-asian="GPAFJ+Aptos" style:font-name-complex="GPAFJ+Aptos" fo:color="#000000"/>
    </style:style>
    <style:style style:name="T1539" style:parent-style-name="Policepardéfaut" style:family="text">
      <style:text-properties style:font-name="GPAFJ+Aptos" style:font-name-asian="GPAFJ+Aptos" style:font-name-complex="GPAFJ+Aptos" fo:color="#000000" style:text-scale="101%"/>
    </style:style>
    <style:style style:name="T1540" style:parent-style-name="Policepardéfaut" style:family="text">
      <style:text-properties style:font-name="GPAFJ+Aptos" style:font-name-asian="GPAFJ+Aptos" style:font-name-complex="GPAFJ+Aptos" fo:color="#000000" fo:letter-spacing="-0.0006in"/>
    </style:style>
    <style:style style:name="T1541" style:parent-style-name="Policepardéfaut" style:family="text">
      <style:text-properties style:font-name="GPAFJ+Aptos" style:font-name-asian="GPAFJ+Aptos" style:font-name-complex="GPAFJ+Aptos" fo:color="#000000"/>
    </style:style>
    <style:style style:name="T1542" style:parent-style-name="Policepardéfaut" style:family="text">
      <style:text-properties style:font-name="GPAFJ+Aptos" style:font-name-asian="GPAFJ+Aptos" style:font-name-complex="GPAFJ+Aptos" fo:color="#000000" style:text-scale="101%"/>
    </style:style>
    <style:style style:name="T1543" style:parent-style-name="Policepardéfaut" style:family="text">
      <style:text-properties style:font-name="GPAFJ+Aptos" style:font-name-asian="GPAFJ+Aptos" style:font-name-complex="GPAFJ+Aptos" fo:color="#000000"/>
    </style:style>
    <style:style style:name="T1544" style:parent-style-name="Policepardéfaut" style:family="text">
      <style:text-properties style:font-name="GPAFJ+Aptos" style:font-name-asian="GPAFJ+Aptos" style:font-name-complex="GPAFJ+Aptos" fo:color="#000000" style:text-scale="101%"/>
    </style:style>
    <style:style style:name="P1545" style:parent-style-name="Normal" style:family="paragraph">
      <style:paragraph-properties fo:text-align="justify" fo:margin-bottom="0.002in" fo:line-height="0.1111in"/>
      <style:text-properties fo:font-size="8pt" style:font-size-asian="8pt" style:font-size-complex="8pt"/>
    </style:style>
    <style:style style:name="P1546" style:parent-style-name="Normal" style:family="paragraph">
      <style:paragraph-properties fo:widows="0" fo:orphans="0" fo:text-align="justify" fo:line-height="100%" fo:margin-right="-0.0138in"/>
    </style:style>
    <style:style style:name="T1547" style:parent-style-name="Policepardéfaut" style:family="text">
      <style:text-properties style:font-name="WYAXW+Aptos" style:font-name-asian="WYAXW+Aptos" style:font-name-complex="WYAXW+Aptos" fo:font-weight="bold" style:font-weight-asian="bold" style:font-weight-complex="bold" fo:color="#000000"/>
    </style:style>
    <style:style style:name="T1548" style:parent-style-name="Policepardéfaut" style:family="text">
      <style:text-properties style:font-name="WYAXW+Aptos" style:font-name-asian="WYAXW+Aptos" style:font-name-complex="WYAXW+Aptos" fo:font-weight="bold" style:font-weight-asian="bold" style:font-weight-complex="bold" fo:color="#000000" fo:letter-spacing="0.0006in" style:text-scale="101%"/>
    </style:style>
    <style:style style:name="T1549"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550" style:parent-style-name="Policepardéfaut" style:family="text">
      <style:text-properties style:font-name="WYAXW+Aptos" style:font-name-asian="WYAXW+Aptos" style:font-name-complex="WYAXW+Aptos" fo:font-weight="bold" style:font-weight-asian="bold" style:font-weight-complex="bold" fo:color="#000000"/>
    </style:style>
    <style:style style:name="T1551"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552" style:parent-style-name="Policepardéfaut" style:family="text">
      <style:text-properties style:font-name="WYAXW+Aptos" style:font-name-asian="WYAXW+Aptos" style:font-name-complex="WYAXW+Aptos" fo:font-weight="bold" style:font-weight-asian="bold" style:font-weight-complex="bold" fo:color="#000000"/>
    </style:style>
    <style:style style:name="T1553"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554" style:parent-style-name="Policepardéfaut" style:family="text">
      <style:text-properties style:font-name="WYAXW+Aptos" style:font-name-asian="WYAXW+Aptos" style:font-name-complex="WYAXW+Aptos" fo:font-weight="bold" style:font-weight-asian="bold" style:font-weight-complex="bold" fo:color="#000000"/>
    </style:style>
    <style:style style:name="T1555"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556" style:parent-style-name="Policepardéfaut" style:family="text">
      <style:text-properties style:font-name="WYAXW+Aptos" style:font-name-asian="WYAXW+Aptos" style:font-name-complex="WYAXW+Aptos" fo:font-weight="bold" style:font-weight-asian="bold" style:font-weight-complex="bold" fo:color="#000000" fo:letter-spacing="-0.002in"/>
    </style:style>
    <style:style style:name="T1557" style:parent-style-name="Policepardéfaut" style:family="text">
      <style:text-properties style:font-name="WYAXW+Aptos" style:font-name-asian="WYAXW+Aptos" style:font-name-complex="WYAXW+Aptos" fo:font-weight="bold" style:font-weight-asian="bold" style:font-weight-complex="bold" fo:color="#000000"/>
    </style:style>
    <style:style style:name="T1558"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559"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560"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561" style:parent-style-name="Policepardéfaut" style:family="text">
      <style:text-properties style:font-name="WYAXW+Aptos" style:font-name-asian="WYAXW+Aptos" style:font-name-complex="WYAXW+Aptos" fo:font-weight="bold" style:font-weight-asian="bold" style:font-weight-complex="bold" fo:color="#000000"/>
    </style:style>
    <style:style style:name="T1562" style:parent-style-name="Policepardéfaut" style:family="text">
      <style:text-properties style:font-name="WYAXW+Aptos" style:font-name-asian="WYAXW+Aptos" style:font-name-complex="WYAXW+Aptos" fo:font-weight="bold" style:font-weight-asian="bold" style:font-weight-complex="bold" fo:color="#000000" fo:letter-spacing="-0.0013in"/>
    </style:style>
    <style:style style:name="T1563"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564" style:parent-style-name="Policepardéfaut" style:family="text">
      <style:text-properties style:font-name="WYAXW+Aptos" style:font-name-asian="WYAXW+Aptos" style:font-name-complex="WYAXW+Aptos" fo:font-weight="bold" style:font-weight-asian="bold" style:font-weight-complex="bold" fo:color="#000000"/>
    </style:style>
    <style:style style:name="T1565"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566"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567"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P1568" style:parent-style-name="Normal" style:family="paragraph">
      <style:paragraph-properties fo:text-align="justify" fo:line-height="0.125in"/>
      <style:text-properties fo:font-size="9pt" style:font-size-asian="9pt" style:font-size-complex="9pt"/>
    </style:style>
    <style:style style:name="P1569" style:parent-style-name="Normal" style:family="paragraph">
      <style:paragraph-properties fo:widows="0" fo:orphans="0" fo:text-align="justify" fo:line-height="107%" fo:margin-left="0.5in" fo:margin-right="0.427in" fo:text-indent="-0.2493in">
        <style:tab-stops/>
      </style:paragraph-properties>
    </style:style>
    <style:style style:name="T1570" style:parent-style-name="Policepardéfaut" style:family="text">
      <style:text-properties style:font-name="Symbol" style:font-name-asian="Symbol" style:font-name-complex="Symbol" fo:color="#000000" fo:font-size="10pt" style:font-size-asian="10pt" style:font-size-complex="10pt"/>
    </style:style>
    <style:style style:name="T1571" style:parent-style-name="Policepardéfaut" style:family="text">
      <style:text-properties style:font-name="Symbol" style:font-name-asian="Symbol" style:font-name-complex="Symbol" fo:color="#000000" fo:font-size="10pt" style:font-size-asian="10pt" style:font-size-complex="10pt"/>
    </style:style>
    <style:style style:name="T1572" style:parent-style-name="Policepardéfaut" style:family="text">
      <style:text-properties style:font-name="WYAXW+Aptos" style:font-name-asian="WYAXW+Aptos" style:font-name-complex="WYAXW+Aptos" fo:font-weight="bold" style:font-weight-asian="bold" style:font-weight-complex="bold" fo:color="#000000"/>
    </style:style>
    <style:style style:name="T1573"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574" style:parent-style-name="Policepardéfaut" style:family="text">
      <style:text-properties style:font-name="WYAXW+Aptos" style:font-name-asian="WYAXW+Aptos" style:font-name-complex="WYAXW+Aptos" fo:font-weight="bold" style:font-weight-asian="bold" style:font-weight-complex="bold" fo:color="#000000" fo:letter-spacing="-0.0006in" style:text-scale="101%"/>
    </style:style>
    <style:style style:name="T1575"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576"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577"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578" style:parent-style-name="Policepardéfaut" style:family="text">
      <style:text-properties style:font-name="WYAXW+Aptos" style:font-name-asian="WYAXW+Aptos" style:font-name-complex="WYAXW+Aptos" fo:font-weight="bold" style:font-weight-asian="bold" style:font-weight-complex="bold" fo:color="#000000"/>
    </style:style>
    <style:style style:name="T1579"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580" style:parent-style-name="Policepardéfaut" style:family="text">
      <style:text-properties style:font-name="WYAXW+Aptos" style:font-name-asian="WYAXW+Aptos" style:font-name-complex="WYAXW+Aptos" fo:font-weight="bold" style:font-weight-asian="bold" style:font-weight-complex="bold" fo:color="#000000"/>
    </style:style>
    <style:style style:name="T1581"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582" style:parent-style-name="Policepardéfaut" style:family="text">
      <style:text-properties style:font-name="GPAFJ+Aptos" style:font-name-asian="GPAFJ+Aptos" style:font-name-complex="GPAFJ+Aptos" fo:color="#000000" style:text-scale="101%"/>
    </style:style>
    <style:style style:name="T1583" style:parent-style-name="Policepardéfaut" style:family="text">
      <style:text-properties style:font-name="GPAFJ+Aptos" style:font-name-asian="GPAFJ+Aptos" style:font-name-complex="GPAFJ+Aptos" fo:color="#000000"/>
    </style:style>
    <style:style style:name="T1584" style:parent-style-name="Policepardéfaut" style:family="text">
      <style:text-properties style:font-name="GPAFJ+Aptos" style:font-name-asian="GPAFJ+Aptos" style:font-name-complex="GPAFJ+Aptos" fo:color="#000000" fo:letter-spacing="-0.0013in"/>
    </style:style>
    <style:style style:name="T1585" style:parent-style-name="Policepardéfaut" style:family="text">
      <style:text-properties style:font-name="GPAFJ+Aptos" style:font-name-asian="GPAFJ+Aptos" style:font-name-complex="GPAFJ+Aptos" fo:color="#000000" style:text-scale="101%"/>
    </style:style>
    <style:style style:name="T1586" style:parent-style-name="Policepardéfaut" style:family="text">
      <style:text-properties style:font-name="GPAFJ+Aptos" style:font-name-asian="GPAFJ+Aptos" style:font-name-complex="GPAFJ+Aptos" fo:color="#000000"/>
    </style:style>
    <style:style style:name="T1587" style:parent-style-name="Policepardéfaut" style:family="text">
      <style:text-properties style:font-name="GPAFJ+Aptos" style:font-name-asian="GPAFJ+Aptos" style:font-name-complex="GPAFJ+Aptos" fo:color="#000000" style:text-scale="101%"/>
    </style:style>
    <style:style style:name="T1588" style:parent-style-name="Policepardéfaut" style:family="text">
      <style:text-properties style:font-name="GPAFJ+Aptos" style:font-name-asian="GPAFJ+Aptos" style:font-name-complex="GPAFJ+Aptos" fo:color="#000000"/>
    </style:style>
    <style:style style:name="T1589" style:parent-style-name="Policepardéfaut" style:family="text">
      <style:text-properties style:font-name="GPAFJ+Aptos" style:font-name-asian="GPAFJ+Aptos" style:font-name-complex="GPAFJ+Aptos" fo:color="#000000" fo:letter-spacing="-0.0013in"/>
    </style:style>
    <style:style style:name="T1590" style:parent-style-name="Policepardéfaut" style:family="text">
      <style:text-properties style:font-name="GPAFJ+Aptos" style:font-name-asian="GPAFJ+Aptos" style:font-name-complex="GPAFJ+Aptos" fo:color="#000000" fo:letter-spacing="-0.0006in" style:text-scale="101%"/>
    </style:style>
    <style:style style:name="T1591" style:parent-style-name="Policepardéfaut" style:family="text">
      <style:text-properties style:font-name="GPAFJ+Aptos" style:font-name-asian="GPAFJ+Aptos" style:font-name-complex="GPAFJ+Aptos" fo:color="#000000"/>
    </style:style>
    <style:style style:name="T1592" style:parent-style-name="Policepardéfaut" style:family="text">
      <style:text-properties style:font-name="GPAFJ+Aptos" style:font-name-asian="GPAFJ+Aptos" style:font-name-complex="GPAFJ+Aptos" fo:color="#000000" style:text-scale="101%"/>
    </style:style>
    <style:style style:name="T1593" style:parent-style-name="Policepardéfaut" style:family="text">
      <style:text-properties style:font-name="GPAFJ+Aptos" style:font-name-asian="GPAFJ+Aptos" style:font-name-complex="GPAFJ+Aptos" fo:color="#000000" fo:letter-spacing="-0.0006in"/>
    </style:style>
    <style:style style:name="T1594" style:parent-style-name="Policepardéfaut" style:family="text">
      <style:text-properties style:font-name="GPAFJ+Aptos" style:font-name-asian="GPAFJ+Aptos" style:font-name-complex="GPAFJ+Aptos" fo:color="#000000"/>
    </style:style>
    <style:style style:name="T1595" style:parent-style-name="Policepardéfaut" style:family="text">
      <style:text-properties style:font-name="GPAFJ+Aptos" style:font-name-asian="GPAFJ+Aptos" style:font-name-complex="GPAFJ+Aptos" fo:color="#000000" style:text-scale="101%"/>
    </style:style>
    <style:style style:name="T1596" style:parent-style-name="Policepardéfaut" style:family="text">
      <style:text-properties style:font-name="GPAFJ+Aptos" style:font-name-asian="GPAFJ+Aptos" style:font-name-complex="GPAFJ+Aptos" fo:color="#000000"/>
    </style:style>
    <style:style style:name="T1597" style:parent-style-name="Policepardéfaut" style:family="text">
      <style:text-properties style:font-name="GPAFJ+Aptos" style:font-name-asian="GPAFJ+Aptos" style:font-name-complex="GPAFJ+Aptos" fo:color="#000000" fo:letter-spacing="-0.0006in"/>
    </style:style>
    <style:style style:name="T1598" style:parent-style-name="Policepardéfaut" style:family="text">
      <style:text-properties style:font-name="GPAFJ+Aptos" style:font-name-asian="GPAFJ+Aptos" style:font-name-complex="GPAFJ+Aptos" fo:color="#000000"/>
    </style:style>
    <style:style style:name="T1599" style:parent-style-name="Policepardéfaut" style:family="text">
      <style:text-properties style:font-name="GPAFJ+Aptos" style:font-name-asian="GPAFJ+Aptos" style:font-name-complex="GPAFJ+Aptos" fo:color="#000000" fo:letter-spacing="-0.0006in" style:text-scale="101%"/>
    </style:style>
    <style:style style:name="T1600" style:parent-style-name="Policepardéfaut" style:family="text">
      <style:text-properties style:font-name="GPAFJ+Aptos" style:font-name-asian="GPAFJ+Aptos" style:font-name-complex="GPAFJ+Aptos" fo:color="#000000"/>
    </style:style>
    <style:style style:name="T1601" style:parent-style-name="Policepardéfaut" style:family="text">
      <style:text-properties style:font-name="GPAFJ+Aptos" style:font-name-asian="GPAFJ+Aptos" style:font-name-complex="GPAFJ+Aptos" fo:color="#000000" style:text-scale="101%"/>
    </style:style>
    <style:style style:name="T1602" style:parent-style-name="Policepardéfaut" style:family="text">
      <style:text-properties style:font-name="GPAFJ+Aptos" style:font-name-asian="GPAFJ+Aptos" style:font-name-complex="GPAFJ+Aptos" fo:color="#000000" fo:letter-spacing="-0.0006in" style:text-scale="101%"/>
    </style:style>
    <style:style style:name="T1603" style:parent-style-name="Policepardéfaut" style:family="text">
      <style:text-properties style:font-name="GPAFJ+Aptos" style:font-name-asian="GPAFJ+Aptos" style:font-name-complex="GPAFJ+Aptos" fo:color="#000000"/>
    </style:style>
    <style:style style:name="T1604" style:parent-style-name="Policepardéfaut" style:family="text">
      <style:text-properties style:font-name="GPAFJ+Aptos" style:font-name-asian="GPAFJ+Aptos" style:font-name-complex="GPAFJ+Aptos" fo:color="#000000" fo:letter-spacing="-0.0006in" style:text-scale="101%"/>
    </style:style>
    <style:style style:name="T1605" style:parent-style-name="Policepardéfaut" style:family="text">
      <style:text-properties style:font-name="GPAFJ+Aptos" style:font-name-asian="GPAFJ+Aptos" style:font-name-complex="GPAFJ+Aptos" fo:color="#000000" fo:letter-spacing="-0.0013in"/>
    </style:style>
    <style:style style:name="T1606" style:parent-style-name="Policepardéfaut" style:family="text">
      <style:text-properties style:font-name="GPAFJ+Aptos" style:font-name-asian="GPAFJ+Aptos" style:font-name-complex="GPAFJ+Aptos" fo:color="#000000" style:text-scale="101%"/>
    </style:style>
    <style:style style:name="T1607" style:parent-style-name="Policepardéfaut" style:family="text">
      <style:text-properties style:font-name="GPAFJ+Aptos" style:font-name-asian="GPAFJ+Aptos" style:font-name-complex="GPAFJ+Aptos" fo:color="#000000" fo:letter-spacing="0.0006in"/>
    </style:style>
    <style:style style:name="T1608" style:parent-style-name="Policepardéfaut" style:family="text">
      <style:text-properties style:font-name="GPAFJ+Aptos" style:font-name-asian="GPAFJ+Aptos" style:font-name-complex="GPAFJ+Aptos" fo:color="#000000"/>
    </style:style>
    <style:style style:name="T1609" style:parent-style-name="Policepardéfaut" style:family="text">
      <style:text-properties style:font-name="GPAFJ+Aptos" style:font-name-asian="GPAFJ+Aptos" style:font-name-complex="GPAFJ+Aptos" fo:color="#000000" fo:letter-spacing="-0.0013in"/>
    </style:style>
    <style:style style:name="T1610" style:parent-style-name="Policepardéfaut" style:family="text">
      <style:text-properties style:font-name="GPAFJ+Aptos" style:font-name-asian="GPAFJ+Aptos" style:font-name-complex="GPAFJ+Aptos" fo:color="#000000"/>
    </style:style>
    <style:style style:name="T1611" style:parent-style-name="Policepardéfaut" style:family="text">
      <style:text-properties style:font-name="GPAFJ+Aptos" style:font-name-asian="GPAFJ+Aptos" style:font-name-complex="GPAFJ+Aptos" fo:color="#000000" fo:letter-spacing="-0.0006in"/>
    </style:style>
    <style:style style:name="T1612" style:parent-style-name="Policepardéfaut" style:family="text">
      <style:text-properties style:font-name="GPAFJ+Aptos" style:font-name-asian="GPAFJ+Aptos" style:font-name-complex="GPAFJ+Aptos" fo:color="#000000" style:text-scale="101%"/>
    </style:style>
    <style:style style:name="T1613" style:parent-style-name="Policepardéfaut" style:family="text">
      <style:text-properties style:font-name="GPAFJ+Aptos" style:font-name-asian="GPAFJ+Aptos" style:font-name-complex="GPAFJ+Aptos" fo:color="#000000" fo:letter-spacing="0.0006in"/>
    </style:style>
    <style:style style:name="T1614" style:parent-style-name="Policepardéfaut" style:family="text">
      <style:text-properties style:font-name="GPAFJ+Aptos" style:font-name-asian="GPAFJ+Aptos" style:font-name-complex="GPAFJ+Aptos" fo:color="#000000" style:text-scale="101%"/>
    </style:style>
    <style:style style:name="T1615" style:parent-style-name="Policepardéfaut" style:family="text">
      <style:text-properties style:font-name="GPAFJ+Aptos" style:font-name-asian="GPAFJ+Aptos" style:font-name-complex="GPAFJ+Aptos" fo:color="#000000" fo:letter-spacing="-0.0013in" style:text-scale="101%"/>
    </style:style>
    <style:style style:name="T1616" style:parent-style-name="Policepardéfaut" style:family="text">
      <style:text-properties style:font-name="GPAFJ+Aptos" style:font-name-asian="GPAFJ+Aptos" style:font-name-complex="GPAFJ+Aptos" fo:color="#000000" fo:letter-spacing="-0.0013in"/>
    </style:style>
    <style:style style:name="T1617" style:parent-style-name="Policepardéfaut" style:family="text">
      <style:text-properties style:font-name="GPAFJ+Aptos" style:font-name-asian="GPAFJ+Aptos" style:font-name-complex="GPAFJ+Aptos" fo:color="#000000" fo:letter-spacing="0.0006in"/>
    </style:style>
    <style:style style:name="T1618" style:parent-style-name="Policepardéfaut" style:family="text">
      <style:text-properties style:font-name="GPAFJ+Aptos" style:font-name-asian="GPAFJ+Aptos" style:font-name-complex="GPAFJ+Aptos" fo:color="#000000"/>
    </style:style>
    <style:style style:name="T1619" style:parent-style-name="Policepardéfaut" style:family="text">
      <style:text-properties style:font-name="GPAFJ+Aptos" style:font-name-asian="GPAFJ+Aptos" style:font-name-complex="GPAFJ+Aptos" fo:color="#000000" style:text-scale="101%"/>
    </style:style>
    <style:style style:name="T1620" style:parent-style-name="Policepardéfaut" style:family="text">
      <style:text-properties style:font-name="GPAFJ+Aptos" style:font-name-asian="GPAFJ+Aptos" style:font-name-complex="GPAFJ+Aptos" fo:color="#000000"/>
    </style:style>
    <style:style style:name="T1621" style:parent-style-name="Policepardéfaut" style:family="text">
      <style:text-properties style:font-name="GPAFJ+Aptos" style:font-name-asian="GPAFJ+Aptos" style:font-name-complex="GPAFJ+Aptos" fo:color="#000000" style:text-scale="101%"/>
    </style:style>
    <style:style style:name="T1622" style:parent-style-name="Policepardéfaut" style:family="text">
      <style:text-properties style:font-name="GPAFJ+Aptos" style:font-name-asian="GPAFJ+Aptos" style:font-name-complex="GPAFJ+Aptos" fo:color="#000000"/>
    </style:style>
    <style:style style:name="T1623" style:parent-style-name="Policepardéfaut" style:family="text">
      <style:text-properties style:font-name="GPAFJ+Aptos" style:font-name-asian="GPAFJ+Aptos" style:font-name-complex="GPAFJ+Aptos" fo:color="#000000" fo:letter-spacing="-0.0013in" style:text-scale="101%"/>
    </style:style>
    <style:style style:name="T1624" style:parent-style-name="Policepardéfaut" style:family="text">
      <style:text-properties style:font-name="GPAFJ+Aptos" style:font-name-asian="GPAFJ+Aptos" style:font-name-complex="GPAFJ+Aptos" fo:color="#000000" style:text-scale="101%"/>
    </style:style>
    <style:style style:name="T1625" style:parent-style-name="Policepardéfaut" style:family="text">
      <style:text-properties style:font-name="GPAFJ+Aptos" style:font-name-asian="GPAFJ+Aptos" style:font-name-complex="GPAFJ+Aptos" fo:color="#000000"/>
    </style:style>
    <style:style style:name="T1626" style:parent-style-name="Policepardéfaut" style:family="text">
      <style:text-properties style:font-name="GPAFJ+Aptos" style:font-name-asian="GPAFJ+Aptos" style:font-name-complex="GPAFJ+Aptos" fo:color="#000000" fo:letter-spacing="-0.0006in"/>
    </style:style>
    <style:style style:name="T1627" style:parent-style-name="Policepardéfaut" style:family="text">
      <style:text-properties style:font-name="GPAFJ+Aptos" style:font-name-asian="GPAFJ+Aptos" style:font-name-complex="GPAFJ+Aptos" fo:color="#000000" style:text-scale="101%"/>
    </style:style>
    <style:style style:name="T1628" style:parent-style-name="Policepardéfaut" style:family="text">
      <style:text-properties style:font-name="GPAFJ+Aptos" style:font-name-asian="GPAFJ+Aptos" style:font-name-complex="GPAFJ+Aptos" fo:color="#000000" fo:letter-spacing="-0.0013in" style:text-scale="101%"/>
    </style:style>
    <style:style style:name="T1629" style:parent-style-name="Policepardéfaut" style:family="text">
      <style:text-properties style:font-name="GPAFJ+Aptos" style:font-name-asian="GPAFJ+Aptos" style:font-name-complex="GPAFJ+Aptos" fo:color="#000000"/>
    </style:style>
    <style:style style:name="T1630" style:parent-style-name="Policepardéfaut" style:family="text">
      <style:text-properties style:font-name="GPAFJ+Aptos" style:font-name-asian="GPAFJ+Aptos" style:font-name-complex="GPAFJ+Aptos" fo:color="#000000" style:text-scale="101%"/>
    </style:style>
    <style:style style:name="T1631" style:parent-style-name="Policepardéfaut" style:family="text">
      <style:text-properties style:font-name="GPAFJ+Aptos" style:font-name-asian="GPAFJ+Aptos" style:font-name-complex="GPAFJ+Aptos" fo:color="#000000" fo:letter-spacing="-0.002in"/>
    </style:style>
    <style:style style:name="T1632" style:parent-style-name="Policepardéfaut" style:family="text">
      <style:text-properties style:font-name="GPAFJ+Aptos" style:font-name-asian="GPAFJ+Aptos" style:font-name-complex="GPAFJ+Aptos" fo:color="#000000" style:text-scale="101%"/>
    </style:style>
    <style:style style:name="T1633" style:parent-style-name="Policepardéfaut" style:family="text">
      <style:text-properties style:font-name="GPAFJ+Aptos" style:font-name-asian="GPAFJ+Aptos" style:font-name-complex="GPAFJ+Aptos" fo:color="#000000"/>
    </style:style>
    <style:style style:name="T1634" style:parent-style-name="Policepardéfaut" style:family="text">
      <style:text-properties style:font-name="GPAFJ+Aptos" style:font-name-asian="GPAFJ+Aptos" style:font-name-complex="GPAFJ+Aptos" fo:color="#000000" fo:letter-spacing="-0.0013in" style:text-scale="101%"/>
    </style:style>
    <style:style style:name="T1635" style:parent-style-name="Policepardéfaut" style:family="text">
      <style:text-properties style:font-name="GPAFJ+Aptos" style:font-name-asian="GPAFJ+Aptos" style:font-name-complex="GPAFJ+Aptos" fo:color="#000000" style:text-scale="101%"/>
    </style:style>
    <style:style style:name="T1636" style:parent-style-name="Policepardéfaut" style:family="text">
      <style:text-properties style:font-name="GPAFJ+Aptos" style:font-name-asian="GPAFJ+Aptos" style:font-name-complex="GPAFJ+Aptos" fo:color="#000000"/>
    </style:style>
    <style:style style:name="T1637" style:parent-style-name="Policepardéfaut" style:family="text">
      <style:text-properties style:font-name="GPAFJ+Aptos" style:font-name-asian="GPAFJ+Aptos" style:font-name-complex="GPAFJ+Aptos" fo:color="#000000" style:text-scale="101%"/>
    </style:style>
    <style:style style:name="T1638" style:parent-style-name="Policepardéfaut" style:family="text">
      <style:text-properties style:font-name="GPAFJ+Aptos" style:font-name-asian="GPAFJ+Aptos" style:font-name-complex="GPAFJ+Aptos" fo:color="#000000" fo:letter-spacing="-0.0006in" style:text-scale="101%"/>
    </style:style>
    <style:style style:name="T1639" style:parent-style-name="Policepardéfaut" style:family="text">
      <style:text-properties style:font-name="GPAFJ+Aptos" style:font-name-asian="GPAFJ+Aptos" style:font-name-complex="GPAFJ+Aptos" fo:color="#000000" style:text-scale="101%"/>
    </style:style>
    <style:style style:name="T1640" style:parent-style-name="Policepardéfaut" style:family="text">
      <style:text-properties style:font-name="GPAFJ+Aptos" style:font-name-asian="GPAFJ+Aptos" style:font-name-complex="GPAFJ+Aptos" fo:color="#000000"/>
    </style:style>
    <style:style style:name="T1641" style:parent-style-name="Policepardéfaut" style:family="text">
      <style:text-properties style:font-name="GPAFJ+Aptos" style:font-name-asian="GPAFJ+Aptos" style:font-name-complex="GPAFJ+Aptos" fo:color="#000000" style:text-scale="101%"/>
    </style:style>
    <style:style style:name="T1642" style:parent-style-name="Policepardéfaut" style:family="text">
      <style:text-properties style:font-name="GPAFJ+Aptos" style:font-name-asian="GPAFJ+Aptos" style:font-name-complex="GPAFJ+Aptos" fo:color="#000000"/>
    </style:style>
    <style:style style:name="T1643" style:parent-style-name="Policepardéfaut" style:family="text">
      <style:text-properties style:font-name="GPAFJ+Aptos" style:font-name-asian="GPAFJ+Aptos" style:font-name-complex="GPAFJ+Aptos" fo:color="#000000" fo:letter-spacing="-0.0006in" style:text-scale="101%"/>
    </style:style>
    <style:style style:name="T1644" style:parent-style-name="Policepardéfaut" style:family="text">
      <style:text-properties style:font-name="GPAFJ+Aptos" style:font-name-asian="GPAFJ+Aptos" style:font-name-complex="GPAFJ+Aptos" fo:color="#000000" style:text-scale="101%"/>
    </style:style>
    <style:style style:name="T1645" style:parent-style-name="Policepardéfaut" style:family="text">
      <style:text-properties style:font-name="GPAFJ+Aptos" style:font-name-asian="GPAFJ+Aptos" style:font-name-complex="GPAFJ+Aptos" fo:color="#000000" fo:letter-spacing="-0.0006in" style:text-scale="101%"/>
    </style:style>
    <style:style style:name="T1646" style:parent-style-name="Policepardéfaut" style:family="text">
      <style:text-properties style:font-name="GPAFJ+Aptos" style:font-name-asian="GPAFJ+Aptos" style:font-name-complex="GPAFJ+Aptos" fo:color="#000000"/>
    </style:style>
    <style:style style:name="T1647" style:parent-style-name="Policepardéfaut" style:family="text">
      <style:text-properties style:font-name="GPAFJ+Aptos" style:font-name-asian="GPAFJ+Aptos" style:font-name-complex="GPAFJ+Aptos" fo:color="#000000" fo:letter-spacing="-0.002in" style:text-scale="101%"/>
    </style:style>
    <style:style style:name="T1648" style:parent-style-name="Policepardéfaut" style:family="text">
      <style:text-properties style:font-name="GPAFJ+Aptos" style:font-name-asian="GPAFJ+Aptos" style:font-name-complex="GPAFJ+Aptos" fo:color="#000000" style:text-scale="101%"/>
    </style:style>
    <style:style style:name="T1649" style:parent-style-name="Policepardéfaut" style:family="text">
      <style:text-properties style:font-name="GPAFJ+Aptos" style:font-name-asian="GPAFJ+Aptos" style:font-name-complex="GPAFJ+Aptos" fo:color="#000000"/>
    </style:style>
    <style:style style:name="T1650" style:parent-style-name="Policepardéfaut" style:family="text">
      <style:text-properties style:font-name="GPAFJ+Aptos" style:font-name-asian="GPAFJ+Aptos" style:font-name-complex="GPAFJ+Aptos" fo:color="#000000" style:text-scale="101%"/>
    </style:style>
    <style:style style:name="T1651" style:parent-style-name="Policepardéfaut" style:family="text">
      <style:text-properties style:font-name="GPAFJ+Aptos" style:font-name-asian="GPAFJ+Aptos" style:font-name-complex="GPAFJ+Aptos" fo:color="#000000" fo:letter-spacing="-0.0013in" style:text-scale="101%"/>
    </style:style>
    <style:style style:name="T1652" style:parent-style-name="Policepardéfaut" style:family="text">
      <style:text-properties style:font-name="GPAFJ+Aptos" style:font-name-asian="GPAFJ+Aptos" style:font-name-complex="GPAFJ+Aptos" fo:color="#000000" fo:letter-spacing="-0.0006in"/>
    </style:style>
    <style:style style:name="T1653" style:parent-style-name="Policepardéfaut" style:family="text">
      <style:text-properties style:font-name="GPAFJ+Aptos" style:font-name-asian="GPAFJ+Aptos" style:font-name-complex="GPAFJ+Aptos" fo:color="#000000" fo:letter-spacing="0.0006in"/>
    </style:style>
    <style:style style:name="T1654" style:parent-style-name="Policepardéfaut" style:family="text">
      <style:text-properties style:font-name="GPAFJ+Aptos" style:font-name-asian="GPAFJ+Aptos" style:font-name-complex="GPAFJ+Aptos" fo:color="#000000" fo:letter-spacing="-0.0006in"/>
    </style:style>
    <style:style style:name="T1655" style:parent-style-name="Policepardéfaut" style:family="text">
      <style:text-properties style:font-name="GPAFJ+Aptos" style:font-name-asian="GPAFJ+Aptos" style:font-name-complex="GPAFJ+Aptos" fo:color="#000000" style:text-scale="101%"/>
    </style:style>
    <style:style style:name="T1656" style:parent-style-name="Policepardéfaut" style:family="text">
      <style:text-properties style:font-name="GPAFJ+Aptos" style:font-name-asian="GPAFJ+Aptos" style:font-name-complex="GPAFJ+Aptos" fo:color="#000000" fo:letter-spacing="-0.0006in"/>
    </style:style>
    <style:style style:name="T1657" style:parent-style-name="Policepardéfaut" style:family="text">
      <style:text-properties style:font-name="GPAFJ+Aptos" style:font-name-asian="GPAFJ+Aptos" style:font-name-complex="GPAFJ+Aptos" fo:color="#000000"/>
    </style:style>
    <style:style style:name="T1658" style:parent-style-name="Policepardéfaut" style:family="text">
      <style:text-properties style:font-name="GPAFJ+Aptos" style:font-name-asian="GPAFJ+Aptos" style:font-name-complex="GPAFJ+Aptos" fo:color="#000000" fo:letter-spacing="-0.0006in"/>
    </style:style>
    <style:style style:name="T1659" style:parent-style-name="Policepardéfaut" style:family="text">
      <style:text-properties style:font-name="GPAFJ+Aptos" style:font-name-asian="GPAFJ+Aptos" style:font-name-complex="GPAFJ+Aptos" fo:color="#000000"/>
    </style:style>
    <style:style style:name="T1660" style:parent-style-name="Policepardéfaut" style:family="text">
      <style:text-properties style:font-name="GPAFJ+Aptos" style:font-name-asian="GPAFJ+Aptos" style:font-name-complex="GPAFJ+Aptos" fo:color="#000000" style:text-scale="101%"/>
    </style:style>
    <style:style style:name="T1661" style:parent-style-name="Policepardéfaut" style:family="text">
      <style:text-properties style:font-name="GPAFJ+Aptos" style:font-name-asian="GPAFJ+Aptos" style:font-name-complex="GPAFJ+Aptos" fo:color="#000000" fo:letter-spacing="-0.0006in" style:text-scale="101%"/>
    </style:style>
    <style:style style:name="T1662" style:parent-style-name="Policepardéfaut" style:family="text">
      <style:text-properties style:font-name="GPAFJ+Aptos" style:font-name-asian="GPAFJ+Aptos" style:font-name-complex="GPAFJ+Aptos" fo:color="#000000"/>
    </style:style>
    <style:style style:name="T1663" style:parent-style-name="Policepardéfaut" style:family="text">
      <style:text-properties style:font-name="GPAFJ+Aptos" style:font-name-asian="GPAFJ+Aptos" style:font-name-complex="GPAFJ+Aptos" fo:color="#000000" style:text-scale="101%"/>
    </style:style>
    <style:style style:name="T1664" style:parent-style-name="Policepardéfaut" style:family="text">
      <style:text-properties style:font-name="GPAFJ+Aptos" style:font-name-asian="GPAFJ+Aptos" style:font-name-complex="GPAFJ+Aptos" fo:color="#000000" fo:letter-spacing="-0.0006in"/>
    </style:style>
    <style:style style:name="T1665" style:parent-style-name="Policepardéfaut" style:family="text">
      <style:text-properties style:font-name="GPAFJ+Aptos" style:font-name-asian="GPAFJ+Aptos" style:font-name-complex="GPAFJ+Aptos" fo:color="#000000" style:text-scale="101%"/>
    </style:style>
    <style:style style:name="T1666" style:parent-style-name="Policepardéfaut" style:family="text">
      <style:text-properties style:font-name="GPAFJ+Aptos" style:font-name-asian="GPAFJ+Aptos" style:font-name-complex="GPAFJ+Aptos" fo:color="#000000"/>
    </style:style>
    <style:style style:name="T1667" style:parent-style-name="Policepardéfaut" style:family="text">
      <style:text-properties style:font-name="GPAFJ+Aptos" style:font-name-asian="GPAFJ+Aptos" style:font-name-complex="GPAFJ+Aptos" fo:color="#000000" fo:letter-spacing="-0.0013in"/>
    </style:style>
    <style:style style:name="T1668" style:parent-style-name="Policepardéfaut" style:family="text">
      <style:text-properties style:font-name="GPAFJ+Aptos" style:font-name-asian="GPAFJ+Aptos" style:font-name-complex="GPAFJ+Aptos" fo:color="#000000" style:text-scale="101%"/>
    </style:style>
    <style:style style:name="T1669" style:parent-style-name="Policepardéfaut" style:family="text">
      <style:text-properties style:font-name="GPAFJ+Aptos" style:font-name-asian="GPAFJ+Aptos" style:font-name-complex="GPAFJ+Aptos" fo:color="#000000"/>
    </style:style>
    <style:style style:name="T1670" style:parent-style-name="Policepardéfaut" style:family="text">
      <style:text-properties style:font-name="GPAFJ+Aptos" style:font-name-asian="GPAFJ+Aptos" style:font-name-complex="GPAFJ+Aptos" fo:color="#000000" fo:letter-spacing="-0.0006in"/>
    </style:style>
    <style:style style:name="T1671" style:parent-style-name="Policepardéfaut" style:family="text">
      <style:text-properties style:font-name="GPAFJ+Aptos" style:font-name-asian="GPAFJ+Aptos" style:font-name-complex="GPAFJ+Aptos" fo:color="#000000" style:text-scale="101%"/>
    </style:style>
    <style:style style:name="T1672" style:parent-style-name="Policepardéfaut" style:family="text">
      <style:text-properties style:font-name="GPAFJ+Aptos" style:font-name-asian="GPAFJ+Aptos" style:font-name-complex="GPAFJ+Aptos" fo:color="#000000" fo:letter-spacing="-0.0006in"/>
    </style:style>
    <style:style style:name="T1673" style:parent-style-name="Policepardéfaut" style:family="text">
      <style:text-properties style:font-name="GPAFJ+Aptos" style:font-name-asian="GPAFJ+Aptos" style:font-name-complex="GPAFJ+Aptos" fo:color="#000000" style:text-scale="101%"/>
    </style:style>
    <style:style style:name="T1674" style:parent-style-name="Policepardéfaut" style:family="text">
      <style:text-properties style:font-name="GPAFJ+Aptos" style:font-name-asian="GPAFJ+Aptos" style:font-name-complex="GPAFJ+Aptos" fo:color="#000000" fo:letter-spacing="-0.0006in" style:text-scale="101%"/>
    </style:style>
    <style:style style:name="T1675" style:parent-style-name="Policepardéfaut" style:family="text">
      <style:text-properties style:font-name="GPAFJ+Aptos" style:font-name-asian="GPAFJ+Aptos" style:font-name-complex="GPAFJ+Aptos" fo:color="#000000" fo:letter-spacing="-0.0013in" style:text-scale="101%"/>
    </style:style>
    <style:style style:name="T1676" style:parent-style-name="Policepardéfaut" style:family="text">
      <style:text-properties style:font-name="GPAFJ+Aptos" style:font-name-asian="GPAFJ+Aptos" style:font-name-complex="GPAFJ+Aptos" fo:color="#000000"/>
    </style:style>
    <style:style style:name="T1677" style:parent-style-name="Policepardéfaut" style:family="text">
      <style:text-properties style:font-name="GPAFJ+Aptos" style:font-name-asian="GPAFJ+Aptos" style:font-name-complex="GPAFJ+Aptos" fo:color="#000000" fo:letter-spacing="-0.0006in"/>
    </style:style>
    <style:style style:name="T1678" style:parent-style-name="Policepardéfaut" style:family="text">
      <style:text-properties style:font-name="GPAFJ+Aptos" style:font-name-asian="GPAFJ+Aptos" style:font-name-complex="GPAFJ+Aptos" fo:color="#000000" style:text-scale="101%"/>
    </style:style>
    <style:style style:name="T1679" style:parent-style-name="Policepardéfaut" style:family="text">
      <style:text-properties style:font-name="GPAFJ+Aptos" style:font-name-asian="GPAFJ+Aptos" style:font-name-complex="GPAFJ+Aptos" fo:color="#000000" fo:letter-spacing="-0.0006in"/>
    </style:style>
    <style:style style:name="T1680" style:parent-style-name="Policepardéfaut" style:family="text">
      <style:text-properties style:font-name="GPAFJ+Aptos" style:font-name-asian="GPAFJ+Aptos" style:font-name-complex="GPAFJ+Aptos" fo:color="#000000" style:text-scale="101%"/>
    </style:style>
    <style:style style:name="T1681" style:parent-style-name="Policepardéfaut" style:family="text">
      <style:text-properties style:font-name="GPAFJ+Aptos" style:font-name-asian="GPAFJ+Aptos" style:font-name-complex="GPAFJ+Aptos" fo:color="#000000" fo:letter-spacing="-0.0006in"/>
    </style:style>
    <style:style style:name="T1682" style:parent-style-name="Policepardéfaut" style:family="text">
      <style:text-properties style:font-name="GPAFJ+Aptos" style:font-name-asian="GPAFJ+Aptos" style:font-name-complex="GPAFJ+Aptos" fo:color="#000000" fo:letter-spacing="0.0006in" style:text-scale="101%"/>
    </style:style>
    <style:style style:name="T1683" style:parent-style-name="Policepardéfaut" style:family="text">
      <style:text-properties style:font-name="GPAFJ+Aptos" style:font-name-asian="GPAFJ+Aptos" style:font-name-complex="GPAFJ+Aptos" fo:color="#000000"/>
    </style:style>
    <style:style style:name="T1684" style:parent-style-name="Policepardéfaut" style:family="text">
      <style:text-properties style:font-name="GPAFJ+Aptos" style:font-name-asian="GPAFJ+Aptos" style:font-name-complex="GPAFJ+Aptos" fo:color="#000000" fo:letter-spacing="0.0006in"/>
    </style:style>
    <style:style style:name="T1685" style:parent-style-name="Policepardéfaut" style:family="text">
      <style:text-properties style:font-name="GPAFJ+Aptos" style:font-name-asian="GPAFJ+Aptos" style:font-name-complex="GPAFJ+Aptos" fo:color="#000000" fo:letter-spacing="-0.0013in"/>
    </style:style>
    <style:style style:name="T1686" style:parent-style-name="Policepardéfaut" style:family="text">
      <style:text-properties style:font-name="GPAFJ+Aptos" style:font-name-asian="GPAFJ+Aptos" style:font-name-complex="GPAFJ+Aptos" fo:color="#000000" fo:letter-spacing="-0.0006in" style:text-scale="101%"/>
    </style:style>
    <style:style style:name="T1687" style:parent-style-name="Policepardéfaut" style:family="text">
      <style:text-properties style:font-name="GPAFJ+Aptos" style:font-name-asian="GPAFJ+Aptos" style:font-name-complex="GPAFJ+Aptos" fo:color="#000000" style:text-scale="101%"/>
    </style:style>
    <style:style style:name="T1688" style:parent-style-name="Policepardéfaut" style:family="text">
      <style:text-properties style:font-name="GPAFJ+Aptos" style:font-name-asian="GPAFJ+Aptos" style:font-name-complex="GPAFJ+Aptos" fo:color="#000000"/>
    </style:style>
    <style:style style:name="T1689" style:parent-style-name="Policepardéfaut" style:family="text">
      <style:text-properties style:font-name="GPAFJ+Aptos" style:font-name-asian="GPAFJ+Aptos" style:font-name-complex="GPAFJ+Aptos" fo:color="#000000" style:text-scale="101%"/>
    </style:style>
    <style:style style:name="T1690" style:parent-style-name="Policepardéfaut" style:family="text">
      <style:text-properties style:font-name="GPAFJ+Aptos" style:font-name-asian="GPAFJ+Aptos" style:font-name-complex="GPAFJ+Aptos" fo:color="#000000" fo:letter-spacing="-0.0006in"/>
    </style:style>
    <style:style style:name="T1691" style:parent-style-name="Policepardéfaut" style:family="text">
      <style:text-properties style:font-name="GPAFJ+Aptos" style:font-name-asian="GPAFJ+Aptos" style:font-name-complex="GPAFJ+Aptos" fo:color="#000000"/>
    </style:style>
    <style:style style:name="T1692" style:parent-style-name="Policepardéfaut" style:family="text">
      <style:text-properties style:font-name="GPAFJ+Aptos" style:font-name-asian="GPAFJ+Aptos" style:font-name-complex="GPAFJ+Aptos" fo:color="#000000" style:text-scale="101%"/>
    </style:style>
    <style:style style:name="T1693" style:parent-style-name="Policepardéfaut" style:family="text">
      <style:text-properties style:font-name="GPAFJ+Aptos" style:font-name-asian="GPAFJ+Aptos" style:font-name-complex="GPAFJ+Aptos" fo:color="#000000"/>
    </style:style>
    <style:style style:name="T1694" style:parent-style-name="Policepardéfaut" style:family="text">
      <style:text-properties style:font-name="GPAFJ+Aptos" style:font-name-asian="GPAFJ+Aptos" style:font-name-complex="GPAFJ+Aptos" fo:color="#000000" fo:letter-spacing="-0.0006in"/>
    </style:style>
    <style:style style:name="T1695" style:parent-style-name="Policepardéfaut" style:family="text">
      <style:text-properties style:font-name="GPAFJ+Aptos" style:font-name-asian="GPAFJ+Aptos" style:font-name-complex="GPAFJ+Aptos" fo:color="#000000" style:text-scale="101%"/>
    </style:style>
    <style:style style:name="T1696" style:parent-style-name="Policepardéfaut" style:family="text">
      <style:text-properties style:font-name="GPAFJ+Aptos" style:font-name-asian="GPAFJ+Aptos" style:font-name-complex="GPAFJ+Aptos" fo:color="#000000" fo:letter-spacing="-0.0013in" style:text-scale="101%"/>
    </style:style>
    <style:style style:name="T1697" style:parent-style-name="Policepardéfaut" style:family="text">
      <style:text-properties style:font-name="GPAFJ+Aptos" style:font-name-asian="GPAFJ+Aptos" style:font-name-complex="GPAFJ+Aptos" fo:color="#000000" style:text-scale="101%"/>
    </style:style>
    <style:style style:name="T1698" style:parent-style-name="Policepardéfaut" style:family="text">
      <style:text-properties style:font-name="GPAFJ+Aptos" style:font-name-asian="GPAFJ+Aptos" style:font-name-complex="GPAFJ+Aptos" fo:color="#000000" fo:letter-spacing="-0.0013in"/>
    </style:style>
    <style:style style:name="T1699" style:parent-style-name="Policepardéfaut" style:family="text">
      <style:text-properties style:font-name="GPAFJ+Aptos" style:font-name-asian="GPAFJ+Aptos" style:font-name-complex="GPAFJ+Aptos" fo:color="#000000" fo:letter-spacing="-0.0006in"/>
    </style:style>
    <style:style style:name="T1700" style:parent-style-name="Policepardéfaut" style:family="text">
      <style:text-properties style:font-name="GPAFJ+Aptos" style:font-name-asian="GPAFJ+Aptos" style:font-name-complex="GPAFJ+Aptos" fo:color="#000000" style:text-scale="101%"/>
    </style:style>
    <style:style style:name="T1701" style:parent-style-name="Policepardéfaut" style:family="text">
      <style:text-properties style:font-name="GPAFJ+Aptos" style:font-name-asian="GPAFJ+Aptos" style:font-name-complex="GPAFJ+Aptos" fo:color="#000000"/>
    </style:style>
    <style:style style:name="T1702" style:parent-style-name="Policepardéfaut" style:family="text">
      <style:text-properties style:font-name="GPAFJ+Aptos" style:font-name-asian="GPAFJ+Aptos" style:font-name-complex="GPAFJ+Aptos" fo:color="#000000" fo:letter-spacing="-0.0013in" style:text-scale="101%"/>
    </style:style>
    <style:style style:name="T1703" style:parent-style-name="Policepardéfaut" style:family="text">
      <style:text-properties style:font-name="GPAFJ+Aptos" style:font-name-asian="GPAFJ+Aptos" style:font-name-complex="GPAFJ+Aptos" fo:color="#000000"/>
    </style:style>
    <style:style style:name="T1704" style:parent-style-name="Policepardéfaut" style:family="text">
      <style:text-properties style:font-name="GPAFJ+Aptos" style:font-name-asian="GPAFJ+Aptos" style:font-name-complex="GPAFJ+Aptos" fo:color="#000000" style:text-scale="101%"/>
    </style:style>
    <style:style style:name="T1705" style:parent-style-name="Policepardéfaut" style:family="text">
      <style:text-properties style:font-name="GPAFJ+Aptos" style:font-name-asian="GPAFJ+Aptos" style:font-name-complex="GPAFJ+Aptos" fo:color="#000000"/>
    </style:style>
    <style:style style:name="T1706" style:parent-style-name="Policepardéfaut" style:family="text">
      <style:text-properties style:font-name="GPAFJ+Aptos" style:font-name-asian="GPAFJ+Aptos" style:font-name-complex="GPAFJ+Aptos" fo:color="#000000" fo:letter-spacing="-0.0006in" style:text-scale="101%"/>
    </style:style>
    <style:style style:name="T1707" style:parent-style-name="Policepardéfaut" style:family="text">
      <style:text-properties style:font-name="GPAFJ+Aptos" style:font-name-asian="GPAFJ+Aptos" style:font-name-complex="GPAFJ+Aptos" fo:color="#000000"/>
    </style:style>
    <style:style style:name="T1708" style:parent-style-name="Policepardéfaut" style:family="text">
      <style:text-properties style:font-name="GPAFJ+Aptos" style:font-name-asian="GPAFJ+Aptos" style:font-name-complex="GPAFJ+Aptos" fo:color="#000000" style:text-scale="101%"/>
    </style:style>
    <style:style style:name="T1709" style:parent-style-name="Policepardéfaut" style:family="text">
      <style:text-properties style:font-name="GPAFJ+Aptos" style:font-name-asian="GPAFJ+Aptos" style:font-name-complex="GPAFJ+Aptos" fo:color="#000000"/>
    </style:style>
    <style:style style:name="T1710" style:parent-style-name="Policepardéfaut" style:family="text">
      <style:text-properties style:font-name="GPAFJ+Aptos" style:font-name-asian="GPAFJ+Aptos" style:font-name-complex="GPAFJ+Aptos" fo:color="#000000" fo:letter-spacing="-0.0006in"/>
    </style:style>
    <style:style style:name="T1711" style:parent-style-name="Policepardéfaut" style:family="text">
      <style:text-properties style:font-name="GPAFJ+Aptos" style:font-name-asian="GPAFJ+Aptos" style:font-name-complex="GPAFJ+Aptos" fo:color="#000000"/>
    </style:style>
    <style:style style:name="T1712" style:parent-style-name="Policepardéfaut" style:family="text">
      <style:text-properties style:font-name="GPAFJ+Aptos" style:font-name-asian="GPAFJ+Aptos" style:font-name-complex="GPAFJ+Aptos" fo:color="#000000" fo:letter-spacing="-0.0013in" style:text-scale="101%"/>
    </style:style>
    <style:style style:name="T1713" style:parent-style-name="Policepardéfaut" style:family="text">
      <style:text-properties style:font-name="GPAFJ+Aptos" style:font-name-asian="GPAFJ+Aptos" style:font-name-complex="GPAFJ+Aptos" fo:color="#000000" style:text-scale="101%"/>
    </style:style>
    <style:style style:name="T1714" style:parent-style-name="Policepardéfaut" style:family="text">
      <style:text-properties style:font-name="GPAFJ+Aptos" style:font-name-asian="GPAFJ+Aptos" style:font-name-complex="GPAFJ+Aptos" fo:color="#000000" fo:letter-spacing="0.0006in"/>
    </style:style>
    <style:style style:name="T1715" style:parent-style-name="Policepardéfaut" style:family="text">
      <style:text-properties style:font-name="GPAFJ+Aptos" style:font-name-asian="GPAFJ+Aptos" style:font-name-complex="GPAFJ+Aptos" fo:color="#000000" fo:letter-spacing="-0.0006in" style:text-scale="101%"/>
    </style:style>
    <style:style style:name="T1716" style:parent-style-name="Policepardéfaut" style:family="text">
      <style:text-properties style:font-name="GPAFJ+Aptos" style:font-name-asian="GPAFJ+Aptos" style:font-name-complex="GPAFJ+Aptos" fo:color="#000000"/>
    </style:style>
    <style:style style:name="T1717" style:parent-style-name="Policepardéfaut" style:family="text">
      <style:text-properties style:font-name="GPAFJ+Aptos" style:font-name-asian="GPAFJ+Aptos" style:font-name-complex="GPAFJ+Aptos" fo:color="#000000" style:text-scale="101%"/>
    </style:style>
    <style:style style:name="T1718" style:parent-style-name="Policepardéfaut" style:family="text">
      <style:text-properties style:font-name="GPAFJ+Aptos" style:font-name-asian="GPAFJ+Aptos" style:font-name-complex="GPAFJ+Aptos" fo:color="#000000" fo:letter-spacing="-0.0013in"/>
    </style:style>
    <style:style style:name="T1719" style:parent-style-name="Policepardéfaut" style:family="text">
      <style:text-properties style:font-name="GPAFJ+Aptos" style:font-name-asian="GPAFJ+Aptos" style:font-name-complex="GPAFJ+Aptos" fo:color="#000000"/>
    </style:style>
    <style:style style:name="T1720" style:parent-style-name="Policepardéfaut" style:family="text">
      <style:text-properties style:font-name="GPAFJ+Aptos" style:font-name-asian="GPAFJ+Aptos" style:font-name-complex="GPAFJ+Aptos" fo:color="#000000" style:text-scale="101%"/>
    </style:style>
    <style:style style:name="T1721" style:parent-style-name="Policepardéfaut" style:family="text">
      <style:text-properties style:font-name="GPAFJ+Aptos" style:font-name-asian="GPAFJ+Aptos" style:font-name-complex="GPAFJ+Aptos" fo:color="#000000" fo:letter-spacing="-0.002in" style:text-scale="101%"/>
    </style:style>
    <style:style style:name="T1722" style:parent-style-name="Policepardéfaut" style:family="text">
      <style:text-properties style:font-name="GPAFJ+Aptos" style:font-name-asian="GPAFJ+Aptos" style:font-name-complex="GPAFJ+Aptos" fo:color="#000000" fo:letter-spacing="-0.0013in"/>
    </style:style>
    <style:style style:name="T1723" style:parent-style-name="Policepardéfaut" style:family="text">
      <style:text-properties style:font-name="GPAFJ+Aptos" style:font-name-asian="GPAFJ+Aptos" style:font-name-complex="GPAFJ+Aptos" fo:color="#000000"/>
    </style:style>
    <style:style style:name="T1724" style:parent-style-name="Policepardéfaut" style:family="text">
      <style:text-properties style:font-name="GPAFJ+Aptos" style:font-name-asian="GPAFJ+Aptos" style:font-name-complex="GPAFJ+Aptos" fo:color="#000000" style:text-scale="101%"/>
    </style:style>
    <style:style style:name="T1725" style:parent-style-name="Policepardéfaut" style:family="text">
      <style:text-properties style:font-name="GPAFJ+Aptos" style:font-name-asian="GPAFJ+Aptos" style:font-name-complex="GPAFJ+Aptos" fo:color="#000000"/>
    </style:style>
    <style:style style:name="T1726" style:parent-style-name="Policepardéfaut" style:family="text">
      <style:text-properties style:font-name="GPAFJ+Aptos" style:font-name-asian="GPAFJ+Aptos" style:font-name-complex="GPAFJ+Aptos" fo:color="#000000" fo:letter-spacing="-0.0013in"/>
    </style:style>
    <style:style style:name="T1727" style:parent-style-name="Policepardéfaut" style:family="text">
      <style:text-properties style:font-name="GPAFJ+Aptos" style:font-name-asian="GPAFJ+Aptos" style:font-name-complex="GPAFJ+Aptos" fo:color="#000000"/>
    </style:style>
    <style:style style:name="T1728" style:parent-style-name="Policepardéfaut" style:family="text">
      <style:text-properties style:font-name="GPAFJ+Aptos" style:font-name-asian="GPAFJ+Aptos" style:font-name-complex="GPAFJ+Aptos" fo:color="#000000" style:text-scale="101%"/>
    </style:style>
    <style:style style:name="T1729" style:parent-style-name="Policepardéfaut" style:family="text">
      <style:text-properties style:font-name="GPAFJ+Aptos" style:font-name-asian="GPAFJ+Aptos" style:font-name-complex="GPAFJ+Aptos" fo:color="#000000"/>
    </style:style>
    <style:style style:name="T1730" style:parent-style-name="Policepardéfaut" style:family="text">
      <style:text-properties style:font-name="GPAFJ+Aptos" style:font-name-asian="GPAFJ+Aptos" style:font-name-complex="GPAFJ+Aptos" fo:color="#000000" style:text-scale="101%"/>
    </style:style>
    <style:style style:name="T1731" style:parent-style-name="Policepardéfaut" style:family="text">
      <style:text-properties style:font-name="GPAFJ+Aptos" style:font-name-asian="GPAFJ+Aptos" style:font-name-complex="GPAFJ+Aptos" fo:color="#000000"/>
    </style:style>
    <style:style style:name="T1732" style:parent-style-name="Policepardéfaut" style:family="text">
      <style:text-properties style:font-name="GPAFJ+Aptos" style:font-name-asian="GPAFJ+Aptos" style:font-name-complex="GPAFJ+Aptos" fo:color="#000000" fo:letter-spacing="-0.0006in"/>
    </style:style>
    <style:style style:name="T1733" style:parent-style-name="Policepardéfaut" style:family="text">
      <style:text-properties style:font-name="GPAFJ+Aptos" style:font-name-asian="GPAFJ+Aptos" style:font-name-complex="GPAFJ+Aptos" fo:color="#000000"/>
    </style:style>
    <style:style style:name="T1734" style:parent-style-name="Policepardéfaut" style:family="text">
      <style:text-properties style:font-name="GPAFJ+Aptos" style:font-name-asian="GPAFJ+Aptos" style:font-name-complex="GPAFJ+Aptos" fo:color="#000000" style:text-scale="101%"/>
    </style:style>
    <style:style style:name="T1735" style:parent-style-name="Policepardéfaut" style:family="text">
      <style:text-properties style:font-name="GPAFJ+Aptos" style:font-name-asian="GPAFJ+Aptos" style:font-name-complex="GPAFJ+Aptos" fo:color="#000000" fo:letter-spacing="0.0006in"/>
    </style:style>
    <style:style style:name="T1736" style:parent-style-name="Policepardéfaut" style:family="text">
      <style:text-properties style:font-name="GPAFJ+Aptos" style:font-name-asian="GPAFJ+Aptos" style:font-name-complex="GPAFJ+Aptos" fo:color="#000000" style:text-scale="101%"/>
    </style:style>
    <style:style style:name="T1737" style:parent-style-name="Policepardéfaut" style:family="text">
      <style:text-properties style:font-name="GPAFJ+Aptos" style:font-name-asian="GPAFJ+Aptos" style:font-name-complex="GPAFJ+Aptos" fo:color="#000000" fo:letter-spacing="-0.0013in" style:text-scale="101%"/>
    </style:style>
    <style:style style:name="T1738" style:parent-style-name="Policepardéfaut" style:family="text">
      <style:text-properties style:font-name="GPAFJ+Aptos" style:font-name-asian="GPAFJ+Aptos" style:font-name-complex="GPAFJ+Aptos" fo:color="#000000" style:text-scale="101%"/>
    </style:style>
    <style:style style:name="T1739" style:parent-style-name="Policepardéfaut" style:family="text">
      <style:text-properties style:font-name="GPAFJ+Aptos" style:font-name-asian="GPAFJ+Aptos" style:font-name-complex="GPAFJ+Aptos" fo:color="#000000" fo:letter-spacing="-0.0006in"/>
    </style:style>
    <style:style style:name="T1740" style:parent-style-name="Policepardéfaut" style:family="text">
      <style:text-properties style:font-name="GPAFJ+Aptos" style:font-name-asian="GPAFJ+Aptos" style:font-name-complex="GPAFJ+Aptos" fo:color="#000000" style:text-scale="101%"/>
    </style:style>
    <style:style style:name="T1741" style:parent-style-name="Policepardéfaut" style:family="text">
      <style:text-properties style:font-name="GPAFJ+Aptos" style:font-name-asian="GPAFJ+Aptos" style:font-name-complex="GPAFJ+Aptos" fo:color="#000000"/>
    </style:style>
    <style:style style:name="T1742" style:parent-style-name="Policepardéfaut" style:family="text">
      <style:text-properties style:font-name="GPAFJ+Aptos" style:font-name-asian="GPAFJ+Aptos" style:font-name-complex="GPAFJ+Aptos" fo:color="#000000" style:text-scale="101%"/>
    </style:style>
    <style:style style:name="T1743" style:parent-style-name="Policepardéfaut" style:family="text">
      <style:text-properties style:font-name="GPAFJ+Aptos" style:font-name-asian="GPAFJ+Aptos" style:font-name-complex="GPAFJ+Aptos" fo:color="#000000" fo:letter-spacing="-0.0013in" style:text-scale="101%"/>
    </style:style>
    <style:style style:name="T1744" style:parent-style-name="Policepardéfaut" style:family="text">
      <style:text-properties style:font-name="GPAFJ+Aptos" style:font-name-asian="GPAFJ+Aptos" style:font-name-complex="GPAFJ+Aptos" fo:color="#000000"/>
    </style:style>
    <style:style style:name="T1745" style:parent-style-name="Policepardéfaut" style:family="text">
      <style:text-properties style:font-name="GPAFJ+Aptos" style:font-name-asian="GPAFJ+Aptos" style:font-name-complex="GPAFJ+Aptos" fo:color="#000000" style:text-scale="101%"/>
    </style:style>
    <style:style style:name="T1746" style:parent-style-name="Policepardéfaut" style:family="text">
      <style:text-properties style:font-name="GPAFJ+Aptos" style:font-name-asian="GPAFJ+Aptos" style:font-name-complex="GPAFJ+Aptos" fo:color="#000000" fo:letter-spacing="-0.0013in"/>
    </style:style>
    <style:style style:name="T1747" style:parent-style-name="Policepardéfaut" style:family="text">
      <style:text-properties style:font-name="GPAFJ+Aptos" style:font-name-asian="GPAFJ+Aptos" style:font-name-complex="GPAFJ+Aptos" fo:color="#000000" fo:letter-spacing="-0.0013in" style:text-scale="101%"/>
    </style:style>
    <style:style style:name="T1748" style:parent-style-name="Policepardéfaut" style:family="text">
      <style:text-properties style:font-name="GPAFJ+Aptos" style:font-name-asian="GPAFJ+Aptos" style:font-name-complex="GPAFJ+Aptos" fo:color="#000000" fo:letter-spacing="-0.0006in" style:text-scale="101%"/>
    </style:style>
    <style:style style:name="T1749" style:parent-style-name="Policepardéfaut" style:family="text">
      <style:text-properties style:font-name="GPAFJ+Aptos" style:font-name-asian="GPAFJ+Aptos" style:font-name-complex="GPAFJ+Aptos" fo:color="#000000"/>
    </style:style>
    <style:style style:name="T1750" style:parent-style-name="Policepardéfaut" style:family="text">
      <style:text-properties style:font-name="GPAFJ+Aptos" style:font-name-asian="GPAFJ+Aptos" style:font-name-complex="GPAFJ+Aptos" fo:color="#000000" style:text-scale="101%"/>
    </style:style>
    <style:style style:name="T1751" style:parent-style-name="Policepardéfaut" style:family="text">
      <style:text-properties style:font-name="GPAFJ+Aptos" style:font-name-asian="GPAFJ+Aptos" style:font-name-complex="GPAFJ+Aptos" fo:color="#000000"/>
    </style:style>
    <style:style style:name="T1752" style:parent-style-name="Policepardéfaut" style:family="text">
      <style:text-properties style:font-name="GPAFJ+Aptos" style:font-name-asian="GPAFJ+Aptos" style:font-name-complex="GPAFJ+Aptos" fo:color="#000000" fo:letter-spacing="-0.0006in" style:text-scale="101%"/>
    </style:style>
    <style:style style:name="T1753" style:parent-style-name="Policepardéfaut" style:family="text">
      <style:text-properties style:font-name="GPAFJ+Aptos" style:font-name-asian="GPAFJ+Aptos" style:font-name-complex="GPAFJ+Aptos" fo:color="#000000" fo:letter-spacing="-0.0006in"/>
    </style:style>
    <style:style style:name="T1754" style:parent-style-name="Policepardéfaut" style:family="text">
      <style:text-properties style:font-name="GPAFJ+Aptos" style:font-name-asian="GPAFJ+Aptos" style:font-name-complex="GPAFJ+Aptos" fo:color="#000000"/>
    </style:style>
    <style:style style:name="T1755" style:parent-style-name="Policepardéfaut" style:family="text">
      <style:text-properties style:font-name="GPAFJ+Aptos" style:font-name-asian="GPAFJ+Aptos" style:font-name-complex="GPAFJ+Aptos" fo:color="#000000" fo:letter-spacing="-0.0006in" style:text-scale="101%"/>
    </style:style>
    <style:style style:name="T1756" style:parent-style-name="Policepardéfaut" style:family="text">
      <style:text-properties style:font-name="GPAFJ+Aptos" style:font-name-asian="GPAFJ+Aptos" style:font-name-complex="GPAFJ+Aptos" fo:color="#000000" style:text-scale="101%"/>
    </style:style>
    <style:style style:name="T1757" style:parent-style-name="Policepardéfaut" style:family="text">
      <style:text-properties style:font-name="GPAFJ+Aptos" style:font-name-asian="GPAFJ+Aptos" style:font-name-complex="GPAFJ+Aptos" fo:color="#000000"/>
    </style:style>
    <style:style style:name="T1758" style:parent-style-name="Policepardéfaut" style:family="text">
      <style:text-properties style:font-name="GPAFJ+Aptos" style:font-name-asian="GPAFJ+Aptos" style:font-name-complex="GPAFJ+Aptos" fo:color="#000000" fo:letter-spacing="-0.002in"/>
    </style:style>
    <style:style style:name="T1759" style:parent-style-name="Policepardéfaut" style:family="text">
      <style:text-properties style:font-name="GPAFJ+Aptos" style:font-name-asian="GPAFJ+Aptos" style:font-name-complex="GPAFJ+Aptos" fo:color="#000000"/>
    </style:style>
    <style:style style:name="T1760" style:parent-style-name="Policepardéfaut" style:family="text">
      <style:text-properties style:font-name="GPAFJ+Aptos" style:font-name-asian="GPAFJ+Aptos" style:font-name-complex="GPAFJ+Aptos" fo:color="#000000" fo:letter-spacing="0.0006in" style:text-scale="101%"/>
    </style:style>
    <style:style style:name="T1761" style:parent-style-name="Policepardéfaut" style:family="text">
      <style:text-properties style:font-name="GPAFJ+Aptos" style:font-name-asian="GPAFJ+Aptos" style:font-name-complex="GPAFJ+Aptos" fo:color="#000000" style:text-scale="101%"/>
    </style:style>
    <style:style style:name="T1762" style:parent-style-name="Policepardéfaut" style:family="text">
      <style:text-properties style:font-name="GPAFJ+Aptos" style:font-name-asian="GPAFJ+Aptos" style:font-name-complex="GPAFJ+Aptos" fo:color="#000000" fo:letter-spacing="-0.0006in" style:text-scale="101%"/>
    </style:style>
    <style:style style:name="T1763" style:parent-style-name="Policepardéfaut" style:family="text">
      <style:text-properties style:font-name="GPAFJ+Aptos" style:font-name-asian="GPAFJ+Aptos" style:font-name-complex="GPAFJ+Aptos" fo:color="#000000" fo:letter-spacing="-0.0013in"/>
    </style:style>
    <style:style style:name="T1764" style:parent-style-name="Policepardéfaut" style:family="text">
      <style:text-properties style:font-name="GPAFJ+Aptos" style:font-name-asian="GPAFJ+Aptos" style:font-name-complex="GPAFJ+Aptos" fo:color="#000000"/>
    </style:style>
    <style:style style:name="T1765" style:parent-style-name="Policepardéfaut" style:family="text">
      <style:text-properties style:font-name="GPAFJ+Aptos" style:font-name-asian="GPAFJ+Aptos" style:font-name-complex="GPAFJ+Aptos" fo:color="#000000" fo:letter-spacing="-0.0013in" style:text-scale="101%"/>
    </style:style>
    <style:style style:name="T1766" style:parent-style-name="Policepardéfaut" style:family="text">
      <style:text-properties style:font-name="GPAFJ+Aptos" style:font-name-asian="GPAFJ+Aptos" style:font-name-complex="GPAFJ+Aptos" fo:color="#000000" style:text-scale="101%"/>
    </style:style>
    <style:style style:name="T1767" style:parent-style-name="Policepardéfaut" style:family="text">
      <style:text-properties style:font-name="GPAFJ+Aptos" style:font-name-asian="GPAFJ+Aptos" style:font-name-complex="GPAFJ+Aptos" fo:color="#000000"/>
    </style:style>
    <style:style style:name="T1768" style:parent-style-name="Policepardéfaut" style:family="text">
      <style:text-properties style:font-name="GPAFJ+Aptos" style:font-name-asian="GPAFJ+Aptos" style:font-name-complex="GPAFJ+Aptos" fo:color="#000000" style:text-scale="101%"/>
    </style:style>
    <style:style style:name="T1769" style:parent-style-name="Policepardéfaut" style:family="text">
      <style:text-properties style:font-name="GPAFJ+Aptos" style:font-name-asian="GPAFJ+Aptos" style:font-name-complex="GPAFJ+Aptos" fo:color="#000000" fo:letter-spacing="-0.0006in" style:text-scale="101%"/>
    </style:style>
    <style:style style:name="T1770" style:parent-style-name="Policepardéfaut" style:family="text">
      <style:text-properties style:font-name="GPAFJ+Aptos" style:font-name-asian="GPAFJ+Aptos" style:font-name-complex="GPAFJ+Aptos" fo:color="#000000" style:text-scale="101%"/>
    </style:style>
    <style:style style:name="T1771" style:parent-style-name="Policepardéfaut" style:family="text">
      <style:text-properties style:font-name="GPAFJ+Aptos" style:font-name-asian="GPAFJ+Aptos" style:font-name-complex="GPAFJ+Aptos" fo:color="#000000" fo:letter-spacing="-0.0006in" style:text-scale="101%"/>
    </style:style>
    <style:style style:name="T1772" style:parent-style-name="Policepardéfaut" style:family="text">
      <style:text-properties style:font-name="GPAFJ+Aptos" style:font-name-asian="GPAFJ+Aptos" style:font-name-complex="GPAFJ+Aptos" fo:color="#000000"/>
    </style:style>
    <style:style style:name="T1773" style:parent-style-name="Policepardéfaut" style:family="text">
      <style:text-properties style:font-name="GPAFJ+Aptos" style:font-name-asian="GPAFJ+Aptos" style:font-name-complex="GPAFJ+Aptos" fo:color="#000000" fo:letter-spacing="-0.0006in"/>
    </style:style>
    <style:style style:name="T1774" style:parent-style-name="Policepardéfaut" style:family="text">
      <style:text-properties style:font-name="GPAFJ+Aptos" style:font-name-asian="GPAFJ+Aptos" style:font-name-complex="GPAFJ+Aptos" fo:color="#000000" style:text-scale="101%"/>
    </style:style>
    <style:style style:name="T1775" style:parent-style-name="Policepardéfaut" style:family="text">
      <style:text-properties style:font-name="GPAFJ+Aptos" style:font-name-asian="GPAFJ+Aptos" style:font-name-complex="GPAFJ+Aptos" fo:color="#000000" fo:letter-spacing="-0.0006in"/>
    </style:style>
    <style:style style:name="T1776" style:parent-style-name="Policepardéfaut" style:family="text">
      <style:text-properties style:font-name="GPAFJ+Aptos" style:font-name-asian="GPAFJ+Aptos" style:font-name-complex="GPAFJ+Aptos" fo:color="#000000" style:text-scale="101%"/>
    </style:style>
    <style:style style:name="T1777" style:parent-style-name="Policepardéfaut" style:family="text">
      <style:text-properties style:font-name="GPAFJ+Aptos" style:font-name-asian="GPAFJ+Aptos" style:font-name-complex="GPAFJ+Aptos" fo:color="#000000" fo:letter-spacing="-0.0006in"/>
    </style:style>
    <style:style style:name="T1778" style:parent-style-name="Policepardéfaut" style:family="text">
      <style:text-properties style:font-name="GPAFJ+Aptos" style:font-name-asian="GPAFJ+Aptos" style:font-name-complex="GPAFJ+Aptos" fo:color="#000000"/>
    </style:style>
    <style:style style:name="T1779" style:parent-style-name="Policepardéfaut" style:family="text">
      <style:text-properties style:font-name="GPAFJ+Aptos" style:font-name-asian="GPAFJ+Aptos" style:font-name-complex="GPAFJ+Aptos" fo:color="#000000" fo:letter-spacing="-0.0006in" style:text-scale="101%"/>
    </style:style>
    <style:style style:name="T1780" style:parent-style-name="Policepardéfaut" style:family="text">
      <style:text-properties style:font-name="GPAFJ+Aptos" style:font-name-asian="GPAFJ+Aptos" style:font-name-complex="GPAFJ+Aptos" fo:color="#000000" style:text-scale="101%"/>
    </style:style>
    <style:style style:name="T1781" style:parent-style-name="Policepardéfaut" style:family="text">
      <style:text-properties style:font-name="GPAFJ+Aptos" style:font-name-asian="GPAFJ+Aptos" style:font-name-complex="GPAFJ+Aptos" fo:color="#000000" fo:letter-spacing="-0.0013in"/>
    </style:style>
    <style:style style:name="T1782" style:parent-style-name="Policepardéfaut" style:family="text">
      <style:text-properties style:font-name="GPAFJ+Aptos" style:font-name-asian="GPAFJ+Aptos" style:font-name-complex="GPAFJ+Aptos" fo:color="#000000" style:text-scale="101%"/>
    </style:style>
    <style:style style:name="T1783" style:parent-style-name="Policepardéfaut" style:family="text">
      <style:text-properties style:font-name="GPAFJ+Aptos" style:font-name-asian="GPAFJ+Aptos" style:font-name-complex="GPAFJ+Aptos" fo:color="#000000"/>
    </style:style>
    <style:style style:name="T1784" style:parent-style-name="Policepardéfaut" style:family="text">
      <style:text-properties style:font-name="GPAFJ+Aptos" style:font-name-asian="GPAFJ+Aptos" style:font-name-complex="GPAFJ+Aptos" fo:color="#000000" style:text-scale="101%"/>
    </style:style>
    <style:style style:name="P1785" style:parent-style-name="Normal" style:family="paragraph">
      <style:paragraph-properties fo:text-align="justify" fo:margin-bottom="0.0013in" fo:line-height="0.1111in"/>
      <style:text-properties fo:font-size="8pt" style:font-size-asian="8pt" style:font-size-complex="8pt"/>
    </style:style>
    <style:style style:name="P1786" style:parent-style-name="Normal" style:family="paragraph">
      <style:paragraph-properties fo:widows="0" fo:orphans="0" fo:text-align="justify" fo:margin-left="0.5in" fo:margin-right="0.4104in" fo:text-indent="-0.2493in">
        <style:tab-stops/>
      </style:paragraph-properties>
    </style:style>
    <style:style style:name="T1787" style:parent-style-name="Policepardéfaut" style:family="text">
      <style:text-properties style:font-name="Symbol" style:font-name-asian="Symbol" style:font-name-complex="Symbol" fo:color="#000000" fo:font-size="10pt" style:font-size-asian="10pt" style:font-size-complex="10pt"/>
    </style:style>
    <style:style style:name="T1788" style:parent-style-name="Policepardéfaut" style:family="text">
      <style:text-properties style:font-name="Symbol" style:font-name-asian="Symbol" style:font-name-complex="Symbol" fo:color="#000000" fo:font-size="10pt" style:font-size-asian="10pt" style:font-size-complex="10pt"/>
    </style:style>
    <style:style style:name="T1789" style:parent-style-name="Policepardéfaut" style:family="text">
      <style:text-properties style:font-name="WYAXW+Aptos" style:font-name-asian="WYAXW+Aptos" style:font-name-complex="WYAXW+Aptos" fo:font-weight="bold" style:font-weight-asian="bold" style:font-weight-complex="bold" fo:color="#000000"/>
    </style:style>
    <style:style style:name="T1790"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791" style:parent-style-name="Policepardéfaut" style:family="text">
      <style:text-properties style:font-name="WYAXW+Aptos" style:font-name-asian="WYAXW+Aptos" style:font-name-complex="WYAXW+Aptos" fo:font-weight="bold" style:font-weight-asian="bold" style:font-weight-complex="bold" fo:color="#000000"/>
    </style:style>
    <style:style style:name="T1792"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793" style:parent-style-name="Policepardéfaut" style:family="text">
      <style:text-properties style:font-name="WYAXW+Aptos" style:font-name-asian="WYAXW+Aptos" style:font-name-complex="WYAXW+Aptos" fo:font-weight="bold" style:font-weight-asian="bold" style:font-weight-complex="bold" fo:color="#000000"/>
    </style:style>
    <style:style style:name="T1794"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795" style:parent-style-name="Policepardéfaut" style:family="text">
      <style:text-properties style:font-name="WYAXW+Aptos" style:font-name-asian="WYAXW+Aptos" style:font-name-complex="WYAXW+Aptos" fo:font-weight="bold" style:font-weight-asian="bold" style:font-weight-complex="bold" fo:color="#000000" fo:letter-spacing="-0.002in"/>
    </style:style>
    <style:style style:name="T1796"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797" style:parent-style-name="Policepardéfaut" style:family="text">
      <style:text-properties style:font-name="WYAXW+Aptos" style:font-name-asian="WYAXW+Aptos" style:font-name-complex="WYAXW+Aptos" fo:font-weight="bold" style:font-weight-asian="bold" style:font-weight-complex="bold" fo:color="#000000"/>
    </style:style>
    <style:style style:name="T1798"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799" style:parent-style-name="Policepardéfaut" style:family="text">
      <style:text-properties style:font-name="WYAXW+Aptos" style:font-name-asian="WYAXW+Aptos" style:font-name-complex="WYAXW+Aptos" fo:font-weight="bold" style:font-weight-asian="bold" style:font-weight-complex="bold" fo:color="#000000" fo:letter-spacing="-0.0013in"/>
    </style:style>
    <style:style style:name="T1800"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801" style:parent-style-name="Policepardéfaut" style:family="text">
      <style:text-properties style:font-name="WYAXW+Aptos" style:font-name-asian="WYAXW+Aptos" style:font-name-complex="WYAXW+Aptos" fo:font-weight="bold" style:font-weight-asian="bold" style:font-weight-complex="bold" fo:color="#000000"/>
    </style:style>
    <style:style style:name="T1802"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803" style:parent-style-name="Policepardéfaut" style:family="text">
      <style:text-properties style:font-name="WYAXW+Aptos" style:font-name-asian="WYAXW+Aptos" style:font-name-complex="WYAXW+Aptos" fo:font-weight="bold" style:font-weight-asian="bold" style:font-weight-complex="bold" fo:color="#000000"/>
    </style:style>
    <style:style style:name="T1804"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805"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806" style:parent-style-name="Policepardéfaut" style:family="text">
      <style:text-properties style:font-name="GPAFJ+Aptos" style:font-name-asian="GPAFJ+Aptos" style:font-name-complex="GPAFJ+Aptos" fo:color="#000000" style:text-scale="101%"/>
    </style:style>
    <style:style style:name="T1807" style:parent-style-name="Policepardéfaut" style:family="text">
      <style:text-properties style:font-name="GPAFJ+Aptos" style:font-name-asian="GPAFJ+Aptos" style:font-name-complex="GPAFJ+Aptos" fo:color="#000000"/>
    </style:style>
    <style:style style:name="T1808" style:parent-style-name="Policepardéfaut" style:family="text">
      <style:text-properties style:font-name="GPAFJ+Aptos" style:font-name-asian="GPAFJ+Aptos" style:font-name-complex="GPAFJ+Aptos" fo:color="#000000" style:text-scale="101%"/>
    </style:style>
    <style:style style:name="T1809" style:parent-style-name="Policepardéfaut" style:family="text">
      <style:text-properties style:font-name="GPAFJ+Aptos" style:font-name-asian="GPAFJ+Aptos" style:font-name-complex="GPAFJ+Aptos" fo:color="#000000"/>
    </style:style>
    <style:style style:name="T1810" style:parent-style-name="Policepardéfaut" style:family="text">
      <style:text-properties style:font-name="GPAFJ+Aptos" style:font-name-asian="GPAFJ+Aptos" style:font-name-complex="GPAFJ+Aptos" fo:color="#000000" fo:letter-spacing="-0.0006in" style:text-scale="101%"/>
    </style:style>
    <style:style style:name="T1811" style:parent-style-name="Policepardéfaut" style:family="text">
      <style:text-properties style:font-name="GPAFJ+Aptos" style:font-name-asian="GPAFJ+Aptos" style:font-name-complex="GPAFJ+Aptos" fo:color="#000000" fo:letter-spacing="-0.0013in"/>
    </style:style>
    <style:style style:name="T1812" style:parent-style-name="Policepardéfaut" style:family="text">
      <style:text-properties style:font-name="GPAFJ+Aptos" style:font-name-asian="GPAFJ+Aptos" style:font-name-complex="GPAFJ+Aptos" fo:color="#000000"/>
    </style:style>
    <style:style style:name="T1813" style:parent-style-name="Policepardéfaut" style:family="text">
      <style:text-properties style:font-name="GPAFJ+Aptos" style:font-name-asian="GPAFJ+Aptos" style:font-name-complex="GPAFJ+Aptos" fo:color="#000000" style:text-scale="101%"/>
    </style:style>
    <style:style style:name="T1814" style:parent-style-name="Policepardéfaut" style:family="text">
      <style:text-properties style:font-name="GPAFJ+Aptos" style:font-name-asian="GPAFJ+Aptos" style:font-name-complex="GPAFJ+Aptos" fo:color="#000000"/>
    </style:style>
    <style:style style:name="T1815" style:parent-style-name="Policepardéfaut" style:family="text">
      <style:text-properties style:font-name="GPAFJ+Aptos" style:font-name-asian="GPAFJ+Aptos" style:font-name-complex="GPAFJ+Aptos" fo:color="#000000" fo:letter-spacing="-0.0013in" style:text-scale="101%"/>
    </style:style>
    <style:style style:name="T1816" style:parent-style-name="Policepardéfaut" style:family="text">
      <style:text-properties style:font-name="GPAFJ+Aptos" style:font-name-asian="GPAFJ+Aptos" style:font-name-complex="GPAFJ+Aptos" fo:color="#000000" style:text-scale="101%"/>
    </style:style>
    <style:style style:name="T1817" style:parent-style-name="Policepardéfaut" style:family="text">
      <style:text-properties style:font-name="GPAFJ+Aptos" style:font-name-asian="GPAFJ+Aptos" style:font-name-complex="GPAFJ+Aptos" fo:color="#000000" fo:letter-spacing="0.0006in"/>
    </style:style>
    <style:style style:name="T1818" style:parent-style-name="Policepardéfaut" style:family="text">
      <style:text-properties style:font-name="GPAFJ+Aptos" style:font-name-asian="GPAFJ+Aptos" style:font-name-complex="GPAFJ+Aptos" fo:color="#000000" fo:letter-spacing="-0.0006in" style:text-scale="101%"/>
    </style:style>
    <style:style style:name="T1819" style:parent-style-name="Policepardéfaut" style:family="text">
      <style:text-properties style:font-name="GPAFJ+Aptos" style:font-name-asian="GPAFJ+Aptos" style:font-name-complex="GPAFJ+Aptos" fo:color="#000000"/>
    </style:style>
    <style:style style:name="T1820" style:parent-style-name="Policepardéfaut" style:family="text">
      <style:text-properties style:font-name="GPAFJ+Aptos" style:font-name-asian="GPAFJ+Aptos" style:font-name-complex="GPAFJ+Aptos" fo:color="#000000" fo:letter-spacing="-0.0006in"/>
    </style:style>
    <style:style style:name="T1821" style:parent-style-name="Policepardéfaut" style:family="text">
      <style:text-properties style:font-name="GPAFJ+Aptos" style:font-name-asian="GPAFJ+Aptos" style:font-name-complex="GPAFJ+Aptos" fo:color="#000000" style:text-scale="101%"/>
    </style:style>
    <style:style style:name="T1822" style:parent-style-name="Policepardéfaut" style:family="text">
      <style:text-properties style:font-name="GPAFJ+Aptos" style:font-name-asian="GPAFJ+Aptos" style:font-name-complex="GPAFJ+Aptos" fo:color="#000000"/>
    </style:style>
    <style:style style:name="T1823" style:parent-style-name="Policepardéfaut" style:family="text">
      <style:text-properties style:font-name="GPAFJ+Aptos" style:font-name-asian="GPAFJ+Aptos" style:font-name-complex="GPAFJ+Aptos" fo:color="#000000" fo:letter-spacing="-0.0013in" style:text-scale="101%"/>
    </style:style>
    <style:style style:name="T1824" style:parent-style-name="Policepardéfaut" style:family="text">
      <style:text-properties style:font-name="GPAFJ+Aptos" style:font-name-asian="GPAFJ+Aptos" style:font-name-complex="GPAFJ+Aptos" fo:color="#000000" style:text-scale="101%"/>
    </style:style>
    <style:style style:name="T1825" style:parent-style-name="Policepardéfaut" style:family="text">
      <style:text-properties style:font-name="GPAFJ+Aptos" style:font-name-asian="GPAFJ+Aptos" style:font-name-complex="GPAFJ+Aptos" fo:color="#000000" fo:letter-spacing="-0.0006in"/>
    </style:style>
    <style:style style:name="T1826" style:parent-style-name="Policepardéfaut" style:family="text">
      <style:text-properties style:font-name="GPAFJ+Aptos" style:font-name-asian="GPAFJ+Aptos" style:font-name-complex="GPAFJ+Aptos" fo:color="#000000" fo:letter-spacing="-0.0013in" style:text-scale="101%"/>
    </style:style>
    <style:style style:name="T1827" style:parent-style-name="Policepardéfaut" style:family="text">
      <style:text-properties style:font-name="GPAFJ+Aptos" style:font-name-asian="GPAFJ+Aptos" style:font-name-complex="GPAFJ+Aptos" fo:color="#000000" style:text-scale="101%"/>
    </style:style>
    <style:style style:name="T1828" style:parent-style-name="Policepardéfaut" style:family="text">
      <style:text-properties style:font-name="GPAFJ+Aptos" style:font-name-asian="GPAFJ+Aptos" style:font-name-complex="GPAFJ+Aptos" fo:color="#000000" fo:letter-spacing="-0.0013in"/>
    </style:style>
    <style:style style:name="T1829" style:parent-style-name="Policepardéfaut" style:family="text">
      <style:text-properties style:font-name="GPAFJ+Aptos" style:font-name-asian="GPAFJ+Aptos" style:font-name-complex="GPAFJ+Aptos" fo:color="#000000"/>
    </style:style>
    <style:style style:name="T1830" style:parent-style-name="Policepardéfaut" style:family="text">
      <style:text-properties style:font-name="GPAFJ+Aptos" style:font-name-asian="GPAFJ+Aptos" style:font-name-complex="GPAFJ+Aptos" fo:color="#000000" style:text-scale="101%"/>
    </style:style>
    <style:style style:name="T1831" style:parent-style-name="Policepardéfaut" style:family="text">
      <style:text-properties style:font-name="GPAFJ+Aptos" style:font-name-asian="GPAFJ+Aptos" style:font-name-complex="GPAFJ+Aptos" fo:color="#000000" fo:letter-spacing="-0.0006in"/>
    </style:style>
    <style:style style:name="T1832" style:parent-style-name="Policepardéfaut" style:family="text">
      <style:text-properties style:font-name="GPAFJ+Aptos" style:font-name-asian="GPAFJ+Aptos" style:font-name-complex="GPAFJ+Aptos" fo:color="#000000" style:text-scale="101%"/>
    </style:style>
    <style:style style:name="T1833" style:parent-style-name="Policepardéfaut" style:family="text">
      <style:text-properties style:font-name="GPAFJ+Aptos" style:font-name-asian="GPAFJ+Aptos" style:font-name-complex="GPAFJ+Aptos" fo:color="#000000" fo:letter-spacing="-0.0006in"/>
    </style:style>
    <style:style style:name="T1834" style:parent-style-name="Policepardéfaut" style:family="text">
      <style:text-properties style:font-name="GPAFJ+Aptos" style:font-name-asian="GPAFJ+Aptos" style:font-name-complex="GPAFJ+Aptos" fo:color="#000000" fo:letter-spacing="-0.0006in" style:text-scale="101%"/>
    </style:style>
    <style:style style:name="T1835" style:parent-style-name="Policepardéfaut" style:family="text">
      <style:text-properties style:font-name="GPAFJ+Aptos" style:font-name-asian="GPAFJ+Aptos" style:font-name-complex="GPAFJ+Aptos" fo:color="#000000"/>
    </style:style>
    <style:style style:name="T1836" style:parent-style-name="Policepardéfaut" style:family="text">
      <style:text-properties style:font-name="GPAFJ+Aptos" style:font-name-asian="GPAFJ+Aptos" style:font-name-complex="GPAFJ+Aptos" fo:color="#000000" fo:letter-spacing="-0.0006in"/>
    </style:style>
    <style:style style:name="T1837" style:parent-style-name="Policepardéfaut" style:family="text">
      <style:text-properties style:font-name="GPAFJ+Aptos" style:font-name-asian="GPAFJ+Aptos" style:font-name-complex="GPAFJ+Aptos" fo:color="#000000"/>
    </style:style>
    <style:style style:name="T1838" style:parent-style-name="Policepardéfaut" style:family="text">
      <style:text-properties style:font-name="GPAFJ+Aptos" style:font-name-asian="GPAFJ+Aptos" style:font-name-complex="GPAFJ+Aptos" fo:color="#000000" style:text-scale="101%"/>
    </style:style>
    <style:style style:name="T1839" style:parent-style-name="Policepardéfaut" style:family="text">
      <style:text-properties style:font-name="GPAFJ+Aptos" style:font-name-asian="GPAFJ+Aptos" style:font-name-complex="GPAFJ+Aptos" fo:color="#000000"/>
    </style:style>
    <style:style style:name="T1840" style:parent-style-name="Policepardéfaut" style:family="text">
      <style:text-properties style:font-name="GPAFJ+Aptos" style:font-name-asian="GPAFJ+Aptos" style:font-name-complex="GPAFJ+Aptos" fo:color="#000000" style:text-scale="101%"/>
    </style:style>
    <style:style style:name="T1841" style:parent-style-name="Policepardéfaut" style:family="text">
      <style:text-properties style:font-name="GPAFJ+Aptos" style:font-name-asian="GPAFJ+Aptos" style:font-name-complex="GPAFJ+Aptos" fo:color="#000000" fo:letter-spacing="-0.0006in"/>
    </style:style>
    <style:style style:name="T1842" style:parent-style-name="Policepardéfaut" style:family="text">
      <style:text-properties style:font-name="GPAFJ+Aptos" style:font-name-asian="GPAFJ+Aptos" style:font-name-complex="GPAFJ+Aptos" fo:color="#000000" style:text-scale="101%"/>
    </style:style>
    <style:style style:name="T1843" style:parent-style-name="Policepardéfaut" style:family="text">
      <style:text-properties style:font-name="GPAFJ+Aptos" style:font-name-asian="GPAFJ+Aptos" style:font-name-complex="GPAFJ+Aptos" fo:color="#000000" fo:letter-spacing="-0.0013in" style:text-scale="101%"/>
    </style:style>
    <style:style style:name="T1844" style:parent-style-name="Policepardéfaut" style:family="text">
      <style:text-properties style:font-name="GPAFJ+Aptos" style:font-name-asian="GPAFJ+Aptos" style:font-name-complex="GPAFJ+Aptos" fo:color="#000000"/>
    </style:style>
    <style:style style:name="T1845" style:parent-style-name="Policepardéfaut" style:family="text">
      <style:text-properties style:font-name="GPAFJ+Aptos" style:font-name-asian="GPAFJ+Aptos" style:font-name-complex="GPAFJ+Aptos" fo:color="#000000" style:text-scale="101%"/>
    </style:style>
    <style:style style:name="T1846" style:parent-style-name="Policepardéfaut" style:family="text">
      <style:text-properties style:font-name="GPAFJ+Aptos" style:font-name-asian="GPAFJ+Aptos" style:font-name-complex="GPAFJ+Aptos" fo:color="#000000" fo:letter-spacing="-0.002in" style:text-scale="101%"/>
    </style:style>
    <style:style style:name="T1847" style:parent-style-name="Policepardéfaut" style:family="text">
      <style:text-properties style:font-name="GPAFJ+Aptos" style:font-name-asian="GPAFJ+Aptos" style:font-name-complex="GPAFJ+Aptos" fo:color="#000000" style:text-scale="101%"/>
    </style:style>
    <style:style style:name="T1848" style:parent-style-name="Policepardéfaut" style:family="text">
      <style:text-properties style:font-name="GPAFJ+Aptos" style:font-name-asian="GPAFJ+Aptos" style:font-name-complex="GPAFJ+Aptos" fo:color="#000000"/>
    </style:style>
    <style:style style:name="T1849" style:parent-style-name="Policepardéfaut" style:family="text">
      <style:text-properties style:font-name="GPAFJ+Aptos" style:font-name-asian="GPAFJ+Aptos" style:font-name-complex="GPAFJ+Aptos" fo:color="#000000" fo:letter-spacing="-0.0006in"/>
    </style:style>
    <style:style style:name="T1850" style:parent-style-name="Policepardéfaut" style:family="text">
      <style:text-properties style:font-name="GPAFJ+Aptos" style:font-name-asian="GPAFJ+Aptos" style:font-name-complex="GPAFJ+Aptos" fo:color="#000000" style:text-scale="101%"/>
    </style:style>
    <style:style style:name="T1851" style:parent-style-name="Policepardéfaut" style:family="text">
      <style:text-properties style:font-name="GPAFJ+Aptos" style:font-name-asian="GPAFJ+Aptos" style:font-name-complex="GPAFJ+Aptos" fo:color="#000000"/>
    </style:style>
    <style:style style:name="T1852" style:parent-style-name="Policepardéfaut" style:family="text">
      <style:text-properties style:font-name="GPAFJ+Aptos" style:font-name-asian="GPAFJ+Aptos" style:font-name-complex="GPAFJ+Aptos" fo:color="#000000" style:text-scale="101%"/>
    </style:style>
    <style:style style:name="T1853" style:parent-style-name="Policepardéfaut" style:family="text">
      <style:text-properties style:font-name="GPAFJ+Aptos" style:font-name-asian="GPAFJ+Aptos" style:font-name-complex="GPAFJ+Aptos" fo:color="#000000"/>
    </style:style>
    <style:style style:name="T1854" style:parent-style-name="Policepardéfaut" style:family="text">
      <style:text-properties style:font-name="GPAFJ+Aptos" style:font-name-asian="GPAFJ+Aptos" style:font-name-complex="GPAFJ+Aptos" fo:color="#000000" fo:letter-spacing="-0.0013in"/>
    </style:style>
    <style:style style:name="T1855" style:parent-style-name="Policepardéfaut" style:family="text">
      <style:text-properties style:font-name="GPAFJ+Aptos" style:font-name-asian="GPAFJ+Aptos" style:font-name-complex="GPAFJ+Aptos" fo:color="#000000" fo:letter-spacing="-0.0006in" style:text-scale="101%"/>
    </style:style>
    <style:style style:name="T1856" style:parent-style-name="Policepardéfaut" style:family="text">
      <style:text-properties style:font-name="GPAFJ+Aptos" style:font-name-asian="GPAFJ+Aptos" style:font-name-complex="GPAFJ+Aptos" fo:color="#000000" style:text-scale="101%"/>
    </style:style>
    <style:style style:name="T1857" style:parent-style-name="Policepardéfaut" style:family="text">
      <style:text-properties style:font-name="GPAFJ+Aptos" style:font-name-asian="GPAFJ+Aptos" style:font-name-complex="GPAFJ+Aptos" fo:color="#000000"/>
    </style:style>
    <style:style style:name="T1858" style:parent-style-name="Policepardéfaut" style:family="text">
      <style:text-properties style:font-name="GPAFJ+Aptos" style:font-name-asian="GPAFJ+Aptos" style:font-name-complex="GPAFJ+Aptos" fo:color="#000000" style:text-scale="101%"/>
    </style:style>
    <style:style style:name="T1859" style:parent-style-name="Policepardéfaut" style:family="text">
      <style:text-properties style:font-name="GPAFJ+Aptos" style:font-name-asian="GPAFJ+Aptos" style:font-name-complex="GPAFJ+Aptos" fo:color="#000000" fo:letter-spacing="-0.0006in" style:text-scale="101%"/>
    </style:style>
    <style:style style:name="T1860" style:parent-style-name="Policepardéfaut" style:family="text">
      <style:text-properties style:font-name="GPAFJ+Aptos" style:font-name-asian="GPAFJ+Aptos" style:font-name-complex="GPAFJ+Aptos" fo:color="#000000" fo:letter-spacing="-0.0006in"/>
    </style:style>
    <style:style style:name="T1861" style:parent-style-name="Policepardéfaut" style:family="text">
      <style:text-properties style:font-name="GPAFJ+Aptos" style:font-name-asian="GPAFJ+Aptos" style:font-name-complex="GPAFJ+Aptos" fo:color="#000000" style:text-scale="101%"/>
    </style:style>
    <style:style style:name="T1862" style:parent-style-name="Policepardéfaut" style:family="text">
      <style:text-properties style:font-name="GPAFJ+Aptos" style:font-name-asian="GPAFJ+Aptos" style:font-name-complex="GPAFJ+Aptos" fo:color="#000000" fo:letter-spacing="-0.0006in"/>
    </style:style>
    <style:style style:name="T1863" style:parent-style-name="Policepardéfaut" style:family="text">
      <style:text-properties style:font-name="GPAFJ+Aptos" style:font-name-asian="GPAFJ+Aptos" style:font-name-complex="GPAFJ+Aptos" fo:color="#000000" style:text-scale="101%"/>
    </style:style>
    <style:style style:name="T1864" style:parent-style-name="Policepardéfaut" style:family="text">
      <style:text-properties style:font-name="GPAFJ+Aptos" style:font-name-asian="GPAFJ+Aptos" style:font-name-complex="GPAFJ+Aptos" fo:color="#000000"/>
    </style:style>
    <style:style style:name="T1865" style:parent-style-name="Policepardéfaut" style:family="text">
      <style:text-properties style:font-name="GPAFJ+Aptos" style:font-name-asian="GPAFJ+Aptos" style:font-name-complex="GPAFJ+Aptos" fo:color="#000000" style:text-scale="101%"/>
    </style:style>
    <style:style style:name="T1866" style:parent-style-name="Policepardéfaut" style:family="text">
      <style:text-properties style:font-name="GPAFJ+Aptos" style:font-name-asian="GPAFJ+Aptos" style:font-name-complex="GPAFJ+Aptos" fo:color="#000000"/>
    </style:style>
    <style:style style:name="T1867" style:parent-style-name="Policepardéfaut" style:family="text">
      <style:text-properties style:font-name="GPAFJ+Aptos" style:font-name-asian="GPAFJ+Aptos" style:font-name-complex="GPAFJ+Aptos" fo:color="#000000" fo:letter-spacing="-0.0006in"/>
    </style:style>
    <style:style style:name="T1868" style:parent-style-name="Policepardéfaut" style:family="text">
      <style:text-properties style:font-name="GPAFJ+Aptos" style:font-name-asian="GPAFJ+Aptos" style:font-name-complex="GPAFJ+Aptos" fo:color="#000000" style:text-scale="101%"/>
    </style:style>
    <style:style style:name="T1869" style:parent-style-name="Policepardéfaut" style:family="text">
      <style:text-properties style:font-name="GPAFJ+Aptos" style:font-name-asian="GPAFJ+Aptos" style:font-name-complex="GPAFJ+Aptos" fo:color="#000000"/>
    </style:style>
    <style:style style:name="T1870" style:parent-style-name="Policepardéfaut" style:family="text">
      <style:text-properties style:font-name="GPAFJ+Aptos" style:font-name-asian="GPAFJ+Aptos" style:font-name-complex="GPAFJ+Aptos" fo:color="#000000" fo:letter-spacing="-0.0006in"/>
    </style:style>
    <style:style style:name="T1871" style:parent-style-name="Policepardéfaut" style:family="text">
      <style:text-properties style:font-name="GPAFJ+Aptos" style:font-name-asian="GPAFJ+Aptos" style:font-name-complex="GPAFJ+Aptos" fo:color="#000000"/>
    </style:style>
    <style:style style:name="T1872" style:parent-style-name="Policepardéfaut" style:family="text">
      <style:text-properties style:font-name="GPAFJ+Aptos" style:font-name-asian="GPAFJ+Aptos" style:font-name-complex="GPAFJ+Aptos" fo:color="#000000" style:text-scale="101%"/>
    </style:style>
    <style:style style:name="T1873" style:parent-style-name="Policepardéfaut" style:family="text">
      <style:text-properties style:font-name="GPAFJ+Aptos" style:font-name-asian="GPAFJ+Aptos" style:font-name-complex="GPAFJ+Aptos" fo:color="#000000" fo:letter-spacing="-0.0006in"/>
    </style:style>
    <style:style style:name="T1874" style:parent-style-name="Policepardéfaut" style:family="text">
      <style:text-properties style:font-name="GPAFJ+Aptos" style:font-name-asian="GPAFJ+Aptos" style:font-name-complex="GPAFJ+Aptos" fo:color="#000000" style:text-scale="101%"/>
    </style:style>
    <style:style style:name="T1875" style:parent-style-name="Policepardéfaut" style:family="text">
      <style:text-properties style:font-name="GPAFJ+Aptos" style:font-name-asian="GPAFJ+Aptos" style:font-name-complex="GPAFJ+Aptos" fo:color="#000000"/>
    </style:style>
    <style:style style:name="T1876" style:parent-style-name="Policepardéfaut" style:family="text">
      <style:text-properties style:font-name="GPAFJ+Aptos" style:font-name-asian="GPAFJ+Aptos" style:font-name-complex="GPAFJ+Aptos" fo:color="#000000" style:text-scale="101%"/>
    </style:style>
    <style:style style:name="T1877" style:parent-style-name="Policepardéfaut" style:family="text">
      <style:text-properties style:font-name="GPAFJ+Aptos" style:font-name-asian="GPAFJ+Aptos" style:font-name-complex="GPAFJ+Aptos" fo:color="#000000" fo:letter-spacing="-0.0013in" style:text-scale="101%"/>
    </style:style>
    <style:style style:name="T1878" style:parent-style-name="Policepardéfaut" style:family="text">
      <style:text-properties style:font-name="GPAFJ+Aptos" style:font-name-asian="GPAFJ+Aptos" style:font-name-complex="GPAFJ+Aptos" fo:color="#000000" fo:letter-spacing="-0.0013in"/>
    </style:style>
    <style:style style:name="T1879" style:parent-style-name="Policepardéfaut" style:family="text">
      <style:text-properties style:font-name="GPAFJ+Aptos" style:font-name-asian="GPAFJ+Aptos" style:font-name-complex="GPAFJ+Aptos" fo:color="#000000"/>
    </style:style>
    <style:style style:name="T1880" style:parent-style-name="Policepardéfaut" style:family="text">
      <style:text-properties style:font-name="GPAFJ+Aptos" style:font-name-asian="GPAFJ+Aptos" style:font-name-complex="GPAFJ+Aptos" fo:color="#000000" fo:letter-spacing="-0.0006in"/>
    </style:style>
    <style:style style:name="T1881" style:parent-style-name="Policepardéfaut" style:family="text">
      <style:text-properties style:font-name="GPAFJ+Aptos" style:font-name-asian="GPAFJ+Aptos" style:font-name-complex="GPAFJ+Aptos" fo:color="#000000" style:text-scale="101%"/>
    </style:style>
    <style:style style:name="T1882" style:parent-style-name="Policepardéfaut" style:family="text">
      <style:text-properties style:font-name="GPAFJ+Aptos" style:font-name-asian="GPAFJ+Aptos" style:font-name-complex="GPAFJ+Aptos" fo:color="#000000" fo:letter-spacing="-0.0006in"/>
    </style:style>
    <style:style style:name="T1883" style:parent-style-name="Policepardéfaut" style:family="text">
      <style:text-properties style:font-name="GPAFJ+Aptos" style:font-name-asian="GPAFJ+Aptos" style:font-name-complex="GPAFJ+Aptos" fo:color="#000000" fo:letter-spacing="0.0006in" style:text-scale="101%"/>
    </style:style>
    <style:style style:name="T1884" style:parent-style-name="Policepardéfaut" style:family="text">
      <style:text-properties style:font-name="GPAFJ+Aptos" style:font-name-asian="GPAFJ+Aptos" style:font-name-complex="GPAFJ+Aptos" fo:color="#000000" fo:letter-spacing="-0.0006in"/>
    </style:style>
    <style:style style:name="T1885" style:parent-style-name="Policepardéfaut" style:family="text">
      <style:text-properties style:font-name="GPAFJ+Aptos" style:font-name-asian="GPAFJ+Aptos" style:font-name-complex="GPAFJ+Aptos" fo:color="#000000"/>
    </style:style>
    <style:style style:name="T1886" style:parent-style-name="Policepardéfaut" style:family="text">
      <style:text-properties style:font-name="GPAFJ+Aptos" style:font-name-asian="GPAFJ+Aptos" style:font-name-complex="GPAFJ+Aptos" fo:color="#000000" fo:letter-spacing="-0.0006in" style:text-scale="101%"/>
    </style:style>
    <style:style style:name="T1887" style:parent-style-name="Policepardéfaut" style:family="text">
      <style:text-properties style:font-name="GPAFJ+Aptos" style:font-name-asian="GPAFJ+Aptos" style:font-name-complex="GPAFJ+Aptos" fo:color="#000000" fo:letter-spacing="-0.0006in"/>
    </style:style>
    <style:style style:name="T1888" style:parent-style-name="Policepardéfaut" style:family="text">
      <style:text-properties style:font-name="GPAFJ+Aptos" style:font-name-asian="GPAFJ+Aptos" style:font-name-complex="GPAFJ+Aptos" fo:color="#000000" style:text-scale="101%"/>
    </style:style>
    <style:style style:name="T1889" style:parent-style-name="Policepardéfaut" style:family="text">
      <style:text-properties style:font-name="GPAFJ+Aptos" style:font-name-asian="GPAFJ+Aptos" style:font-name-complex="GPAFJ+Aptos" fo:color="#000000"/>
    </style:style>
    <style:style style:name="T1890" style:parent-style-name="Policepardéfaut" style:family="text">
      <style:text-properties style:font-name="GPAFJ+Aptos" style:font-name-asian="GPAFJ+Aptos" style:font-name-complex="GPAFJ+Aptos" fo:color="#000000" style:text-scale="101%"/>
    </style:style>
    <style:style style:name="T1891" style:parent-style-name="Policepardéfaut" style:family="text">
      <style:text-properties style:font-name="GPAFJ+Aptos" style:font-name-asian="GPAFJ+Aptos" style:font-name-complex="GPAFJ+Aptos" fo:color="#000000"/>
    </style:style>
    <style:style style:name="T1892" style:parent-style-name="Policepardéfaut" style:family="text">
      <style:text-properties style:font-name="GPAFJ+Aptos" style:font-name-asian="GPAFJ+Aptos" style:font-name-complex="GPAFJ+Aptos" fo:color="#000000" fo:letter-spacing="-0.0013in" style:text-scale="101%"/>
    </style:style>
    <style:style style:name="T1893" style:parent-style-name="Policepardéfaut" style:family="text">
      <style:text-properties style:font-name="GPAFJ+Aptos" style:font-name-asian="GPAFJ+Aptos" style:font-name-complex="GPAFJ+Aptos" fo:color="#000000" style:text-scale="101%"/>
    </style:style>
    <style:style style:name="T1894" style:parent-style-name="Policepardéfaut" style:family="text">
      <style:text-properties style:font-name="GPAFJ+Aptos" style:font-name-asian="GPAFJ+Aptos" style:font-name-complex="GPAFJ+Aptos" fo:color="#000000"/>
    </style:style>
    <style:style style:name="T1895" style:parent-style-name="Policepardéfaut" style:family="text">
      <style:text-properties style:font-name="GPAFJ+Aptos" style:font-name-asian="GPAFJ+Aptos" style:font-name-complex="GPAFJ+Aptos" fo:color="#000000" fo:letter-spacing="-0.0006in"/>
    </style:style>
    <style:style style:name="T1896" style:parent-style-name="Policepardéfaut" style:family="text">
      <style:text-properties style:font-name="GPAFJ+Aptos" style:font-name-asian="GPAFJ+Aptos" style:font-name-complex="GPAFJ+Aptos" fo:color="#000000" style:text-scale="101%"/>
    </style:style>
    <style:style style:name="T1897" style:parent-style-name="Policepardéfaut" style:family="text">
      <style:text-properties style:font-name="GPAFJ+Aptos" style:font-name-asian="GPAFJ+Aptos" style:font-name-complex="GPAFJ+Aptos" fo:color="#000000"/>
    </style:style>
    <style:style style:name="T1898" style:parent-style-name="Policepardéfaut" style:family="text">
      <style:text-properties style:font-name="GPAFJ+Aptos" style:font-name-asian="GPAFJ+Aptos" style:font-name-complex="GPAFJ+Aptos" fo:color="#000000" fo:letter-spacing="-0.0006in" style:text-scale="101%"/>
    </style:style>
    <style:style style:name="T1899" style:parent-style-name="Policepardéfaut" style:family="text">
      <style:text-properties style:font-name="GPAFJ+Aptos" style:font-name-asian="GPAFJ+Aptos" style:font-name-complex="GPAFJ+Aptos" fo:color="#000000" style:text-scale="101%"/>
    </style:style>
    <style:style style:name="T1900" style:parent-style-name="Policepardéfaut" style:family="text">
      <style:text-properties style:font-name="GPAFJ+Aptos" style:font-name-asian="GPAFJ+Aptos" style:font-name-complex="GPAFJ+Aptos" fo:color="#000000"/>
    </style:style>
    <style:style style:name="T1901" style:parent-style-name="Policepardéfaut" style:family="text">
      <style:text-properties style:font-name="GPAFJ+Aptos" style:font-name-asian="GPAFJ+Aptos" style:font-name-complex="GPAFJ+Aptos" fo:color="#000000" fo:letter-spacing="-0.0006in" style:text-scale="101%"/>
    </style:style>
    <style:style style:name="T1902" style:parent-style-name="Policepardéfaut" style:family="text">
      <style:text-properties style:font-name="GPAFJ+Aptos" style:font-name-asian="GPAFJ+Aptos" style:font-name-complex="GPAFJ+Aptos" fo:color="#000000"/>
    </style:style>
    <style:style style:name="T1903" style:parent-style-name="Policepardéfaut" style:family="text">
      <style:text-properties style:font-name="GPAFJ+Aptos" style:font-name-asian="GPAFJ+Aptos" style:font-name-complex="GPAFJ+Aptos" fo:color="#000000" fo:letter-spacing="-0.0006in"/>
    </style:style>
    <style:style style:name="T1904" style:parent-style-name="Policepardéfaut" style:family="text">
      <style:text-properties style:font-name="GPAFJ+Aptos" style:font-name-asian="GPAFJ+Aptos" style:font-name-complex="GPAFJ+Aptos" fo:color="#000000"/>
    </style:style>
    <style:style style:name="T1905" style:parent-style-name="Policepardéfaut" style:family="text">
      <style:text-properties style:font-name="GPAFJ+Aptos" style:font-name-asian="GPAFJ+Aptos" style:font-name-complex="GPAFJ+Aptos" fo:color="#000000" fo:letter-spacing="-0.0006in" style:text-scale="101%"/>
    </style:style>
    <style:style style:name="T1906" style:parent-style-name="Policepardéfaut" style:family="text">
      <style:text-properties style:font-name="GPAFJ+Aptos" style:font-name-asian="GPAFJ+Aptos" style:font-name-complex="GPAFJ+Aptos" fo:color="#000000"/>
    </style:style>
    <style:style style:name="T1907" style:parent-style-name="Policepardéfaut" style:family="text">
      <style:text-properties style:font-name="GPAFJ+Aptos" style:font-name-asian="GPAFJ+Aptos" style:font-name-complex="GPAFJ+Aptos" fo:color="#000000" fo:letter-spacing="-0.0006in" style:text-scale="101%"/>
    </style:style>
    <style:style style:name="T1908" style:parent-style-name="Policepardéfaut" style:family="text">
      <style:text-properties style:font-name="GPAFJ+Aptos" style:font-name-asian="GPAFJ+Aptos" style:font-name-complex="GPAFJ+Aptos" fo:color="#000000" style:text-scale="101%"/>
    </style:style>
    <style:style style:name="T1909" style:parent-style-name="Policepardéfaut" style:family="text">
      <style:text-properties style:font-name="GPAFJ+Aptos" style:font-name-asian="GPAFJ+Aptos" style:font-name-complex="GPAFJ+Aptos" fo:color="#000000"/>
    </style:style>
    <style:style style:name="T1910" style:parent-style-name="Policepardéfaut" style:family="text">
      <style:text-properties style:font-name="GPAFJ+Aptos" style:font-name-asian="GPAFJ+Aptos" style:font-name-complex="GPAFJ+Aptos" fo:color="#000000" fo:letter-spacing="0.0006in" style:text-scale="101%"/>
    </style:style>
    <style:style style:name="T1911" style:parent-style-name="Policepardéfaut" style:family="text">
      <style:text-properties style:font-name="GPAFJ+Aptos" style:font-name-asian="GPAFJ+Aptos" style:font-name-complex="GPAFJ+Aptos" fo:color="#000000" style:text-scale="101%"/>
    </style:style>
    <style:style style:name="P1912" style:parent-style-name="Normal" style:family="paragraph">
      <style:paragraph-properties fo:text-align="justify" fo:margin-bottom="0.0125in" fo:line-height="0.0972in"/>
      <style:text-properties fo:font-size="7pt" style:font-size-asian="7pt" style:font-size-complex="7pt"/>
    </style:style>
    <style:style style:name="P1913" style:parent-style-name="Normal" style:family="paragraph">
      <style:paragraph-properties fo:widows="0" fo:orphans="0" fo:text-align="justify" fo:margin-left="0.5in" fo:margin-right="0.859in" fo:text-indent="-0.2493in">
        <style:tab-stops/>
      </style:paragraph-properties>
    </style:style>
    <style:style style:name="T1914" style:parent-style-name="Policepardéfaut" style:family="text">
      <style:text-properties style:font-name="Symbol" style:font-name-asian="Symbol" style:font-name-complex="Symbol" fo:color="#000000" fo:font-size="10pt" style:font-size-asian="10pt" style:font-size-complex="10pt"/>
    </style:style>
    <style:style style:name="T1915" style:parent-style-name="Policepardéfaut" style:family="text">
      <style:text-properties style:font-name="Symbol" style:font-name-asian="Symbol" style:font-name-complex="Symbol" fo:color="#000000" fo:font-size="10pt" style:font-size-asian="10pt" style:font-size-complex="10pt"/>
    </style:style>
    <style:style style:name="T1916" style:parent-style-name="Policepardéfaut" style:family="text">
      <style:text-properties style:font-name="WYAXW+Aptos" style:font-name-asian="WYAXW+Aptos" style:font-name-complex="WYAXW+Aptos" fo:font-weight="bold" style:font-weight-asian="bold" style:font-weight-complex="bold" fo:color="#000000" fo:letter-spacing="-0.0006in" style:text-scale="101%"/>
    </style:style>
    <style:style style:name="T1917" style:parent-style-name="Policepardéfaut" style:family="text">
      <style:text-properties style:font-name="WYAXW+Aptos" style:font-name-asian="WYAXW+Aptos" style:font-name-complex="WYAXW+Aptos" fo:font-weight="bold" style:font-weight-asian="bold" style:font-weight-complex="bold" fo:color="#000000"/>
    </style:style>
    <style:style style:name="T1918" style:parent-style-name="Policepardéfaut" style:family="text">
      <style:text-properties style:font-name="WYAXW+Aptos" style:font-name-asian="WYAXW+Aptos" style:font-name-complex="WYAXW+Aptos" fo:font-weight="bold" style:font-weight-asian="bold" style:font-weight-complex="bold" fo:color="#000000" fo:letter-spacing="0.0006in" style:text-scale="101%"/>
    </style:style>
    <style:style style:name="T1919"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920" style:parent-style-name="Policepardéfaut" style:family="text">
      <style:text-properties style:font-name="WYAXW+Aptos" style:font-name-asian="WYAXW+Aptos" style:font-name-complex="WYAXW+Aptos" fo:font-weight="bold" style:font-weight-asian="bold" style:font-weight-complex="bold" fo:color="#000000"/>
    </style:style>
    <style:style style:name="T1921"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922"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923" style:parent-style-name="Policepardéfaut" style:family="text">
      <style:text-properties style:font-name="WYAXW+Aptos" style:font-name-asian="WYAXW+Aptos" style:font-name-complex="WYAXW+Aptos" fo:font-weight="bold" style:font-weight-asian="bold" style:font-weight-complex="bold" fo:color="#000000"/>
    </style:style>
    <style:style style:name="T1924"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1925" style:parent-style-name="Policepardéfaut" style:family="text">
      <style:text-properties style:font-name="WYAXW+Aptos" style:font-name-asian="WYAXW+Aptos" style:font-name-complex="WYAXW+Aptos" fo:font-weight="bold" style:font-weight-asian="bold" style:font-weight-complex="bold" fo:color="#000000"/>
    </style:style>
    <style:style style:name="T1926"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1927" style:parent-style-name="Policepardéfaut" style:family="text">
      <style:text-properties style:font-name="WYAXW+Aptos" style:font-name-asian="WYAXW+Aptos" style:font-name-complex="WYAXW+Aptos" fo:font-weight="bold" style:font-weight-asian="bold" style:font-weight-complex="bold" fo:color="#000000"/>
    </style:style>
    <style:style style:name="T1928" style:parent-style-name="Policepardéfaut" style:family="text">
      <style:text-properties style:font-name="WYAXW+Aptos" style:font-name-asian="WYAXW+Aptos" style:font-name-complex="WYAXW+Aptos" fo:font-weight="bold" style:font-weight-asian="bold" style:font-weight-complex="bold" fo:color="#000000" fo:letter-spacing="-0.0006in" style:text-scale="101%"/>
    </style:style>
    <style:style style:name="T1929" style:parent-style-name="Policepardéfaut" style:family="text">
      <style:text-properties style:font-name="WYAXW+Aptos" style:font-name-asian="WYAXW+Aptos" style:font-name-complex="WYAXW+Aptos" fo:font-weight="bold" style:font-weight-asian="bold" style:font-weight-complex="bold" fo:color="#000000"/>
    </style:style>
    <style:style style:name="T1930" style:parent-style-name="Policepardéfaut" style:family="text">
      <style:text-properties style:font-name="WYAXW+Aptos" style:font-name-asian="WYAXW+Aptos" style:font-name-complex="WYAXW+Aptos" fo:font-weight="bold" style:font-weight-asian="bold" style:font-weight-complex="bold" fo:color="#000000" fo:letter-spacing="-0.0013in"/>
    </style:style>
    <style:style style:name="T1931" style:parent-style-name="Policepardéfaut" style:family="text">
      <style:text-properties style:font-name="WYAXW+Aptos" style:font-name-asian="WYAXW+Aptos" style:font-name-complex="WYAXW+Aptos" fo:font-weight="bold" style:font-weight-asian="bold" style:font-weight-complex="bold" fo:color="#000000"/>
    </style:style>
    <style:style style:name="T1932" style:parent-style-name="Policepardéfaut" style:family="text">
      <style:text-properties style:font-name="WYAXW+Aptos" style:font-name-asian="WYAXW+Aptos" style:font-name-complex="WYAXW+Aptos" fo:font-weight="bold" style:font-weight-asian="bold" style:font-weight-complex="bold" fo:color="#000000" fo:letter-spacing="0.0013in"/>
    </style:style>
    <style:style style:name="T1933" style:parent-style-name="Policepardéfaut" style:family="text">
      <style:text-properties style:font-name="GPAFJ+Aptos" style:font-name-asian="GPAFJ+Aptos" style:font-name-complex="GPAFJ+Aptos" fo:color="#000000" style:text-scale="101%"/>
    </style:style>
    <style:style style:name="T1934" style:parent-style-name="Policepardéfaut" style:family="text">
      <style:text-properties style:font-name="GPAFJ+Aptos" style:font-name-asian="GPAFJ+Aptos" style:font-name-complex="GPAFJ+Aptos" fo:color="#000000"/>
    </style:style>
    <style:style style:name="T1935" style:parent-style-name="Policepardéfaut" style:family="text">
      <style:text-properties style:font-name="GPAFJ+Aptos" style:font-name-asian="GPAFJ+Aptos" style:font-name-complex="GPAFJ+Aptos" fo:color="#000000" style:text-scale="101%"/>
    </style:style>
    <style:style style:name="T1936" style:parent-style-name="Policepardéfaut" style:family="text">
      <style:text-properties style:font-name="GPAFJ+Aptos" style:font-name-asian="GPAFJ+Aptos" style:font-name-complex="GPAFJ+Aptos" fo:color="#000000" fo:letter-spacing="-0.0006in"/>
    </style:style>
    <style:style style:name="T1937" style:parent-style-name="Policepardéfaut" style:family="text">
      <style:text-properties style:font-name="GPAFJ+Aptos" style:font-name-asian="GPAFJ+Aptos" style:font-name-complex="GPAFJ+Aptos" fo:color="#000000" style:text-scale="101%"/>
    </style:style>
    <style:style style:name="T1938" style:parent-style-name="Policepardéfaut" style:family="text">
      <style:text-properties style:font-name="GPAFJ+Aptos" style:font-name-asian="GPAFJ+Aptos" style:font-name-complex="GPAFJ+Aptos" fo:color="#000000"/>
    </style:style>
    <style:style style:name="T1939" style:parent-style-name="Policepardéfaut" style:family="text">
      <style:text-properties style:font-name="GPAFJ+Aptos" style:font-name-asian="GPAFJ+Aptos" style:font-name-complex="GPAFJ+Aptos" fo:color="#000000" fo:letter-spacing="-0.0006in"/>
    </style:style>
    <style:style style:name="T1940" style:parent-style-name="Policepardéfaut" style:family="text">
      <style:text-properties style:font-name="GPAFJ+Aptos" style:font-name-asian="GPAFJ+Aptos" style:font-name-complex="GPAFJ+Aptos" fo:color="#000000"/>
    </style:style>
    <style:style style:name="T1941" style:parent-style-name="Policepardéfaut" style:family="text">
      <style:text-properties style:font-name="GPAFJ+Aptos" style:font-name-asian="GPAFJ+Aptos" style:font-name-complex="GPAFJ+Aptos" fo:color="#000000" fo:letter-spacing="-0.0006in" style:text-scale="101%"/>
    </style:style>
    <style:style style:name="T1942" style:parent-style-name="Policepardéfaut" style:family="text">
      <style:text-properties style:font-name="GPAFJ+Aptos" style:font-name-asian="GPAFJ+Aptos" style:font-name-complex="GPAFJ+Aptos" fo:color="#000000"/>
    </style:style>
    <style:style style:name="T1943" style:parent-style-name="Policepardéfaut" style:family="text">
      <style:text-properties style:font-name="GPAFJ+Aptos" style:font-name-asian="GPAFJ+Aptos" style:font-name-complex="GPAFJ+Aptos" fo:color="#000000" fo:letter-spacing="-0.0006in" style:text-scale="101%"/>
    </style:style>
    <style:style style:name="T1944" style:parent-style-name="Policepardéfaut" style:family="text">
      <style:text-properties style:font-name="GPAFJ+Aptos" style:font-name-asian="GPAFJ+Aptos" style:font-name-complex="GPAFJ+Aptos" fo:color="#000000" style:text-scale="101%"/>
    </style:style>
    <style:style style:name="T1945" style:parent-style-name="Policepardéfaut" style:family="text">
      <style:text-properties style:font-name="GPAFJ+Aptos" style:font-name-asian="GPAFJ+Aptos" style:font-name-complex="GPAFJ+Aptos" fo:color="#000000"/>
    </style:style>
    <style:style style:name="T1946" style:parent-style-name="Policepardéfaut" style:family="text">
      <style:text-properties style:font-name="GPAFJ+Aptos" style:font-name-asian="GPAFJ+Aptos" style:font-name-complex="GPAFJ+Aptos" fo:color="#000000" fo:letter-spacing="-0.0006in"/>
    </style:style>
    <style:style style:name="T1947" style:parent-style-name="Policepardéfaut" style:family="text">
      <style:text-properties style:font-name="GPAFJ+Aptos" style:font-name-asian="GPAFJ+Aptos" style:font-name-complex="GPAFJ+Aptos" fo:color="#000000" style:text-scale="101%"/>
    </style:style>
    <style:style style:name="T1948" style:parent-style-name="Policepardéfaut" style:family="text">
      <style:text-properties style:font-name="GPAFJ+Aptos" style:font-name-asian="GPAFJ+Aptos" style:font-name-complex="GPAFJ+Aptos" fo:color="#000000" fo:letter-spacing="-0.0006in"/>
    </style:style>
    <style:style style:name="T1949" style:parent-style-name="Policepardéfaut" style:family="text">
      <style:text-properties style:font-name="GPAFJ+Aptos" style:font-name-asian="GPAFJ+Aptos" style:font-name-complex="GPAFJ+Aptos" fo:color="#000000" style:text-scale="101%"/>
    </style:style>
    <style:style style:name="T1950" style:parent-style-name="Policepardéfaut" style:family="text">
      <style:text-properties style:font-name="GPAFJ+Aptos" style:font-name-asian="GPAFJ+Aptos" style:font-name-complex="GPAFJ+Aptos" fo:color="#000000" fo:letter-spacing="-0.0006in" style:text-scale="101%"/>
    </style:style>
    <style:style style:name="T1951" style:parent-style-name="Policepardéfaut" style:family="text">
      <style:text-properties style:font-name="GPAFJ+Aptos" style:font-name-asian="GPAFJ+Aptos" style:font-name-complex="GPAFJ+Aptos" fo:color="#000000"/>
    </style:style>
    <style:style style:name="T1952" style:parent-style-name="Policepardéfaut" style:family="text">
      <style:text-properties style:font-name="GPAFJ+Aptos" style:font-name-asian="GPAFJ+Aptos" style:font-name-complex="GPAFJ+Aptos" fo:color="#000000" fo:letter-spacing="-0.0006in"/>
    </style:style>
    <style:style style:name="T1953" style:parent-style-name="Policepardéfaut" style:family="text">
      <style:text-properties style:font-name="GPAFJ+Aptos" style:font-name-asian="GPAFJ+Aptos" style:font-name-complex="GPAFJ+Aptos" fo:color="#000000" fo:letter-spacing="-0.0006in" style:text-scale="101%"/>
    </style:style>
    <style:style style:name="T1954" style:parent-style-name="Policepardéfaut" style:family="text">
      <style:text-properties style:font-name="GPAFJ+Aptos" style:font-name-asian="GPAFJ+Aptos" style:font-name-complex="GPAFJ+Aptos" fo:color="#000000" fo:letter-spacing="-0.0006in"/>
    </style:style>
    <style:style style:name="T1955" style:parent-style-name="Policepardéfaut" style:family="text">
      <style:text-properties style:font-name="GPAFJ+Aptos" style:font-name-asian="GPAFJ+Aptos" style:font-name-complex="GPAFJ+Aptos" fo:color="#000000" fo:letter-spacing="0.0006in"/>
    </style:style>
    <style:style style:name="T1956" style:parent-style-name="Policepardéfaut" style:family="text">
      <style:text-properties style:font-name="GPAFJ+Aptos" style:font-name-asian="GPAFJ+Aptos" style:font-name-complex="GPAFJ+Aptos" fo:color="#000000"/>
    </style:style>
    <style:style style:name="T1957" style:parent-style-name="Policepardéfaut" style:family="text">
      <style:text-properties style:font-name="GPAFJ+Aptos" style:font-name-asian="GPAFJ+Aptos" style:font-name-complex="GPAFJ+Aptos" fo:color="#000000" style:text-scale="101%"/>
    </style:style>
    <style:style style:name="T1958" style:parent-style-name="Policepardéfaut" style:family="text">
      <style:text-properties style:font-name="GPAFJ+Aptos" style:font-name-asian="GPAFJ+Aptos" style:font-name-complex="GPAFJ+Aptos" fo:color="#000000" fo:letter-spacing="-0.0006in"/>
    </style:style>
    <style:style style:name="T1959" style:parent-style-name="Policepardéfaut" style:family="text">
      <style:text-properties style:font-name="GPAFJ+Aptos" style:font-name-asian="GPAFJ+Aptos" style:font-name-complex="GPAFJ+Aptos" fo:color="#000000" style:text-scale="101%"/>
    </style:style>
    <style:style style:name="T1960" style:parent-style-name="Policepardéfaut" style:family="text">
      <style:text-properties style:font-name="GPAFJ+Aptos" style:font-name-asian="GPAFJ+Aptos" style:font-name-complex="GPAFJ+Aptos" fo:color="#000000"/>
    </style:style>
    <style:style style:name="T1961" style:parent-style-name="Policepardéfaut" style:family="text">
      <style:text-properties style:font-name="GPAFJ+Aptos" style:font-name-asian="GPAFJ+Aptos" style:font-name-complex="GPAFJ+Aptos" fo:color="#000000" fo:letter-spacing="-0.0006in"/>
    </style:style>
    <style:style style:name="T1962" style:parent-style-name="Policepardéfaut" style:family="text">
      <style:text-properties style:font-name="GPAFJ+Aptos" style:font-name-asian="GPAFJ+Aptos" style:font-name-complex="GPAFJ+Aptos" fo:color="#000000" style:text-scale="101%"/>
    </style:style>
    <style:style style:name="T1963" style:parent-style-name="Policepardéfaut" style:family="text">
      <style:text-properties style:font-name="GPAFJ+Aptos" style:font-name-asian="GPAFJ+Aptos" style:font-name-complex="GPAFJ+Aptos" fo:color="#000000" fo:letter-spacing="0.0006in" style:text-scale="101%"/>
    </style:style>
    <style:style style:name="T1964" style:parent-style-name="Policepardéfaut" style:family="text">
      <style:text-properties style:font-name="GPAFJ+Aptos" style:font-name-asian="GPAFJ+Aptos" style:font-name-complex="GPAFJ+Aptos" fo:color="#000000" fo:letter-spacing="-0.0006in" style:text-scale="101%"/>
    </style:style>
    <style:style style:name="T1965" style:parent-style-name="Policepardéfaut" style:family="text">
      <style:text-properties style:font-name="GPAFJ+Aptos" style:font-name-asian="GPAFJ+Aptos" style:font-name-complex="GPAFJ+Aptos" fo:color="#000000"/>
    </style:style>
    <style:style style:name="T1966" style:parent-style-name="Policepardéfaut" style:family="text">
      <style:text-properties style:font-name="GPAFJ+Aptos" style:font-name-asian="GPAFJ+Aptos" style:font-name-complex="GPAFJ+Aptos" fo:color="#000000" fo:letter-spacing="-0.0006in"/>
    </style:style>
    <style:style style:name="T1967" style:parent-style-name="Policepardéfaut" style:family="text">
      <style:text-properties style:font-name="GPAFJ+Aptos" style:font-name-asian="GPAFJ+Aptos" style:font-name-complex="GPAFJ+Aptos" fo:color="#000000" fo:letter-spacing="-0.0013in" style:text-scale="101%"/>
    </style:style>
    <style:style style:name="T1968" style:parent-style-name="Policepardéfaut" style:family="text">
      <style:text-properties style:font-name="GPAFJ+Aptos" style:font-name-asian="GPAFJ+Aptos" style:font-name-complex="GPAFJ+Aptos" fo:color="#000000" fo:letter-spacing="-0.0006in" style:text-scale="101%"/>
    </style:style>
    <style:style style:name="T1969" style:parent-style-name="Policepardéfaut" style:family="text">
      <style:text-properties style:font-name="GPAFJ+Aptos" style:font-name-asian="GPAFJ+Aptos" style:font-name-complex="GPAFJ+Aptos" fo:color="#000000"/>
    </style:style>
    <style:style style:name="T1970" style:parent-style-name="Policepardéfaut" style:family="text">
      <style:text-properties style:font-name="GPAFJ+Aptos" style:font-name-asian="GPAFJ+Aptos" style:font-name-complex="GPAFJ+Aptos" fo:color="#000000" style:text-scale="101%"/>
    </style:style>
    <style:style style:name="T1971" style:parent-style-name="Policepardéfaut" style:family="text">
      <style:text-properties style:font-name="GPAFJ+Aptos" style:font-name-asian="GPAFJ+Aptos" style:font-name-complex="GPAFJ+Aptos" fo:color="#000000" fo:letter-spacing="-0.002in"/>
    </style:style>
    <style:style style:name="T1972" style:parent-style-name="Policepardéfaut" style:family="text">
      <style:text-properties style:font-name="GPAFJ+Aptos" style:font-name-asian="GPAFJ+Aptos" style:font-name-complex="GPAFJ+Aptos" fo:color="#000000"/>
    </style:style>
    <style:style style:name="T1973" style:parent-style-name="Policepardéfaut" style:family="text">
      <style:text-properties style:font-name="GPAFJ+Aptos" style:font-name-asian="GPAFJ+Aptos" style:font-name-complex="GPAFJ+Aptos" fo:color="#000000" fo:letter-spacing="0.0006in"/>
    </style:style>
    <style:style style:name="T1974" style:parent-style-name="Policepardéfaut" style:family="text">
      <style:text-properties style:font-name="GPAFJ+Aptos" style:font-name-asian="GPAFJ+Aptos" style:font-name-complex="GPAFJ+Aptos" fo:color="#000000" style:text-scale="101%"/>
    </style:style>
    <style:style style:name="T1975" style:parent-style-name="Policepardéfaut" style:family="text">
      <style:text-properties style:font-name="GPAFJ+Aptos" style:font-name-asian="GPAFJ+Aptos" style:font-name-complex="GPAFJ+Aptos" fo:color="#000000" fo:letter-spacing="-0.0006in"/>
    </style:style>
    <style:style style:name="T1976" style:parent-style-name="Policepardéfaut" style:family="text">
      <style:text-properties style:font-name="GPAFJ+Aptos" style:font-name-asian="GPAFJ+Aptos" style:font-name-complex="GPAFJ+Aptos" fo:color="#000000" style:text-scale="101%"/>
    </style:style>
    <style:style style:name="T1977" style:parent-style-name="Policepardéfaut" style:family="text">
      <style:text-properties style:font-name="GPAFJ+Aptos" style:font-name-asian="GPAFJ+Aptos" style:font-name-complex="GPAFJ+Aptos" fo:color="#000000"/>
    </style:style>
    <style:style style:name="T1978" style:parent-style-name="Policepardéfaut" style:family="text">
      <style:text-properties style:font-name="GPAFJ+Aptos" style:font-name-asian="GPAFJ+Aptos" style:font-name-complex="GPAFJ+Aptos" fo:color="#000000" style:text-scale="101%"/>
    </style:style>
    <style:style style:name="T1979" style:parent-style-name="Policepardéfaut" style:family="text">
      <style:text-properties style:font-name="GPAFJ+Aptos" style:font-name-asian="GPAFJ+Aptos" style:font-name-complex="GPAFJ+Aptos" fo:color="#000000"/>
    </style:style>
    <style:style style:name="T1980" style:parent-style-name="Policepardéfaut" style:family="text">
      <style:text-properties style:font-name="GPAFJ+Aptos" style:font-name-asian="GPAFJ+Aptos" style:font-name-complex="GPAFJ+Aptos" fo:color="#000000" fo:letter-spacing="-0.0006in"/>
    </style:style>
    <style:style style:name="T1981" style:parent-style-name="Policepardéfaut" style:family="text">
      <style:text-properties style:font-name="GPAFJ+Aptos" style:font-name-asian="GPAFJ+Aptos" style:font-name-complex="GPAFJ+Aptos" fo:color="#000000" style:text-scale="101%"/>
    </style:style>
    <style:style style:name="T1982" style:parent-style-name="Policepardéfaut" style:family="text">
      <style:text-properties style:font-name="GPAFJ+Aptos" style:font-name-asian="GPAFJ+Aptos" style:font-name-complex="GPAFJ+Aptos" fo:color="#000000"/>
    </style:style>
    <style:style style:name="T1983" style:parent-style-name="Policepardéfaut" style:family="text">
      <style:text-properties style:font-name="GPAFJ+Aptos" style:font-name-asian="GPAFJ+Aptos" style:font-name-complex="GPAFJ+Aptos" fo:color="#000000" style:text-scale="101%"/>
    </style:style>
    <style:style style:name="T1984" style:parent-style-name="Policepardéfaut" style:family="text">
      <style:text-properties style:font-name="GPAFJ+Aptos" style:font-name-asian="GPAFJ+Aptos" style:font-name-complex="GPAFJ+Aptos" fo:color="#000000" fo:letter-spacing="-0.0006in"/>
    </style:style>
    <style:style style:name="T1985" style:parent-style-name="Policepardéfaut" style:family="text">
      <style:text-properties style:font-name="GPAFJ+Aptos" style:font-name-asian="GPAFJ+Aptos" style:font-name-complex="GPAFJ+Aptos" fo:color="#000000"/>
    </style:style>
    <style:style style:name="T1986" style:parent-style-name="Policepardéfaut" style:family="text">
      <style:text-properties style:font-name="GPAFJ+Aptos" style:font-name-asian="GPAFJ+Aptos" style:font-name-complex="GPAFJ+Aptos" fo:color="#000000" fo:letter-spacing="-0.0006in" style:text-scale="101%"/>
    </style:style>
    <style:style style:name="T1987" style:parent-style-name="Policepardéfaut" style:family="text">
      <style:text-properties style:font-name="GPAFJ+Aptos" style:font-name-asian="GPAFJ+Aptos" style:font-name-complex="GPAFJ+Aptos" fo:color="#000000"/>
    </style:style>
    <style:style style:name="T1988" style:parent-style-name="Policepardéfaut" style:family="text">
      <style:text-properties style:font-name="GPAFJ+Aptos" style:font-name-asian="GPAFJ+Aptos" style:font-name-complex="GPAFJ+Aptos" fo:color="#000000" style:text-scale="101%"/>
    </style:style>
    <style:style style:name="T1989" style:parent-style-name="Policepardéfaut" style:family="text">
      <style:text-properties style:font-name="GPAFJ+Aptos" style:font-name-asian="GPAFJ+Aptos" style:font-name-complex="GPAFJ+Aptos" fo:color="#000000"/>
    </style:style>
    <style:style style:name="T1990" style:parent-style-name="Policepardéfaut" style:family="text">
      <style:text-properties style:font-name="GPAFJ+Aptos" style:font-name-asian="GPAFJ+Aptos" style:font-name-complex="GPAFJ+Aptos" fo:color="#000000" style:text-scale="101%"/>
    </style:style>
    <style:style style:name="T1991" style:parent-style-name="Policepardéfaut" style:family="text">
      <style:text-properties style:font-name="GPAFJ+Aptos" style:font-name-asian="GPAFJ+Aptos" style:font-name-complex="GPAFJ+Aptos" fo:color="#000000" fo:letter-spacing="-0.0006in"/>
    </style:style>
    <style:style style:name="T1992" style:parent-style-name="Policepardéfaut" style:family="text">
      <style:text-properties style:font-name="GPAFJ+Aptos" style:font-name-asian="GPAFJ+Aptos" style:font-name-complex="GPAFJ+Aptos" fo:color="#000000" fo:letter-spacing="0.0006in"/>
    </style:style>
    <style:style style:name="T1993" style:parent-style-name="Policepardéfaut" style:family="text">
      <style:text-properties style:font-name="GPAFJ+Aptos" style:font-name-asian="GPAFJ+Aptos" style:font-name-complex="GPAFJ+Aptos" fo:color="#000000"/>
    </style:style>
    <style:style style:name="T1994" style:parent-style-name="Policepardéfaut" style:family="text">
      <style:text-properties style:font-name="GPAFJ+Aptos" style:font-name-asian="GPAFJ+Aptos" style:font-name-complex="GPAFJ+Aptos" fo:color="#000000" fo:letter-spacing="-0.0006in"/>
    </style:style>
    <style:style style:name="T1995" style:parent-style-name="Policepardéfaut" style:family="text">
      <style:text-properties style:font-name="GPAFJ+Aptos" style:font-name-asian="GPAFJ+Aptos" style:font-name-complex="GPAFJ+Aptos" fo:color="#000000"/>
    </style:style>
    <style:style style:name="T1996" style:parent-style-name="Policepardéfaut" style:family="text">
      <style:text-properties style:font-name="GPAFJ+Aptos" style:font-name-asian="GPAFJ+Aptos" style:font-name-complex="GPAFJ+Aptos" fo:color="#000000" fo:letter-spacing="-0.0006in" style:text-scale="101%"/>
    </style:style>
    <style:style style:name="T1997" style:parent-style-name="Policepardéfaut" style:family="text">
      <style:text-properties style:font-name="GPAFJ+Aptos" style:font-name-asian="GPAFJ+Aptos" style:font-name-complex="GPAFJ+Aptos" fo:color="#000000" style:text-scale="101%"/>
    </style:style>
    <style:style style:name="T1998" style:parent-style-name="Policepardéfaut" style:family="text">
      <style:text-properties style:font-name="GPAFJ+Aptos" style:font-name-asian="GPAFJ+Aptos" style:font-name-complex="GPAFJ+Aptos" fo:color="#000000"/>
    </style:style>
    <style:style style:name="T1999" style:parent-style-name="Policepardéfaut" style:family="text">
      <style:text-properties style:font-name="GPAFJ+Aptos" style:font-name-asian="GPAFJ+Aptos" style:font-name-complex="GPAFJ+Aptos" fo:color="#000000" fo:letter-spacing="-0.0006in"/>
    </style:style>
    <style:style style:name="T2000" style:parent-style-name="Policepardéfaut" style:family="text">
      <style:text-properties style:font-name="GPAFJ+Aptos" style:font-name-asian="GPAFJ+Aptos" style:font-name-complex="GPAFJ+Aptos" fo:color="#000000" fo:letter-spacing="-0.0006in" style:text-scale="101%"/>
    </style:style>
    <style:style style:name="T2001" style:parent-style-name="Policepardéfaut" style:family="text">
      <style:text-properties style:font-name="GPAFJ+Aptos" style:font-name-asian="GPAFJ+Aptos" style:font-name-complex="GPAFJ+Aptos" fo:color="#000000"/>
    </style:style>
    <style:style style:name="T2002" style:parent-style-name="Policepardéfaut" style:family="text">
      <style:text-properties style:font-name="GPAFJ+Aptos" style:font-name-asian="GPAFJ+Aptos" style:font-name-complex="GPAFJ+Aptos" fo:color="#000000" fo:letter-spacing="0.0006in"/>
    </style:style>
    <style:style style:name="T2003" style:parent-style-name="Policepardéfaut" style:family="text">
      <style:text-properties style:font-name="GPAFJ+Aptos" style:font-name-asian="GPAFJ+Aptos" style:font-name-complex="GPAFJ+Aptos" fo:color="#000000" style:text-scale="101%"/>
    </style:style>
    <style:style style:name="T2004" style:parent-style-name="Policepardéfaut" style:family="text">
      <style:text-properties style:font-name="GPAFJ+Aptos" style:font-name-asian="GPAFJ+Aptos" style:font-name-complex="GPAFJ+Aptos" fo:color="#000000"/>
    </style:style>
    <style:style style:name="T2005" style:parent-style-name="Policepardéfaut" style:family="text">
      <style:text-properties style:font-name="GPAFJ+Aptos" style:font-name-asian="GPAFJ+Aptos" style:font-name-complex="GPAFJ+Aptos" fo:color="#000000" fo:letter-spacing="-0.0006in"/>
    </style:style>
    <style:style style:name="T2006" style:parent-style-name="Policepardéfaut" style:family="text">
      <style:text-properties style:font-name="GPAFJ+Aptos" style:font-name-asian="GPAFJ+Aptos" style:font-name-complex="GPAFJ+Aptos" fo:color="#000000" style:text-scale="101%"/>
    </style:style>
    <style:style style:name="T2007" style:parent-style-name="Policepardéfaut" style:family="text">
      <style:text-properties style:font-name="GPAFJ+Aptos" style:font-name-asian="GPAFJ+Aptos" style:font-name-complex="GPAFJ+Aptos" fo:color="#000000" fo:letter-spacing="-0.0006in" style:text-scale="101%"/>
    </style:style>
    <style:style style:name="T2008" style:parent-style-name="Policepardéfaut" style:family="text">
      <style:text-properties style:font-name="GPAFJ+Aptos" style:font-name-asian="GPAFJ+Aptos" style:font-name-complex="GPAFJ+Aptos" fo:color="#000000" fo:letter-spacing="-0.0013in"/>
    </style:style>
    <style:style style:name="T2009" style:parent-style-name="Policepardéfaut" style:family="text">
      <style:text-properties style:font-name="GPAFJ+Aptos" style:font-name-asian="GPAFJ+Aptos" style:font-name-complex="GPAFJ+Aptos" fo:color="#000000"/>
    </style:style>
    <style:style style:name="T2010" style:parent-style-name="Policepardéfaut" style:family="text">
      <style:text-properties style:font-name="GPAFJ+Aptos" style:font-name-asian="GPAFJ+Aptos" style:font-name-complex="GPAFJ+Aptos" fo:color="#000000" style:text-scale="101%"/>
    </style:style>
    <style:style style:name="T2011" style:parent-style-name="Policepardéfaut" style:family="text">
      <style:text-properties style:font-name="GPAFJ+Aptos" style:font-name-asian="GPAFJ+Aptos" style:font-name-complex="GPAFJ+Aptos" fo:color="#000000" fo:letter-spacing="-0.0006in"/>
    </style:style>
    <style:style style:name="T2012" style:parent-style-name="Policepardéfaut" style:family="text">
      <style:text-properties style:font-name="GPAFJ+Aptos" style:font-name-asian="GPAFJ+Aptos" style:font-name-complex="GPAFJ+Aptos" fo:color="#000000" fo:letter-spacing="-0.0006in" style:text-scale="101%"/>
    </style:style>
    <style:style style:name="T2013" style:parent-style-name="Policepardéfaut" style:family="text">
      <style:text-properties style:font-name="GPAFJ+Aptos" style:font-name-asian="GPAFJ+Aptos" style:font-name-complex="GPAFJ+Aptos" fo:color="#000000" fo:letter-spacing="-0.0006in"/>
    </style:style>
    <style:style style:name="T2014" style:parent-style-name="Policepardéfaut" style:family="text">
      <style:text-properties style:font-name="GPAFJ+Aptos" style:font-name-asian="GPAFJ+Aptos" style:font-name-complex="GPAFJ+Aptos" fo:color="#000000"/>
    </style:style>
    <style:style style:name="T2015" style:parent-style-name="Policepardéfaut" style:family="text">
      <style:text-properties style:font-name="GPAFJ+Aptos" style:font-name-asian="GPAFJ+Aptos" style:font-name-complex="GPAFJ+Aptos" fo:color="#000000" fo:letter-spacing="-0.0006in" style:text-scale="101%"/>
    </style:style>
    <style:style style:name="T2016" style:parent-style-name="Policepardéfaut" style:family="text">
      <style:text-properties style:font-name="GPAFJ+Aptos" style:font-name-asian="GPAFJ+Aptos" style:font-name-complex="GPAFJ+Aptos" fo:color="#000000"/>
    </style:style>
    <style:style style:name="T2017" style:parent-style-name="Policepardéfaut" style:family="text">
      <style:text-properties style:font-name="GPAFJ+Aptos" style:font-name-asian="GPAFJ+Aptos" style:font-name-complex="GPAFJ+Aptos" fo:color="#000000" style:text-scale="101%"/>
    </style:style>
    <style:style style:name="T2018" style:parent-style-name="Policepardéfaut" style:family="text">
      <style:text-properties style:font-name="GPAFJ+Aptos" style:font-name-asian="GPAFJ+Aptos" style:font-name-complex="GPAFJ+Aptos" fo:color="#000000" fo:letter-spacing="-0.0006in"/>
    </style:style>
    <style:style style:name="T2019" style:parent-style-name="Policepardéfaut" style:family="text">
      <style:text-properties style:font-name="GPAFJ+Aptos" style:font-name-asian="GPAFJ+Aptos" style:font-name-complex="GPAFJ+Aptos" fo:color="#000000" style:text-scale="101%"/>
    </style:style>
    <style:style style:name="T2020" style:parent-style-name="Policepardéfaut" style:family="text">
      <style:text-properties style:font-name="GPAFJ+Aptos" style:font-name-asian="GPAFJ+Aptos" style:font-name-complex="GPAFJ+Aptos" fo:color="#000000"/>
    </style:style>
    <style:style style:name="T2021" style:parent-style-name="Policepardéfaut" style:family="text">
      <style:text-properties style:font-name="GPAFJ+Aptos" style:font-name-asian="GPAFJ+Aptos" style:font-name-complex="GPAFJ+Aptos" fo:color="#000000" fo:letter-spacing="-0.0013in" style:text-scale="101%"/>
    </style:style>
    <style:style style:name="T2022" style:parent-style-name="Policepardéfaut" style:family="text">
      <style:text-properties style:font-name="GPAFJ+Aptos" style:font-name-asian="GPAFJ+Aptos" style:font-name-complex="GPAFJ+Aptos" fo:color="#000000" style:text-scale="101%"/>
    </style:style>
    <style:style style:name="T2023" style:parent-style-name="Policepardéfaut" style:family="text">
      <style:text-properties style:font-name="GPAFJ+Aptos" style:font-name-asian="GPAFJ+Aptos" style:font-name-complex="GPAFJ+Aptos" fo:color="#000000" fo:letter-spacing="-0.002in"/>
    </style:style>
    <style:style style:name="T2024" style:parent-style-name="Policepardéfaut" style:family="text">
      <style:text-properties style:font-name="GPAFJ+Aptos" style:font-name-asian="GPAFJ+Aptos" style:font-name-complex="GPAFJ+Aptos" fo:color="#000000" style:text-scale="101%"/>
    </style:style>
    <style:style style:name="T2025" style:parent-style-name="Policepardéfaut" style:family="text">
      <style:text-properties style:font-name="GPAFJ+Aptos" style:font-name-asian="GPAFJ+Aptos" style:font-name-complex="GPAFJ+Aptos" fo:color="#000000"/>
    </style:style>
    <style:style style:name="T2026" style:parent-style-name="Policepardéfaut" style:family="text">
      <style:text-properties style:font-name="GPAFJ+Aptos" style:font-name-asian="GPAFJ+Aptos" style:font-name-complex="GPAFJ+Aptos" fo:color="#000000" fo:letter-spacing="-0.0013in"/>
    </style:style>
    <style:style style:name="T2027" style:parent-style-name="Policepardéfaut" style:family="text">
      <style:text-properties style:font-name="GPAFJ+Aptos" style:font-name-asian="GPAFJ+Aptos" style:font-name-complex="GPAFJ+Aptos" fo:color="#000000"/>
    </style:style>
    <style:style style:name="T2028" style:parent-style-name="Policepardéfaut" style:family="text">
      <style:text-properties style:font-name="GPAFJ+Aptos" style:font-name-asian="GPAFJ+Aptos" style:font-name-complex="GPAFJ+Aptos" fo:color="#000000" style:text-scale="101%"/>
    </style:style>
    <style:style style:name="T2029" style:parent-style-name="Policepardéfaut" style:family="text">
      <style:text-properties style:font-name="GPAFJ+Aptos" style:font-name-asian="GPAFJ+Aptos" style:font-name-complex="GPAFJ+Aptos" fo:color="#000000"/>
    </style:style>
    <style:style style:name="T2030" style:parent-style-name="Policepardéfaut" style:family="text">
      <style:text-properties style:font-name="GPAFJ+Aptos" style:font-name-asian="GPAFJ+Aptos" style:font-name-complex="GPAFJ+Aptos" fo:color="#000000" style:text-scale="101%"/>
    </style:style>
    <style:style style:name="P2031" style:parent-style-name="Normal" style:family="paragraph">
      <style:paragraph-properties fo:text-align="justify" fo:margin-bottom="0.0125in" fo:line-height="0.0972in"/>
      <style:text-properties fo:font-size="7pt" style:font-size-asian="7pt" style:font-size-complex="7pt"/>
    </style:style>
    <style:style style:name="P2032" style:parent-style-name="Normal" style:family="paragraph">
      <style:paragraph-properties fo:widows="0" fo:orphans="0" fo:text-align="justify" fo:margin-left="0.5in" fo:margin-right="0.8722in" fo:text-indent="-0.2493in">
        <style:tab-stops/>
      </style:paragraph-properties>
    </style:style>
    <style:style style:name="T2033" style:parent-style-name="Policepardéfaut" style:family="text">
      <style:text-properties style:font-name="Symbol" style:font-name-asian="Symbol" style:font-name-complex="Symbol" fo:color="#000000" fo:font-size="10pt" style:font-size-asian="10pt" style:font-size-complex="10pt"/>
    </style:style>
    <style:style style:name="T2034" style:parent-style-name="Policepardéfaut" style:family="text">
      <style:text-properties style:font-name="Symbol" style:font-name-asian="Symbol" style:font-name-complex="Symbol" fo:color="#000000" fo:font-size="10pt" style:font-size-asian="10pt" style:font-size-complex="10pt"/>
    </style:style>
    <style:style style:name="T2035" style:parent-style-name="Policepardéfaut" style:family="text">
      <style:text-properties style:font-name="WYAXW+Aptos" style:font-name-asian="WYAXW+Aptos" style:font-name-complex="WYAXW+Aptos" fo:font-weight="bold" style:font-weight-asian="bold" style:font-weight-complex="bold" fo:color="#000000"/>
    </style:style>
    <style:style style:name="T2036" style:parent-style-name="Policepardéfaut" style:family="text">
      <style:text-properties style:font-name="WYAXW+Aptos" style:font-name-asian="WYAXW+Aptos" style:font-name-complex="WYAXW+Aptos" fo:font-weight="bold" style:font-weight-asian="bold" style:font-weight-complex="bold" fo:color="#000000" fo:letter-spacing="0.0006in" style:text-scale="101%"/>
    </style:style>
    <style:style style:name="T2037" style:parent-style-name="Policepardéfaut" style:family="text">
      <style:text-properties style:font-name="WYAXW+Aptos" style:font-name-asian="WYAXW+Aptos" style:font-name-complex="WYAXW+Aptos" fo:font-weight="bold" style:font-weight-asian="bold" style:font-weight-complex="bold" fo:color="#000000"/>
    </style:style>
    <style:style style:name="T2038" style:parent-style-name="Policepardéfaut" style:family="text">
      <style:text-properties style:font-name="WYAXW+Aptos" style:font-name-asian="WYAXW+Aptos" style:font-name-complex="WYAXW+Aptos" fo:font-weight="bold" style:font-weight-asian="bold" style:font-weight-complex="bold" fo:color="#000000" fo:letter-spacing="-0.0013in" style:text-scale="101%"/>
    </style:style>
    <style:style style:name="T2039" style:parent-style-name="Policepardéfaut" style:family="text">
      <style:text-properties style:font-name="WYAXW+Aptos" style:font-name-asian="WYAXW+Aptos" style:font-name-complex="WYAXW+Aptos" fo:font-weight="bold" style:font-weight-asian="bold" style:font-weight-complex="bold" fo:color="#000000"/>
    </style:style>
    <style:style style:name="T2040"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2041" style:parent-style-name="Policepardéfaut" style:family="text">
      <style:text-properties style:font-name="WYAXW+Aptos" style:font-name-asian="WYAXW+Aptos" style:font-name-complex="WYAXW+Aptos" fo:font-weight="bold" style:font-weight-asian="bold" style:font-weight-complex="bold" fo:color="#000000"/>
    </style:style>
    <style:style style:name="T2042" style:parent-style-name="Policepardéfaut" style:family="text">
      <style:text-properties style:font-name="WYAXW+Aptos" style:font-name-asian="WYAXW+Aptos" style:font-name-complex="WYAXW+Aptos" fo:font-weight="bold" style:font-weight-asian="bold" style:font-weight-complex="bold" fo:color="#000000" style:text-scale="101%"/>
    </style:style>
    <style:style style:name="T2043" style:parent-style-name="Policepardéfaut" style:family="text">
      <style:text-properties style:font-name="WYAXW+Aptos" style:font-name-asian="WYAXW+Aptos" style:font-name-complex="WYAXW+Aptos" fo:font-weight="bold" style:font-weight-asian="bold" style:font-weight-complex="bold" fo:color="#000000"/>
    </style:style>
    <style:style style:name="T2044" style:parent-style-name="Policepardéfaut" style:family="text">
      <style:text-properties style:font-name="WYAXW+Aptos" style:font-name-asian="WYAXW+Aptos" style:font-name-complex="WYAXW+Aptos" fo:font-weight="bold" style:font-weight-asian="bold" style:font-weight-complex="bold" fo:color="#000000" fo:letter-spacing="0.0006in"/>
    </style:style>
    <style:style style:name="T2045" style:parent-style-name="Policepardéfaut" style:family="text">
      <style:text-properties style:font-name="GPAFJ+Aptos" style:font-name-asian="GPAFJ+Aptos" style:font-name-complex="GPAFJ+Aptos" fo:color="#000000" style:text-scale="101%"/>
    </style:style>
    <style:style style:name="T2046" style:parent-style-name="Policepardéfaut" style:family="text">
      <style:text-properties style:font-name="GPAFJ+Aptos" style:font-name-asian="GPAFJ+Aptos" style:font-name-complex="GPAFJ+Aptos" fo:color="#000000" fo:letter-spacing="-0.0013in"/>
    </style:style>
    <style:style style:name="T2047" style:parent-style-name="Policepardéfaut" style:family="text">
      <style:text-properties style:font-name="GPAFJ+Aptos" style:font-name-asian="GPAFJ+Aptos" style:font-name-complex="GPAFJ+Aptos" fo:color="#000000" style:text-scale="101%"/>
    </style:style>
    <style:style style:name="T2048" style:parent-style-name="Policepardéfaut" style:family="text">
      <style:text-properties style:font-name="GPAFJ+Aptos" style:font-name-asian="GPAFJ+Aptos" style:font-name-complex="GPAFJ+Aptos" fo:color="#000000"/>
    </style:style>
    <style:style style:name="T2049" style:parent-style-name="Policepardéfaut" style:family="text">
      <style:text-properties style:font-name="GPAFJ+Aptos" style:font-name-asian="GPAFJ+Aptos" style:font-name-complex="GPAFJ+Aptos" fo:color="#000000" fo:letter-spacing="-0.0006in"/>
    </style:style>
    <style:style style:name="T2050" style:parent-style-name="Policepardéfaut" style:family="text">
      <style:text-properties style:font-name="GPAFJ+Aptos" style:font-name-asian="GPAFJ+Aptos" style:font-name-complex="GPAFJ+Aptos" fo:color="#000000"/>
    </style:style>
    <style:style style:name="T2051" style:parent-style-name="Policepardéfaut" style:family="text">
      <style:text-properties style:font-name="GPAFJ+Aptos" style:font-name-asian="GPAFJ+Aptos" style:font-name-complex="GPAFJ+Aptos" fo:color="#000000" style:text-scale="101%"/>
    </style:style>
    <style:style style:name="T2052" style:parent-style-name="Policepardéfaut" style:family="text">
      <style:text-properties style:font-name="GPAFJ+Aptos" style:font-name-asian="GPAFJ+Aptos" style:font-name-complex="GPAFJ+Aptos" fo:color="#000000" fo:letter-spacing="-0.002in" style:text-scale="101%"/>
    </style:style>
    <style:style style:name="T2053" style:parent-style-name="Policepardéfaut" style:family="text">
      <style:text-properties style:font-name="GPAFJ+Aptos" style:font-name-asian="GPAFJ+Aptos" style:font-name-complex="GPAFJ+Aptos" fo:color="#000000" fo:letter-spacing="-0.0006in"/>
    </style:style>
    <style:style style:name="T2054" style:parent-style-name="Policepardéfaut" style:family="text">
      <style:text-properties style:font-name="GPAFJ+Aptos" style:font-name-asian="GPAFJ+Aptos" style:font-name-complex="GPAFJ+Aptos" fo:color="#000000" style:text-scale="101%"/>
    </style:style>
    <style:style style:name="T2055" style:parent-style-name="Policepardéfaut" style:family="text">
      <style:text-properties style:font-name="GPAFJ+Aptos" style:font-name-asian="GPAFJ+Aptos" style:font-name-complex="GPAFJ+Aptos" fo:color="#000000"/>
    </style:style>
    <style:style style:name="T2056" style:parent-style-name="Policepardéfaut" style:family="text">
      <style:text-properties style:font-name="GPAFJ+Aptos" style:font-name-asian="GPAFJ+Aptos" style:font-name-complex="GPAFJ+Aptos" fo:color="#000000" fo:letter-spacing="-0.0013in"/>
    </style:style>
    <style:style style:name="T2057" style:parent-style-name="Policepardéfaut" style:family="text">
      <style:text-properties style:font-name="GPAFJ+Aptos" style:font-name-asian="GPAFJ+Aptos" style:font-name-complex="GPAFJ+Aptos" fo:color="#000000" fo:letter-spacing="0.0006in" style:text-scale="101%"/>
    </style:style>
    <style:style style:name="T2058" style:parent-style-name="Policepardéfaut" style:family="text">
      <style:text-properties style:font-name="GPAFJ+Aptos" style:font-name-asian="GPAFJ+Aptos" style:font-name-complex="GPAFJ+Aptos" fo:color="#000000" fo:letter-spacing="-0.0006in"/>
    </style:style>
    <style:style style:name="T2059" style:parent-style-name="Policepardéfaut" style:family="text">
      <style:text-properties style:font-name="GPAFJ+Aptos" style:font-name-asian="GPAFJ+Aptos" style:font-name-complex="GPAFJ+Aptos" fo:color="#000000" style:text-scale="101%"/>
    </style:style>
    <style:style style:name="T2060" style:parent-style-name="Policepardéfaut" style:family="text">
      <style:text-properties style:font-name="GPAFJ+Aptos" style:font-name-asian="GPAFJ+Aptos" style:font-name-complex="GPAFJ+Aptos" fo:color="#000000"/>
    </style:style>
    <style:style style:name="T2061" style:parent-style-name="Policepardéfaut" style:family="text">
      <style:text-properties style:font-name="GPAFJ+Aptos" style:font-name-asian="GPAFJ+Aptos" style:font-name-complex="GPAFJ+Aptos" fo:color="#000000" style:text-scale="101%"/>
    </style:style>
    <style:style style:name="T2062" style:parent-style-name="Policepardéfaut" style:family="text">
      <style:text-properties style:font-name="GPAFJ+Aptos" style:font-name-asian="GPAFJ+Aptos" style:font-name-complex="GPAFJ+Aptos" fo:color="#000000" fo:letter-spacing="-0.0006in" style:text-scale="101%"/>
    </style:style>
    <style:style style:name="T2063" style:parent-style-name="Policepardéfaut" style:family="text">
      <style:text-properties style:font-name="GPAFJ+Aptos" style:font-name-asian="GPAFJ+Aptos" style:font-name-complex="GPAFJ+Aptos" fo:color="#000000" style:text-scale="101%"/>
    </style:style>
    <style:style style:name="T2064" style:parent-style-name="Policepardéfaut" style:family="text">
      <style:text-properties style:font-name="GPAFJ+Aptos" style:font-name-asian="GPAFJ+Aptos" style:font-name-complex="GPAFJ+Aptos" fo:color="#000000" fo:letter-spacing="-0.0006in"/>
    </style:style>
    <style:style style:name="T2065" style:parent-style-name="Policepardéfaut" style:family="text">
      <style:text-properties style:font-name="GPAFJ+Aptos" style:font-name-asian="GPAFJ+Aptos" style:font-name-complex="GPAFJ+Aptos" fo:color="#000000"/>
    </style:style>
    <style:style style:name="T2066" style:parent-style-name="Policepardéfaut" style:family="text">
      <style:text-properties style:font-name="GPAFJ+Aptos" style:font-name-asian="GPAFJ+Aptos" style:font-name-complex="GPAFJ+Aptos" fo:color="#000000" style:text-scale="101%"/>
    </style:style>
    <style:style style:name="T2067" style:parent-style-name="Policepardéfaut" style:family="text">
      <style:text-properties style:font-name="GPAFJ+Aptos" style:font-name-asian="GPAFJ+Aptos" style:font-name-complex="GPAFJ+Aptos" fo:color="#000000"/>
    </style:style>
    <style:style style:name="T2068" style:parent-style-name="Policepardéfaut" style:family="text">
      <style:text-properties style:font-name="GPAFJ+Aptos" style:font-name-asian="GPAFJ+Aptos" style:font-name-complex="GPAFJ+Aptos" fo:color="#000000" style:text-scale="101%"/>
    </style:style>
    <style:style style:name="T2069" style:parent-style-name="Policepardéfaut" style:family="text">
      <style:text-properties style:font-name="GPAFJ+Aptos" style:font-name-asian="GPAFJ+Aptos" style:font-name-complex="GPAFJ+Aptos" fo:color="#000000" fo:letter-spacing="-0.0013in" style:text-scale="101%"/>
    </style:style>
    <style:style style:name="T2070" style:parent-style-name="Policepardéfaut" style:family="text">
      <style:text-properties style:font-name="GPAFJ+Aptos" style:font-name-asian="GPAFJ+Aptos" style:font-name-complex="GPAFJ+Aptos" fo:color="#000000"/>
    </style:style>
    <style:style style:name="T2071" style:parent-style-name="Policepardéfaut" style:family="text">
      <style:text-properties style:font-name="GPAFJ+Aptos" style:font-name-asian="GPAFJ+Aptos" style:font-name-complex="GPAFJ+Aptos" fo:color="#000000" style:text-scale="101%"/>
    </style:style>
    <style:style style:name="T2072" style:parent-style-name="Policepardéfaut" style:family="text">
      <style:text-properties style:font-name="GPAFJ+Aptos" style:font-name-asian="GPAFJ+Aptos" style:font-name-complex="GPAFJ+Aptos" fo:color="#000000" fo:letter-spacing="-0.0006in"/>
    </style:style>
    <style:style style:name="T2073" style:parent-style-name="Policepardéfaut" style:family="text">
      <style:text-properties style:font-name="GPAFJ+Aptos" style:font-name-asian="GPAFJ+Aptos" style:font-name-complex="GPAFJ+Aptos" fo:color="#000000" fo:letter-spacing="-0.0013in" style:text-scale="101%"/>
    </style:style>
    <style:style style:name="T2074" style:parent-style-name="Policepardéfaut" style:family="text">
      <style:text-properties style:font-name="GPAFJ+Aptos" style:font-name-asian="GPAFJ+Aptos" style:font-name-complex="GPAFJ+Aptos" fo:color="#000000" style:text-scale="101%"/>
    </style:style>
    <style:style style:name="T2075" style:parent-style-name="Policepardéfaut" style:family="text">
      <style:text-properties style:font-name="GPAFJ+Aptos" style:font-name-asian="GPAFJ+Aptos" style:font-name-complex="GPAFJ+Aptos" fo:color="#000000" fo:letter-spacing="-0.0013in"/>
    </style:style>
    <style:style style:name="T2076" style:parent-style-name="Policepardéfaut" style:family="text">
      <style:text-properties style:font-name="GPAFJ+Aptos" style:font-name-asian="GPAFJ+Aptos" style:font-name-complex="GPAFJ+Aptos" fo:color="#000000"/>
    </style:style>
    <style:style style:name="T2077" style:parent-style-name="Policepardéfaut" style:family="text">
      <style:text-properties style:font-name="GPAFJ+Aptos" style:font-name-asian="GPAFJ+Aptos" style:font-name-complex="GPAFJ+Aptos" fo:color="#000000" style:text-scale="101%"/>
    </style:style>
    <style:style style:name="T2078" style:parent-style-name="Policepardéfaut" style:family="text">
      <style:text-properties style:font-name="GPAFJ+Aptos" style:font-name-asian="GPAFJ+Aptos" style:font-name-complex="GPAFJ+Aptos" fo:color="#000000" fo:letter-spacing="-0.0006in"/>
    </style:style>
    <style:style style:name="T2079" style:parent-style-name="Policepardéfaut" style:family="text">
      <style:text-properties style:font-name="GPAFJ+Aptos" style:font-name-asian="GPAFJ+Aptos" style:font-name-complex="GPAFJ+Aptos" fo:color="#000000" style:text-scale="101%"/>
    </style:style>
    <style:style style:name="T2080" style:parent-style-name="Policepardéfaut" style:family="text">
      <style:text-properties style:font-name="GPAFJ+Aptos" style:font-name-asian="GPAFJ+Aptos" style:font-name-complex="GPAFJ+Aptos" fo:color="#000000"/>
    </style:style>
    <style:style style:name="T2081" style:parent-style-name="Policepardéfaut" style:family="text">
      <style:text-properties style:font-name="GPAFJ+Aptos" style:font-name-asian="GPAFJ+Aptos" style:font-name-complex="GPAFJ+Aptos" fo:color="#000000" fo:letter-spacing="-0.0006in"/>
    </style:style>
    <style:style style:name="T2082" style:parent-style-name="Policepardéfaut" style:family="text">
      <style:text-properties style:font-name="GPAFJ+Aptos" style:font-name-asian="GPAFJ+Aptos" style:font-name-complex="GPAFJ+Aptos" fo:color="#000000" style:text-scale="101%"/>
    </style:style>
    <style:style style:name="T2083" style:parent-style-name="Policepardéfaut" style:family="text">
      <style:text-properties style:font-name="GPAFJ+Aptos" style:font-name-asian="GPAFJ+Aptos" style:font-name-complex="GPAFJ+Aptos" fo:color="#000000" fo:letter-spacing="-0.0013in"/>
    </style:style>
    <style:style style:name="T2084" style:parent-style-name="Policepardéfaut" style:family="text">
      <style:text-properties style:font-name="GPAFJ+Aptos" style:font-name-asian="GPAFJ+Aptos" style:font-name-complex="GPAFJ+Aptos" fo:color="#000000" style:text-scale="101%"/>
    </style:style>
    <style:style style:name="T2085" style:parent-style-name="Policepardéfaut" style:family="text">
      <style:text-properties style:font-name="GPAFJ+Aptos" style:font-name-asian="GPAFJ+Aptos" style:font-name-complex="GPAFJ+Aptos" fo:color="#000000"/>
    </style:style>
    <style:style style:name="T2086" style:parent-style-name="Policepardéfaut" style:family="text">
      <style:text-properties style:font-name="GPAFJ+Aptos" style:font-name-asian="GPAFJ+Aptos" style:font-name-complex="GPAFJ+Aptos" fo:color="#000000" fo:letter-spacing="-0.0006in" style:text-scale="101%"/>
    </style:style>
    <style:style style:name="T2087" style:parent-style-name="Policepardéfaut" style:family="text">
      <style:text-properties style:font-name="GPAFJ+Aptos" style:font-name-asian="GPAFJ+Aptos" style:font-name-complex="GPAFJ+Aptos" fo:color="#000000"/>
    </style:style>
    <style:style style:name="T2088" style:parent-style-name="Policepardéfaut" style:family="text">
      <style:text-properties style:font-name="GPAFJ+Aptos" style:font-name-asian="GPAFJ+Aptos" style:font-name-complex="GPAFJ+Aptos" fo:color="#000000" fo:letter-spacing="-0.0006in"/>
    </style:style>
    <style:style style:name="T2089" style:parent-style-name="Policepardéfaut" style:family="text">
      <style:text-properties style:font-name="GPAFJ+Aptos" style:font-name-asian="GPAFJ+Aptos" style:font-name-complex="GPAFJ+Aptos" fo:color="#000000" style:text-scale="101%"/>
    </style:style>
    <style:style style:name="T2090" style:parent-style-name="Policepardéfaut" style:family="text">
      <style:text-properties style:font-name="GPAFJ+Aptos" style:font-name-asian="GPAFJ+Aptos" style:font-name-complex="GPAFJ+Aptos" fo:color="#000000" fo:letter-spacing="-0.0006in" style:text-scale="101%"/>
    </style:style>
    <style:style style:name="T2091" style:parent-style-name="Policepardéfaut" style:family="text">
      <style:text-properties style:font-name="GPAFJ+Aptos" style:font-name-asian="GPAFJ+Aptos" style:font-name-complex="GPAFJ+Aptos" fo:color="#000000" style:text-scale="101%"/>
    </style:style>
    <style:style style:name="T2092" style:parent-style-name="Policepardéfaut" style:family="text">
      <style:text-properties style:font-name="GPAFJ+Aptos" style:font-name-asian="GPAFJ+Aptos" style:font-name-complex="GPAFJ+Aptos" fo:color="#000000" fo:letter-spacing="-0.0006in"/>
    </style:style>
    <style:style style:name="T2093" style:parent-style-name="Policepardéfaut" style:family="text">
      <style:text-properties style:font-name="GPAFJ+Aptos" style:font-name-asian="GPAFJ+Aptos" style:font-name-complex="GPAFJ+Aptos" fo:color="#000000"/>
    </style:style>
    <style:style style:name="T2094" style:parent-style-name="Policepardéfaut" style:family="text">
      <style:text-properties style:font-name="GPAFJ+Aptos" style:font-name-asian="GPAFJ+Aptos" style:font-name-complex="GPAFJ+Aptos" fo:color="#000000" style:text-scale="101%"/>
    </style:style>
    <style:style style:name="T2095" style:parent-style-name="Policepardéfaut" style:family="text">
      <style:text-properties style:font-name="GPAFJ+Aptos" style:font-name-asian="GPAFJ+Aptos" style:font-name-complex="GPAFJ+Aptos" fo:color="#000000" fo:letter-spacing="-0.0006in" style:text-scale="101%"/>
    </style:style>
    <style:style style:name="T2096" style:parent-style-name="Policepardéfaut" style:family="text">
      <style:text-properties style:font-name="GPAFJ+Aptos" style:font-name-asian="GPAFJ+Aptos" style:font-name-complex="GPAFJ+Aptos" fo:color="#000000"/>
    </style:style>
    <style:style style:name="T2097" style:parent-style-name="Policepardéfaut" style:family="text">
      <style:text-properties style:font-name="GPAFJ+Aptos" style:font-name-asian="GPAFJ+Aptos" style:font-name-complex="GPAFJ+Aptos" fo:color="#000000" style:text-scale="101%"/>
    </style:style>
    <style:style style:name="T2098" style:parent-style-name="Policepardéfaut" style:family="text">
      <style:text-properties style:font-name="GPAFJ+Aptos" style:font-name-asian="GPAFJ+Aptos" style:font-name-complex="GPAFJ+Aptos" fo:color="#000000"/>
    </style:style>
    <style:style style:name="T2099" style:parent-style-name="Policepardéfaut" style:family="text">
      <style:text-properties style:font-name="GPAFJ+Aptos" style:font-name-asian="GPAFJ+Aptos" style:font-name-complex="GPAFJ+Aptos" fo:color="#000000" style:text-scale="101%"/>
    </style:style>
    <style:style style:name="T2100" style:parent-style-name="Policepardéfaut" style:family="text">
      <style:text-properties style:font-name="GPAFJ+Aptos" style:font-name-asian="GPAFJ+Aptos" style:font-name-complex="GPAFJ+Aptos" fo:color="#000000"/>
    </style:style>
    <style:style style:name="T2101" style:parent-style-name="Policepardéfaut" style:family="text">
      <style:text-properties style:font-name="GPAFJ+Aptos" style:font-name-asian="GPAFJ+Aptos" style:font-name-complex="GPAFJ+Aptos" fo:color="#000000" fo:letter-spacing="-0.0006in"/>
    </style:style>
    <style:style style:name="T2102" style:parent-style-name="Policepardéfaut" style:family="text">
      <style:text-properties style:font-name="GPAFJ+Aptos" style:font-name-asian="GPAFJ+Aptos" style:font-name-complex="GPAFJ+Aptos" fo:color="#000000" fo:letter-spacing="0.0006in" style:text-scale="101%"/>
    </style:style>
    <style:style style:name="T2103" style:parent-style-name="Policepardéfaut" style:family="text">
      <style:text-properties style:font-name="GPAFJ+Aptos" style:font-name-asian="GPAFJ+Aptos" style:font-name-complex="GPAFJ+Aptos" fo:color="#000000" fo:letter-spacing="-0.0006in"/>
    </style:style>
    <style:style style:name="T2104" style:parent-style-name="Policepardéfaut" style:family="text">
      <style:text-properties style:font-name="GPAFJ+Aptos" style:font-name-asian="GPAFJ+Aptos" style:font-name-complex="GPAFJ+Aptos" fo:color="#000000"/>
    </style:style>
    <style:style style:name="T2105" style:parent-style-name="Policepardéfaut" style:family="text">
      <style:text-properties style:font-name="GPAFJ+Aptos" style:font-name-asian="GPAFJ+Aptos" style:font-name-complex="GPAFJ+Aptos" fo:color="#000000" fo:letter-spacing="-0.0006in"/>
    </style:style>
    <style:style style:name="T2106" style:parent-style-name="Policepardéfaut" style:family="text">
      <style:text-properties style:font-name="GPAFJ+Aptos" style:font-name-asian="GPAFJ+Aptos" style:font-name-complex="GPAFJ+Aptos" fo:color="#000000" style:text-scale="101%"/>
    </style:style>
    <style:style style:name="T2107" style:parent-style-name="Policepardéfaut" style:family="text">
      <style:text-properties style:font-name="GPAFJ+Aptos" style:font-name-asian="GPAFJ+Aptos" style:font-name-complex="GPAFJ+Aptos" fo:color="#000000"/>
    </style:style>
    <style:style style:name="T2108" style:parent-style-name="Policepardéfaut" style:family="text">
      <style:text-properties style:font-name="GPAFJ+Aptos" style:font-name-asian="GPAFJ+Aptos" style:font-name-complex="GPAFJ+Aptos" fo:color="#000000" style:text-scale="101%"/>
    </style:style>
    <style:style style:name="T2109" style:parent-style-name="Policepardéfaut" style:family="text">
      <style:text-properties style:font-name="GPAFJ+Aptos" style:font-name-asian="GPAFJ+Aptos" style:font-name-complex="GPAFJ+Aptos" fo:color="#000000"/>
    </style:style>
    <style:style style:name="T2110" style:parent-style-name="Policepardéfaut" style:family="text">
      <style:text-properties style:font-name="GPAFJ+Aptos" style:font-name-asian="GPAFJ+Aptos" style:font-name-complex="GPAFJ+Aptos" fo:color="#000000" fo:letter-spacing="-0.0006in"/>
    </style:style>
    <style:style style:name="T2111" style:parent-style-name="Policepardéfaut" style:family="text">
      <style:text-properties style:font-name="GPAFJ+Aptos" style:font-name-asian="GPAFJ+Aptos" style:font-name-complex="GPAFJ+Aptos" fo:color="#000000" fo:letter-spacing="-0.0006in" style:text-scale="101%"/>
    </style:style>
    <style:style style:name="T2112" style:parent-style-name="Policepardéfaut" style:family="text">
      <style:text-properties style:font-name="GPAFJ+Aptos" style:font-name-asian="GPAFJ+Aptos" style:font-name-complex="GPAFJ+Aptos" fo:color="#000000" style:text-scale="101%"/>
    </style:style>
    <style:style style:name="T2113" style:parent-style-name="Policepardéfaut" style:family="text">
      <style:text-properties style:font-name="GPAFJ+Aptos" style:font-name-asian="GPAFJ+Aptos" style:font-name-complex="GPAFJ+Aptos" fo:color="#000000"/>
    </style:style>
    <style:style style:name="T2114" style:parent-style-name="Policepardéfaut" style:family="text">
      <style:text-properties style:font-name="GPAFJ+Aptos" style:font-name-asian="GPAFJ+Aptos" style:font-name-complex="GPAFJ+Aptos" fo:color="#000000" fo:letter-spacing="-0.0006in" style:text-scale="101%"/>
    </style:style>
    <style:style style:name="T2115" style:parent-style-name="Policepardéfaut" style:family="text">
      <style:text-properties style:font-name="GPAFJ+Aptos" style:font-name-asian="GPAFJ+Aptos" style:font-name-complex="GPAFJ+Aptos" fo:color="#000000" style:text-scale="101%"/>
    </style:style>
    <style:style style:name="T2116" style:parent-style-name="Policepardéfaut" style:family="text">
      <style:text-properties style:font-name="GPAFJ+Aptos" style:font-name-asian="GPAFJ+Aptos" style:font-name-complex="GPAFJ+Aptos" fo:color="#000000"/>
    </style:style>
    <style:style style:name="T2117" style:parent-style-name="Policepardéfaut" style:family="text">
      <style:text-properties style:font-name="GPAFJ+Aptos" style:font-name-asian="GPAFJ+Aptos" style:font-name-complex="GPAFJ+Aptos" fo:color="#000000" fo:letter-spacing="-0.002in" style:text-scale="101%"/>
    </style:style>
    <style:style style:name="T2118" style:parent-style-name="Policepardéfaut" style:family="text">
      <style:text-properties style:font-name="GPAFJ+Aptos" style:font-name-asian="GPAFJ+Aptos" style:font-name-complex="GPAFJ+Aptos" fo:color="#000000" fo:letter-spacing="-0.0006in"/>
    </style:style>
    <style:style style:name="T2119" style:parent-style-name="Policepardéfaut" style:family="text">
      <style:text-properties style:font-name="GPAFJ+Aptos" style:font-name-asian="GPAFJ+Aptos" style:font-name-complex="GPAFJ+Aptos" fo:color="#000000"/>
    </style:style>
    <style:style style:name="T2120" style:parent-style-name="Policepardéfaut" style:family="text">
      <style:text-properties style:font-name="GPAFJ+Aptos" style:font-name-asian="GPAFJ+Aptos" style:font-name-complex="GPAFJ+Aptos" fo:color="#000000" style:text-scale="101%"/>
    </style:style>
    <style:style style:name="T2121" style:parent-style-name="Policepardéfaut" style:family="text">
      <style:text-properties style:font-name="GPAFJ+Aptos" style:font-name-asian="GPAFJ+Aptos" style:font-name-complex="GPAFJ+Aptos" fo:color="#000000"/>
    </style:style>
    <style:style style:name="T2122" style:parent-style-name="Policepardéfaut" style:family="text">
      <style:text-properties style:font-name="GPAFJ+Aptos" style:font-name-asian="GPAFJ+Aptos" style:font-name-complex="GPAFJ+Aptos" fo:color="#000000" fo:letter-spacing="-0.0006in" style:text-scale="101%"/>
    </style:style>
    <style:style style:name="T2123" style:parent-style-name="Policepardéfaut" style:family="text">
      <style:text-properties style:font-name="GPAFJ+Aptos" style:font-name-asian="GPAFJ+Aptos" style:font-name-complex="GPAFJ+Aptos" fo:color="#000000"/>
    </style:style>
    <style:style style:name="T2124" style:parent-style-name="Policepardéfaut" style:family="text">
      <style:text-properties style:font-name="GPAFJ+Aptos" style:font-name-asian="GPAFJ+Aptos" style:font-name-complex="GPAFJ+Aptos" fo:color="#000000" style:text-scale="101%"/>
    </style:style>
    <style:style style:name="T2125" style:parent-style-name="Policepardéfaut" style:family="text">
      <style:text-properties style:font-name="GPAFJ+Aptos" style:font-name-asian="GPAFJ+Aptos" style:font-name-complex="GPAFJ+Aptos" fo:color="#000000" fo:letter-spacing="-0.002in"/>
    </style:style>
    <style:style style:name="T2126" style:parent-style-name="Policepardéfaut" style:family="text">
      <style:text-properties style:font-name="GPAFJ+Aptos" style:font-name-asian="GPAFJ+Aptos" style:font-name-complex="GPAFJ+Aptos" fo:color="#000000" style:text-scale="101%"/>
    </style:style>
    <style:style style:name="T2127" style:parent-style-name="Policepardéfaut" style:family="text">
      <style:text-properties style:font-name="GPAFJ+Aptos" style:font-name-asian="GPAFJ+Aptos" style:font-name-complex="GPAFJ+Aptos" fo:color="#000000"/>
    </style:style>
    <style:style style:name="T2128" style:parent-style-name="Policepardéfaut" style:family="text">
      <style:text-properties style:font-name="GPAFJ+Aptos" style:font-name-asian="GPAFJ+Aptos" style:font-name-complex="GPAFJ+Aptos" fo:color="#000000" style:text-scale="101%"/>
    </style:style>
    <style:style style:name="T2129" style:parent-style-name="Policepardéfaut" style:family="text">
      <style:text-properties style:font-name="GPAFJ+Aptos" style:font-name-asian="GPAFJ+Aptos" style:font-name-complex="GPAFJ+Aptos" fo:color="#000000"/>
    </style:style>
    <style:style style:name="T2130" style:parent-style-name="Policepardéfaut" style:family="text">
      <style:text-properties style:font-name="GPAFJ+Aptos" style:font-name-asian="GPAFJ+Aptos" style:font-name-complex="GPAFJ+Aptos" fo:color="#000000" style:text-scale="101%"/>
    </style:style>
    <style:style style:name="T2131" style:parent-style-name="Policepardéfaut" style:family="text">
      <style:text-properties style:font-name="GPAFJ+Aptos" style:font-name-asian="GPAFJ+Aptos" style:font-name-complex="GPAFJ+Aptos" fo:color="#000000" fo:letter-spacing="-0.0013in" style:text-scale="101%"/>
    </style:style>
    <style:style style:name="T2132" style:parent-style-name="Policepardéfaut" style:family="text">
      <style:text-properties style:font-name="GPAFJ+Aptos" style:font-name-asian="GPAFJ+Aptos" style:font-name-complex="GPAFJ+Aptos" fo:color="#000000" style:text-scale="101%"/>
    </style:style>
    <style:style style:name="T2133" style:parent-style-name="Policepardéfaut" style:family="text">
      <style:text-properties style:font-name="GPAFJ+Aptos" style:font-name-asian="GPAFJ+Aptos" style:font-name-complex="GPAFJ+Aptos" fo:color="#000000"/>
    </style:style>
    <style:style style:name="T2134" style:parent-style-name="Policepardéfaut" style:family="text">
      <style:text-properties style:font-name="GPAFJ+Aptos" style:font-name-asian="GPAFJ+Aptos" style:font-name-complex="GPAFJ+Aptos" fo:color="#000000" style:text-scale="101%"/>
    </style:style>
    <style:style style:name="T2135" style:parent-style-name="Policepardéfaut" style:family="text">
      <style:text-properties style:font-name="GPAFJ+Aptos" style:font-name-asian="GPAFJ+Aptos" style:font-name-complex="GPAFJ+Aptos" fo:color="#000000" fo:letter-spacing="-0.0013in"/>
    </style:style>
    <style:style style:name="T2136" style:parent-style-name="Policepardéfaut" style:family="text">
      <style:text-properties style:font-name="GPAFJ+Aptos" style:font-name-asian="GPAFJ+Aptos" style:font-name-complex="GPAFJ+Aptos" fo:color="#000000" fo:letter-spacing="0.0006in" style:text-scale="101%"/>
    </style:style>
    <style:style style:name="T2137" style:parent-style-name="Policepardéfaut" style:family="text">
      <style:text-properties style:font-name="GPAFJ+Aptos" style:font-name-asian="GPAFJ+Aptos" style:font-name-complex="GPAFJ+Aptos" fo:color="#000000"/>
    </style:style>
    <style:style style:name="T2138" style:parent-style-name="Policepardéfaut" style:family="text">
      <style:text-properties style:font-name="GPAFJ+Aptos" style:font-name-asian="GPAFJ+Aptos" style:font-name-complex="GPAFJ+Aptos" fo:color="#000000" fo:letter-spacing="-0.0006in"/>
    </style:style>
    <style:style style:name="T2139" style:parent-style-name="Policepardéfaut" style:family="text">
      <style:text-properties style:font-name="GPAFJ+Aptos" style:font-name-asian="GPAFJ+Aptos" style:font-name-complex="GPAFJ+Aptos" fo:color="#000000"/>
    </style:style>
    <style:style style:name="T2140" style:parent-style-name="Policepardéfaut" style:family="text">
      <style:text-properties style:font-name="GPAFJ+Aptos" style:font-name-asian="GPAFJ+Aptos" style:font-name-complex="GPAFJ+Aptos" fo:color="#000000" fo:letter-spacing="-0.0006in"/>
    </style:style>
    <style:style style:name="T2141" style:parent-style-name="Policepardéfaut" style:family="text">
      <style:text-properties style:font-name="GPAFJ+Aptos" style:font-name-asian="GPAFJ+Aptos" style:font-name-complex="GPAFJ+Aptos" fo:color="#000000" style:text-scale="101%"/>
    </style:style>
    <style:style style:name="T2142" style:parent-style-name="Policepardéfaut" style:family="text">
      <style:text-properties style:font-name="GPAFJ+Aptos" style:font-name-asian="GPAFJ+Aptos" style:font-name-complex="GPAFJ+Aptos" fo:color="#000000"/>
    </style:style>
    <style:style style:name="T2143" style:parent-style-name="Policepardéfaut" style:family="text">
      <style:text-properties style:font-name="GPAFJ+Aptos" style:font-name-asian="GPAFJ+Aptos" style:font-name-complex="GPAFJ+Aptos" fo:color="#000000" style:text-scale="101%"/>
    </style:style>
    <style:style style:name="T2144" style:parent-style-name="Policepardéfaut" style:family="text">
      <style:text-properties style:font-name="GPAFJ+Aptos" style:font-name-asian="GPAFJ+Aptos" style:font-name-complex="GPAFJ+Aptos" fo:color="#000000" fo:letter-spacing="-0.0006in" style:text-scale="101%"/>
    </style:style>
    <style:style style:name="T2145" style:parent-style-name="Policepardéfaut" style:family="text">
      <style:text-properties style:font-name="GPAFJ+Aptos" style:font-name-asian="GPAFJ+Aptos" style:font-name-complex="GPAFJ+Aptos" fo:color="#000000" style:text-scale="101%"/>
    </style:style>
    <style:style style:name="T2146" style:parent-style-name="Policepardéfaut" style:family="text">
      <style:text-properties style:font-name="GPAFJ+Aptos" style:font-name-asian="GPAFJ+Aptos" style:font-name-complex="GPAFJ+Aptos" fo:color="#000000"/>
    </style:style>
    <style:style style:name="T2147" style:parent-style-name="Policepardéfaut" style:family="text">
      <style:text-properties style:font-name="GPAFJ+Aptos" style:font-name-asian="GPAFJ+Aptos" style:font-name-complex="GPAFJ+Aptos" fo:color="#000000" fo:letter-spacing="-0.0013in"/>
    </style:style>
    <style:style style:name="T2148" style:parent-style-name="Policepardéfaut" style:family="text">
      <style:text-properties style:font-name="GPAFJ+Aptos" style:font-name-asian="GPAFJ+Aptos" style:font-name-complex="GPAFJ+Aptos" fo:color="#000000" style:text-scale="101%"/>
    </style:style>
    <style:style style:name="T2149" style:parent-style-name="Policepardéfaut" style:family="text">
      <style:text-properties style:font-name="GPAFJ+Aptos" style:font-name-asian="GPAFJ+Aptos" style:font-name-complex="GPAFJ+Aptos" fo:color="#000000" fo:letter-spacing="0.0006in"/>
    </style:style>
    <style:style style:name="T2150" style:parent-style-name="Policepardéfaut" style:family="text">
      <style:text-properties style:font-name="GPAFJ+Aptos" style:font-name-asian="GPAFJ+Aptos" style:font-name-complex="GPAFJ+Aptos" fo:color="#000000"/>
    </style:style>
    <style:style style:name="T2151" style:parent-style-name="Policepardéfaut" style:family="text">
      <style:text-properties style:font-name="GPAFJ+Aptos" style:font-name-asian="GPAFJ+Aptos" style:font-name-complex="GPAFJ+Aptos" fo:color="#000000" fo:letter-spacing="-0.0006in" style:text-scale="101%"/>
    </style:style>
    <style:style style:name="T2152" style:parent-style-name="Policepardéfaut" style:family="text">
      <style:text-properties style:font-name="GPAFJ+Aptos" style:font-name-asian="GPAFJ+Aptos" style:font-name-complex="GPAFJ+Aptos" fo:color="#000000" style:text-scale="101%"/>
    </style:style>
    <style:style style:name="T2153" style:parent-style-name="Policepardéfaut" style:family="text">
      <style:text-properties style:font-name="GPAFJ+Aptos" style:font-name-asian="GPAFJ+Aptos" style:font-name-complex="GPAFJ+Aptos" fo:color="#000000"/>
    </style:style>
    <style:style style:name="T2154" style:parent-style-name="Policepardéfaut" style:family="text">
      <style:text-properties style:font-name="GPAFJ+Aptos" style:font-name-asian="GPAFJ+Aptos" style:font-name-complex="GPAFJ+Aptos" fo:color="#000000" fo:letter-spacing="-0.0013in" style:text-scale="101%"/>
    </style:style>
    <style:style style:name="T2155" style:parent-style-name="Policepardéfaut" style:family="text">
      <style:text-properties style:font-name="GPAFJ+Aptos" style:font-name-asian="GPAFJ+Aptos" style:font-name-complex="GPAFJ+Aptos" fo:color="#000000" style:text-scale="101%"/>
    </style:style>
    <style:style style:name="T2156" style:parent-style-name="Policepardéfaut" style:family="text">
      <style:text-properties style:font-name="GPAFJ+Aptos" style:font-name-asian="GPAFJ+Aptos" style:font-name-complex="GPAFJ+Aptos" fo:color="#000000"/>
    </style:style>
    <style:style style:name="T2157" style:parent-style-name="Policepardéfaut" style:family="text">
      <style:text-properties style:font-name="GPAFJ+Aptos" style:font-name-asian="GPAFJ+Aptos" style:font-name-complex="GPAFJ+Aptos" fo:color="#000000" fo:letter-spacing="0.0034in"/>
    </style:style>
    <style:style style:name="T2158" style:parent-style-name="Policepardéfaut" style:family="text">
      <style:text-properties style:font-name="GPAFJ+Aptos" style:font-name-asian="GPAFJ+Aptos" style:font-name-complex="GPAFJ+Aptos" fo:color="#000000" style:text-scale="101%"/>
    </style:style>
    <style:style style:name="P2159" style:parent-style-name="Normal" style:family="paragraph">
      <style:text-properties style:font-name="Times New Roman" style:font-name-asian="Times New Roman" style:font-name-complex="Times New Roman" fo:font-size="12pt" style:font-size-asian="12pt" style:font-size-complex="12pt"/>
    </style:style>
    <style:style style:name="P2160" style:parent-style-name="Titre1" style:list-style-name="LFO18" style:family="paragraph">
      <style:paragraph-properties fo:text-align="justify"/>
      <style:text-properties style:font-name-asian="Times New Roman"/>
    </style:style>
    <style:style style:name="P2161" style:parent-style-name="Normal" style:family="paragraph">
      <style:paragraph-properties fo:widows="0" fo:orphans="0" fo:text-align="justify" fo:line-height="107%" fo:margin-right="0.3618in"/>
      <style:text-properties style:font-name="Times New Roman" style:font-name-asian="GPAFJ+Aptos" style:font-name-complex="Times New Roman" fo:color="#000000" style:text-scale="101%" fo:font-size="12pt" style:font-size-asian="12pt" style:font-size-complex="12pt"/>
    </style:style>
    <style:style style:name="P2162" style:parent-style-name="Normal" style:family="paragraph">
      <style:paragraph-properties fo:widows="0" fo:orphans="0" fo:text-align="justify" fo:line-height="107%" fo:margin-right="0.3618in"/>
    </style:style>
    <style:style style:name="T216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16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16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166"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167" style:parent-style-name="Policepardéfaut" style:family="text">
      <style:text-properties style:font-name="Times New Roman" style:font-name-asian="GPAFJ+Aptos" style:font-name-complex="Times New Roman" fo:color="#000000" fo:font-size="12pt" style:font-size-asian="12pt" style:font-size-complex="12pt"/>
    </style:style>
    <style:style style:name="T216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169" style:parent-style-name="Policepardéfaut" style:family="text">
      <style:text-properties style:font-name="Times New Roman" style:font-name-asian="GPAFJ+Aptos" style:font-name-complex="Times New Roman" fo:color="#000000" fo:letter-spacing="-0.002in" style:text-scale="101%" fo:font-size="12pt" style:font-size-asian="12pt" style:font-size-complex="12pt"/>
    </style:style>
    <style:style style:name="T217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171" style:parent-style-name="Policepardéfaut" style:family="text">
      <style:text-properties style:font-name="Times New Roman" style:font-name-asian="GPAFJ+Aptos" style:font-name-complex="Times New Roman" fo:color="#000000" fo:font-size="12pt" style:font-size-asian="12pt" style:font-size-complex="12pt"/>
    </style:style>
    <style:style style:name="T217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173" style:parent-style-name="Policepardéfaut" style:family="text">
      <style:text-properties style:font-name="Times New Roman" style:font-name-asian="GPAFJ+Aptos" style:font-name-complex="Times New Roman" fo:color="#000000" fo:font-size="12pt" style:font-size-asian="12pt" style:font-size-complex="12pt"/>
    </style:style>
    <style:style style:name="T217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17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17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177" style:parent-style-name="Policepardéfaut" style:family="text">
      <style:text-properties style:font-name="Times New Roman" style:font-name-asian="GPAFJ+Aptos" style:font-name-complex="Times New Roman" fo:color="#000000" fo:font-size="12pt" style:font-size-asian="12pt" style:font-size-complex="12pt"/>
    </style:style>
    <style:style style:name="T217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179" style:parent-style-name="Policepardéfaut" style:family="text">
      <style:text-properties style:font-name="Times New Roman" style:font-name-asian="GPAFJ+Aptos" style:font-name-complex="Times New Roman" fo:color="#000000" fo:font-size="12pt" style:font-size-asian="12pt" style:font-size-complex="12pt"/>
    </style:style>
    <style:style style:name="T218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18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18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183"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184" style:parent-style-name="Policepardéfaut" style:family="text">
      <style:text-properties style:font-name="Times New Roman" style:font-name-asian="GPAFJ+Aptos" style:font-name-complex="Times New Roman" fo:color="#000000" fo:font-size="12pt" style:font-size-asian="12pt" style:font-size-complex="12pt"/>
    </style:style>
    <style:style style:name="T2185"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18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187" style:parent-style-name="Policepardéfaut" style:family="text">
      <style:text-properties style:font-name="Times New Roman" style:font-name-asian="GPAFJ+Aptos" style:font-name-complex="Times New Roman" fo:color="#000000" fo:font-size="12pt" style:font-size-asian="12pt" style:font-size-complex="12pt"/>
    </style:style>
    <style:style style:name="T2188"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18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19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19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19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19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194" style:parent-style-name="Policepardéfaut" style:family="text">
      <style:text-properties style:font-name="Times New Roman" style:font-name-asian="GPAFJ+Aptos" style:font-name-complex="Times New Roman" fo:color="#000000" fo:letter-spacing="-0.002in" fo:font-size="12pt" style:font-size-asian="12pt" style:font-size-complex="12pt"/>
    </style:style>
    <style:style style:name="T219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196" style:parent-style-name="Policepardéfaut" style:family="text">
      <style:text-properties style:font-name="Times New Roman" style:font-name-asian="GPAFJ+Aptos" style:font-name-complex="Times New Roman" fo:color="#000000" fo:font-size="12pt" style:font-size-asian="12pt" style:font-size-complex="12pt"/>
    </style:style>
    <style:style style:name="T219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19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19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00" style:parent-style-name="Policepardéfaut" style:family="text">
      <style:text-properties style:font-name="Times New Roman" style:font-name-asian="GPAFJ+Aptos" style:font-name-complex="Times New Roman" fo:color="#000000" fo:font-size="12pt" style:font-size-asian="12pt" style:font-size-complex="12pt"/>
    </style:style>
    <style:style style:name="T220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20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03"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20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205" style:parent-style-name="Policepardéfaut" style:family="text">
      <style:text-properties style:font-name="Times New Roman" style:font-name-asian="GPAFJ+Aptos" style:font-name-complex="Times New Roman" fo:color="#000000" fo:font-size="12pt" style:font-size-asian="12pt" style:font-size-complex="12pt"/>
    </style:style>
    <style:style style:name="T220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07" style:parent-style-name="Policepardéfaut" style:family="text">
      <style:text-properties style:font-name="Times New Roman" style:font-name-asian="GPAFJ+Aptos" style:font-name-complex="Times New Roman" fo:color="#000000" fo:font-size="12pt" style:font-size-asian="12pt" style:font-size-complex="12pt"/>
    </style:style>
    <style:style style:name="T220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20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210"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211" style:parent-style-name="Policepardéfaut" style:family="text">
      <style:text-properties style:font-name="Times New Roman" style:font-name-asian="GPAFJ+Aptos" style:font-name-complex="Times New Roman" fo:color="#000000" fo:font-size="12pt" style:font-size-asian="12pt" style:font-size-complex="12pt"/>
    </style:style>
    <style:style style:name="T221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213"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214" style:parent-style-name="Policepardéfaut" style:family="text">
      <style:text-properties style:font-name="Times New Roman" style:font-name-asian="GPAFJ+Aptos" style:font-name-complex="Times New Roman" fo:color="#000000" fo:font-size="12pt" style:font-size-asian="12pt" style:font-size-complex="12pt"/>
    </style:style>
    <style:style style:name="T221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16" style:parent-style-name="Policepardéfaut" style:family="text">
      <style:text-properties style:font-name="Times New Roman" style:font-name-asian="GPAFJ+Aptos" style:font-name-complex="Times New Roman" fo:color="#000000" fo:font-size="12pt" style:font-size-asian="12pt" style:font-size-complex="12pt"/>
    </style:style>
    <style:style style:name="T221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21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19" style:parent-style-name="Policepardéfaut" style:family="text">
      <style:text-properties style:font-name="Times New Roman" style:font-name-asian="GPAFJ+Aptos" style:font-name-complex="Times New Roman" fo:color="#000000" fo:font-size="12pt" style:font-size-asian="12pt" style:font-size-complex="12pt"/>
    </style:style>
    <style:style style:name="T222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221"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222" style:parent-style-name="Policepardéfaut" style:family="text">
      <style:text-properties style:font-name="Times New Roman" style:font-name-asian="GPAFJ+Aptos" style:font-name-complex="Times New Roman" fo:color="#000000" fo:font-size="12pt" style:font-size-asian="12pt" style:font-size-complex="12pt"/>
    </style:style>
    <style:style style:name="T2223"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224" style:parent-style-name="Policepardéfaut" style:family="text">
      <style:text-properties style:font-name="Times New Roman" style:font-name-asian="GPAFJ+Aptos" style:font-name-complex="Times New Roman" fo:color="#000000" fo:font-size="12pt" style:font-size-asian="12pt" style:font-size-complex="12pt"/>
    </style:style>
    <style:style style:name="T222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26" style:parent-style-name="Policepardéfaut" style:family="text">
      <style:text-properties style:font-name="Times New Roman" style:font-name-asian="GPAFJ+Aptos" style:font-name-complex="Times New Roman" fo:color="#000000" fo:font-size="12pt" style:font-size-asian="12pt" style:font-size-complex="12pt"/>
    </style:style>
    <style:style style:name="T222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28" style:parent-style-name="Policepardéfaut" style:family="text">
      <style:text-properties style:font-name="Times New Roman" style:font-name-asian="GPAFJ+Aptos" style:font-name-complex="Times New Roman" fo:color="#000000" fo:letter-spacing="0.0034in" style:text-scale="101%" fo:font-size="12pt" style:font-size-asian="12pt" style:font-size-complex="12pt"/>
    </style:style>
    <style:style style:name="T2229" style:parent-style-name="Policepardéfaut" style:family="text">
      <style:text-properties style:font-name="Times New Roman" style:font-name-asian="GPAFJ+Aptos" style:font-name-complex="Times New Roman" fo:color="#000000" fo:letter-spacing="0.0034in" style:text-scale="101%" fo:font-size="12pt" style:font-size-asian="12pt" style:font-size-complex="12pt"/>
    </style:style>
    <style:style style:name="T223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231"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23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233" style:parent-style-name="Policepardéfaut" style:family="text">
      <style:text-properties style:font-name="Times New Roman" style:font-name-asian="GPAFJ+Aptos" style:font-name-complex="Times New Roman" fo:color="#000000" fo:font-size="12pt" style:font-size-asian="12pt" style:font-size-complex="12pt"/>
    </style:style>
    <style:style style:name="T223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23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3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23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38"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23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240" style:parent-style-name="Policepardéfaut" style:family="text">
      <style:text-properties style:font-name="Times New Roman" style:font-name-asian="GPAFJ+Aptos" style:font-name-complex="Times New Roman" fo:color="#000000" fo:font-size="12pt" style:font-size-asian="12pt" style:font-size-complex="12pt"/>
    </style:style>
    <style:style style:name="T2241"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24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4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24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24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46" style:parent-style-name="Policepardéfaut" style:family="text">
      <style:text-properties style:font-name="Times New Roman" style:font-name-asian="GPAFJ+Aptos" style:font-name-complex="Times New Roman" fo:color="#000000" fo:font-size="12pt" style:font-size-asian="12pt" style:font-size-complex="12pt"/>
    </style:style>
    <style:style style:name="T2247"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248" style:parent-style-name="Policepardéfaut" style:family="text">
      <style:text-properties style:font-name="Times New Roman" style:font-name-asian="GPAFJ+Aptos" style:font-name-complex="Times New Roman" fo:color="#000000" fo:font-size="12pt" style:font-size-asian="12pt" style:font-size-complex="12pt"/>
    </style:style>
    <style:style style:name="T224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250" style:parent-style-name="Policepardéfaut" style:family="text">
      <style:text-properties style:font-name="Times New Roman" style:font-name-asian="GPAFJ+Aptos" style:font-name-complex="Times New Roman" fo:color="#000000" fo:font-size="12pt" style:font-size-asian="12pt" style:font-size-complex="12pt"/>
    </style:style>
    <style:style style:name="T225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5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25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54" style:parent-style-name="Policepardéfaut" style:family="text">
      <style:text-properties style:font-name="Times New Roman" style:font-name-asian="GPAFJ+Aptos" style:font-name-complex="Times New Roman" fo:color="#000000" fo:font-size="12pt" style:font-size-asian="12pt" style:font-size-complex="12pt"/>
    </style:style>
    <style:style style:name="T225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56" style:parent-style-name="Policepardéfaut" style:family="text">
      <style:text-properties style:font-name="Times New Roman" style:font-name-asian="GPAFJ+Aptos" style:font-name-complex="Times New Roman" fo:color="#000000" fo:font-size="12pt" style:font-size-asian="12pt" style:font-size-complex="12pt"/>
    </style:style>
    <style:style style:name="T225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5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259" style:parent-style-name="Policepardéfaut" style:family="text">
      <style:text-properties style:font-name="Times New Roman" style:font-name-asian="GPAFJ+Aptos" style:font-name-complex="Times New Roman" fo:color="#000000" fo:font-size="12pt" style:font-size-asian="12pt" style:font-size-complex="12pt"/>
    </style:style>
    <style:style style:name="T2260"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26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6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26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6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265" style:parent-style-name="Policepardéfaut" style:family="text">
      <style:text-properties style:font-name="Times New Roman" style:font-name-asian="GPAFJ+Aptos" style:font-name-complex="Times New Roman" fo:color="#000000" fo:font-size="12pt" style:font-size-asian="12pt" style:font-size-complex="12pt"/>
    </style:style>
    <style:style style:name="T2266"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267" style:parent-style-name="Policepardéfaut" style:family="text">
      <style:text-properties style:font-name="Times New Roman" style:font-name-asian="GPAFJ+Aptos" style:font-name-complex="Times New Roman" fo:color="#000000" fo:letter-spacing="-0.002in" fo:font-size="12pt" style:font-size-asian="12pt" style:font-size-complex="12pt"/>
    </style:style>
    <style:style style:name="T226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69"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270" style:parent-style-name="Policepardéfaut" style:family="text">
      <style:text-properties style:font-name="Times New Roman" style:font-name-asian="GPAFJ+Aptos" style:font-name-complex="Times New Roman" fo:color="#000000" fo:font-size="12pt" style:font-size-asian="12pt" style:font-size-complex="12pt"/>
    </style:style>
    <style:style style:name="T2271"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27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73" style:parent-style-name="Policepardéfaut" style:family="text">
      <style:text-properties style:font-name="Times New Roman" style:font-name-asian="GPAFJ+Aptos" style:font-name-complex="Times New Roman" fo:color="#000000" fo:font-size="12pt" style:font-size-asian="12pt" style:font-size-complex="12pt"/>
    </style:style>
    <style:style style:name="T227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75" style:parent-style-name="Policepardéfaut" style:family="text">
      <style:text-properties style:font-name="Times New Roman" style:font-name-asian="GPAFJ+Aptos" style:font-name-complex="Times New Roman" fo:color="#000000" fo:font-size="12pt" style:font-size-asian="12pt" style:font-size-complex="12pt"/>
    </style:style>
    <style:style style:name="T227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277" style:parent-style-name="Policepardéfaut" style:family="text">
      <style:text-properties style:font-name="Times New Roman" style:font-name-asian="GPAFJ+Aptos" style:font-name-complex="Times New Roman" fo:color="#000000" fo:font-size="12pt" style:font-size-asian="12pt" style:font-size-complex="12pt"/>
    </style:style>
    <style:style style:name="T227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79" style:parent-style-name="Policepardéfaut" style:family="text">
      <style:text-properties style:font-name="Times New Roman" style:font-name-asian="GPAFJ+Aptos" style:font-name-complex="Times New Roman" fo:color="#000000" fo:font-size="12pt" style:font-size-asian="12pt" style:font-size-complex="12pt"/>
    </style:style>
    <style:style style:name="T2280"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281"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28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83" style:parent-style-name="Policepardéfaut" style:family="text">
      <style:text-properties style:font-name="Times New Roman" style:font-name-asian="GPAFJ+Aptos" style:font-name-complex="Times New Roman" fo:color="#000000" fo:font-size="12pt" style:font-size-asian="12pt" style:font-size-complex="12pt"/>
    </style:style>
    <style:style style:name="T2284" style:parent-style-name="Policepardéfaut" style:family="text">
      <style:text-properties style:font-name="Times New Roman" style:font-name-asian="GPAFJ+Aptos" style:font-name-complex="Times New Roman" fo:color="#000000" fo:font-size="12pt" style:font-size-asian="12pt" style:font-size-complex="12pt"/>
    </style:style>
    <style:style style:name="T2285" style:parent-style-name="Policepardéfaut" style:family="text">
      <style:text-properties style:font-name="Times New Roman" style:font-name-asian="GPAFJ+Aptos" style:font-name-complex="Times New Roman" fo:color="#000000" fo:font-size="12pt" style:font-size-asian="12pt" style:font-size-complex="12pt"/>
    </style:style>
    <style:style style:name="T228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87" style:parent-style-name="Policepardéfaut" style:family="text">
      <style:text-properties style:font-name="Times New Roman" style:font-name-asian="GPAFJ+Aptos" style:font-name-complex="Times New Roman" fo:color="#000000" fo:font-size="12pt" style:font-size-asian="12pt" style:font-size-complex="12pt"/>
    </style:style>
    <style:style style:name="T228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28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90" style:parent-style-name="Policepardéfaut" style:family="text">
      <style:text-properties style:font-name="Times New Roman" style:font-name-asian="GPAFJ+Aptos" style:font-name-complex="Times New Roman" fo:color="#000000" fo:font-size="12pt" style:font-size-asian="12pt" style:font-size-complex="12pt"/>
    </style:style>
    <style:style style:name="T229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92"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293" style:parent-style-name="Policepardéfaut" style:family="text">
      <style:text-properties style:font-name="Times New Roman" style:font-name-asian="GPAFJ+Aptos" style:font-name-complex="Times New Roman" fo:color="#000000" fo:font-size="12pt" style:font-size-asian="12pt" style:font-size-complex="12pt"/>
    </style:style>
    <style:style style:name="T229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95"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29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9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29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29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300"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301" style:parent-style-name="Policepardéfaut" style:family="text">
      <style:text-properties style:font-name="Times New Roman" style:font-name-asian="GPAFJ+Aptos" style:font-name-complex="Times New Roman" fo:color="#000000" fo:font-size="12pt" style:font-size-asian="12pt" style:font-size-complex="12pt"/>
    </style:style>
    <style:style style:name="T230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303" style:parent-style-name="Policepardéfaut" style:family="text">
      <style:text-properties style:font-name="Times New Roman" style:font-name-asian="GPAFJ+Aptos" style:font-name-complex="Times New Roman" fo:color="#000000" fo:font-size="12pt" style:font-size-asian="12pt" style:font-size-complex="12pt"/>
    </style:style>
    <style:style style:name="T230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305" style:parent-style-name="Policepardéfaut" style:family="text">
      <style:text-properties style:font-name="Times New Roman" style:font-name-asian="GPAFJ+Aptos" style:font-name-complex="Times New Roman" fo:color="#000000" fo:font-size="12pt" style:font-size-asian="12pt" style:font-size-complex="12pt"/>
    </style:style>
    <style:style style:name="T2306"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30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30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309" style:parent-style-name="Policepardéfaut" style:family="text">
      <style:text-properties style:font-name="Times New Roman" style:font-name-asian="GPAFJ+Aptos" style:font-name-complex="Times New Roman" fo:color="#000000" fo:font-size="12pt" style:font-size-asian="12pt" style:font-size-complex="12pt"/>
    </style:style>
    <style:style style:name="T231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31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312" style:parent-style-name="Policepardéfaut" style:family="text">
      <style:text-properties style:font-name="Times New Roman" style:font-name-asian="GPAFJ+Aptos" style:font-name-complex="Times New Roman" fo:color="#000000" fo:letter-spacing="-0.0027in" fo:font-size="12pt" style:font-size-asian="12pt" style:font-size-complex="12pt"/>
    </style:style>
    <style:style style:name="T2313"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31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315" style:parent-style-name="Policepardéfaut" style:family="text">
      <style:text-properties style:font-name="Times New Roman" style:font-name-asian="GPAFJ+Aptos" style:font-name-complex="Times New Roman" fo:color="#000000" fo:font-size="12pt" style:font-size-asian="12pt" style:font-size-complex="12pt"/>
    </style:style>
    <style:style style:name="T231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31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31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319" style:parent-style-name="Policepardéfaut" style:family="text">
      <style:text-properties style:font-name="Times New Roman" style:font-name-asian="GPAFJ+Aptos" style:font-name-complex="Times New Roman" fo:color="#000000" fo:font-size="12pt" style:font-size-asian="12pt" style:font-size-complex="12pt"/>
    </style:style>
    <style:style style:name="T2320"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32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32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32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32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32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326" style:parent-style-name="Policepardéfaut" style:family="text">
      <style:text-properties style:font-name="Times New Roman" style:font-name-asian="GPAFJ+Aptos" style:font-name-complex="Times New Roman" fo:color="#000000" fo:font-size="12pt" style:font-size-asian="12pt" style:font-size-complex="12pt"/>
    </style:style>
    <style:style style:name="T232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328"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32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330"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33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332" style:parent-style-name="Policepardéfaut" style:family="text">
      <style:text-properties style:font-name="Times New Roman" style:font-name-asian="GPAFJ+Aptos" style:font-name-complex="Times New Roman" fo:color="#000000" fo:font-size="12pt" style:font-size-asian="12pt" style:font-size-complex="12pt"/>
    </style:style>
    <style:style style:name="T2333"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33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335" style:parent-style-name="Policepardéfaut" style:family="text">
      <style:text-properties style:font-name="Times New Roman" style:font-name-asian="GPAFJ+Aptos" style:font-name-complex="Times New Roman" fo:color="#000000" fo:font-size="12pt" style:font-size-asian="12pt" style:font-size-complex="12pt"/>
    </style:style>
    <style:style style:name="T233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337"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338" style:parent-style-name="Policepardéfaut" style:family="text">
      <style:text-properties style:font-name="Times New Roman" style:font-name-asian="GPAFJ+Aptos" style:font-name-complex="Times New Roman" fo:color="#000000" fo:font-size="12pt" style:font-size-asian="12pt" style:font-size-complex="12pt"/>
    </style:style>
    <style:style style:name="T233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34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34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34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34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34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34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34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34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34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349" style:parent-style-name="Policepardéfaut" style:family="text">
      <style:text-properties style:font-name="Times New Roman" style:font-name-asian="GPAFJ+Aptos" style:font-name-complex="Times New Roman" fo:color="#000000" fo:font-size="12pt" style:font-size-asian="12pt" style:font-size-complex="12pt"/>
    </style:style>
    <style:style style:name="T2350"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351" style:parent-style-name="Policepardéfaut" style:family="text">
      <style:text-properties style:font-name="Times New Roman" style:font-name-asian="GPAFJ+Aptos" style:font-name-complex="Times New Roman" fo:color="#000000" fo:font-size="12pt" style:font-size-asian="12pt" style:font-size-complex="12pt"/>
    </style:style>
    <style:style style:name="T235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353"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354" style:parent-style-name="Policepardéfaut" style:family="text">
      <style:text-properties style:font-name="Times New Roman" style:font-name-asian="GPAFJ+Aptos" style:font-name-complex="Times New Roman" fo:color="#000000" fo:font-size="12pt" style:font-size-asian="12pt" style:font-size-complex="12pt"/>
    </style:style>
    <style:style style:name="T235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35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35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358" style:parent-style-name="Policepardéfaut" style:family="text">
      <style:text-properties style:font-name="Times New Roman" style:font-name-asian="GPAFJ+Aptos" style:font-name-complex="Times New Roman" fo:color="#000000" fo:font-size="12pt" style:font-size-asian="12pt" style:font-size-complex="12pt"/>
    </style:style>
    <style:style style:name="T235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36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361" style:parent-style-name="Policepardéfaut" style:family="text">
      <style:text-properties style:font-name="Times New Roman" style:font-name-asian="GPAFJ+Aptos" style:font-name-complex="Times New Roman" fo:color="#000000" fo:font-size="12pt" style:font-size-asian="12pt" style:font-size-complex="12pt"/>
    </style:style>
    <style:style style:name="T236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36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364" style:parent-style-name="Policepardéfaut" style:family="text">
      <style:text-properties style:font-name="Times New Roman" style:font-name-asian="GPAFJ+Aptos" style:font-name-complex="Times New Roman" fo:color="#000000" fo:font-size="12pt" style:font-size-asian="12pt" style:font-size-complex="12pt"/>
    </style:style>
    <style:style style:name="T236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366" style:parent-style-name="Policepardéfaut" style:family="text">
      <style:text-properties style:font-name="Times New Roman" style:font-name-asian="GPAFJ+Aptos" style:font-name-complex="Times New Roman" fo:color="#000000" fo:font-size="12pt" style:font-size-asian="12pt" style:font-size-complex="12pt"/>
    </style:style>
    <style:style style:name="T236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368" style:parent-style-name="Policepardéfaut" style:family="text">
      <style:text-properties style:font-name="Times New Roman" style:font-name-asian="GPAFJ+Aptos" style:font-name-complex="Times New Roman" fo:color="#000000" fo:font-size="12pt" style:font-size-asian="12pt" style:font-size-complex="12pt"/>
    </style:style>
    <style:style style:name="T2369"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370" style:parent-style-name="Policepardéfaut" style:family="text">
      <style:text-properties style:font-name="Times New Roman" style:font-name-asian="GPAFJ+Aptos" style:font-name-complex="Times New Roman" fo:color="#000000" fo:font-size="12pt" style:font-size-asian="12pt" style:font-size-complex="12pt"/>
    </style:style>
    <style:style style:name="T237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37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373" style:parent-style-name="Policepardéfaut" style:family="text">
      <style:text-properties style:font-name="Times New Roman" style:font-name-asian="GPAFJ+Aptos" style:font-name-complex="Times New Roman" fo:color="#000000" fo:font-size="12pt" style:font-size-asian="12pt" style:font-size-complex="12pt"/>
    </style:style>
    <style:style style:name="T237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375" style:parent-style-name="Policepardéfaut" style:family="text">
      <style:text-properties style:font-name="Times New Roman" style:font-name-asian="GPAFJ+Aptos" style:font-name-complex="Times New Roman" fo:color="#000000" fo:font-size="12pt" style:font-size-asian="12pt" style:font-size-complex="12pt"/>
    </style:style>
    <style:style style:name="T237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377" style:parent-style-name="Policepardéfaut" style:family="text">
      <style:text-properties style:font-name="Times New Roman" style:font-name-asian="GPAFJ+Aptos" style:font-name-complex="Times New Roman" fo:color="#000000" fo:font-size="12pt" style:font-size-asian="12pt" style:font-size-complex="12pt"/>
    </style:style>
    <style:style style:name="T237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P2379" style:parent-style-name="Normal" style:family="paragraph">
      <style:paragraph-properties fo:widows="0" fo:orphans="0" fo:text-align="justify" fo:line-height="107%" fo:margin-right="0.3618in"/>
      <style:text-properties style:font-name="Times New Roman" style:font-name-asian="GPAFJ+Aptos" style:font-name-complex="Times New Roman" fo:color="#000000" fo:font-size="12pt" style:font-size-asian="12pt" style:font-size-complex="12pt"/>
    </style:style>
    <style:style style:name="P2380" style:parent-style-name="Normal" style:family="paragraph">
      <style:paragraph-properties fo:text-align="justify" fo:margin-bottom="0.0013in" fo:line-height="0.1111in"/>
      <style:text-properties style:font-name="Times New Roman" style:font-name-complex="Times New Roman" fo:font-size="8pt" style:font-size-asian="8pt" style:font-size-complex="8pt"/>
    </style:style>
    <style:style style:name="P2381" style:parent-style-name="Normal" style:family="paragraph">
      <style:paragraph-properties fo:text-align="justify" fo:margin-bottom="0.0013in" fo:line-height="0.1111in"/>
      <style:text-properties style:font-name="Times New Roman" style:font-name-complex="Times New Roman" fo:font-size="8pt" style:font-size-asian="8pt" style:font-size-complex="8pt"/>
    </style:style>
    <style:style style:name="P2382" style:parent-style-name="Normal" style:family="paragraph">
      <style:paragraph-properties fo:widows="0" fo:orphans="0" fo:text-align="justify" fo:line-height="100%" fo:margin-right="-0.0138in"/>
    </style:style>
    <style:style style:name="T2383" style:parent-style-name="Policepardéfaut" style:family="text">
      <style:text-properties style:font-name="Times New Roman" style:font-name-asian="WYAXW+Aptos" style:font-name-complex="Times New Roman" fo:font-weight="bold" style:font-weight-asian="bold" style:font-weight-complex="bold" fo:color="#000000" style:text-scale="101%" fo:font-size="12pt" style:font-size-asian="12pt" style:font-size-complex="12pt"/>
    </style:style>
    <style:style style:name="T2384" style:parent-style-name="Policepardéfaut" style:family="text">
      <style:text-properties style:font-name="Times New Roman" style:font-name-asian="WYAXW+Aptos" style:font-name-complex="Times New Roman" fo:font-weight="bold" style:font-weight-asian="bold" style:font-weight-complex="bold" fo:color="#000000" fo:font-size="12pt" style:font-size-asian="12pt" style:font-size-complex="12pt"/>
    </style:style>
    <style:style style:name="T2385" style:parent-style-name="Policepardéfaut" style:family="text">
      <style:text-properties style:font-name="Times New Roman" style:font-name-asian="WYAXW+Aptos" style:font-name-complex="Times New Roman" fo:font-weight="bold" style:font-weight-asian="bold" style:font-weight-complex="bold" fo:color="#000000" style:text-scale="101%" fo:font-size="12pt" style:font-size-asian="12pt" style:font-size-complex="12pt"/>
    </style:style>
    <style:style style:name="T2386" style:parent-style-name="Policepardéfaut" style:family="text">
      <style:text-properties style:font-name="Times New Roman" style:font-name-asian="WYAXW+Aptos" style:font-name-complex="Times New Roman" fo:font-weight="bold" style:font-weight-asian="bold" style:font-weight-complex="bold" fo:color="#000000" fo:font-size="12pt" style:font-size-asian="12pt" style:font-size-complex="12pt"/>
    </style:style>
    <style:style style:name="T2387" style:parent-style-name="Policepardéfaut" style:family="text">
      <style:text-properties style:font-name="Times New Roman" style:font-name-asian="WYAXW+Aptos" style:font-name-complex="Times New Roman" fo:font-weight="bold" style:font-weight-asian="bold" style:font-weight-complex="bold" fo:color="#000000" fo:letter-spacing="-0.0006in" style:text-scale="101%" fo:font-size="12pt" style:font-size-asian="12pt" style:font-size-complex="12pt"/>
    </style:style>
    <style:style style:name="T2388" style:parent-style-name="Policepardéfaut" style:family="text">
      <style:text-properties style:font-name="Times New Roman" style:font-name-asian="WYAXW+Aptos" style:font-name-complex="Times New Roman" fo:font-weight="bold" style:font-weight-asian="bold" style:font-weight-complex="bold" fo:color="#000000" fo:letter-spacing="-0.0006in" fo:font-size="12pt" style:font-size-asian="12pt" style:font-size-complex="12pt"/>
    </style:style>
    <style:style style:name="T2389" style:parent-style-name="Policepardéfaut" style:family="text">
      <style:text-properties style:font-name="Times New Roman" style:font-name-asian="WYAXW+Aptos" style:font-name-complex="Times New Roman" fo:font-weight="bold" style:font-weight-asian="bold" style:font-weight-complex="bold" fo:color="#000000" fo:font-size="12pt" style:font-size-asian="12pt" style:font-size-complex="12pt"/>
    </style:style>
    <style:style style:name="T2390" style:parent-style-name="Policepardéfaut" style:family="text">
      <style:text-properties style:font-name="Times New Roman" style:font-name-asian="WYAXW+Aptos" style:font-name-complex="Times New Roman" fo:font-weight="bold" style:font-weight-asian="bold" style:font-weight-complex="bold" fo:color="#000000" fo:letter-spacing="0.0006in" fo:font-size="12pt" style:font-size-asian="12pt" style:font-size-complex="12pt"/>
    </style:style>
    <style:style style:name="T2391" style:parent-style-name="Policepardéfaut" style:family="text">
      <style:text-properties style:font-name="Times New Roman" style:font-name-asian="WYAXW+Aptos" style:font-name-complex="Times New Roman" fo:font-weight="bold" style:font-weight-asian="bold" style:font-weight-complex="bold" fo:color="#000000" fo:font-size="12pt" style:font-size-asian="12pt" style:font-size-complex="12pt"/>
    </style:style>
    <style:style style:name="T2392" style:parent-style-name="Policepardéfaut" style:family="text">
      <style:text-properties style:font-name="Times New Roman" style:font-name-asian="WYAXW+Aptos" style:font-name-complex="Times New Roman" fo:font-weight="bold" style:font-weight-asian="bold" style:font-weight-complex="bold" fo:color="#000000" style:text-scale="101%" fo:font-size="12pt" style:font-size-asian="12pt" style:font-size-complex="12pt"/>
    </style:style>
    <style:style style:name="T2393" style:parent-style-name="Policepardéfaut" style:family="text">
      <style:text-properties style:font-name="Times New Roman" style:font-name-asian="WYAXW+Aptos" style:font-name-complex="Times New Roman" fo:font-weight="bold" style:font-weight-asian="bold" style:font-weight-complex="bold" fo:color="#000000" fo:letter-spacing="-0.0006in" fo:font-size="12pt" style:font-size-asian="12pt" style:font-size-complex="12pt"/>
    </style:style>
    <style:style style:name="T2394" style:parent-style-name="Policepardéfaut" style:family="text">
      <style:text-properties style:font-name="Times New Roman" style:font-name-asian="WYAXW+Aptos" style:font-name-complex="Times New Roman" fo:font-weight="bold" style:font-weight-asian="bold" style:font-weight-complex="bold" fo:color="#000000" fo:font-size="12pt" style:font-size-asian="12pt" style:font-size-complex="12pt"/>
    </style:style>
    <style:style style:name="T2395" style:parent-style-name="Policepardéfaut" style:family="text">
      <style:text-properties style:font-name="Times New Roman" style:font-name-asian="WYAXW+Aptos" style:font-name-complex="Times New Roman" fo:font-weight="bold" style:font-weight-asian="bold" style:font-weight-complex="bold" fo:color="#000000" fo:letter-spacing="-0.0006in" style:text-scale="101%" fo:font-size="12pt" style:font-size-asian="12pt" style:font-size-complex="12pt"/>
    </style:style>
    <style:style style:name="T2396" style:parent-style-name="Policepardéfaut" style:family="text">
      <style:text-properties style:font-name="Times New Roman" style:font-name-asian="WYAXW+Aptos" style:font-name-complex="Times New Roman" fo:font-weight="bold" style:font-weight-asian="bold" style:font-weight-complex="bold" fo:color="#000000" style:text-scale="101%" fo:font-size="12pt" style:font-size-asian="12pt" style:font-size-complex="12pt"/>
    </style:style>
    <style:style style:name="T2397" style:parent-style-name="Policepardéfaut" style:family="text">
      <style:text-properties style:font-name="Times New Roman" style:font-name-asian="WYAXW+Aptos" style:font-name-complex="Times New Roman" fo:font-weight="bold" style:font-weight-asian="bold" style:font-weight-complex="bold" fo:color="#000000" fo:font-size="12pt" style:font-size-asian="12pt" style:font-size-complex="12pt"/>
    </style:style>
    <style:style style:name="T2398" style:parent-style-name="Policepardéfaut" style:family="text">
      <style:text-properties style:font-name="Times New Roman" style:font-name-asian="WYAXW+Aptos" style:font-name-complex="Times New Roman" fo:font-weight="bold" style:font-weight-asian="bold" style:font-weight-complex="bold" fo:color="#000000" fo:letter-spacing="-0.0006in" style:text-scale="101%" fo:font-size="12pt" style:font-size-asian="12pt" style:font-size-complex="12pt"/>
    </style:style>
    <style:style style:name="T2399" style:parent-style-name="Policepardéfaut" style:family="text">
      <style:text-properties style:font-name="Times New Roman" style:font-name-asian="WYAXW+Aptos" style:font-name-complex="Times New Roman" fo:font-weight="bold" style:font-weight-asian="bold" style:font-weight-complex="bold" fo:color="#000000" fo:font-size="12pt" style:font-size-asian="12pt" style:font-size-complex="12pt"/>
    </style:style>
    <style:style style:name="T2400" style:parent-style-name="Policepardéfaut" style:family="text">
      <style:text-properties style:font-name="Times New Roman" style:font-name-asian="WYAXW+Aptos" style:font-name-complex="Times New Roman" fo:font-weight="bold" style:font-weight-asian="bold" style:font-weight-complex="bold" fo:color="#000000" style:text-scale="101%" fo:font-size="12pt" style:font-size-asian="12pt" style:font-size-complex="12pt"/>
    </style:style>
    <style:style style:name="T2401" style:parent-style-name="Policepardéfaut" style:family="text">
      <style:text-properties style:font-name="Times New Roman" style:font-name-asian="WYAXW+Aptos" style:font-name-complex="Times New Roman" fo:font-weight="bold" style:font-weight-asian="bold" style:font-weight-complex="bold" fo:color="#000000" fo:letter-spacing="-0.0013in" fo:font-size="12pt" style:font-size-asian="12pt" style:font-size-complex="12pt"/>
    </style:style>
    <style:style style:name="T2402" style:parent-style-name="Policepardéfaut" style:family="text">
      <style:text-properties style:font-name="Times New Roman" style:font-name-asian="WYAXW+Aptos" style:font-name-complex="Times New Roman" fo:font-weight="bold" style:font-weight-asian="bold" style:font-weight-complex="bold" fo:color="#000000" fo:letter-spacing="0.0006in" style:text-scale="101%" fo:font-size="12pt" style:font-size-asian="12pt" style:font-size-complex="12pt"/>
    </style:style>
    <style:style style:name="T2403" style:parent-style-name="Policepardéfaut" style:family="text">
      <style:text-properties style:font-name="Times New Roman" style:font-name-asian="WYAXW+Aptos" style:font-name-complex="Times New Roman" fo:font-weight="bold" style:font-weight-asian="bold" style:font-weight-complex="bold" fo:color="#000000" fo:font-size="12pt" style:font-size-asian="12pt" style:font-size-complex="12pt"/>
    </style:style>
    <style:style style:name="T2404" style:parent-style-name="Policepardéfaut" style:family="text">
      <style:text-properties style:font-name="Times New Roman" style:font-name-asian="WYAXW+Aptos" style:font-name-complex="Times New Roman" fo:font-weight="bold" style:font-weight-asian="bold" style:font-weight-complex="bold" fo:color="#000000" style:text-scale="101%" fo:font-size="12pt" style:font-size-asian="12pt" style:font-size-complex="12pt"/>
    </style:style>
    <style:style style:name="T2405" style:parent-style-name="Policepardéfaut" style:family="text">
      <style:text-properties style:font-name="Times New Roman" style:font-name-asian="WYAXW+Aptos" style:font-name-complex="Times New Roman" fo:font-weight="bold" style:font-weight-asian="bold" style:font-weight-complex="bold" fo:color="#000000" fo:letter-spacing="-0.0006in" fo:font-size="12pt" style:font-size-asian="12pt" style:font-size-complex="12pt"/>
    </style:style>
    <style:style style:name="T2406" style:parent-style-name="Policepardéfaut" style:family="text">
      <style:text-properties style:font-name="Times New Roman" style:font-name-asian="WYAXW+Aptos" style:font-name-complex="Times New Roman" fo:font-weight="bold" style:font-weight-asian="bold" style:font-weight-complex="bold" fo:color="#000000" fo:font-size="12pt" style:font-size-asian="12pt" style:font-size-complex="12pt"/>
    </style:style>
    <style:style style:name="T2407" style:parent-style-name="Policepardéfaut" style:family="text">
      <style:text-properties style:font-name="Times New Roman" style:font-name-asian="WYAXW+Aptos" style:font-name-complex="Times New Roman" fo:font-weight="bold" style:font-weight-asian="bold" style:font-weight-complex="bold" fo:color="#000000" style:text-scale="101%" fo:font-size="12pt" style:font-size-asian="12pt" style:font-size-complex="12pt"/>
    </style:style>
    <style:style style:name="T2408" style:parent-style-name="Policepardéfaut" style:family="text">
      <style:text-properties style:font-name="Times New Roman" style:font-name-asian="WYAXW+Aptos" style:font-name-complex="Times New Roman" fo:font-weight="bold" style:font-weight-asian="bold" style:font-weight-complex="bold" fo:color="#000000" fo:letter-spacing="-0.0006in" fo:font-size="12pt" style:font-size-asian="12pt" style:font-size-complex="12pt"/>
    </style:style>
    <style:style style:name="T2409" style:parent-style-name="Policepardéfaut" style:family="text">
      <style:text-properties style:font-name="Times New Roman" style:font-name-asian="WYAXW+Aptos" style:font-name-complex="Times New Roman" fo:font-weight="bold" style:font-weight-asian="bold" style:font-weight-complex="bold" fo:color="#000000" style:text-scale="101%" fo:font-size="12pt" style:font-size-asian="12pt" style:font-size-complex="12pt"/>
    </style:style>
    <style:style style:name="T2410" style:parent-style-name="Policepardéfaut" style:family="text">
      <style:text-properties style:font-name="Times New Roman" style:font-name-asian="WYAXW+Aptos" style:font-name-complex="Times New Roman" fo:font-weight="bold" style:font-weight-asian="bold" style:font-weight-complex="bold" fo:color="#000000" fo:font-size="12pt" style:font-size-asian="12pt" style:font-size-complex="12pt"/>
    </style:style>
    <style:style style:name="T2411" style:parent-style-name="Policepardéfaut" style:family="text">
      <style:text-properties style:font-name="Times New Roman" style:font-name-asian="WYAXW+Aptos" style:font-name-complex="Times New Roman" fo:font-weight="bold" style:font-weight-asian="bold" style:font-weight-complex="bold" fo:color="#000000" fo:letter-spacing="-0.0006in" style:text-scale="101%" fo:font-size="12pt" style:font-size-asian="12pt" style:font-size-complex="12pt"/>
    </style:style>
    <style:style style:name="T2412" style:parent-style-name="Policepardéfaut" style:family="text">
      <style:text-properties style:font-name="Times New Roman" style:font-name-asian="WYAXW+Aptos" style:font-name-complex="Times New Roman" fo:font-weight="bold" style:font-weight-asian="bold" style:font-weight-complex="bold" fo:color="#000000" fo:font-size="12pt" style:font-size-asian="12pt" style:font-size-complex="12pt"/>
    </style:style>
    <style:style style:name="T2413" style:parent-style-name="Policepardéfaut" style:family="text">
      <style:text-properties style:font-name="Times New Roman" style:font-name-asian="WYAXW+Aptos" style:font-name-complex="Times New Roman" fo:font-weight="bold" style:font-weight-asian="bold" style:font-weight-complex="bold" fo:color="#000000" fo:letter-spacing="-0.0006in" fo:font-size="12pt" style:font-size-asian="12pt" style:font-size-complex="12pt"/>
    </style:style>
    <style:style style:name="T2414" style:parent-style-name="Policepardéfaut" style:family="text">
      <style:text-properties style:font-name="Times New Roman" style:font-name-asian="WYAXW+Aptos" style:font-name-complex="Times New Roman" fo:font-weight="bold" style:font-weight-asian="bold" style:font-weight-complex="bold" fo:color="#000000" style:text-scale="101%" fo:font-size="12pt" style:font-size-asian="12pt" style:font-size-complex="12pt"/>
    </style:style>
    <style:style style:name="T2415" style:parent-style-name="Policepardéfaut" style:family="text">
      <style:text-properties style:font-name="Times New Roman" style:font-name-asian="WYAXW+Aptos" style:font-name-complex="Times New Roman" fo:font-weight="bold" style:font-weight-asian="bold" style:font-weight-complex="bold" fo:color="#000000" fo:letter-spacing="-0.0013in" fo:font-size="12pt" style:font-size-asian="12pt" style:font-size-complex="12pt"/>
    </style:style>
    <style:style style:name="T2416" style:parent-style-name="Policepardéfaut" style:family="text">
      <style:text-properties style:font-name="Times New Roman" style:font-name-asian="WYAXW+Aptos" style:font-name-complex="Times New Roman" fo:font-weight="bold" style:font-weight-asian="bold" style:font-weight-complex="bold" fo:color="#000000" fo:font-size="12pt" style:font-size-asian="12pt" style:font-size-complex="12pt"/>
    </style:style>
    <style:style style:name="T2417" style:parent-style-name="Policepardéfaut" style:family="text">
      <style:text-properties style:font-name="Times New Roman" style:font-name-asian="WYAXW+Aptos" style:font-name-complex="Times New Roman" fo:font-weight="bold" style:font-weight-asian="bold" style:font-weight-complex="bold" fo:color="#000000" style:text-scale="101%" fo:font-size="12pt" style:font-size-asian="12pt" style:font-size-complex="12pt"/>
    </style:style>
    <style:style style:name="T2418" style:parent-style-name="Policepardéfaut" style:family="text">
      <style:text-properties style:font-name="Times New Roman" style:font-name-asian="WYAXW+Aptos" style:font-name-complex="Times New Roman" fo:font-weight="bold" style:font-weight-asian="bold" style:font-weight-complex="bold" fo:color="#000000" fo:letter-spacing="-0.0006in" fo:font-size="12pt" style:font-size-asian="12pt" style:font-size-complex="12pt"/>
    </style:style>
    <style:style style:name="T2419" style:parent-style-name="Policepardéfaut" style:family="text">
      <style:text-properties style:font-name="Times New Roman" style:font-name-asian="WYAXW+Aptos" style:font-name-complex="Times New Roman" fo:font-weight="bold" style:font-weight-asian="bold" style:font-weight-complex="bold" fo:color="#000000" fo:font-size="12pt" style:font-size-asian="12pt" style:font-size-complex="12pt"/>
    </style:style>
    <style:style style:name="T2420" style:parent-style-name="Policepardéfaut" style:family="text">
      <style:text-properties style:font-name="Times New Roman" style:font-name-asian="WYAXW+Aptos" style:font-name-complex="Times New Roman" fo:font-weight="bold" style:font-weight-asian="bold" style:font-weight-complex="bold" fo:color="#000000" style:text-scale="101%" fo:font-size="12pt" style:font-size-asian="12pt" style:font-size-complex="12pt"/>
    </style:style>
    <style:style style:name="T2421" style:parent-style-name="Policepardéfaut" style:family="text">
      <style:text-properties style:font-name="Times New Roman" style:font-name-asian="WYAXW+Aptos" style:font-name-complex="Times New Roman" fo:font-weight="bold" style:font-weight-asian="bold" style:font-weight-complex="bold" fo:color="#000000" fo:font-size="12pt" style:font-size-asian="12pt" style:font-size-complex="12pt"/>
    </style:style>
    <style:style style:name="T2422" style:parent-style-name="Policepardéfaut" style:family="text">
      <style:text-properties style:font-name="Times New Roman" style:font-name-asian="WYAXW+Aptos" style:font-name-complex="Times New Roman" fo:font-weight="bold" style:font-weight-asian="bold" style:font-weight-complex="bold" fo:color="#000000" fo:letter-spacing="-0.0006in" fo:font-size="12pt" style:font-size-asian="12pt" style:font-size-complex="12pt"/>
    </style:style>
    <style:style style:name="T2423" style:parent-style-name="Policepardéfaut" style:family="text">
      <style:text-properties style:font-name="Times New Roman" style:font-name-asian="WYAXW+Aptos" style:font-name-complex="Times New Roman" fo:font-weight="bold" style:font-weight-asian="bold" style:font-weight-complex="bold" fo:color="#000000" style:text-scale="101%" fo:font-size="12pt" style:font-size-asian="12pt" style:font-size-complex="12pt"/>
    </style:style>
    <style:style style:name="P2424" style:parent-style-name="Normal" style:family="paragraph">
      <style:paragraph-properties fo:text-align="justify" fo:line-height="0.1666in"/>
      <style:text-properties style:font-name="Times New Roman" style:font-name-complex="Times New Roman"/>
    </style:style>
    <style:style style:name="P2425" style:parent-style-name="Normal" style:family="paragraph">
      <style:paragraph-properties fo:text-align="justify" fo:margin-bottom="0.0083in" fo:line-height="0.0972in"/>
      <style:text-properties style:font-name="Times New Roman" style:font-name-complex="Times New Roman" fo:font-size="7pt" style:font-size-asian="7pt" style:font-size-complex="7pt"/>
    </style:style>
    <style:style style:name="P2426" style:parent-style-name="Normal" style:family="paragraph">
      <style:paragraph-properties fo:widows="0" fo:orphans="0" fo:text-align="justify" fo:line-height="107%" fo:margin-right="0.4444in"/>
    </style:style>
    <style:style style:name="T2427" style:parent-style-name="Policepardéfaut" style:family="text">
      <style:text-properties style:font-name="Times New Roman" style:font-name-asian="GPAFJ+Aptos" style:font-name-complex="Times New Roman" fo:color="#000000" fo:font-size="12pt" style:font-size-asian="12pt" style:font-size-complex="12pt"/>
    </style:style>
    <style:style style:name="T2428" style:parent-style-name="Policepardéfaut" style:family="text">
      <style:text-properties style:font-name="Times New Roman" style:font-name-asian="GPAFJ+Aptos" style:font-name-complex="Times New Roman" fo:color="#000000" fo:font-size="12pt" style:font-size-asian="12pt" style:font-size-complex="12pt"/>
    </style:style>
    <style:style style:name="T242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43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431"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432"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43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43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435" style:parent-style-name="Policepardéfaut" style:family="text">
      <style:text-properties style:font-name="Times New Roman" style:font-name-asian="GPAFJ+Aptos" style:font-name-complex="Times New Roman" fo:color="#000000" fo:font-size="12pt" style:font-size-asian="12pt" style:font-size-complex="12pt"/>
    </style:style>
    <style:style style:name="T243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437"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438"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43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440" style:parent-style-name="Policepardéfaut" style:family="text">
      <style:text-properties style:font-name="Times New Roman" style:font-name-asian="GPAFJ+Aptos" style:font-name-complex="Times New Roman" fo:color="#000000" fo:font-size="12pt" style:font-size-asian="12pt" style:font-size-complex="12pt"/>
    </style:style>
    <style:style style:name="T244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442" style:parent-style-name="Policepardéfaut" style:family="text">
      <style:text-properties style:font-name="Times New Roman" style:font-name-asian="GPAFJ+Aptos" style:font-name-complex="Times New Roman" fo:color="#000000" fo:font-size="12pt" style:font-size-asian="12pt" style:font-size-complex="12pt"/>
    </style:style>
    <style:style style:name="T244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444" style:parent-style-name="Policepardéfaut" style:family="text">
      <style:text-properties style:font-name="Times New Roman" style:font-name-asian="GPAFJ+Aptos" style:font-name-complex="Times New Roman" fo:color="#000000" fo:font-size="12pt" style:font-size-asian="12pt" style:font-size-complex="12pt"/>
    </style:style>
    <style:style style:name="T244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44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44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448" style:parent-style-name="Policepardéfaut" style:family="text">
      <style:text-properties style:font-name="Times New Roman" style:font-name-asian="GPAFJ+Aptos" style:font-name-complex="Times New Roman" fo:color="#000000" fo:font-size="12pt" style:font-size-asian="12pt" style:font-size-complex="12pt"/>
    </style:style>
    <style:style style:name="T244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450" style:parent-style-name="Policepardéfaut" style:family="text">
      <style:text-properties style:font-name="Times New Roman" style:font-name-asian="GPAFJ+Aptos" style:font-name-complex="Times New Roman" fo:color="#000000" fo:font-size="12pt" style:font-size-asian="12pt" style:font-size-complex="12pt"/>
    </style:style>
    <style:style style:name="T2451"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45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45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45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45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456" style:parent-style-name="Policepardéfaut" style:family="text">
      <style:text-properties style:font-name="Times New Roman" style:font-name-asian="GPAFJ+Aptos" style:font-name-complex="Times New Roman" fo:color="#000000" fo:font-size="12pt" style:font-size-asian="12pt" style:font-size-complex="12pt"/>
    </style:style>
    <style:style style:name="T245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458" style:parent-style-name="Policepardéfaut" style:family="text">
      <style:text-properties style:font-name="Times New Roman" style:font-name-asian="GPAFJ+Aptos" style:font-name-complex="Times New Roman" fo:color="#000000" fo:font-size="12pt" style:font-size-asian="12pt" style:font-size-complex="12pt"/>
    </style:style>
    <style:style style:name="T245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460" style:parent-style-name="Policepardéfaut" style:family="text">
      <style:text-properties style:font-name="Times New Roman" style:font-name-asian="GPAFJ+Aptos" style:font-name-complex="Times New Roman" fo:color="#000000" fo:font-size="12pt" style:font-size-asian="12pt" style:font-size-complex="12pt"/>
    </style:style>
    <style:style style:name="T2461"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46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46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46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465" style:parent-style-name="Policepardéfaut" style:family="text">
      <style:text-properties style:font-name="Times New Roman" style:font-name-asian="GPAFJ+Aptos" style:font-name-complex="Times New Roman" fo:color="#000000" fo:letter-spacing="0.0027in" fo:font-size="12pt" style:font-size-asian="12pt" style:font-size-complex="12pt"/>
    </style:style>
    <style:style style:name="T246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46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468" style:parent-style-name="Policepardéfaut" style:family="text">
      <style:text-properties style:font-name="Times New Roman" style:font-name-asian="GPAFJ+Aptos" style:font-name-complex="Times New Roman" fo:color="#000000" fo:font-size="12pt" style:font-size-asian="12pt" style:font-size-complex="12pt"/>
    </style:style>
    <style:style style:name="T246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470" style:parent-style-name="Policepardéfaut" style:family="text">
      <style:text-properties style:font-name="Times New Roman" style:font-name-asian="GPAFJ+Aptos" style:font-name-complex="Times New Roman" fo:color="#000000" fo:font-size="12pt" style:font-size-asian="12pt" style:font-size-complex="12pt"/>
    </style:style>
    <style:style style:name="T247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47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473" style:parent-style-name="Policepardéfaut" style:family="text">
      <style:text-properties style:font-name="Times New Roman" style:font-name-asian="GPAFJ+Aptos" style:font-name-complex="Times New Roman" fo:color="#000000" fo:font-size="12pt" style:font-size-asian="12pt" style:font-size-complex="12pt"/>
    </style:style>
    <style:style style:name="T247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47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476" style:parent-style-name="Policepardéfaut" style:family="text">
      <style:text-properties style:font-name="Times New Roman" style:font-name-asian="GPAFJ+Aptos" style:font-name-complex="Times New Roman" fo:color="#000000" fo:font-size="12pt" style:font-size-asian="12pt" style:font-size-complex="12pt"/>
    </style:style>
    <style:style style:name="T247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478"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47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480"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48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48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483" style:parent-style-name="Policepardéfaut" style:family="text">
      <style:text-properties style:font-name="Times New Roman" style:font-name-asian="GPAFJ+Aptos" style:font-name-complex="Times New Roman" fo:color="#000000" fo:font-size="12pt" style:font-size-asian="12pt" style:font-size-complex="12pt"/>
    </style:style>
    <style:style style:name="T248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485" style:parent-style-name="Policepardéfaut" style:family="text">
      <style:text-properties style:font-name="Times New Roman" style:font-name-asian="GPAFJ+Aptos" style:font-name-complex="Times New Roman" fo:color="#000000" fo:font-size="12pt" style:font-size-asian="12pt" style:font-size-complex="12pt"/>
    </style:style>
    <style:style style:name="T248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487" style:parent-style-name="Policepardéfaut" style:family="text">
      <style:text-properties style:font-name="Times New Roman" style:font-name-asian="GPAFJ+Aptos" style:font-name-complex="Times New Roman" fo:color="#000000" fo:font-size="12pt" style:font-size-asian="12pt" style:font-size-complex="12pt"/>
    </style:style>
    <style:style style:name="T248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48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490"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49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49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493" style:parent-style-name="Policepardéfaut" style:family="text">
      <style:text-properties style:font-name="Times New Roman" style:font-name-asian="GPAFJ+Aptos" style:font-name-complex="Times New Roman" fo:color="#000000" fo:font-size="12pt" style:font-size-asian="12pt" style:font-size-complex="12pt"/>
    </style:style>
    <style:style style:name="T249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495" style:parent-style-name="Policepardéfaut" style:family="text">
      <style:text-properties style:font-name="Times New Roman" style:font-name-asian="GPAFJ+Aptos" style:font-name-complex="Times New Roman" fo:color="#000000" fo:font-size="12pt" style:font-size-asian="12pt" style:font-size-complex="12pt"/>
    </style:style>
    <style:style style:name="T249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497" style:parent-style-name="Policepardéfaut" style:family="text">
      <style:text-properties style:font-name="Times New Roman" style:font-name-asian="GPAFJ+Aptos" style:font-name-complex="Times New Roman" fo:color="#000000" fo:font-size="12pt" style:font-size-asian="12pt" style:font-size-complex="12pt"/>
    </style:style>
    <style:style style:name="T249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499" style:parent-style-name="Policepardéfaut" style:family="text">
      <style:text-properties style:font-name="Times New Roman" style:font-name-asian="GPAFJ+Aptos" style:font-name-complex="Times New Roman" fo:color="#000000" fo:font-size="12pt" style:font-size-asian="12pt" style:font-size-complex="12pt"/>
    </style:style>
    <style:style style:name="T250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01" style:parent-style-name="Policepardéfaut" style:family="text">
      <style:text-properties style:font-name="Times New Roman" style:font-name-asian="GPAFJ+Aptos" style:font-name-complex="Times New Roman" fo:color="#000000" fo:font-size="12pt" style:font-size-asian="12pt" style:font-size-complex="12pt"/>
    </style:style>
    <style:style style:name="T250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50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04" style:parent-style-name="Policepardéfaut" style:family="text">
      <style:text-properties style:font-name="Times New Roman" style:font-name-asian="GPAFJ+Aptos" style:font-name-complex="Times New Roman" fo:color="#000000" fo:font-size="12pt" style:font-size-asian="12pt" style:font-size-complex="12pt"/>
    </style:style>
    <style:style style:name="T250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506" style:parent-style-name="Policepardéfaut" style:family="text">
      <style:text-properties style:font-name="Times New Roman" style:font-name-asian="GPAFJ+Aptos" style:font-name-complex="Times New Roman" fo:color="#000000" fo:font-size="12pt" style:font-size-asian="12pt" style:font-size-complex="12pt"/>
    </style:style>
    <style:style style:name="T250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508"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50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1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511"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512" style:parent-style-name="Policepardéfaut" style:family="text">
      <style:text-properties style:font-name="Times New Roman" style:font-name-asian="GPAFJ+Aptos" style:font-name-complex="Times New Roman" fo:color="#000000" fo:font-size="12pt" style:font-size-asian="12pt" style:font-size-complex="12pt"/>
    </style:style>
    <style:style style:name="T251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514" style:parent-style-name="Policepardéfaut" style:family="text">
      <style:text-properties style:font-name="Times New Roman" style:font-name-asian="GPAFJ+Aptos" style:font-name-complex="Times New Roman" fo:color="#000000" fo:font-size="12pt" style:font-size-asian="12pt" style:font-size-complex="12pt"/>
    </style:style>
    <style:style style:name="T251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16"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517" style:parent-style-name="Policepardéfaut" style:family="text">
      <style:text-properties style:font-name="Times New Roman" style:font-name-asian="GPAFJ+Aptos" style:font-name-complex="Times New Roman" fo:color="#000000" fo:font-size="12pt" style:font-size-asian="12pt" style:font-size-complex="12pt"/>
    </style:style>
    <style:style style:name="T251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1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520"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52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2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52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24" style:parent-style-name="Policepardéfaut" style:family="text">
      <style:text-properties style:font-name="Times New Roman" style:font-name-asian="GPAFJ+Aptos" style:font-name-complex="Times New Roman" fo:color="#000000" fo:font-size="12pt" style:font-size-asian="12pt" style:font-size-complex="12pt"/>
    </style:style>
    <style:style style:name="T252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526" style:parent-style-name="Policepardéfaut" style:family="text">
      <style:text-properties style:font-name="Times New Roman" style:font-name-asian="GPAFJ+Aptos" style:font-name-complex="Times New Roman" fo:color="#000000" fo:font-size="12pt" style:font-size-asian="12pt" style:font-size-complex="12pt"/>
    </style:style>
    <style:style style:name="T2527"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52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2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530" style:parent-style-name="Policepardéfaut" style:family="text">
      <style:text-properties style:font-name="Times New Roman" style:font-name-asian="GPAFJ+Aptos" style:font-name-complex="Times New Roman" fo:color="#000000" fo:font-size="12pt" style:font-size-asian="12pt" style:font-size-complex="12pt"/>
    </style:style>
    <style:style style:name="T253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32" style:parent-style-name="Policepardéfaut" style:family="text">
      <style:text-properties style:font-name="Times New Roman" style:font-name-asian="GPAFJ+Aptos" style:font-name-complex="Times New Roman" fo:color="#000000" fo:font-size="12pt" style:font-size-asian="12pt" style:font-size-complex="12pt"/>
    </style:style>
    <style:style style:name="T253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534"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53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53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53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38" style:parent-style-name="Policepardéfaut" style:family="text">
      <style:text-properties style:font-name="Times New Roman" style:font-name-asian="GPAFJ+Aptos" style:font-name-complex="Times New Roman" fo:color="#000000" fo:font-size="12pt" style:font-size-asian="12pt" style:font-size-complex="12pt"/>
    </style:style>
    <style:style style:name="T253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54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41" style:parent-style-name="Policepardéfaut" style:family="text">
      <style:text-properties style:font-name="Times New Roman" style:font-name-asian="GPAFJ+Aptos" style:font-name-complex="Times New Roman" fo:color="#000000" fo:font-size="12pt" style:font-size-asian="12pt" style:font-size-complex="12pt"/>
    </style:style>
    <style:style style:name="T2542"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54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44" style:parent-style-name="Policepardéfaut" style:family="text">
      <style:text-properties style:font-name="Times New Roman" style:font-name-asian="GPAFJ+Aptos" style:font-name-complex="Times New Roman" fo:color="#000000" fo:font-size="12pt" style:font-size-asian="12pt" style:font-size-complex="12pt"/>
    </style:style>
    <style:style style:name="T254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46"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547" style:parent-style-name="Policepardéfaut" style:family="text">
      <style:text-properties style:font-name="Times New Roman" style:font-name-asian="GPAFJ+Aptos" style:font-name-complex="Times New Roman" fo:color="#000000" fo:font-size="12pt" style:font-size-asian="12pt" style:font-size-complex="12pt"/>
    </style:style>
    <style:style style:name="T2548"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54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50" style:parent-style-name="Policepardéfaut" style:family="text">
      <style:text-properties style:font-name="Times New Roman" style:font-name-asian="GPAFJ+Aptos" style:font-name-complex="Times New Roman" fo:color="#000000" fo:font-size="12pt" style:font-size-asian="12pt" style:font-size-complex="12pt"/>
    </style:style>
    <style:style style:name="T255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5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553" style:parent-style-name="Policepardéfaut" style:family="text">
      <style:text-properties style:font-name="Times New Roman" style:font-name-asian="GPAFJ+Aptos" style:font-name-complex="Times New Roman" fo:color="#000000" fo:letter-spacing="-0.002in" fo:font-size="12pt" style:font-size-asian="12pt" style:font-size-complex="12pt"/>
    </style:style>
    <style:style style:name="T255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55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5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55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58"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55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6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56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62" style:parent-style-name="Policepardéfaut" style:family="text">
      <style:text-properties style:font-name="Times New Roman" style:font-name-asian="GPAFJ+Aptos" style:font-name-complex="Times New Roman" fo:color="#000000" fo:font-size="12pt" style:font-size-asian="12pt" style:font-size-complex="12pt"/>
    </style:style>
    <style:style style:name="T2563"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56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65" style:parent-style-name="Policepardéfaut" style:family="text">
      <style:text-properties style:font-name="Times New Roman" style:font-name-asian="GPAFJ+Aptos" style:font-name-complex="Times New Roman" fo:color="#000000" fo:letter-spacing="-0.002in" fo:font-size="12pt" style:font-size-asian="12pt" style:font-size-complex="12pt"/>
    </style:style>
    <style:style style:name="T2566" style:parent-style-name="Policepardéfaut" style:family="text">
      <style:text-properties style:font-name="Times New Roman" style:font-name-asian="GPAFJ+Aptos" style:font-name-complex="Times New Roman" fo:color="#000000" fo:font-size="12pt" style:font-size-asian="12pt" style:font-size-complex="12pt"/>
    </style:style>
    <style:style style:name="T2567"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56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69" style:parent-style-name="Policepardéfaut" style:family="text">
      <style:text-properties style:font-name="Times New Roman" style:font-name-asian="GPAFJ+Aptos" style:font-name-complex="Times New Roman" fo:color="#000000" fo:font-size="12pt" style:font-size-asian="12pt" style:font-size-complex="12pt"/>
    </style:style>
    <style:style style:name="T2570"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571" style:parent-style-name="Policepardéfaut" style:family="text">
      <style:text-properties style:font-name="Times New Roman" style:font-name-asian="GPAFJ+Aptos" style:font-name-complex="Times New Roman" fo:color="#000000" fo:font-size="12pt" style:font-size-asian="12pt" style:font-size-complex="12pt"/>
    </style:style>
    <style:style style:name="T257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57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74" style:parent-style-name="Policepardéfaut" style:family="text">
      <style:text-properties style:font-name="Times New Roman" style:font-name-asian="GPAFJ+Aptos" style:font-name-complex="Times New Roman" fo:color="#000000" fo:font-size="12pt" style:font-size-asian="12pt" style:font-size-complex="12pt"/>
    </style:style>
    <style:style style:name="T257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76" style:parent-style-name="Policepardéfaut" style:family="text">
      <style:text-properties style:font-name="Times New Roman" style:font-name-asian="GPAFJ+Aptos" style:font-name-complex="Times New Roman" fo:color="#000000" fo:font-size="12pt" style:font-size-asian="12pt" style:font-size-complex="12pt"/>
    </style:style>
    <style:style style:name="T257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P2578" style:parent-style-name="Normal" style:family="paragraph">
      <style:paragraph-properties fo:text-align="justify" fo:margin-bottom="0.0006in" fo:line-height="0.1111in"/>
      <style:text-properties style:font-name="Times New Roman" style:font-name-complex="Times New Roman" fo:font-size="12pt" style:font-size-asian="12pt" style:font-size-complex="12pt"/>
    </style:style>
    <style:style style:name="P2579" style:parent-style-name="Normal" style:family="paragraph">
      <style:paragraph-properties fo:widows="0" fo:orphans="0" fo:text-align="justify" fo:line-height="107%" fo:margin-right="0.5854in"/>
    </style:style>
    <style:style style:name="T2580" style:parent-style-name="Policepardéfaut" style:family="text">
      <style:text-properties style:font-name="Times New Roman" style:font-name-asian="GPAFJ+Aptos" style:font-name-complex="Times New Roman" fo:color="#000000" fo:font-size="12pt" style:font-size-asian="12pt" style:font-size-complex="12pt"/>
    </style:style>
    <style:style style:name="T2581" style:parent-style-name="Policepardéfaut" style:family="text">
      <style:text-properties style:font-name="Times New Roman" style:font-name-asian="GPAFJ+Aptos" style:font-name-complex="Times New Roman" fo:color="#000000" fo:font-size="12pt" style:font-size-asian="12pt" style:font-size-complex="12pt"/>
    </style:style>
    <style:style style:name="T258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83" style:parent-style-name="Policepardéfaut" style:family="text">
      <style:text-properties style:font-name="Times New Roman" style:font-name-asian="GPAFJ+Aptos" style:font-name-complex="Times New Roman" fo:color="#000000" fo:font-size="12pt" style:font-size-asian="12pt" style:font-size-complex="12pt"/>
    </style:style>
    <style:style style:name="T258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8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58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58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88"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58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90" style:parent-style-name="Policepardéfaut" style:family="text">
      <style:text-properties style:font-name="Times New Roman" style:font-name-asian="GPAFJ+Aptos" style:font-name-complex="Times New Roman" fo:color="#000000" fo:font-size="12pt" style:font-size-asian="12pt" style:font-size-complex="12pt"/>
    </style:style>
    <style:style style:name="T2591"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592" style:parent-style-name="Policepardéfaut" style:family="text">
      <style:text-properties style:font-name="Times New Roman" style:font-name-asian="GPAFJ+Aptos" style:font-name-complex="Times New Roman" fo:color="#000000" fo:font-size="12pt" style:font-size-asian="12pt" style:font-size-complex="12pt"/>
    </style:style>
    <style:style style:name="T2593"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594" style:parent-style-name="Policepardéfaut" style:family="text">
      <style:text-properties style:font-name="Times New Roman" style:font-name-asian="GPAFJ+Aptos" style:font-name-complex="Times New Roman" fo:color="#000000" fo:font-size="12pt" style:font-size-asian="12pt" style:font-size-complex="12pt"/>
    </style:style>
    <style:style style:name="T259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596" style:parent-style-name="Policepardéfaut" style:family="text">
      <style:text-properties style:font-name="Times New Roman" style:font-name-asian="GPAFJ+Aptos" style:font-name-complex="Times New Roman" fo:color="#000000" fo:font-size="12pt" style:font-size-asian="12pt" style:font-size-complex="12pt"/>
    </style:style>
    <style:style style:name="T259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59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59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0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60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02"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603" style:parent-style-name="Policepardéfaut" style:family="text">
      <style:text-properties style:font-name="Times New Roman" style:font-name-asian="GPAFJ+Aptos" style:font-name-complex="Times New Roman" fo:color="#000000" fo:font-size="12pt" style:font-size-asian="12pt" style:font-size-complex="12pt"/>
    </style:style>
    <style:style style:name="T260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05"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60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0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608"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60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61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1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61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61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1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61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16" style:parent-style-name="Policepardéfaut" style:family="text">
      <style:text-properties style:font-name="Times New Roman" style:font-name-asian="GPAFJ+Aptos" style:font-name-complex="Times New Roman" fo:color="#000000" fo:font-size="12pt" style:font-size-asian="12pt" style:font-size-complex="12pt"/>
    </style:style>
    <style:style style:name="T261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18"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619" style:parent-style-name="Policepardéfaut" style:family="text">
      <style:text-properties style:font-name="Times New Roman" style:font-name-asian="GPAFJ+Aptos" style:font-name-complex="Times New Roman" fo:color="#000000" fo:font-size="12pt" style:font-size-asian="12pt" style:font-size-complex="12pt"/>
    </style:style>
    <style:style style:name="T262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21" style:parent-style-name="Policepardéfaut" style:family="text">
      <style:text-properties style:font-name="Times New Roman" style:font-name-asian="GPAFJ+Aptos" style:font-name-complex="Times New Roman" fo:color="#000000" fo:font-size="12pt" style:font-size-asian="12pt" style:font-size-complex="12pt"/>
    </style:style>
    <style:style style:name="T262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62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2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62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26" style:parent-style-name="Policepardéfaut" style:family="text">
      <style:text-properties style:font-name="Times New Roman" style:font-name-asian="GPAFJ+Aptos" style:font-name-complex="Times New Roman" fo:color="#000000" fo:font-size="12pt" style:font-size-asian="12pt" style:font-size-complex="12pt"/>
    </style:style>
    <style:style style:name="T2627"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628" style:parent-style-name="Policepardéfaut" style:family="text">
      <style:text-properties style:font-name="Times New Roman" style:font-name-asian="GPAFJ+Aptos" style:font-name-complex="Times New Roman" fo:color="#000000" fo:font-size="12pt" style:font-size-asian="12pt" style:font-size-complex="12pt"/>
    </style:style>
    <style:style style:name="T262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630" style:parent-style-name="Policepardéfaut" style:family="text">
      <style:text-properties style:font-name="Times New Roman" style:font-name-asian="GPAFJ+Aptos" style:font-name-complex="Times New Roman" fo:color="#000000" fo:font-size="12pt" style:font-size-asian="12pt" style:font-size-complex="12pt"/>
    </style:style>
    <style:style style:name="T263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63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3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634" style:parent-style-name="Policepardéfaut" style:family="text">
      <style:text-properties style:font-name="Times New Roman" style:font-name-asian="GPAFJ+Aptos" style:font-name-complex="Times New Roman" fo:color="#000000" fo:font-size="12pt" style:font-size-asian="12pt" style:font-size-complex="12pt"/>
    </style:style>
    <style:style style:name="T263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63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3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638"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63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40" style:parent-style-name="Policepardéfaut" style:family="text">
      <style:text-properties style:font-name="Times New Roman" style:font-name-asian="GPAFJ+Aptos" style:font-name-complex="Times New Roman" fo:color="#000000" fo:font-size="12pt" style:font-size-asian="12pt" style:font-size-complex="12pt"/>
    </style:style>
    <style:style style:name="T2641"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64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43" style:parent-style-name="Policepardéfaut" style:family="text">
      <style:text-properties style:font-name="Times New Roman" style:font-name-asian="GPAFJ+Aptos" style:font-name-complex="Times New Roman" fo:color="#000000" fo:font-size="12pt" style:font-size-asian="12pt" style:font-size-complex="12pt"/>
    </style:style>
    <style:style style:name="T264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64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64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4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648"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64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650" style:parent-style-name="Policepardéfaut" style:family="text">
      <style:text-properties style:font-name="Times New Roman" style:font-name-asian="GPAFJ+Aptos" style:font-name-complex="Times New Roman" fo:color="#000000" fo:font-size="12pt" style:font-size-asian="12pt" style:font-size-complex="12pt"/>
    </style:style>
    <style:style style:name="T265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52" style:parent-style-name="Policepardéfaut" style:family="text">
      <style:text-properties style:font-name="Times New Roman" style:font-name-asian="GPAFJ+Aptos" style:font-name-complex="Times New Roman" fo:color="#000000" fo:font-size="12pt" style:font-size-asian="12pt" style:font-size-complex="12pt"/>
    </style:style>
    <style:style style:name="T265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54" style:parent-style-name="Policepardéfaut" style:family="text">
      <style:text-properties style:font-name="Times New Roman" style:font-name-asian="GPAFJ+Aptos" style:font-name-complex="Times New Roman" fo:color="#000000" fo:font-size="12pt" style:font-size-asian="12pt" style:font-size-complex="12pt"/>
    </style:style>
    <style:style style:name="T2655"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656" style:parent-style-name="Policepardéfaut" style:family="text">
      <style:text-properties style:font-name="Times New Roman" style:font-name-asian="GPAFJ+Aptos" style:font-name-complex="Times New Roman" fo:color="#000000" fo:font-size="12pt" style:font-size-asian="12pt" style:font-size-complex="12pt"/>
    </style:style>
    <style:style style:name="T265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658" style:parent-style-name="Policepardéfaut" style:family="text">
      <style:text-properties style:font-name="Times New Roman" style:font-name-asian="GPAFJ+Aptos" style:font-name-complex="Times New Roman" fo:color="#000000" fo:font-size="12pt" style:font-size-asian="12pt" style:font-size-complex="12pt"/>
    </style:style>
    <style:style style:name="T265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660" style:parent-style-name="Policepardéfaut" style:family="text">
      <style:text-properties style:font-name="Times New Roman" style:font-name-asian="GPAFJ+Aptos" style:font-name-complex="Times New Roman" fo:color="#000000" fo:font-size="12pt" style:font-size-asian="12pt" style:font-size-complex="12pt"/>
    </style:style>
    <style:style style:name="T266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6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663" style:parent-style-name="Policepardéfaut" style:family="text">
      <style:text-properties style:font-name="Times New Roman" style:font-name-asian="GPAFJ+Aptos" style:font-name-complex="Times New Roman" fo:color="#000000" fo:font-size="12pt" style:font-size-asian="12pt" style:font-size-complex="12pt"/>
    </style:style>
    <style:style style:name="T266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65"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66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6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668"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66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70"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671" style:parent-style-name="Policepardéfaut" style:family="text">
      <style:text-properties style:font-name="Times New Roman" style:font-name-asian="GPAFJ+Aptos" style:font-name-complex="Times New Roman" fo:color="#000000" fo:font-size="12pt" style:font-size-asian="12pt" style:font-size-complex="12pt"/>
    </style:style>
    <style:style style:name="T267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7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67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7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676" style:parent-style-name="Policepardéfaut" style:family="text">
      <style:text-properties style:font-name="Times New Roman" style:font-name-asian="GPAFJ+Aptos" style:font-name-complex="Times New Roman" fo:color="#000000" fo:font-size="12pt" style:font-size-asian="12pt" style:font-size-complex="12pt"/>
    </style:style>
    <style:style style:name="T267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78"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679" style:parent-style-name="Policepardéfaut" style:family="text">
      <style:text-properties style:font-name="Times New Roman" style:font-name-asian="GPAFJ+Aptos" style:font-name-complex="Times New Roman" fo:color="#000000" fo:font-size="12pt" style:font-size-asian="12pt" style:font-size-complex="12pt"/>
    </style:style>
    <style:style style:name="T2680"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681" style:parent-style-name="Policepardéfaut" style:family="text">
      <style:text-properties style:font-name="Times New Roman" style:font-name-asian="GPAFJ+Aptos" style:font-name-complex="Times New Roman" fo:color="#000000" fo:font-size="12pt" style:font-size-asian="12pt" style:font-size-complex="12pt"/>
    </style:style>
    <style:style style:name="T268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83" style:parent-style-name="Policepardéfaut" style:family="text">
      <style:text-properties style:font-name="Times New Roman" style:font-name-asian="GPAFJ+Aptos" style:font-name-complex="Times New Roman" fo:color="#000000" fo:font-size="12pt" style:font-size-asian="12pt" style:font-size-complex="12pt"/>
    </style:style>
    <style:style style:name="T268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85"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686" style:parent-style-name="Policepardéfaut" style:family="text">
      <style:text-properties style:font-name="Times New Roman" style:font-name-asian="GPAFJ+Aptos" style:font-name-complex="Times New Roman" fo:color="#000000" fo:font-size="12pt" style:font-size-asian="12pt" style:font-size-complex="12pt"/>
    </style:style>
    <style:style style:name="T268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688"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68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69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9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692" style:parent-style-name="Policepardéfaut" style:family="text">
      <style:text-properties style:font-name="Times New Roman" style:font-name-asian="GPAFJ+Aptos" style:font-name-complex="Times New Roman" fo:color="#000000" fo:font-size="12pt" style:font-size-asian="12pt" style:font-size-complex="12pt"/>
    </style:style>
    <style:style style:name="T269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9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69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9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69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69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69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00"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70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02" style:parent-style-name="Policepardéfaut" style:family="text">
      <style:text-properties style:font-name="Times New Roman" style:font-name-asian="GPAFJ+Aptos" style:font-name-complex="Times New Roman" fo:color="#000000" fo:font-size="12pt" style:font-size-asian="12pt" style:font-size-complex="12pt"/>
    </style:style>
    <style:style style:name="T270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P2704" style:parent-style-name="Normal" style:family="paragraph">
      <style:paragraph-properties fo:text-align="justify" fo:margin-bottom="0.0027in" fo:line-height="0.1111in"/>
      <style:text-properties style:font-name="Times New Roman" style:font-name-complex="Times New Roman" fo:font-size="12pt" style:font-size-asian="12pt" style:font-size-complex="12pt"/>
    </style:style>
    <style:style style:name="P2705" style:parent-style-name="Normal" style:family="paragraph">
      <style:paragraph-properties fo:widows="0" fo:orphans="0" fo:text-align="justify" fo:line-height="107%" fo:margin-right="0.7423in"/>
    </style:style>
    <style:style style:name="T2706" style:parent-style-name="Policepardéfaut" style:family="text">
      <style:text-properties style:font-name="Times New Roman" style:font-name-asian="GPAFJ+Aptos" style:font-name-complex="Times New Roman" fo:color="#000000" fo:font-size="12pt" style:font-size-asian="12pt" style:font-size-complex="12pt"/>
    </style:style>
    <style:style style:name="T2707" style:parent-style-name="Policepardéfaut" style:family="text">
      <style:text-properties style:font-name="Times New Roman" style:font-name-asian="GPAFJ+Aptos" style:font-name-complex="Times New Roman" fo:color="#000000" fo:font-size="12pt" style:font-size-asian="12pt" style:font-size-complex="12pt"/>
    </style:style>
    <style:style style:name="T270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0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710" style:parent-style-name="Policepardéfaut" style:family="text">
      <style:text-properties style:font-name="Times New Roman" style:font-name-asian="GPAFJ+Aptos" style:font-name-complex="Times New Roman" fo:color="#000000" fo:font-size="12pt" style:font-size-asian="12pt" style:font-size-complex="12pt"/>
    </style:style>
    <style:style style:name="T271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12"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71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1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71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716" style:parent-style-name="Policepardéfaut" style:family="text">
      <style:text-properties style:font-name="Times New Roman" style:font-name-asian="GPAFJ+Aptos" style:font-name-complex="Times New Roman" fo:color="#000000" fo:font-size="12pt" style:font-size-asian="12pt" style:font-size-complex="12pt"/>
    </style:style>
    <style:style style:name="T271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71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1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720" style:parent-style-name="Policepardéfaut" style:family="text">
      <style:text-properties style:font-name="Times New Roman" style:font-name-asian="GPAFJ+Aptos" style:font-name-complex="Times New Roman" fo:color="#000000" fo:font-size="12pt" style:font-size-asian="12pt" style:font-size-complex="12pt"/>
    </style:style>
    <style:style style:name="T272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722" style:parent-style-name="Policepardéfaut" style:family="text">
      <style:text-properties style:font-name="Times New Roman" style:font-name-asian="GPAFJ+Aptos" style:font-name-complex="Times New Roman" fo:color="#000000" fo:font-size="12pt" style:font-size-asian="12pt" style:font-size-complex="12pt"/>
    </style:style>
    <style:style style:name="T272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24"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72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2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72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28" style:parent-style-name="Policepardéfaut" style:family="text">
      <style:text-properties style:font-name="Times New Roman" style:font-name-asian="GPAFJ+Aptos" style:font-name-complex="Times New Roman" fo:color="#000000" fo:letter-spacing="0.002in" fo:font-size="12pt" style:font-size-asian="12pt" style:font-size-complex="12pt"/>
    </style:style>
    <style:style style:name="T2729"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730"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73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3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733" style:parent-style-name="Policepardéfaut" style:family="text">
      <style:text-properties style:font-name="Times New Roman" style:font-name-asian="GPAFJ+Aptos" style:font-name-complex="Times New Roman" fo:color="#000000" fo:font-size="12pt" style:font-size-asian="12pt" style:font-size-complex="12pt"/>
    </style:style>
    <style:style style:name="T273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3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736" style:parent-style-name="Policepardéfaut" style:family="text">
      <style:text-properties style:font-name="Times New Roman" style:font-name-asian="GPAFJ+Aptos" style:font-name-complex="Times New Roman" fo:color="#000000" fo:font-size="12pt" style:font-size-asian="12pt" style:font-size-complex="12pt"/>
    </style:style>
    <style:style style:name="T2737"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73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3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740" style:parent-style-name="Policepardéfaut" style:family="text">
      <style:text-properties style:font-name="Times New Roman" style:font-name-asian="GPAFJ+Aptos" style:font-name-complex="Times New Roman" fo:color="#000000" fo:font-size="12pt" style:font-size-asian="12pt" style:font-size-complex="12pt"/>
    </style:style>
    <style:style style:name="T274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4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74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44" style:parent-style-name="Policepardéfaut" style:family="text">
      <style:text-properties style:font-name="Times New Roman" style:font-name-asian="GPAFJ+Aptos" style:font-name-complex="Times New Roman" fo:color="#000000" fo:font-size="12pt" style:font-size-asian="12pt" style:font-size-complex="12pt"/>
    </style:style>
    <style:style style:name="T2745"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74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4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748"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749" style:parent-style-name="Policepardéfaut" style:family="text">
      <style:text-properties style:font-name="Times New Roman" style:font-name-asian="GPAFJ+Aptos" style:font-name-complex="Times New Roman" fo:color="#000000" fo:font-size="12pt" style:font-size-asian="12pt" style:font-size-complex="12pt"/>
    </style:style>
    <style:style style:name="T2750"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75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752"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753" style:parent-style-name="Policepardéfaut" style:family="text">
      <style:text-properties style:font-name="Times New Roman" style:font-name-asian="GPAFJ+Aptos" style:font-name-complex="Times New Roman" fo:color="#000000" fo:font-size="12pt" style:font-size-asian="12pt" style:font-size-complex="12pt"/>
    </style:style>
    <style:style style:name="T275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5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75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57" style:parent-style-name="Policepardéfaut" style:family="text">
      <style:text-properties style:font-name="Times New Roman" style:font-name-asian="GPAFJ+Aptos" style:font-name-complex="Times New Roman" fo:color="#000000" fo:font-size="12pt" style:font-size-asian="12pt" style:font-size-complex="12pt"/>
    </style:style>
    <style:style style:name="T2758"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75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6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761"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76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6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76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6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76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67"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768"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769" style:parent-style-name="Policepardéfaut" style:family="text">
      <style:text-properties style:font-name="Times New Roman" style:font-name-asian="GPAFJ+Aptos" style:font-name-complex="Times New Roman" fo:color="#000000" fo:font-size="12pt" style:font-size-asian="12pt" style:font-size-complex="12pt"/>
    </style:style>
    <style:style style:name="T277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71" style:parent-style-name="Policepardéfaut" style:family="text">
      <style:text-properties style:font-name="Times New Roman" style:font-name-asian="GPAFJ+Aptos" style:font-name-complex="Times New Roman" fo:color="#000000" fo:font-size="12pt" style:font-size-asian="12pt" style:font-size-complex="12pt"/>
    </style:style>
    <style:style style:name="T277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77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74" style:parent-style-name="Policepardéfaut" style:family="text">
      <style:text-properties style:font-name="Times New Roman" style:font-name-asian="GPAFJ+Aptos" style:font-name-complex="Times New Roman" fo:color="#000000" fo:font-size="12pt" style:font-size-asian="12pt" style:font-size-complex="12pt"/>
    </style:style>
    <style:style style:name="T277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76" style:parent-style-name="Policepardéfaut" style:family="text">
      <style:text-properties style:font-name="Times New Roman" style:font-name-asian="GPAFJ+Aptos" style:font-name-complex="Times New Roman" fo:color="#000000" fo:font-size="12pt" style:font-size-asian="12pt" style:font-size-complex="12pt"/>
    </style:style>
    <style:style style:name="T2777"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77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7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78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81"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782" style:parent-style-name="Policepardéfaut" style:family="text">
      <style:text-properties style:font-name="Times New Roman" style:font-name-asian="GPAFJ+Aptos" style:font-name-complex="Times New Roman" fo:color="#000000" fo:font-size="12pt" style:font-size-asian="12pt" style:font-size-complex="12pt"/>
    </style:style>
    <style:style style:name="T278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84" style:parent-style-name="Policepardéfaut" style:family="text">
      <style:text-properties style:font-name="Times New Roman" style:font-name-asian="GPAFJ+Aptos" style:font-name-complex="Times New Roman" fo:color="#000000" fo:font-size="12pt" style:font-size-asian="12pt" style:font-size-complex="12pt"/>
    </style:style>
    <style:style style:name="T278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78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8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788"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789" style:parent-style-name="Policepardéfaut" style:family="text">
      <style:text-properties style:font-name="Times New Roman" style:font-name-asian="GPAFJ+Aptos" style:font-name-complex="Times New Roman" fo:color="#000000" fo:font-size="12pt" style:font-size-asian="12pt" style:font-size-complex="12pt"/>
    </style:style>
    <style:style style:name="T279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79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9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793" style:parent-style-name="Policepardéfaut" style:family="text">
      <style:text-properties style:font-name="Times New Roman" style:font-name-asian="GPAFJ+Aptos" style:font-name-complex="Times New Roman" fo:color="#000000" fo:font-size="12pt" style:font-size-asian="12pt" style:font-size-complex="12pt"/>
    </style:style>
    <style:style style:name="T279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795"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796" style:parent-style-name="Policepardéfaut" style:family="text">
      <style:text-properties style:font-name="Times New Roman" style:font-name-asian="GPAFJ+Aptos" style:font-name-complex="Times New Roman" fo:color="#000000" fo:font-size="12pt" style:font-size-asian="12pt" style:font-size-complex="12pt"/>
    </style:style>
    <style:style style:name="T279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P2798" style:parent-style-name="Normal" style:family="paragraph">
      <style:paragraph-properties fo:text-align="justify" fo:margin-bottom="0.002in" fo:line-height="0.1111in"/>
      <style:text-properties style:font-name="Times New Roman" style:font-name-complex="Times New Roman" fo:font-size="12pt" style:font-size-asian="12pt" style:font-size-complex="12pt"/>
    </style:style>
    <style:style style:name="P2799" style:parent-style-name="Normal" style:family="paragraph">
      <style:paragraph-properties fo:widows="0" fo:orphans="0" fo:text-align="justify" fo:margin-right="0.5986in"/>
    </style:style>
    <style:style style:name="T2800" style:parent-style-name="Policepardéfaut" style:family="text">
      <style:text-properties style:font-name="Times New Roman" style:font-name-asian="GPAFJ+Aptos" style:font-name-complex="Times New Roman" fo:color="#000000" fo:font-size="12pt" style:font-size-asian="12pt" style:font-size-complex="12pt"/>
    </style:style>
    <style:style style:name="T2801" style:parent-style-name="Policepardéfaut" style:family="text">
      <style:text-properties style:font-name="Times New Roman" style:font-name-asian="GPAFJ+Aptos" style:font-name-complex="Times New Roman" fo:color="#000000" fo:font-size="12pt" style:font-size-asian="12pt" style:font-size-complex="12pt"/>
    </style:style>
    <style:style style:name="T280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03"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804" style:parent-style-name="Policepardéfaut" style:family="text">
      <style:text-properties style:font-name="Times New Roman" style:font-name-asian="GPAFJ+Aptos" style:font-name-complex="Times New Roman" fo:color="#000000" fo:font-size="12pt" style:font-size-asian="12pt" style:font-size-complex="12pt"/>
    </style:style>
    <style:style style:name="T280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806" style:parent-style-name="Policepardéfaut" style:family="text">
      <style:text-properties style:font-name="Times New Roman" style:font-name-asian="GPAFJ+Aptos" style:font-name-complex="Times New Roman" fo:color="#000000" fo:font-size="12pt" style:font-size-asian="12pt" style:font-size-complex="12pt"/>
    </style:style>
    <style:style style:name="T280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08" style:parent-style-name="Policepardéfaut" style:family="text">
      <style:text-properties style:font-name="Times New Roman" style:font-name-asian="GPAFJ+Aptos" style:font-name-complex="Times New Roman" fo:color="#000000" fo:font-size="12pt" style:font-size-asian="12pt" style:font-size-complex="12pt"/>
    </style:style>
    <style:style style:name="T280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810" style:parent-style-name="Policepardéfaut" style:family="text">
      <style:text-properties style:font-name="Times New Roman" style:font-name-asian="GPAFJ+Aptos" style:font-name-complex="Times New Roman" fo:color="#000000" fo:letter-spacing="-0.002in" style:text-scale="101%" fo:font-size="12pt" style:font-size-asian="12pt" style:font-size-complex="12pt"/>
    </style:style>
    <style:style style:name="T2811" style:parent-style-name="Policepardéfaut" style:family="text">
      <style:text-properties style:font-name="Times New Roman" style:font-name-asian="GPAFJ+Aptos" style:font-name-complex="Times New Roman" fo:color="#000000" fo:font-size="12pt" style:font-size-asian="12pt" style:font-size-complex="12pt"/>
    </style:style>
    <style:style style:name="T281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1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81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15" style:parent-style-name="Policepardéfaut" style:family="text">
      <style:text-properties style:font-name="Times New Roman" style:font-name-asian="GPAFJ+Aptos" style:font-name-complex="Times New Roman" fo:color="#000000" fo:font-size="12pt" style:font-size-asian="12pt" style:font-size-complex="12pt"/>
    </style:style>
    <style:style style:name="T281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81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18"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819" style:parent-style-name="Policepardéfaut" style:family="text">
      <style:text-properties style:font-name="Times New Roman" style:font-name-asian="GPAFJ+Aptos" style:font-name-complex="Times New Roman" fo:color="#000000" fo:font-size="12pt" style:font-size-asian="12pt" style:font-size-complex="12pt"/>
    </style:style>
    <style:style style:name="T282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21" style:parent-style-name="Policepardéfaut" style:family="text">
      <style:text-properties style:font-name="Times New Roman" style:font-name-asian="GPAFJ+Aptos" style:font-name-complex="Times New Roman" fo:color="#000000" fo:font-size="12pt" style:font-size-asian="12pt" style:font-size-complex="12pt"/>
    </style:style>
    <style:style style:name="T282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23" style:parent-style-name="Policepardéfaut" style:family="text">
      <style:text-properties style:font-name="Times New Roman" style:font-name-asian="GPAFJ+Aptos" style:font-name-complex="Times New Roman" fo:color="#000000" fo:font-size="12pt" style:font-size-asian="12pt" style:font-size-complex="12pt"/>
    </style:style>
    <style:style style:name="T282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2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826" style:parent-style-name="Policepardéfaut" style:family="text">
      <style:text-properties style:font-name="Times New Roman" style:font-name-asian="GPAFJ+Aptos" style:font-name-complex="Times New Roman" fo:color="#000000" fo:font-size="12pt" style:font-size-asian="12pt" style:font-size-complex="12pt"/>
    </style:style>
    <style:style style:name="T282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28" style:parent-style-name="Policepardéfaut" style:family="text">
      <style:text-properties style:font-name="Times New Roman" style:font-name-asian="GPAFJ+Aptos" style:font-name-complex="Times New Roman" fo:color="#000000" fo:font-size="12pt" style:font-size-asian="12pt" style:font-size-complex="12pt"/>
    </style:style>
    <style:style style:name="T282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83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831" style:parent-style-name="Policepardéfaut" style:family="text">
      <style:text-properties style:font-name="Times New Roman" style:font-name-asian="GPAFJ+Aptos" style:font-name-complex="Times New Roman" fo:color="#000000" fo:font-size="12pt" style:font-size-asian="12pt" style:font-size-complex="12pt"/>
    </style:style>
    <style:style style:name="T283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33"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83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835" style:parent-style-name="Policepardéfaut" style:family="text">
      <style:text-properties style:font-name="Times New Roman" style:font-name-asian="GPAFJ+Aptos" style:font-name-complex="Times New Roman" fo:color="#000000" fo:font-size="12pt" style:font-size-asian="12pt" style:font-size-complex="12pt"/>
    </style:style>
    <style:style style:name="T2836"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837" style:parent-style-name="Policepardéfaut" style:family="text">
      <style:text-properties style:font-name="Times New Roman" style:font-name-asian="GPAFJ+Aptos" style:font-name-complex="Times New Roman" fo:color="#000000" fo:font-size="12pt" style:font-size-asian="12pt" style:font-size-complex="12pt"/>
    </style:style>
    <style:style style:name="T283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39"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840" style:parent-style-name="Policepardéfaut" style:family="text">
      <style:text-properties style:font-name="Times New Roman" style:font-name-asian="GPAFJ+Aptos" style:font-name-complex="Times New Roman" fo:color="#000000" fo:font-size="12pt" style:font-size-asian="12pt" style:font-size-complex="12pt"/>
    </style:style>
    <style:style style:name="T2841"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84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43"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84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4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846" style:parent-style-name="Policepardéfaut" style:family="text">
      <style:text-properties style:font-name="Times New Roman" style:font-name-asian="GPAFJ+Aptos" style:font-name-complex="Times New Roman" fo:color="#000000" fo:font-size="12pt" style:font-size-asian="12pt" style:font-size-complex="12pt"/>
    </style:style>
    <style:style style:name="T284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48" style:parent-style-name="Policepardéfaut" style:family="text">
      <style:text-properties style:font-name="Times New Roman" style:font-name-asian="GPAFJ+Aptos" style:font-name-complex="Times New Roman" fo:color="#000000" fo:font-size="12pt" style:font-size-asian="12pt" style:font-size-complex="12pt"/>
    </style:style>
    <style:style style:name="T284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850" style:parent-style-name="Policepardéfaut" style:family="text">
      <style:text-properties style:font-name="Times New Roman" style:font-name-asian="GPAFJ+Aptos" style:font-name-complex="Times New Roman" fo:color="#000000" fo:letter-spacing="-0.002in" style:text-scale="101%" fo:font-size="12pt" style:font-size-asian="12pt" style:font-size-complex="12pt"/>
    </style:style>
    <style:style style:name="T2851" style:parent-style-name="Policepardéfaut" style:family="text">
      <style:text-properties style:font-name="Times New Roman" style:font-name-asian="GPAFJ+Aptos" style:font-name-complex="Times New Roman" fo:color="#000000" fo:font-size="12pt" style:font-size-asian="12pt" style:font-size-complex="12pt"/>
    </style:style>
    <style:style style:name="T285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5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85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55" style:parent-style-name="Policepardéfaut" style:family="text">
      <style:text-properties style:font-name="Times New Roman" style:font-name-asian="GPAFJ+Aptos" style:font-name-complex="Times New Roman" fo:color="#000000" fo:font-size="12pt" style:font-size-asian="12pt" style:font-size-complex="12pt"/>
    </style:style>
    <style:style style:name="T285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85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58"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859" style:parent-style-name="Policepardéfaut" style:family="text">
      <style:text-properties style:font-name="Times New Roman" style:font-name-asian="GPAFJ+Aptos" style:font-name-complex="Times New Roman" fo:color="#000000" fo:font-size="12pt" style:font-size-asian="12pt" style:font-size-complex="12pt"/>
    </style:style>
    <style:style style:name="T286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61" style:parent-style-name="Policepardéfaut" style:family="text">
      <style:text-properties style:font-name="Times New Roman" style:font-name-asian="GPAFJ+Aptos" style:font-name-complex="Times New Roman" fo:color="#000000" fo:font-size="12pt" style:font-size-asian="12pt" style:font-size-complex="12pt"/>
    </style:style>
    <style:style style:name="T2862"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86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6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865"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866" style:parent-style-name="Policepardéfaut" style:family="text">
      <style:text-properties style:font-name="Times New Roman" style:font-name-asian="GPAFJ+Aptos" style:font-name-complex="Times New Roman" fo:color="#000000" fo:font-size="12pt" style:font-size-asian="12pt" style:font-size-complex="12pt"/>
    </style:style>
    <style:style style:name="T286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6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86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87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871"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87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73" style:parent-style-name="Policepardéfaut" style:family="text">
      <style:text-properties style:font-name="Times New Roman" style:font-name-asian="GPAFJ+Aptos" style:font-name-complex="Times New Roman" fo:color="#000000" fo:font-size="12pt" style:font-size-asian="12pt" style:font-size-complex="12pt"/>
    </style:style>
    <style:style style:name="T287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75" style:parent-style-name="Policepardéfaut" style:family="text">
      <style:text-properties style:font-name="Times New Roman" style:font-name-asian="GPAFJ+Aptos" style:font-name-complex="Times New Roman" fo:color="#000000" fo:font-size="12pt" style:font-size-asian="12pt" style:font-size-complex="12pt"/>
    </style:style>
    <style:style style:name="T287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87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7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87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80"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88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88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8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884" style:parent-style-name="Policepardéfaut" style:family="text">
      <style:text-properties style:font-name="Times New Roman" style:font-name-asian="GPAFJ+Aptos" style:font-name-complex="Times New Roman" fo:color="#000000" fo:font-size="12pt" style:font-size-asian="12pt" style:font-size-complex="12pt"/>
    </style:style>
    <style:style style:name="T2885"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88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87" style:parent-style-name="Policepardéfaut" style:family="text">
      <style:text-properties style:font-name="Times New Roman" style:font-name-asian="GPAFJ+Aptos" style:font-name-complex="Times New Roman" fo:color="#000000" fo:font-size="12pt" style:font-size-asian="12pt" style:font-size-complex="12pt"/>
    </style:style>
    <style:style style:name="T2888"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889" style:parent-style-name="Policepardéfaut" style:family="text">
      <style:text-properties style:font-name="Times New Roman" style:font-name-asian="GPAFJ+Aptos" style:font-name-complex="Times New Roman" fo:color="#000000" fo:font-size="12pt" style:font-size-asian="12pt" style:font-size-complex="12pt"/>
    </style:style>
    <style:style style:name="T289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891" style:parent-style-name="Policepardéfaut" style:family="text">
      <style:text-properties style:font-name="Times New Roman" style:font-name-asian="GPAFJ+Aptos" style:font-name-complex="Times New Roman" fo:color="#000000" fo:font-size="12pt" style:font-size-asian="12pt" style:font-size-complex="12pt"/>
    </style:style>
    <style:style style:name="T289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893" style:parent-style-name="Policepardéfaut" style:family="text">
      <style:text-properties style:font-name="Times New Roman" style:font-name-asian="GPAFJ+Aptos" style:font-name-complex="Times New Roman" fo:color="#000000" fo:font-size="12pt" style:font-size-asian="12pt" style:font-size-complex="12pt"/>
    </style:style>
    <style:style style:name="T289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9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896" style:parent-style-name="Policepardéfaut" style:family="text">
      <style:text-properties style:font-name="Times New Roman" style:font-name-asian="GPAFJ+Aptos" style:font-name-complex="Times New Roman" fo:color="#000000" fo:font-size="12pt" style:font-size-asian="12pt" style:font-size-complex="12pt"/>
    </style:style>
    <style:style style:name="T289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898"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89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900" style:parent-style-name="Policepardéfaut" style:family="text">
      <style:text-properties style:font-name="Times New Roman" style:font-name-asian="GPAFJ+Aptos" style:font-name-complex="Times New Roman" fo:color="#000000" fo:font-size="12pt" style:font-size-asian="12pt" style:font-size-complex="12pt"/>
    </style:style>
    <style:style style:name="T2901"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902" style:parent-style-name="Policepardéfaut" style:family="text">
      <style:text-properties style:font-name="Times New Roman" style:font-name-asian="GPAFJ+Aptos" style:font-name-complex="Times New Roman" fo:color="#000000" fo:font-size="12pt" style:font-size-asian="12pt" style:font-size-complex="12pt"/>
    </style:style>
    <style:style style:name="T2903"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90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0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90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07" style:parent-style-name="Policepardéfaut" style:family="text">
      <style:text-properties style:font-name="Times New Roman" style:font-name-asian="GPAFJ+Aptos" style:font-name-complex="Times New Roman" fo:color="#000000" fo:font-size="12pt" style:font-size-asian="12pt" style:font-size-complex="12pt"/>
    </style:style>
    <style:style style:name="T290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09" style:parent-style-name="Policepardéfaut" style:family="text">
      <style:text-properties style:font-name="Times New Roman" style:font-name-asian="GPAFJ+Aptos" style:font-name-complex="Times New Roman" fo:color="#000000" fo:font-size="12pt" style:font-size-asian="12pt" style:font-size-complex="12pt"/>
    </style:style>
    <style:style style:name="T2910"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91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12"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91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91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91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16"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2917" style:parent-style-name="Policepardéfaut" style:family="text">
      <style:text-properties style:font-name="Times New Roman" style:font-name-asian="GPAFJ+Aptos" style:font-name-complex="Times New Roman" fo:color="#000000" fo:font-size="12pt" style:font-size-asian="12pt" style:font-size-complex="12pt"/>
    </style:style>
    <style:style style:name="T2918"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91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20"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92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92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P2923" style:parent-style-name="Normal" style:family="paragraph">
      <style:paragraph-properties fo:text-align="justify" fo:margin-bottom="0.0125in" fo:line-height="0.0972in"/>
      <style:text-properties style:font-name="Times New Roman" style:font-name-complex="Times New Roman" fo:font-size="12pt" style:font-size-asian="12pt" style:font-size-complex="12pt"/>
    </style:style>
    <style:style style:name="P2924" style:parent-style-name="Normal" style:family="paragraph">
      <style:paragraph-properties fo:widows="0" fo:orphans="0" fo:text-align="justify" fo:margin-right="0.5854in"/>
    </style:style>
    <style:style style:name="T2925" style:parent-style-name="Policepardéfaut" style:family="text">
      <style:text-properties style:font-name="Times New Roman" style:font-name-asian="GPAFJ+Aptos" style:font-name-complex="Times New Roman" fo:color="#000000" fo:font-size="12pt" style:font-size-asian="12pt" style:font-size-complex="12pt"/>
    </style:style>
    <style:style style:name="T2926" style:parent-style-name="Policepardéfaut" style:family="text">
      <style:text-properties style:font-name="Times New Roman" style:font-name-asian="GPAFJ+Aptos" style:font-name-complex="Times New Roman" fo:color="#000000" fo:font-size="12pt" style:font-size-asian="12pt" style:font-size-complex="12pt"/>
    </style:style>
    <style:style style:name="T292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28" style:parent-style-name="Policepardéfaut" style:family="text">
      <style:text-properties style:font-name="Times New Roman" style:font-name-asian="GPAFJ+Aptos" style:font-name-complex="Times New Roman" fo:color="#000000" fo:font-size="12pt" style:font-size-asian="12pt" style:font-size-complex="12pt"/>
    </style:style>
    <style:style style:name="T292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30"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93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93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3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934" style:parent-style-name="Policepardéfaut" style:family="text">
      <style:text-properties style:font-name="Times New Roman" style:font-name-asian="GPAFJ+Aptos" style:font-name-complex="Times New Roman" fo:color="#000000" fo:font-size="12pt" style:font-size-asian="12pt" style:font-size-complex="12pt"/>
    </style:style>
    <style:style style:name="T293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36"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93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3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93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40" style:parent-style-name="Policepardéfaut" style:family="text">
      <style:text-properties style:font-name="Times New Roman" style:font-name-asian="GPAFJ+Aptos" style:font-name-complex="Times New Roman" fo:color="#000000" fo:font-size="12pt" style:font-size-asian="12pt" style:font-size-complex="12pt"/>
    </style:style>
    <style:style style:name="T294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42" style:parent-style-name="Policepardéfaut" style:family="text">
      <style:text-properties style:font-name="Times New Roman" style:font-name-asian="GPAFJ+Aptos" style:font-name-complex="Times New Roman" fo:color="#000000" fo:letter-spacing="0.002in" fo:font-size="12pt" style:font-size-asian="12pt" style:font-size-complex="12pt"/>
    </style:style>
    <style:style style:name="T2943" style:parent-style-name="Policepardéfaut" style:family="text">
      <style:text-properties style:font-name="Times New Roman" style:font-name-asian="GPAFJ+Aptos" style:font-name-complex="Times New Roman" fo:color="#000000" fo:font-size="12pt" style:font-size-asian="12pt" style:font-size-complex="12pt"/>
    </style:style>
    <style:style style:name="T294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945" style:parent-style-name="Policepardéfaut" style:family="text">
      <style:text-properties style:font-name="Times New Roman" style:font-name-asian="GPAFJ+Aptos" style:font-name-complex="Times New Roman" fo:color="#000000" fo:font-size="12pt" style:font-size-asian="12pt" style:font-size-complex="12pt"/>
    </style:style>
    <style:style style:name="T2946"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94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948"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94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95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95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95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5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954" style:parent-style-name="Policepardéfaut" style:family="text">
      <style:text-properties style:font-name="Times New Roman" style:font-name-asian="GPAFJ+Aptos" style:font-name-complex="Times New Roman" fo:color="#000000" fo:font-size="12pt" style:font-size-asian="12pt" style:font-size-complex="12pt"/>
    </style:style>
    <style:style style:name="T295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56"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95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58" style:parent-style-name="Policepardéfaut" style:family="text">
      <style:text-properties style:font-name="Times New Roman" style:font-name-asian="GPAFJ+Aptos" style:font-name-complex="Times New Roman" fo:color="#000000" fo:font-size="12pt" style:font-size-asian="12pt" style:font-size-complex="12pt"/>
    </style:style>
    <style:style style:name="T295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6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96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6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963" style:parent-style-name="Policepardéfaut" style:family="text">
      <style:text-properties style:font-name="Times New Roman" style:font-name-asian="GPAFJ+Aptos" style:font-name-complex="Times New Roman" fo:color="#000000" fo:font-size="12pt" style:font-size-asian="12pt" style:font-size-complex="12pt"/>
    </style:style>
    <style:style style:name="T296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6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966" style:parent-style-name="Policepardéfaut" style:family="text">
      <style:text-properties style:font-name="Times New Roman" style:font-name-asian="GPAFJ+Aptos" style:font-name-complex="Times New Roman" fo:color="#000000" fo:font-size="12pt" style:font-size-asian="12pt" style:font-size-complex="12pt"/>
    </style:style>
    <style:style style:name="T2967"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96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6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97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71" style:parent-style-name="Policepardéfaut" style:family="text">
      <style:text-properties style:font-name="Times New Roman" style:font-name-asian="GPAFJ+Aptos" style:font-name-complex="Times New Roman" fo:color="#000000" fo:font-size="12pt" style:font-size-asian="12pt" style:font-size-complex="12pt"/>
    </style:style>
    <style:style style:name="T297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97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7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975" style:parent-style-name="Policepardéfaut" style:family="text">
      <style:text-properties style:font-name="Times New Roman" style:font-name-asian="GPAFJ+Aptos" style:font-name-complex="Times New Roman" fo:color="#000000" fo:font-size="12pt" style:font-size-asian="12pt" style:font-size-complex="12pt"/>
    </style:style>
    <style:style style:name="T297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97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978" style:parent-style-name="Policepardéfaut" style:family="text">
      <style:text-properties style:font-name="Times New Roman" style:font-name-asian="GPAFJ+Aptos" style:font-name-complex="Times New Roman" fo:color="#000000" fo:font-size="12pt" style:font-size-asian="12pt" style:font-size-complex="12pt"/>
    </style:style>
    <style:style style:name="T297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2980" style:parent-style-name="Policepardéfaut" style:family="text">
      <style:text-properties style:font-name="Times New Roman" style:font-name-asian="GPAFJ+Aptos" style:font-name-complex="Times New Roman" fo:color="#000000" fo:font-size="12pt" style:font-size-asian="12pt" style:font-size-complex="12pt"/>
    </style:style>
    <style:style style:name="T298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82" style:parent-style-name="Policepardéfaut" style:family="text">
      <style:text-properties style:font-name="Times New Roman" style:font-name-asian="GPAFJ+Aptos" style:font-name-complex="Times New Roman" fo:color="#000000" fo:font-size="12pt" style:font-size-asian="12pt" style:font-size-complex="12pt"/>
    </style:style>
    <style:style style:name="T298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84" style:parent-style-name="Policepardéfaut" style:family="text">
      <style:text-properties style:font-name="Times New Roman" style:font-name-asian="GPAFJ+Aptos" style:font-name-complex="Times New Roman" fo:color="#000000" fo:font-size="12pt" style:font-size-asian="12pt" style:font-size-complex="12pt"/>
    </style:style>
    <style:style style:name="T298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86"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2987" style:parent-style-name="Policepardéfaut" style:family="text">
      <style:text-properties style:font-name="Times New Roman" style:font-name-asian="GPAFJ+Aptos" style:font-name-complex="Times New Roman" fo:color="#000000" fo:font-size="12pt" style:font-size-asian="12pt" style:font-size-complex="12pt"/>
    </style:style>
    <style:style style:name="T298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989" style:parent-style-name="Policepardéfaut" style:family="text">
      <style:text-properties style:font-name="Times New Roman" style:font-name-asian="GPAFJ+Aptos" style:font-name-complex="Times New Roman" fo:color="#000000" fo:font-size="12pt" style:font-size-asian="12pt" style:font-size-complex="12pt"/>
    </style:style>
    <style:style style:name="T299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9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99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93" style:parent-style-name="Policepardéfaut" style:family="text">
      <style:text-properties style:font-name="Times New Roman" style:font-name-asian="GPAFJ+Aptos" style:font-name-complex="Times New Roman" fo:color="#000000" fo:font-size="12pt" style:font-size-asian="12pt" style:font-size-complex="12pt"/>
    </style:style>
    <style:style style:name="T299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995" style:parent-style-name="Policepardéfaut" style:family="text">
      <style:text-properties style:font-name="Times New Roman" style:font-name-asian="GPAFJ+Aptos" style:font-name-complex="Times New Roman" fo:color="#000000" fo:font-size="12pt" style:font-size-asian="12pt" style:font-size-complex="12pt"/>
    </style:style>
    <style:style style:name="T299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9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299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2999" style:parent-style-name="Policepardéfaut" style:family="text">
      <style:text-properties style:font-name="Times New Roman" style:font-name-asian="GPAFJ+Aptos" style:font-name-complex="Times New Roman" fo:color="#000000" fo:font-size="12pt" style:font-size-asian="12pt" style:font-size-complex="12pt"/>
    </style:style>
    <style:style style:name="T300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01" style:parent-style-name="Policepardéfaut" style:family="text">
      <style:text-properties style:font-name="Times New Roman" style:font-name-asian="GPAFJ+Aptos" style:font-name-complex="Times New Roman" fo:color="#000000" fo:font-size="12pt" style:font-size-asian="12pt" style:font-size-complex="12pt"/>
    </style:style>
    <style:style style:name="T300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03"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00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05" style:parent-style-name="Policepardéfaut" style:family="text">
      <style:text-properties style:font-name="Times New Roman" style:font-name-asian="GPAFJ+Aptos" style:font-name-complex="Times New Roman" fo:color="#000000" fo:font-size="12pt" style:font-size-asian="12pt" style:font-size-complex="12pt"/>
    </style:style>
    <style:style style:name="T300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00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08" style:parent-style-name="Policepardéfaut" style:family="text">
      <style:text-properties style:font-name="Times New Roman" style:font-name-asian="GPAFJ+Aptos" style:font-name-complex="Times New Roman" fo:color="#000000" fo:font-size="12pt" style:font-size-asian="12pt" style:font-size-complex="12pt"/>
    </style:style>
    <style:style style:name="T300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010" style:parent-style-name="Policepardéfaut" style:family="text">
      <style:text-properties style:font-name="Times New Roman" style:font-name-asian="GPAFJ+Aptos" style:font-name-complex="Times New Roman" fo:color="#000000" fo:font-size="12pt" style:font-size-asian="12pt" style:font-size-complex="12pt"/>
    </style:style>
    <style:style style:name="T301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012"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01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14" style:parent-style-name="Policepardéfaut" style:family="text">
      <style:text-properties style:font-name="Times New Roman" style:font-name-asian="GPAFJ+Aptos" style:font-name-complex="Times New Roman" fo:color="#000000" fo:font-size="12pt" style:font-size-asian="12pt" style:font-size-complex="12pt"/>
    </style:style>
    <style:style style:name="T301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016"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01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1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01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20"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021" style:parent-style-name="Policepardéfaut" style:family="text">
      <style:text-properties style:font-name="Times New Roman" style:font-name-asian="GPAFJ+Aptos" style:font-name-complex="Times New Roman" fo:color="#000000" fo:font-size="12pt" style:font-size-asian="12pt" style:font-size-complex="12pt"/>
    </style:style>
    <style:style style:name="T302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23"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02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25" style:parent-style-name="Policepardéfaut" style:family="text">
      <style:text-properties style:font-name="Times New Roman" style:font-name-asian="GPAFJ+Aptos" style:font-name-complex="Times New Roman" fo:color="#000000" fo:font-size="12pt" style:font-size-asian="12pt" style:font-size-complex="12pt"/>
    </style:style>
    <style:style style:name="T302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027" style:parent-style-name="Policepardéfaut" style:family="text">
      <style:text-properties style:font-name="Times New Roman" style:font-name-asian="GPAFJ+Aptos" style:font-name-complex="Times New Roman" fo:color="#000000" fo:font-size="12pt" style:font-size-asian="12pt" style:font-size-complex="12pt"/>
    </style:style>
    <style:style style:name="T302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29" style:parent-style-name="Policepardéfaut" style:family="text">
      <style:text-properties style:font-name="Times New Roman" style:font-name-asian="GPAFJ+Aptos" style:font-name-complex="Times New Roman" fo:color="#000000" fo:font-size="12pt" style:font-size-asian="12pt" style:font-size-complex="12pt"/>
    </style:style>
    <style:style style:name="T303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31"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032"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033" style:parent-style-name="Policepardéfaut" style:family="text">
      <style:text-properties style:font-name="Times New Roman" style:font-name-asian="GPAFJ+Aptos" style:font-name-complex="Times New Roman" fo:color="#000000" fo:font-size="12pt" style:font-size-asian="12pt" style:font-size-complex="12pt"/>
    </style:style>
    <style:style style:name="T303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P3035" style:parent-style-name="Normal" style:family="paragraph">
      <style:paragraph-properties fo:text-align="justify" fo:margin-bottom="0.0131in" fo:line-height="0.0972in"/>
      <style:text-properties style:font-name="Times New Roman" style:font-name-complex="Times New Roman" fo:font-size="12pt" style:font-size-asian="12pt" style:font-size-complex="12pt"/>
    </style:style>
    <style:style style:name="P3036" style:parent-style-name="Normal" style:family="paragraph">
      <style:paragraph-properties fo:widows="0" fo:orphans="0" fo:text-align="justify" fo:margin-right="0.7368in"/>
    </style:style>
    <style:style style:name="T3037" style:parent-style-name="Policepardéfaut" style:family="text">
      <style:text-properties style:font-name="Times New Roman" style:font-name-asian="GPAFJ+Aptos" style:font-name-complex="Times New Roman" fo:color="#000000" fo:font-size="12pt" style:font-size-asian="12pt" style:font-size-complex="12pt"/>
    </style:style>
    <style:style style:name="T3038" style:parent-style-name="Policepardéfaut" style:family="text">
      <style:text-properties style:font-name="Times New Roman" style:font-name-asian="GPAFJ+Aptos" style:font-name-complex="Times New Roman" fo:color="#000000" fo:font-size="12pt" style:font-size-asian="12pt" style:font-size-complex="12pt"/>
    </style:style>
    <style:style style:name="T303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40" style:parent-style-name="Policepardéfaut" style:family="text">
      <style:text-properties style:font-name="Times New Roman" style:font-name-asian="GPAFJ+Aptos" style:font-name-complex="Times New Roman" fo:color="#000000" fo:font-size="12pt" style:font-size-asian="12pt" style:font-size-complex="12pt"/>
    </style:style>
    <style:style style:name="T304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042" style:parent-style-name="Policepardéfaut" style:family="text">
      <style:text-properties style:font-name="Times New Roman" style:font-name-asian="GPAFJ+Aptos" style:font-name-complex="Times New Roman" fo:color="#000000" fo:font-size="12pt" style:font-size-asian="12pt" style:font-size-complex="12pt"/>
    </style:style>
    <style:style style:name="T304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4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045" style:parent-style-name="Policepardéfaut" style:family="text">
      <style:text-properties style:font-name="Times New Roman" style:font-name-asian="GPAFJ+Aptos" style:font-name-complex="Times New Roman" fo:color="#000000" fo:font-size="12pt" style:font-size-asian="12pt" style:font-size-complex="12pt"/>
    </style:style>
    <style:style style:name="T304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04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4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04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050"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05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5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053" style:parent-style-name="Policepardéfaut" style:family="text">
      <style:text-properties style:font-name="Times New Roman" style:font-name-asian="GPAFJ+Aptos" style:font-name-complex="Times New Roman" fo:color="#000000" fo:font-size="12pt" style:font-size-asian="12pt" style:font-size-complex="12pt"/>
    </style:style>
    <style:style style:name="T305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55" style:parent-style-name="Policepardéfaut" style:family="text">
      <style:text-properties style:font-name="Times New Roman" style:font-name-asian="GPAFJ+Aptos" style:font-name-complex="Times New Roman" fo:color="#000000" fo:font-size="12pt" style:font-size-asian="12pt" style:font-size-complex="12pt"/>
    </style:style>
    <style:style style:name="T3056"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05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58" style:parent-style-name="Policepardéfaut" style:family="text">
      <style:text-properties style:font-name="Times New Roman" style:font-name-asian="GPAFJ+Aptos" style:font-name-complex="Times New Roman" fo:color="#000000" fo:font-size="12pt" style:font-size-asian="12pt" style:font-size-complex="12pt"/>
    </style:style>
    <style:style style:name="T305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060" style:parent-style-name="Policepardéfaut" style:family="text">
      <style:text-properties style:font-name="Times New Roman" style:font-name-asian="GPAFJ+Aptos" style:font-name-complex="Times New Roman" fo:color="#000000" fo:font-size="12pt" style:font-size-asian="12pt" style:font-size-complex="12pt"/>
    </style:style>
    <style:style style:name="T306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06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063" style:parent-style-name="Policepardéfaut" style:family="text">
      <style:text-properties style:font-name="Times New Roman" style:font-name-asian="GPAFJ+Aptos" style:font-name-complex="Times New Roman" fo:color="#000000" fo:font-size="12pt" style:font-size-asian="12pt" style:font-size-complex="12pt"/>
    </style:style>
    <style:style style:name="T306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065" style:parent-style-name="Policepardéfaut" style:family="text">
      <style:text-properties style:font-name="Times New Roman" style:font-name-asian="GPAFJ+Aptos" style:font-name-complex="Times New Roman" fo:color="#000000" fo:font-size="12pt" style:font-size-asian="12pt" style:font-size-complex="12pt"/>
    </style:style>
    <style:style style:name="T306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67" style:parent-style-name="Policepardéfaut" style:family="text">
      <style:text-properties style:font-name="Times New Roman" style:font-name-asian="GPAFJ+Aptos" style:font-name-complex="Times New Roman" fo:color="#000000" fo:font-size="12pt" style:font-size-asian="12pt" style:font-size-complex="12pt"/>
    </style:style>
    <style:style style:name="T3068"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069" style:parent-style-name="Policepardéfaut" style:family="text">
      <style:text-properties style:font-name="Times New Roman" style:font-name-asian="GPAFJ+Aptos" style:font-name-complex="Times New Roman" fo:color="#000000" fo:font-size="12pt" style:font-size-asian="12pt" style:font-size-complex="12pt"/>
    </style:style>
    <style:style style:name="T3070"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071" style:parent-style-name="Policepardéfaut" style:family="text">
      <style:text-properties style:font-name="Times New Roman" style:font-name-asian="GPAFJ+Aptos" style:font-name-complex="Times New Roman" fo:color="#000000" fo:font-size="12pt" style:font-size-asian="12pt" style:font-size-complex="12pt"/>
    </style:style>
    <style:style style:name="T307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73" style:parent-style-name="Policepardéfaut" style:family="text">
      <style:text-properties style:font-name="Times New Roman" style:font-name-asian="GPAFJ+Aptos" style:font-name-complex="Times New Roman" fo:color="#000000" fo:font-size="12pt" style:font-size-asian="12pt" style:font-size-complex="12pt"/>
    </style:style>
    <style:style style:name="T307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7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07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77"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07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79" style:parent-style-name="Policepardéfaut" style:family="text">
      <style:text-properties style:font-name="Times New Roman" style:font-name-asian="GPAFJ+Aptos" style:font-name-complex="Times New Roman" fo:color="#000000" fo:font-size="12pt" style:font-size-asian="12pt" style:font-size-complex="12pt"/>
    </style:style>
    <style:style style:name="T308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08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8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08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84" style:parent-style-name="Policepardéfaut" style:family="text">
      <style:text-properties style:font-name="Times New Roman" style:font-name-asian="GPAFJ+Aptos" style:font-name-complex="Times New Roman" fo:color="#000000" fo:font-size="12pt" style:font-size-asian="12pt" style:font-size-complex="12pt"/>
    </style:style>
    <style:style style:name="T308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86" style:parent-style-name="Policepardéfaut" style:family="text">
      <style:text-properties style:font-name="Times New Roman" style:font-name-asian="GPAFJ+Aptos" style:font-name-complex="Times New Roman" fo:color="#000000" fo:font-size="12pt" style:font-size-asian="12pt" style:font-size-complex="12pt"/>
    </style:style>
    <style:style style:name="T3087"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08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089"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09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9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09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93" style:parent-style-name="Policepardéfaut" style:family="text">
      <style:text-properties style:font-name="Times New Roman" style:font-name-asian="GPAFJ+Aptos" style:font-name-complex="Times New Roman" fo:color="#000000" fo:font-size="12pt" style:font-size-asian="12pt" style:font-size-complex="12pt"/>
    </style:style>
    <style:style style:name="T309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095" style:parent-style-name="Policepardéfaut" style:family="text">
      <style:text-properties style:font-name="Times New Roman" style:font-name-asian="GPAFJ+Aptos" style:font-name-complex="Times New Roman" fo:color="#000000" fo:font-size="12pt" style:font-size-asian="12pt" style:font-size-complex="12pt"/>
    </style:style>
    <style:style style:name="T309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97" style:parent-style-name="Policepardéfaut" style:family="text">
      <style:text-properties style:font-name="Times New Roman" style:font-name-asian="GPAFJ+Aptos" style:font-name-complex="Times New Roman" fo:color="#000000" fo:font-size="12pt" style:font-size-asian="12pt" style:font-size-complex="12pt"/>
    </style:style>
    <style:style style:name="T309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09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100" style:parent-style-name="Policepardéfaut" style:family="text">
      <style:text-properties style:font-name="Times New Roman" style:font-name-asian="GPAFJ+Aptos" style:font-name-complex="Times New Roman" fo:color="#000000" fo:font-size="12pt" style:font-size-asian="12pt" style:font-size-complex="12pt"/>
    </style:style>
    <style:style style:name="T310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0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103" style:parent-style-name="Policepardéfaut" style:family="text">
      <style:text-properties style:font-name="Times New Roman" style:font-name-asian="GPAFJ+Aptos" style:font-name-complex="Times New Roman" fo:color="#000000" fo:font-size="12pt" style:font-size-asian="12pt" style:font-size-complex="12pt"/>
    </style:style>
    <style:style style:name="T310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05" style:parent-style-name="Policepardéfaut" style:family="text">
      <style:text-properties style:font-name="Times New Roman" style:font-name-asian="GPAFJ+Aptos" style:font-name-complex="Times New Roman" fo:color="#000000" fo:font-size="12pt" style:font-size-asian="12pt" style:font-size-complex="12pt"/>
    </style:style>
    <style:style style:name="T310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07"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108" style:parent-style-name="Policepardéfaut" style:family="text">
      <style:text-properties style:font-name="Times New Roman" style:font-name-asian="GPAFJ+Aptos" style:font-name-complex="Times New Roman" fo:color="#000000" fo:font-size="12pt" style:font-size-asian="12pt" style:font-size-complex="12pt"/>
    </style:style>
    <style:style style:name="T310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10"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11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12" style:parent-style-name="Policepardéfaut" style:family="text">
      <style:text-properties style:font-name="Times New Roman" style:font-name-asian="GPAFJ+Aptos" style:font-name-complex="Times New Roman" fo:color="#000000" fo:font-size="12pt" style:font-size-asian="12pt" style:font-size-complex="12pt"/>
    </style:style>
    <style:style style:name="T311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1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11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1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11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18"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11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2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121"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122" style:parent-style-name="Policepardéfaut" style:family="text">
      <style:text-properties style:font-name="Times New Roman" style:font-name-asian="GPAFJ+Aptos" style:font-name-complex="Times New Roman" fo:color="#000000" fo:font-size="12pt" style:font-size-asian="12pt" style:font-size-complex="12pt"/>
    </style:style>
    <style:style style:name="T312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2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12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126" style:parent-style-name="Policepardéfaut" style:family="text">
      <style:text-properties style:font-name="Times New Roman" style:font-name-asian="GPAFJ+Aptos" style:font-name-complex="Times New Roman" fo:color="#000000" fo:font-size="12pt" style:font-size-asian="12pt" style:font-size-complex="12pt"/>
    </style:style>
    <style:style style:name="T312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128" style:parent-style-name="Policepardéfaut" style:family="text">
      <style:text-properties style:font-name="Times New Roman" style:font-name-asian="GPAFJ+Aptos" style:font-name-complex="Times New Roman" fo:color="#000000" fo:font-size="12pt" style:font-size-asian="12pt" style:font-size-complex="12pt"/>
    </style:style>
    <style:style style:name="T312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30"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131" style:parent-style-name="Policepardéfaut" style:family="text">
      <style:text-properties style:font-name="Times New Roman" style:font-name-asian="GPAFJ+Aptos" style:font-name-complex="Times New Roman" fo:color="#000000" fo:font-size="12pt" style:font-size-asian="12pt" style:font-size-complex="12pt"/>
    </style:style>
    <style:style style:name="T313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133" style:parent-style-name="Policepardéfaut" style:family="text">
      <style:text-properties style:font-name="Times New Roman" style:font-name-asian="GPAFJ+Aptos" style:font-name-complex="Times New Roman" fo:color="#000000" fo:font-size="12pt" style:font-size-asian="12pt" style:font-size-complex="12pt"/>
    </style:style>
    <style:style style:name="T313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35" style:parent-style-name="Policepardéfaut" style:family="text">
      <style:text-properties style:font-name="Times New Roman" style:font-name-asian="GPAFJ+Aptos" style:font-name-complex="Times New Roman" fo:color="#000000" fo:font-size="12pt" style:font-size-asian="12pt" style:font-size-complex="12pt"/>
    </style:style>
    <style:style style:name="T3136"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13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3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139"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14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4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142" style:parent-style-name="Policepardéfaut" style:family="text">
      <style:text-properties style:font-name="Times New Roman" style:font-name-asian="GPAFJ+Aptos" style:font-name-complex="Times New Roman" fo:color="#000000" fo:font-size="12pt" style:font-size-asian="12pt" style:font-size-complex="12pt"/>
    </style:style>
    <style:style style:name="T314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44"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14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P3146" style:parent-style-name="Normal" style:family="paragraph">
      <style:paragraph-properties fo:text-align="justify" fo:margin-bottom="0.0125in" fo:line-height="0.0972in"/>
      <style:text-properties style:font-name="Times New Roman" style:font-name-complex="Times New Roman" fo:font-size="12pt" style:font-size-asian="12pt" style:font-size-complex="12pt"/>
    </style:style>
    <style:style style:name="P3147" style:parent-style-name="Normal" style:family="paragraph">
      <style:paragraph-properties fo:widows="0" fo:orphans="0" fo:text-align="justify" fo:margin-right="1.2319in"/>
    </style:style>
    <style:style style:name="T3148" style:parent-style-name="Policepardéfaut" style:family="text">
      <style:text-properties style:font-name="Times New Roman" style:font-name-asian="GPAFJ+Aptos" style:font-name-complex="Times New Roman" fo:color="#000000" fo:font-size="12pt" style:font-size-asian="12pt" style:font-size-complex="12pt"/>
    </style:style>
    <style:style style:name="T3149" style:parent-style-name="Policepardéfaut" style:family="text">
      <style:text-properties style:font-name="Times New Roman" style:font-name-asian="GPAFJ+Aptos" style:font-name-complex="Times New Roman" fo:color="#000000" fo:font-size="12pt" style:font-size-asian="12pt" style:font-size-complex="12pt"/>
    </style:style>
    <style:style style:name="T315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51" style:parent-style-name="Policepardéfaut" style:family="text">
      <style:text-properties style:font-name="Times New Roman" style:font-name-asian="GPAFJ+Aptos" style:font-name-complex="Times New Roman" fo:color="#000000" fo:font-size="12pt" style:font-size-asian="12pt" style:font-size-complex="12pt"/>
    </style:style>
    <style:style style:name="T315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153" style:parent-style-name="Policepardéfaut" style:family="text">
      <style:text-properties style:font-name="Times New Roman" style:font-name-asian="GPAFJ+Aptos" style:font-name-complex="Times New Roman" fo:color="#000000" fo:font-size="12pt" style:font-size-asian="12pt" style:font-size-complex="12pt"/>
    </style:style>
    <style:style style:name="T315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15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156"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15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5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159" style:parent-style-name="Policepardéfaut" style:family="text">
      <style:text-properties style:font-name="Times New Roman" style:font-name-asian="GPAFJ+Aptos" style:font-name-complex="Times New Roman" fo:color="#000000" fo:font-size="12pt" style:font-size-asian="12pt" style:font-size-complex="12pt"/>
    </style:style>
    <style:style style:name="T3160"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161" style:parent-style-name="Policepardéfaut" style:family="text">
      <style:text-properties style:font-name="Times New Roman" style:font-name-asian="GPAFJ+Aptos" style:font-name-complex="Times New Roman" fo:color="#000000" fo:font-size="12pt" style:font-size-asian="12pt" style:font-size-complex="12pt"/>
    </style:style>
    <style:style style:name="T316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6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16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6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166" style:parent-style-name="Policepardéfaut" style:family="text">
      <style:text-properties style:font-name="Times New Roman" style:font-name-asian="GPAFJ+Aptos" style:font-name-complex="Times New Roman" fo:color="#000000" fo:font-size="12pt" style:font-size-asian="12pt" style:font-size-complex="12pt"/>
    </style:style>
    <style:style style:name="T316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6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16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70" style:parent-style-name="Policepardéfaut" style:family="text">
      <style:text-properties style:font-name="Times New Roman" style:font-name-asian="GPAFJ+Aptos" style:font-name-complex="Times New Roman" fo:color="#000000" fo:font-size="12pt" style:font-size-asian="12pt" style:font-size-complex="12pt"/>
    </style:style>
    <style:style style:name="T317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7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17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74" style:parent-style-name="Policepardéfaut" style:family="text">
      <style:text-properties style:font-name="Times New Roman" style:font-name-asian="GPAFJ+Aptos" style:font-name-complex="Times New Roman" fo:color="#000000" fo:font-size="12pt" style:font-size-asian="12pt" style:font-size-complex="12pt"/>
    </style:style>
    <style:style style:name="T317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17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77"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178" style:parent-style-name="Policepardéfaut" style:family="text">
      <style:text-properties style:font-name="Times New Roman" style:font-name-asian="GPAFJ+Aptos" style:font-name-complex="Times New Roman" fo:color="#000000" fo:font-size="12pt" style:font-size-asian="12pt" style:font-size-complex="12pt"/>
    </style:style>
    <style:style style:name="T317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80" style:parent-style-name="Policepardéfaut" style:family="text">
      <style:text-properties style:font-name="Times New Roman" style:font-name-asian="GPAFJ+Aptos" style:font-name-complex="Times New Roman" fo:color="#000000" fo:font-size="12pt" style:font-size-asian="12pt" style:font-size-complex="12pt"/>
    </style:style>
    <style:style style:name="T3181"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18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83"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18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85" style:parent-style-name="Policepardéfaut" style:family="text">
      <style:text-properties style:font-name="Times New Roman" style:font-name-asian="GPAFJ+Aptos" style:font-name-complex="Times New Roman" fo:color="#000000" fo:font-size="12pt" style:font-size-asian="12pt" style:font-size-complex="12pt"/>
    </style:style>
    <style:style style:name="T3186"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18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88" style:parent-style-name="Policepardéfaut" style:family="text">
      <style:text-properties style:font-name="Times New Roman" style:font-name-asian="GPAFJ+Aptos" style:font-name-complex="Times New Roman" fo:color="#000000" fo:font-size="12pt" style:font-size-asian="12pt" style:font-size-complex="12pt"/>
    </style:style>
    <style:style style:name="T318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90"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19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9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193"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19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19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9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19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198"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199" style:parent-style-name="Policepardéfaut" style:family="text">
      <style:text-properties style:font-name="Times New Roman" style:font-name-asian="GPAFJ+Aptos" style:font-name-complex="Times New Roman" fo:color="#000000" fo:font-size="12pt" style:font-size-asian="12pt" style:font-size-complex="12pt"/>
    </style:style>
    <style:style style:name="T320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201"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20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0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204" style:parent-style-name="Policepardéfaut" style:family="text">
      <style:text-properties style:font-name="Times New Roman" style:font-name-asian="GPAFJ+Aptos" style:font-name-complex="Times New Roman" fo:color="#000000" fo:font-size="12pt" style:font-size-asian="12pt" style:font-size-complex="12pt"/>
    </style:style>
    <style:style style:name="T320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0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20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0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209" style:parent-style-name="Policepardéfaut" style:family="text">
      <style:text-properties style:font-name="Times New Roman" style:font-name-asian="GPAFJ+Aptos" style:font-name-complex="Times New Roman" fo:color="#000000" fo:font-size="12pt" style:font-size-asian="12pt" style:font-size-complex="12pt"/>
    </style:style>
    <style:style style:name="T321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1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212" style:parent-style-name="Policepardéfaut" style:family="text">
      <style:text-properties style:font-name="Times New Roman" style:font-name-asian="GPAFJ+Aptos" style:font-name-complex="Times New Roman" fo:color="#000000" fo:font-size="12pt" style:font-size-asian="12pt" style:font-size-complex="12pt"/>
    </style:style>
    <style:style style:name="T321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14" style:parent-style-name="Policepardéfaut" style:family="text">
      <style:text-properties style:font-name="Times New Roman" style:font-name-asian="GPAFJ+Aptos" style:font-name-complex="Times New Roman" fo:color="#000000" fo:font-size="12pt" style:font-size-asian="12pt" style:font-size-complex="12pt"/>
    </style:style>
    <style:style style:name="T321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1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21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1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219" style:parent-style-name="Policepardéfaut" style:family="text">
      <style:text-properties style:font-name="Times New Roman" style:font-name-asian="GPAFJ+Aptos" style:font-name-complex="Times New Roman" fo:color="#000000" fo:font-size="12pt" style:font-size-asian="12pt" style:font-size-complex="12pt"/>
    </style:style>
    <style:style style:name="T322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2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22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2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22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25" style:parent-style-name="Policepardéfaut" style:family="text">
      <style:text-properties style:font-name="Times New Roman" style:font-name-asian="GPAFJ+Aptos" style:font-name-complex="Times New Roman" fo:color="#000000" fo:font-size="12pt" style:font-size-asian="12pt" style:font-size-complex="12pt"/>
    </style:style>
    <style:style style:name="T322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22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28" style:parent-style-name="Policepardéfaut" style:family="text">
      <style:text-properties style:font-name="Times New Roman" style:font-name-asian="GPAFJ+Aptos" style:font-name-complex="Times New Roman" fo:color="#000000" fo:font-size="12pt" style:font-size-asian="12pt" style:font-size-complex="12pt"/>
    </style:style>
    <style:style style:name="T3229" style:parent-style-name="Policepardéfaut" style:family="text">
      <style:text-properties style:font-name="Times New Roman" style:font-name-asian="GPAFJ+Aptos" style:font-name-complex="Times New Roman" fo:color="#000000" fo:letter-spacing="-0.002in" style:text-scale="101%" fo:font-size="12pt" style:font-size-asian="12pt" style:font-size-complex="12pt"/>
    </style:style>
    <style:style style:name="T3230"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231" style:parent-style-name="Policepardéfaut" style:family="text">
      <style:text-properties style:font-name="Times New Roman" style:font-name-asian="GPAFJ+Aptos" style:font-name-complex="Times New Roman" fo:color="#000000" fo:font-size="12pt" style:font-size-asian="12pt" style:font-size-complex="12pt"/>
    </style:style>
    <style:style style:name="T323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23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34" style:parent-style-name="Policepardéfaut" style:family="text">
      <style:text-properties style:font-name="Times New Roman" style:font-name-asian="GPAFJ+Aptos" style:font-name-complex="Times New Roman" fo:color="#000000" fo:font-size="12pt" style:font-size-asian="12pt" style:font-size-complex="12pt"/>
    </style:style>
    <style:style style:name="T323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36"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237"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238" style:parent-style-name="Policepardéfaut" style:family="text">
      <style:text-properties style:font-name="Times New Roman" style:font-name-asian="GPAFJ+Aptos" style:font-name-complex="Times New Roman" fo:color="#000000" fo:font-size="12pt" style:font-size-asian="12pt" style:font-size-complex="12pt"/>
    </style:style>
    <style:style style:name="T323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P3240" style:parent-style-name="Normal" style:family="paragraph">
      <style:paragraph-properties fo:text-align="justify" fo:margin-bottom="0.0006in" fo:line-height="0.1111in"/>
      <style:text-properties style:font-name="Times New Roman" style:font-name-complex="Times New Roman" fo:font-size="12pt" style:font-size-asian="12pt" style:font-size-complex="12pt"/>
    </style:style>
    <style:style style:name="P3241" style:parent-style-name="Normal" style:family="paragraph">
      <style:paragraph-properties fo:widows="0" fo:orphans="0" fo:text-align="justify" fo:line-height="107%" fo:margin-right="0.9493in"/>
    </style:style>
    <style:style style:name="T3242" style:parent-style-name="Policepardéfaut" style:family="text">
      <style:text-properties style:font-name="Times New Roman" style:font-name-asian="GPAFJ+Aptos" style:font-name-complex="Times New Roman" fo:color="#000000" fo:font-size="12pt" style:font-size-asian="12pt" style:font-size-complex="12pt"/>
    </style:style>
    <style:style style:name="T3243" style:parent-style-name="Policepardéfaut" style:family="text">
      <style:text-properties style:font-name="Times New Roman" style:font-name-asian="GPAFJ+Aptos" style:font-name-complex="Times New Roman" fo:color="#000000" fo:font-size="12pt" style:font-size-asian="12pt" style:font-size-complex="12pt"/>
    </style:style>
    <style:style style:name="T324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45" style:parent-style-name="Policepardéfaut" style:family="text">
      <style:text-properties style:font-name="Times New Roman" style:font-name-asian="GPAFJ+Aptos" style:font-name-complex="Times New Roman" fo:color="#000000" fo:font-size="12pt" style:font-size-asian="12pt" style:font-size-complex="12pt"/>
    </style:style>
    <style:style style:name="T324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47" style:parent-style-name="Policepardéfaut" style:family="text">
      <style:text-properties style:font-name="Times New Roman" style:font-name-asian="GPAFJ+Aptos" style:font-name-complex="Times New Roman" fo:color="#000000" fo:font-size="12pt" style:font-size-asian="12pt" style:font-size-complex="12pt"/>
    </style:style>
    <style:style style:name="T3248"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24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50" style:parent-style-name="Policepardéfaut" style:family="text">
      <style:text-properties style:font-name="Times New Roman" style:font-name-asian="GPAFJ+Aptos" style:font-name-complex="Times New Roman" fo:color="#000000" fo:font-size="12pt" style:font-size-asian="12pt" style:font-size-complex="12pt"/>
    </style:style>
    <style:style style:name="T325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52" style:parent-style-name="Policepardéfaut" style:family="text">
      <style:text-properties style:font-name="Times New Roman" style:font-name-asian="GPAFJ+Aptos" style:font-name-complex="Times New Roman" fo:color="#000000" fo:font-size="12pt" style:font-size-asian="12pt" style:font-size-complex="12pt"/>
    </style:style>
    <style:style style:name="T3253"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254" style:parent-style-name="Policepardéfaut" style:family="text">
      <style:text-properties style:font-name="Times New Roman" style:font-name-asian="GPAFJ+Aptos" style:font-name-complex="Times New Roman" fo:color="#000000" fo:font-size="12pt" style:font-size-asian="12pt" style:font-size-complex="12pt"/>
    </style:style>
    <style:style style:name="T325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56" style:parent-style-name="Policepardéfaut" style:family="text">
      <style:text-properties style:font-name="Times New Roman" style:font-name-asian="GPAFJ+Aptos" style:font-name-complex="Times New Roman" fo:color="#000000" fo:font-size="12pt" style:font-size-asian="12pt" style:font-size-complex="12pt"/>
    </style:style>
    <style:style style:name="T3257"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258" style:parent-style-name="Policepardéfaut" style:family="text">
      <style:text-properties style:font-name="Times New Roman" style:font-name-asian="GPAFJ+Aptos" style:font-name-complex="Times New Roman" fo:color="#000000" fo:font-size="12pt" style:font-size-asian="12pt" style:font-size-complex="12pt"/>
    </style:style>
    <style:style style:name="T325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60" style:parent-style-name="Policepardéfaut" style:family="text">
      <style:text-properties style:font-name="Times New Roman" style:font-name-asian="GPAFJ+Aptos" style:font-name-complex="Times New Roman" fo:color="#000000" fo:font-size="12pt" style:font-size-asian="12pt" style:font-size-complex="12pt"/>
    </style:style>
    <style:style style:name="T326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62" style:parent-style-name="Policepardéfaut" style:family="text">
      <style:text-properties style:font-name="Times New Roman" style:font-name-asian="GPAFJ+Aptos" style:font-name-complex="Times New Roman" fo:color="#000000" fo:font-size="12pt" style:font-size-asian="12pt" style:font-size-complex="12pt"/>
    </style:style>
    <style:style style:name="T3263"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264" style:parent-style-name="Policepardéfaut" style:family="text">
      <style:text-properties style:font-name="Times New Roman" style:font-name-asian="GPAFJ+Aptos" style:font-name-complex="Times New Roman" fo:color="#000000" fo:font-size="12pt" style:font-size-asian="12pt" style:font-size-complex="12pt"/>
    </style:style>
    <style:style style:name="T326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66" style:parent-style-name="Policepardéfaut" style:family="text">
      <style:text-properties style:font-name="Times New Roman" style:font-name-asian="GPAFJ+Aptos" style:font-name-complex="Times New Roman" fo:color="#000000" fo:font-size="12pt" style:font-size-asian="12pt" style:font-size-complex="12pt"/>
    </style:style>
    <style:style style:name="T326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68" style:parent-style-name="Policepardéfaut" style:family="text">
      <style:text-properties style:font-name="Times New Roman" style:font-name-asian="GPAFJ+Aptos" style:font-name-complex="Times New Roman" fo:color="#000000" fo:font-size="12pt" style:font-size-asian="12pt" style:font-size-complex="12pt"/>
    </style:style>
    <style:style style:name="T326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70" style:parent-style-name="Policepardéfaut" style:family="text">
      <style:text-properties style:font-name="Times New Roman" style:font-name-asian="GPAFJ+Aptos" style:font-name-complex="Times New Roman" fo:color="#000000" fo:font-size="12pt" style:font-size-asian="12pt" style:font-size-complex="12pt"/>
    </style:style>
    <style:style style:name="T327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7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273" style:parent-style-name="Policepardéfaut" style:family="text">
      <style:text-properties style:font-name="Times New Roman" style:font-name-asian="GPAFJ+Aptos" style:font-name-complex="Times New Roman" fo:color="#000000" fo:font-size="12pt" style:font-size-asian="12pt" style:font-size-complex="12pt"/>
    </style:style>
    <style:style style:name="T327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275" style:parent-style-name="Policepardéfaut" style:family="text">
      <style:text-properties style:font-name="Times New Roman" style:font-name-asian="GPAFJ+Aptos" style:font-name-complex="Times New Roman" fo:color="#000000" fo:font-size="12pt" style:font-size-asian="12pt" style:font-size-complex="12pt"/>
    </style:style>
    <style:style style:name="T327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77"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278" style:parent-style-name="Policepardéfaut" style:family="text">
      <style:text-properties style:font-name="Times New Roman" style:font-name-asian="GPAFJ+Aptos" style:font-name-complex="Times New Roman" fo:color="#000000" fo:font-size="12pt" style:font-size-asian="12pt" style:font-size-complex="12pt"/>
    </style:style>
    <style:style style:name="T327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80" style:parent-style-name="Policepardéfaut" style:family="text">
      <style:text-properties style:font-name="Times New Roman" style:font-name-asian="GPAFJ+Aptos" style:font-name-complex="Times New Roman" fo:color="#000000" fo:font-size="12pt" style:font-size-asian="12pt" style:font-size-complex="12pt"/>
    </style:style>
    <style:style style:name="T328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82"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28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84" style:parent-style-name="Policepardéfaut" style:family="text">
      <style:text-properties style:font-name="Times New Roman" style:font-name-asian="GPAFJ+Aptos" style:font-name-complex="Times New Roman" fo:color="#000000" fo:font-size="12pt" style:font-size-asian="12pt" style:font-size-complex="12pt"/>
    </style:style>
    <style:style style:name="T328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286"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287" style:parent-style-name="Policepardéfaut" style:family="text">
      <style:text-properties style:font-name="Times New Roman" style:font-name-asian="GPAFJ+Aptos" style:font-name-complex="Times New Roman" fo:color="#000000" fo:font-size="12pt" style:font-size-asian="12pt" style:font-size-complex="12pt"/>
    </style:style>
    <style:style style:name="T328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28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90"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29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92" style:parent-style-name="Policepardéfaut" style:family="text">
      <style:text-properties style:font-name="Times New Roman" style:font-name-asian="GPAFJ+Aptos" style:font-name-complex="Times New Roman" fo:color="#000000" fo:font-size="12pt" style:font-size-asian="12pt" style:font-size-complex="12pt"/>
    </style:style>
    <style:style style:name="T329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29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95" style:parent-style-name="Policepardéfaut" style:family="text">
      <style:text-properties style:font-name="Times New Roman" style:font-name-asian="GPAFJ+Aptos" style:font-name-complex="Times New Roman" fo:color="#000000" fo:font-size="12pt" style:font-size-asian="12pt" style:font-size-complex="12pt"/>
    </style:style>
    <style:style style:name="T329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297" style:parent-style-name="Policepardéfaut" style:family="text">
      <style:text-properties style:font-name="Times New Roman" style:font-name-asian="GPAFJ+Aptos" style:font-name-complex="Times New Roman" fo:color="#000000" fo:font-size="12pt" style:font-size-asian="12pt" style:font-size-complex="12pt"/>
    </style:style>
    <style:style style:name="T329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29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300" style:parent-style-name="Policepardéfaut" style:family="text">
      <style:text-properties style:font-name="Times New Roman" style:font-name-asian="GPAFJ+Aptos" style:font-name-complex="Times New Roman" fo:color="#000000" fo:font-size="12pt" style:font-size-asian="12pt" style:font-size-complex="12pt"/>
    </style:style>
    <style:style style:name="T330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30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03" style:parent-style-name="Policepardéfaut" style:family="text">
      <style:text-properties style:font-name="Times New Roman" style:font-name-asian="GPAFJ+Aptos" style:font-name-complex="Times New Roman" fo:color="#000000" fo:font-size="12pt" style:font-size-asian="12pt" style:font-size-complex="12pt"/>
    </style:style>
    <style:style style:name="T330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05" style:parent-style-name="Policepardéfaut" style:family="text">
      <style:text-properties style:font-name="Times New Roman" style:font-name-asian="GPAFJ+Aptos" style:font-name-complex="Times New Roman" fo:color="#000000" fo:font-size="12pt" style:font-size-asian="12pt" style:font-size-complex="12pt"/>
    </style:style>
    <style:style style:name="T330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07" style:parent-style-name="Policepardéfaut" style:family="text">
      <style:text-properties style:font-name="Times New Roman" style:font-name-asian="GPAFJ+Aptos" style:font-name-complex="Times New Roman" fo:color="#000000" fo:font-size="12pt" style:font-size-asian="12pt" style:font-size-complex="12pt"/>
    </style:style>
    <style:style style:name="T330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30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10" style:parent-style-name="Policepardéfaut" style:family="text">
      <style:text-properties style:font-name="Times New Roman" style:font-name-asian="GPAFJ+Aptos" style:font-name-complex="Times New Roman" fo:color="#000000" fo:font-size="12pt" style:font-size-asian="12pt" style:font-size-complex="12pt"/>
    </style:style>
    <style:style style:name="T331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1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313" style:parent-style-name="Policepardéfaut" style:family="text">
      <style:text-properties style:font-name="Times New Roman" style:font-name-asian="GPAFJ+Aptos" style:font-name-complex="Times New Roman" fo:color="#000000" fo:font-size="12pt" style:font-size-asian="12pt" style:font-size-complex="12pt"/>
    </style:style>
    <style:style style:name="T331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315" style:parent-style-name="Policepardéfaut" style:family="text">
      <style:text-properties style:font-name="Times New Roman" style:font-name-asian="GPAFJ+Aptos" style:font-name-complex="Times New Roman" fo:color="#000000" fo:font-size="12pt" style:font-size-asian="12pt" style:font-size-complex="12pt"/>
    </style:style>
    <style:style style:name="T3316"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31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18"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31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32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32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322" style:parent-style-name="Policepardéfaut" style:family="text">
      <style:text-properties style:font-name="Times New Roman" style:font-name-asian="GPAFJ+Aptos" style:font-name-complex="Times New Roman" fo:color="#000000" fo:font-size="12pt" style:font-size-asian="12pt" style:font-size-complex="12pt"/>
    </style:style>
    <style:style style:name="T332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24"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32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326"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327" style:parent-style-name="Policepardéfaut" style:family="text">
      <style:text-properties style:font-name="Times New Roman" style:font-name-asian="GPAFJ+Aptos" style:font-name-complex="Times New Roman" fo:color="#000000" fo:font-size="12pt" style:font-size-asian="12pt" style:font-size-complex="12pt"/>
    </style:style>
    <style:style style:name="T332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29" style:parent-style-name="Policepardéfaut" style:family="text">
      <style:text-properties style:font-name="Times New Roman" style:font-name-asian="GPAFJ+Aptos" style:font-name-complex="Times New Roman" fo:color="#000000" fo:font-size="12pt" style:font-size-asian="12pt" style:font-size-complex="12pt"/>
    </style:style>
    <style:style style:name="T333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31" style:parent-style-name="Policepardéfaut" style:family="text">
      <style:text-properties style:font-name="Times New Roman" style:font-name-asian="GPAFJ+Aptos" style:font-name-complex="Times New Roman" fo:color="#000000" fo:font-size="12pt" style:font-size-asian="12pt" style:font-size-complex="12pt"/>
    </style:style>
    <style:style style:name="T3332"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333" style:parent-style-name="Policepardéfaut" style:family="text">
      <style:text-properties style:font-name="Times New Roman" style:font-name-asian="GPAFJ+Aptos" style:font-name-complex="Times New Roman" fo:color="#000000" fo:font-size="12pt" style:font-size-asian="12pt" style:font-size-complex="12pt"/>
    </style:style>
    <style:style style:name="T333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33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336" style:parent-style-name="Policepardéfaut" style:family="text">
      <style:text-properties style:font-name="Times New Roman" style:font-name-asian="GPAFJ+Aptos" style:font-name-complex="Times New Roman" fo:color="#000000" fo:font-size="12pt" style:font-size-asian="12pt" style:font-size-complex="12pt"/>
    </style:style>
    <style:style style:name="T333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338" style:parent-style-name="Policepardéfaut" style:family="text">
      <style:text-properties style:font-name="Times New Roman" style:font-name-asian="GPAFJ+Aptos" style:font-name-complex="Times New Roman" fo:color="#000000" fo:font-size="12pt" style:font-size-asian="12pt" style:font-size-complex="12pt"/>
    </style:style>
    <style:style style:name="T333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40" style:parent-style-name="Policepardéfaut" style:family="text">
      <style:text-properties style:font-name="Times New Roman" style:font-name-asian="GPAFJ+Aptos" style:font-name-complex="Times New Roman" fo:color="#000000" fo:font-size="12pt" style:font-size-asian="12pt" style:font-size-complex="12pt"/>
    </style:style>
    <style:style style:name="T3341"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34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4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344" style:parent-style-name="Policepardéfaut" style:family="text">
      <style:text-properties style:font-name="Times New Roman" style:font-name-asian="GPAFJ+Aptos" style:font-name-complex="Times New Roman" fo:color="#000000" fo:font-size="12pt" style:font-size-asian="12pt" style:font-size-complex="12pt"/>
    </style:style>
    <style:style style:name="T334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34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47" style:parent-style-name="Policepardéfaut" style:family="text">
      <style:text-properties style:font-name="Times New Roman" style:font-name-asian="GPAFJ+Aptos" style:font-name-complex="Times New Roman" fo:color="#000000" fo:font-size="12pt" style:font-size-asian="12pt" style:font-size-complex="12pt"/>
    </style:style>
    <style:style style:name="T334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49" style:parent-style-name="Policepardéfaut" style:family="text">
      <style:text-properties style:font-name="Times New Roman" style:font-name-asian="GPAFJ+Aptos" style:font-name-complex="Times New Roman" fo:color="#000000" fo:font-size="12pt" style:font-size-asian="12pt" style:font-size-complex="12pt"/>
    </style:style>
    <style:style style:name="T335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5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352" style:parent-style-name="Policepardéfaut" style:family="text">
      <style:text-properties style:font-name="Times New Roman" style:font-name-asian="GPAFJ+Aptos" style:font-name-complex="Times New Roman" fo:color="#000000" fo:font-size="12pt" style:font-size-asian="12pt" style:font-size-complex="12pt"/>
    </style:style>
    <style:style style:name="T335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5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35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56" style:parent-style-name="Policepardéfaut" style:family="text">
      <style:text-properties style:font-name="Times New Roman" style:font-name-asian="GPAFJ+Aptos" style:font-name-complex="Times New Roman" fo:color="#000000" fo:font-size="12pt" style:font-size-asian="12pt" style:font-size-complex="12pt"/>
    </style:style>
    <style:style style:name="T335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358"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35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6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361"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36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63" style:parent-style-name="Policepardéfaut" style:family="text">
      <style:text-properties style:font-name="Times New Roman" style:font-name-asian="GPAFJ+Aptos" style:font-name-complex="Times New Roman" fo:color="#000000" fo:font-size="12pt" style:font-size-asian="12pt" style:font-size-complex="12pt"/>
    </style:style>
    <style:style style:name="T3364"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36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36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P3367" style:parent-style-name="Normal" style:family="paragraph">
      <style:paragraph-properties fo:widows="0" fo:orphans="0" fo:text-align="justify" fo:line-height="107%" fo:margin-right="0.9493in"/>
      <style:text-properties style:font-name="Times New Roman" style:font-name-asian="GPAFJ+Aptos" style:font-name-complex="Times New Roman" fo:color="#000000" fo:font-size="12pt" style:font-size-asian="12pt" style:font-size-complex="12pt"/>
    </style:style>
    <style:style style:name="P3368" style:parent-style-name="Normal" style:family="paragraph">
      <style:paragraph-properties fo:widows="0" fo:orphans="0" fo:text-align="justify" fo:line-height="107%" fo:margin-right="0.9493in"/>
    </style:style>
    <style:style style:name="T3369" style:parent-style-name="Policepardéfaut" style:family="text">
      <style:text-properties style:font-name="Times New Roman" style:font-name-asian="GPAFJ+Aptos" style:font-name-complex="Times New Roman" fo:color="#000000" fo:font-size="12pt" style:font-size-asian="12pt" style:font-size-complex="12pt"/>
    </style:style>
    <style:style style:name="T3370" style:parent-style-name="Policepardéfaut" style:family="text">
      <style:text-properties style:font-name="Times New Roman" style:font-name-asian="GPAFJ+Aptos" style:font-name-complex="Times New Roman" fo:color="#000000" fo:font-size="12pt" style:font-size-asian="12pt" style:font-size-complex="12pt"/>
    </style:style>
    <style:style style:name="P3371" style:parent-style-name="Normal" style:family="paragraph">
      <style:paragraph-properties fo:text-align="justify" fo:line-height="0.1666in"/>
      <style:text-properties style:font-name="Times New Roman" style:font-name-complex="Times New Roman"/>
    </style:style>
    <style:style style:name="P3372" style:parent-style-name="Normal" style:family="paragraph">
      <style:paragraph-properties fo:text-align="justify" fo:line-height="0.1666in"/>
      <style:text-properties style:font-name="Times New Roman" style:font-name-complex="Times New Roman"/>
    </style:style>
    <style:style style:name="P3373" style:parent-style-name="Normal" style:family="paragraph">
      <style:paragraph-properties fo:text-align="justify" fo:margin-bottom="0.0083in" fo:line-height="0.0833in"/>
      <style:text-properties style:font-name="Times New Roman" style:font-name-complex="Times New Roman" fo:font-size="6pt" style:font-size-asian="6pt" style:font-size-complex="6pt"/>
    </style:style>
    <style:style style:name="P3374" style:parent-style-name="Normal" style:family="paragraph">
      <style:paragraph-properties fo:widows="0" fo:orphans="0" fo:text-align="justify" fo:margin-right="0.3694in"/>
    </style:style>
    <style:style style:name="T3375" style:parent-style-name="Policepardéfaut" style:family="text">
      <style:text-properties style:font-name="Times New Roman" style:font-name-asian="GPAFJ+Aptos" style:font-name-complex="Times New Roman" fo:color="#000000" fo:font-size="12pt" style:font-size-asian="12pt" style:font-size-complex="12pt"/>
    </style:style>
    <style:style style:name="T337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377" style:parent-style-name="Policepardéfaut" style:family="text">
      <style:text-properties style:font-name="Times New Roman" style:font-name-asian="GPAFJ+Aptos" style:font-name-complex="Times New Roman" fo:color="#000000" fo:font-size="12pt" style:font-size-asian="12pt" style:font-size-complex="12pt"/>
    </style:style>
    <style:style style:name="T337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79" style:parent-style-name="Policepardéfaut" style:family="text">
      <style:text-properties style:font-name="Times New Roman" style:font-name-asian="GPAFJ+Aptos" style:font-name-complex="Times New Roman" fo:color="#000000" fo:letter-spacing="-0.002in" style:text-scale="101%" fo:font-size="12pt" style:font-size-asian="12pt" style:font-size-complex="12pt"/>
    </style:style>
    <style:style style:name="T338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38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82" style:parent-style-name="Policepardéfaut" style:family="text">
      <style:text-properties style:font-name="Times New Roman" style:font-name-asian="GPAFJ+Aptos" style:font-name-complex="Times New Roman" fo:color="#000000" fo:font-size="12pt" style:font-size-asian="12pt" style:font-size-complex="12pt"/>
    </style:style>
    <style:style style:name="T338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84" style:parent-style-name="Policepardéfaut" style:family="text">
      <style:text-properties style:font-name="Times New Roman" style:font-name-asian="GPAFJ+Aptos" style:font-name-complex="Times New Roman" fo:color="#000000" fo:font-size="12pt" style:font-size-asian="12pt" style:font-size-complex="12pt"/>
    </style:style>
    <style:style style:name="T338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38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8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388" style:parent-style-name="Policepardéfaut" style:family="text">
      <style:text-properties style:font-name="Times New Roman" style:font-name-asian="GPAFJ+Aptos" style:font-name-complex="Times New Roman" fo:color="#000000" fo:font-size="12pt" style:font-size-asian="12pt" style:font-size-complex="12pt"/>
    </style:style>
    <style:style style:name="T338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39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91" style:parent-style-name="Policepardéfaut" style:family="text">
      <style:text-properties style:font-name="Times New Roman" style:font-name-asian="GPAFJ+Aptos" style:font-name-complex="Times New Roman" fo:color="#000000" fo:font-size="12pt" style:font-size-asian="12pt" style:font-size-complex="12pt"/>
    </style:style>
    <style:style style:name="T339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393"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39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9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39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397"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398" style:parent-style-name="Policepardéfaut" style:family="text">
      <style:text-properties style:font-name="Times New Roman" style:font-name-asian="GPAFJ+Aptos" style:font-name-complex="Times New Roman" fo:color="#000000" fo:font-size="12pt" style:font-size-asian="12pt" style:font-size-complex="12pt"/>
    </style:style>
    <style:style style:name="T339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400" style:parent-style-name="Policepardéfaut" style:family="text">
      <style:text-properties style:font-name="Times New Roman" style:font-name-asian="GPAFJ+Aptos" style:font-name-complex="Times New Roman" fo:color="#000000" fo:font-size="12pt" style:font-size-asian="12pt" style:font-size-complex="12pt"/>
    </style:style>
    <style:style style:name="T340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0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40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04" style:parent-style-name="Policepardéfaut" style:family="text">
      <style:text-properties style:font-name="Times New Roman" style:font-name-asian="GPAFJ+Aptos" style:font-name-complex="Times New Roman" fo:color="#000000" fo:font-size="12pt" style:font-size-asian="12pt" style:font-size-complex="12pt"/>
    </style:style>
    <style:style style:name="T340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0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407" style:parent-style-name="Policepardéfaut" style:family="text">
      <style:text-properties style:font-name="Times New Roman" style:font-name-asian="GPAFJ+Aptos" style:font-name-complex="Times New Roman" fo:color="#000000" fo:font-size="12pt" style:font-size-asian="12pt" style:font-size-complex="12pt"/>
    </style:style>
    <style:style style:name="T340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0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41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1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412" style:parent-style-name="Policepardéfaut" style:family="text">
      <style:text-properties style:font-name="Times New Roman" style:font-name-asian="GPAFJ+Aptos" style:font-name-complex="Times New Roman" fo:color="#000000" fo:font-size="12pt" style:font-size-asian="12pt" style:font-size-complex="12pt"/>
    </style:style>
    <style:style style:name="T3413"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414" style:parent-style-name="Policepardéfaut" style:family="text">
      <style:text-properties style:font-name="Times New Roman" style:font-name-asian="GPAFJ+Aptos" style:font-name-complex="Times New Roman" fo:color="#000000" fo:font-size="12pt" style:font-size-asian="12pt" style:font-size-complex="12pt"/>
    </style:style>
    <style:style style:name="T341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41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17" style:parent-style-name="Policepardéfaut" style:family="text">
      <style:text-properties style:font-name="Times New Roman" style:font-name-asian="GPAFJ+Aptos" style:font-name-complex="Times New Roman" fo:color="#000000" fo:font-size="12pt" style:font-size-asian="12pt" style:font-size-complex="12pt"/>
    </style:style>
    <style:style style:name="T3418"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41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2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42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22"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423" style:parent-style-name="Policepardéfaut" style:family="text">
      <style:text-properties style:font-name="Times New Roman" style:font-name-asian="GPAFJ+Aptos" style:font-name-complex="Times New Roman" fo:color="#000000" fo:font-size="12pt" style:font-size-asian="12pt" style:font-size-complex="12pt"/>
    </style:style>
    <style:style style:name="T342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25" style:parent-style-name="Policepardéfaut" style:family="text">
      <style:text-properties style:font-name="Times New Roman" style:font-name-asian="GPAFJ+Aptos" style:font-name-complex="Times New Roman" fo:color="#000000" fo:font-size="12pt" style:font-size-asian="12pt" style:font-size-complex="12pt"/>
    </style:style>
    <style:style style:name="T3426"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42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428" style:parent-style-name="Policepardéfaut" style:family="text">
      <style:text-properties style:font-name="Times New Roman" style:font-name-asian="GPAFJ+Aptos" style:font-name-complex="Times New Roman" fo:color="#000000" fo:font-size="12pt" style:font-size-asian="12pt" style:font-size-complex="12pt"/>
    </style:style>
    <style:style style:name="T342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430" style:parent-style-name="Policepardéfaut" style:family="text">
      <style:text-properties style:font-name="Times New Roman" style:font-name-asian="GPAFJ+Aptos" style:font-name-complex="Times New Roman" fo:color="#000000" fo:font-size="12pt" style:font-size-asian="12pt" style:font-size-complex="12pt"/>
    </style:style>
    <style:style style:name="T343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32"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433" style:parent-style-name="Policepardéfaut" style:family="text">
      <style:text-properties style:font-name="Times New Roman" style:font-name-asian="GPAFJ+Aptos" style:font-name-complex="Times New Roman" fo:color="#000000" fo:font-size="12pt" style:font-size-asian="12pt" style:font-size-complex="12pt"/>
    </style:style>
    <style:style style:name="T343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35" style:parent-style-name="Policepardéfaut" style:family="text">
      <style:text-properties style:font-name="Times New Roman" style:font-name-asian="GPAFJ+Aptos" style:font-name-complex="Times New Roman" fo:color="#000000" fo:font-size="12pt" style:font-size-asian="12pt" style:font-size-complex="12pt"/>
    </style:style>
    <style:style style:name="T3436"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437" style:parent-style-name="Policepardéfaut" style:family="text">
      <style:text-properties style:font-name="Times New Roman" style:font-name-asian="GPAFJ+Aptos" style:font-name-complex="Times New Roman" fo:color="#000000" fo:font-size="12pt" style:font-size-asian="12pt" style:font-size-complex="12pt"/>
    </style:style>
    <style:style style:name="T343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3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440" style:parent-style-name="Policepardéfaut" style:family="text">
      <style:text-properties style:font-name="Times New Roman" style:font-name-asian="GPAFJ+Aptos" style:font-name-complex="Times New Roman" fo:color="#000000" fo:font-size="12pt" style:font-size-asian="12pt" style:font-size-complex="12pt"/>
    </style:style>
    <style:style style:name="T344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42" style:parent-style-name="Policepardéfaut" style:family="text">
      <style:text-properties style:font-name="Times New Roman" style:font-name-asian="GPAFJ+Aptos" style:font-name-complex="Times New Roman" fo:color="#000000" fo:font-size="12pt" style:font-size-asian="12pt" style:font-size-complex="12pt"/>
    </style:style>
    <style:style style:name="T344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44" style:parent-style-name="Policepardéfaut" style:family="text">
      <style:text-properties style:font-name="Times New Roman" style:font-name-asian="GPAFJ+Aptos" style:font-name-complex="Times New Roman" fo:color="#000000" fo:font-size="12pt" style:font-size-asian="12pt" style:font-size-complex="12pt"/>
    </style:style>
    <style:style style:name="T344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46" style:parent-style-name="Policepardéfaut" style:family="text">
      <style:text-properties style:font-name="Times New Roman" style:font-name-asian="GPAFJ+Aptos" style:font-name-complex="Times New Roman" fo:color="#000000" fo:font-size="12pt" style:font-size-asian="12pt" style:font-size-complex="12pt"/>
    </style:style>
    <style:style style:name="T344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48" style:parent-style-name="Policepardéfaut" style:family="text">
      <style:text-properties style:font-name="Times New Roman" style:font-name-asian="GPAFJ+Aptos" style:font-name-complex="Times New Roman" fo:color="#000000" fo:font-size="12pt" style:font-size-asian="12pt" style:font-size-complex="12pt"/>
    </style:style>
    <style:style style:name="T344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45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5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45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53" style:parent-style-name="Policepardéfaut" style:family="text">
      <style:text-properties style:font-name="Times New Roman" style:font-name-asian="GPAFJ+Aptos" style:font-name-complex="Times New Roman" fo:color="#000000" fo:font-size="12pt" style:font-size-asian="12pt" style:font-size-complex="12pt"/>
    </style:style>
    <style:style style:name="T345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45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456" style:parent-style-name="Policepardéfaut" style:family="text">
      <style:text-properties style:font-name="Times New Roman" style:font-name-asian="GPAFJ+Aptos" style:font-name-complex="Times New Roman" fo:color="#000000" fo:font-size="12pt" style:font-size-asian="12pt" style:font-size-complex="12pt"/>
    </style:style>
    <style:style style:name="T345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58" style:parent-style-name="Policepardéfaut" style:family="text">
      <style:text-properties style:font-name="Times New Roman" style:font-name-asian="GPAFJ+Aptos" style:font-name-complex="Times New Roman" fo:color="#000000" fo:font-size="12pt" style:font-size-asian="12pt" style:font-size-complex="12pt"/>
    </style:style>
    <style:style style:name="T3459"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46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61"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462" style:parent-style-name="Policepardéfaut" style:family="text">
      <style:text-properties style:font-name="Times New Roman" style:font-name-asian="GPAFJ+Aptos" style:font-name-complex="Times New Roman" fo:color="#000000" fo:font-size="12pt" style:font-size-asian="12pt" style:font-size-complex="12pt"/>
    </style:style>
    <style:style style:name="T3463"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464"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46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466" style:parent-style-name="Policepardéfaut" style:family="text">
      <style:text-properties style:font-name="Times New Roman" style:font-name-asian="GPAFJ+Aptos" style:font-name-complex="Times New Roman" fo:color="#000000" fo:font-size="12pt" style:font-size-asian="12pt" style:font-size-complex="12pt"/>
    </style:style>
    <style:style style:name="T346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46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46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70" style:parent-style-name="Policepardéfaut" style:family="text">
      <style:text-properties style:font-name="Times New Roman" style:font-name-asian="GPAFJ+Aptos" style:font-name-complex="Times New Roman" fo:color="#000000" fo:font-size="12pt" style:font-size-asian="12pt" style:font-size-complex="12pt"/>
    </style:style>
    <style:style style:name="T3471"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47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47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7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475"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476" style:parent-style-name="Policepardéfaut" style:family="text">
      <style:text-properties style:font-name="Times New Roman" style:font-name-asian="GPAFJ+Aptos" style:font-name-complex="Times New Roman" fo:color="#000000" fo:font-size="12pt" style:font-size-asian="12pt" style:font-size-complex="12pt"/>
    </style:style>
    <style:style style:name="T3477"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478" style:parent-style-name="Policepardéfaut" style:family="text">
      <style:text-properties style:font-name="Times New Roman" style:font-name-asian="GPAFJ+Aptos" style:font-name-complex="Times New Roman" fo:color="#000000" fo:font-size="12pt" style:font-size-asian="12pt" style:font-size-complex="12pt"/>
    </style:style>
    <style:style style:name="T347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48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48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82" style:parent-style-name="Policepardéfaut" style:family="text">
      <style:text-properties style:font-name="Times New Roman" style:font-name-asian="GPAFJ+Aptos" style:font-name-complex="Times New Roman" fo:color="#000000" fo:font-size="12pt" style:font-size-asian="12pt" style:font-size-complex="12pt"/>
    </style:style>
    <style:style style:name="T348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8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485" style:parent-style-name="Policepardéfaut" style:family="text">
      <style:text-properties style:font-name="Times New Roman" style:font-name-asian="GPAFJ+Aptos" style:font-name-complex="Times New Roman" fo:color="#000000" fo:font-size="12pt" style:font-size-asian="12pt" style:font-size-complex="12pt"/>
    </style:style>
    <style:style style:name="T348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8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488" style:parent-style-name="Policepardéfaut" style:family="text">
      <style:text-properties style:font-name="Times New Roman" style:font-name-asian="GPAFJ+Aptos" style:font-name-complex="Times New Roman" fo:color="#000000" fo:font-size="12pt" style:font-size-asian="12pt" style:font-size-complex="12pt"/>
    </style:style>
    <style:style style:name="T348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49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91" style:parent-style-name="Policepardéfaut" style:family="text">
      <style:text-properties style:font-name="Times New Roman" style:font-name-asian="GPAFJ+Aptos" style:font-name-complex="Times New Roman" fo:color="#000000" fo:letter-spacing="-0.002in" style:text-scale="101%" fo:font-size="12pt" style:font-size-asian="12pt" style:font-size-complex="12pt"/>
    </style:style>
    <style:style style:name="T349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49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9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495"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496" style:parent-style-name="Policepardéfaut" style:family="text">
      <style:text-properties style:font-name="Times New Roman" style:font-name-asian="GPAFJ+Aptos" style:font-name-complex="Times New Roman" fo:color="#000000" fo:font-size="12pt" style:font-size-asian="12pt" style:font-size-complex="12pt"/>
    </style:style>
    <style:style style:name="T349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49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49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50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01"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50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0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504" style:parent-style-name="Policepardéfaut" style:family="text">
      <style:text-properties style:font-name="Times New Roman" style:font-name-asian="GPAFJ+Aptos" style:font-name-complex="Times New Roman" fo:color="#000000" fo:font-size="12pt" style:font-size-asian="12pt" style:font-size-complex="12pt"/>
    </style:style>
    <style:style style:name="T350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06" style:parent-style-name="Policepardéfaut" style:family="text">
      <style:text-properties style:font-name="Times New Roman" style:font-name-asian="GPAFJ+Aptos" style:font-name-complex="Times New Roman" fo:color="#000000" fo:font-size="12pt" style:font-size-asian="12pt" style:font-size-complex="12pt"/>
    </style:style>
    <style:style style:name="T350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508" style:parent-style-name="Policepardéfaut" style:family="text">
      <style:text-properties style:font-name="Times New Roman" style:font-name-asian="GPAFJ+Aptos" style:font-name-complex="Times New Roman" fo:color="#000000" fo:font-size="12pt" style:font-size-asian="12pt" style:font-size-complex="12pt"/>
    </style:style>
    <style:style style:name="T350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10" style:parent-style-name="Policepardéfaut" style:family="text">
      <style:text-properties style:font-name="Times New Roman" style:font-name-asian="GPAFJ+Aptos" style:font-name-complex="Times New Roman" fo:color="#000000" fo:font-size="12pt" style:font-size-asian="12pt" style:font-size-complex="12pt"/>
    </style:style>
    <style:style style:name="T3511"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51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13" style:parent-style-name="Policepardéfaut" style:family="text">
      <style:text-properties style:font-name="Times New Roman" style:font-name-asian="GPAFJ+Aptos" style:font-name-complex="Times New Roman" fo:color="#000000" fo:font-size="12pt" style:font-size-asian="12pt" style:font-size-complex="12pt"/>
    </style:style>
    <style:style style:name="T351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51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516"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517" style:parent-style-name="Policepardéfaut" style:family="text">
      <style:text-properties style:font-name="Times New Roman" style:font-name-asian="GPAFJ+Aptos" style:font-name-complex="Times New Roman" fo:color="#000000" fo:font-size="12pt" style:font-size-asian="12pt" style:font-size-complex="12pt"/>
    </style:style>
    <style:style style:name="T351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51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520"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521"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522" style:parent-style-name="Policepardéfaut" style:family="text">
      <style:text-properties style:font-name="Times New Roman" style:font-name-asian="GPAFJ+Aptos" style:font-name-complex="Times New Roman" fo:color="#000000" fo:font-size="12pt" style:font-size-asian="12pt" style:font-size-complex="12pt"/>
    </style:style>
    <style:style style:name="T352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52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525" style:parent-style-name="Policepardéfaut" style:family="text">
      <style:text-properties style:font-name="Times New Roman" style:font-name-asian="GPAFJ+Aptos" style:font-name-complex="Times New Roman" fo:color="#000000" fo:font-size="12pt" style:font-size-asian="12pt" style:font-size-complex="12pt"/>
    </style:style>
    <style:style style:name="T352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27" style:parent-style-name="Policepardéfaut" style:family="text">
      <style:text-properties style:font-name="Times New Roman" style:font-name-asian="GPAFJ+Aptos" style:font-name-complex="Times New Roman" fo:color="#000000" fo:font-size="12pt" style:font-size-asian="12pt" style:font-size-complex="12pt"/>
    </style:style>
    <style:style style:name="T352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29" style:parent-style-name="Policepardéfaut" style:family="text">
      <style:text-properties style:font-name="Times New Roman" style:font-name-asian="GPAFJ+Aptos" style:font-name-complex="Times New Roman" fo:color="#000000" fo:font-size="12pt" style:font-size-asian="12pt" style:font-size-complex="12pt"/>
    </style:style>
    <style:style style:name="T353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53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32" style:parent-style-name="Policepardéfaut" style:family="text">
      <style:text-properties style:font-name="Times New Roman" style:font-name-asian="GPAFJ+Aptos" style:font-name-complex="Times New Roman" fo:color="#000000" fo:font-size="12pt" style:font-size-asian="12pt" style:font-size-complex="12pt"/>
    </style:style>
    <style:style style:name="T353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3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535" style:parent-style-name="Policepardéfaut" style:family="text">
      <style:text-properties style:font-name="Times New Roman" style:font-name-asian="GPAFJ+Aptos" style:font-name-complex="Times New Roman" fo:color="#000000" fo:font-size="12pt" style:font-size-asian="12pt" style:font-size-complex="12pt"/>
    </style:style>
    <style:style style:name="T3536"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537" style:parent-style-name="Policepardéfaut" style:family="text">
      <style:text-properties style:font-name="Times New Roman" style:font-name-asian="GPAFJ+Aptos" style:font-name-complex="Times New Roman" fo:color="#000000" fo:font-size="12pt" style:font-size-asian="12pt" style:font-size-complex="12pt"/>
    </style:style>
    <style:style style:name="T3538"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53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40"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541" style:parent-style-name="Policepardéfaut" style:family="text">
      <style:text-properties style:font-name="Times New Roman" style:font-name-asian="GPAFJ+Aptos" style:font-name-complex="Times New Roman" fo:color="#000000" fo:font-size="12pt" style:font-size-asian="12pt" style:font-size-complex="12pt"/>
    </style:style>
    <style:style style:name="T354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54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44" style:parent-style-name="Policepardéfaut" style:family="text">
      <style:text-properties style:font-name="Times New Roman" style:font-name-asian="GPAFJ+Aptos" style:font-name-complex="Times New Roman" fo:color="#000000" fo:font-size="12pt" style:font-size-asian="12pt" style:font-size-complex="12pt"/>
    </style:style>
    <style:style style:name="T354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546"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547" style:parent-style-name="Policepardéfaut" style:family="text">
      <style:text-properties style:font-name="Times New Roman" style:font-name-asian="GPAFJ+Aptos" style:font-name-complex="Times New Roman" fo:color="#000000" fo:font-size="12pt" style:font-size-asian="12pt" style:font-size-complex="12pt"/>
    </style:style>
    <style:style style:name="T354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49"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550"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551"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552" style:parent-style-name="Policepardéfaut" style:family="text">
      <style:text-properties style:font-name="Times New Roman" style:font-name-asian="GPAFJ+Aptos" style:font-name-complex="Times New Roman" fo:color="#000000" fo:font-size="12pt" style:font-size-asian="12pt" style:font-size-complex="12pt"/>
    </style:style>
    <style:style style:name="T3553"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554" style:parent-style-name="Policepardéfaut" style:family="text">
      <style:text-properties style:font-name="Times New Roman" style:font-name-asian="GPAFJ+Aptos" style:font-name-complex="Times New Roman" fo:color="#000000" fo:font-size="12pt" style:font-size-asian="12pt" style:font-size-complex="12pt"/>
    </style:style>
    <style:style style:name="T355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56" style:parent-style-name="Policepardéfaut" style:family="text">
      <style:text-properties style:font-name="Times New Roman" style:font-name-asian="GPAFJ+Aptos" style:font-name-complex="Times New Roman" fo:color="#000000" fo:font-size="12pt" style:font-size-asian="12pt" style:font-size-complex="12pt"/>
    </style:style>
    <style:style style:name="T355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55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59" style:parent-style-name="Policepardéfaut" style:family="text">
      <style:text-properties style:font-name="Times New Roman" style:font-name-asian="GPAFJ+Aptos" style:font-name-complex="Times New Roman" fo:color="#000000" fo:font-size="12pt" style:font-size-asian="12pt" style:font-size-complex="12pt"/>
    </style:style>
    <style:style style:name="T356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56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62" style:parent-style-name="Policepardéfaut" style:family="text">
      <style:text-properties style:font-name="Times New Roman" style:font-name-asian="GPAFJ+Aptos" style:font-name-complex="Times New Roman" fo:color="#000000" fo:letter-spacing="-0.002in" style:text-scale="101%" fo:font-size="12pt" style:font-size-asian="12pt" style:font-size-complex="12pt"/>
    </style:style>
    <style:style style:name="T3563" style:parent-style-name="Policepardéfaut" style:family="text">
      <style:text-properties style:font-name="Times New Roman" style:font-name-asian="GPAFJ+Aptos" style:font-name-complex="Times New Roman" fo:color="#000000" fo:font-size="12pt" style:font-size-asian="12pt" style:font-size-complex="12pt"/>
    </style:style>
    <style:style style:name="T356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65" style:parent-style-name="Policepardéfaut" style:family="text">
      <style:text-properties style:font-name="Times New Roman" style:font-name-asian="GPAFJ+Aptos" style:font-name-complex="Times New Roman" fo:color="#000000" fo:font-size="12pt" style:font-size-asian="12pt" style:font-size-complex="12pt"/>
    </style:style>
    <style:style style:name="T356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567" style:parent-style-name="Policepardéfaut" style:family="text">
      <style:text-properties style:font-name="Times New Roman" style:font-name-asian="GPAFJ+Aptos" style:font-name-complex="Times New Roman" fo:color="#000000" fo:font-size="12pt" style:font-size-asian="12pt" style:font-size-complex="12pt"/>
    </style:style>
    <style:style style:name="T356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56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70"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571" style:parent-style-name="Policepardéfaut" style:family="text">
      <style:text-properties style:font-name="Times New Roman" style:font-name-asian="GPAFJ+Aptos" style:font-name-complex="Times New Roman" fo:color="#000000" fo:font-size="12pt" style:font-size-asian="12pt" style:font-size-complex="12pt"/>
    </style:style>
    <style:style style:name="T357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7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57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75" style:parent-style-name="Policepardéfaut" style:family="text">
      <style:text-properties style:font-name="Times New Roman" style:font-name-asian="GPAFJ+Aptos" style:font-name-complex="Times New Roman" fo:color="#000000" fo:font-size="12pt" style:font-size-asian="12pt" style:font-size-complex="12pt"/>
    </style:style>
    <style:style style:name="T357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77" style:parent-style-name="Policepardéfaut" style:family="text">
      <style:text-properties style:font-name="Times New Roman" style:font-name-asian="GPAFJ+Aptos" style:font-name-complex="Times New Roman" fo:color="#000000" fo:font-size="12pt" style:font-size-asian="12pt" style:font-size-complex="12pt"/>
    </style:style>
    <style:style style:name="T357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579"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580" style:parent-style-name="Policepardéfaut" style:family="text">
      <style:text-properties style:font-name="Times New Roman" style:font-name-asian="GPAFJ+Aptos" style:font-name-complex="Times New Roman" fo:color="#000000" fo:letter-spacing="0.002in" style:text-scale="101%" fo:font-size="12pt" style:font-size-asian="12pt" style:font-size-complex="12pt"/>
    </style:style>
    <style:style style:name="T3581" style:parent-style-name="Policepardéfaut" style:family="text">
      <style:text-properties style:font-name="Times New Roman" style:font-name-asian="GPAFJ+Aptos" style:font-name-complex="Times New Roman" fo:color="#000000" fo:font-size="12pt" style:font-size-asian="12pt" style:font-size-complex="12pt"/>
    </style:style>
    <style:style style:name="T358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83" style:parent-style-name="Policepardéfaut" style:family="text">
      <style:text-properties style:font-name="Times New Roman" style:font-name-asian="GPAFJ+Aptos" style:font-name-complex="Times New Roman" fo:color="#000000" fo:font-size="12pt" style:font-size-asian="12pt" style:font-size-complex="12pt"/>
    </style:style>
    <style:style style:name="T358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85"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58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87" style:parent-style-name="Policepardéfaut" style:family="text">
      <style:text-properties style:font-name="Times New Roman" style:font-name-asian="GPAFJ+Aptos" style:font-name-complex="Times New Roman" fo:color="#000000" fo:letter-spacing="-0.002in" fo:font-size="12pt" style:font-size-asian="12pt" style:font-size-complex="12pt"/>
    </style:style>
    <style:style style:name="T358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89" style:parent-style-name="Policepardéfaut" style:family="text">
      <style:text-properties style:font-name="Times New Roman" style:font-name-asian="GPAFJ+Aptos" style:font-name-complex="Times New Roman" fo:color="#000000" fo:font-size="12pt" style:font-size-asian="12pt" style:font-size-complex="12pt"/>
    </style:style>
    <style:style style:name="T3590"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591" style:parent-style-name="Policepardéfaut" style:family="text">
      <style:text-properties style:font-name="Times New Roman" style:font-name-asian="GPAFJ+Aptos" style:font-name-complex="Times New Roman" fo:color="#000000" fo:font-size="12pt" style:font-size-asian="12pt" style:font-size-complex="12pt"/>
    </style:style>
    <style:style style:name="T3592"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59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594"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59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59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P3597" style:parent-style-name="Normal" style:family="paragraph">
      <style:text-properties style:font-name="Times New Roman" style:font-name-asian="Times New Roman" style:font-name-complex="Times New Roman" fo:font-size="12pt" style:font-size-asian="12pt" style:font-size-complex="12pt"/>
    </style:style>
    <style:style style:name="P3598" style:parent-style-name="Titre1" style:list-style-name="LFO18" style:family="paragraph">
      <style:paragraph-properties fo:text-align="justify"/>
      <style:text-properties style:font-name-asian="Times New Roman"/>
    </style:style>
    <style:style style:name="P3599" style:parent-style-name="Normal" style:family="paragraph">
      <style:paragraph-properties fo:widows="0" fo:orphans="0" fo:text-align="justify" fo:line-height="100%" fo:margin-right="-0.0138in"/>
      <style:text-properties style:font-name="Times New Roman" style:font-name-asian="GPAFJ+Aptos" style:font-name-complex="Times New Roman" fo:color="#000000" style:text-scale="101%"/>
    </style:style>
    <style:style style:name="P3600" style:parent-style-name="Normal" style:family="paragraph">
      <style:paragraph-properties fo:widows="0" fo:orphans="0" fo:text-align="justify" fo:line-height="100%" fo:margin-right="-0.0138in"/>
      <style:text-properties style:font-name="Times New Roman" style:font-name-asian="GPAFJ+Aptos" style:font-name-complex="Times New Roman" fo:color="#000000" style:text-scale="101%"/>
    </style:style>
    <style:style style:name="P3601" style:parent-style-name="Normal" style:family="paragraph">
      <style:paragraph-properties fo:widows="0" fo:orphans="0" fo:text-align="justify" fo:line-height="100%" fo:margin-right="-0.0138in"/>
      <style:text-properties style:font-name="Times New Roman" style:font-name-asian="GPAFJ+Aptos" style:font-name-complex="Times New Roman" fo:color="#000000" style:text-scale="101%"/>
    </style:style>
    <style:style style:name="P3602" style:parent-style-name="Normal" style:family="paragraph">
      <style:paragraph-properties fo:widows="0" fo:orphans="0" fo:text-align="justify" fo:line-height="100%" fo:margin-right="-0.0138in"/>
      <style:text-properties style:font-name="Times New Roman" style:font-name-asian="GPAFJ+Aptos" style:font-name-complex="Times New Roman" fo:color="#000000" style:text-scale="101%"/>
    </style:style>
    <style:style style:name="P3603" style:parent-style-name="Normal" style:family="paragraph">
      <style:paragraph-properties fo:widows="0" fo:orphans="0" fo:text-align="justify" fo:line-height="100%" fo:margin-right="-0.0138in"/>
      <style:text-properties style:font-name="Times New Roman" style:font-name-asian="GPAFJ+Aptos" style:font-name-complex="Times New Roman" fo:color="#000000" style:text-scale="101%"/>
    </style:style>
    <style:style style:name="P3604" style:parent-style-name="Normal" style:family="paragraph">
      <style:paragraph-properties fo:text-align="justify" fo:margin-bottom="0.0013in" fo:line-height="0.125in"/>
      <style:text-properties style:font-name="Times New Roman" style:font-name-complex="Times New Roman" fo:font-size="9pt" style:font-size-asian="9pt" style:font-size-complex="9pt"/>
    </style:style>
    <style:style style:name="P3605" style:parent-style-name="Normal" style:family="paragraph">
      <style:paragraph-properties fo:widows="0" fo:orphans="0" fo:text-align="justify" fo:line-height="107%" fo:margin-right="0.3659in"/>
    </style:style>
    <style:style style:name="T3606" style:parent-style-name="Policepardéfaut" style:family="text">
      <style:text-properties style:font-name="Times New Roman" style:font-name-asian="GPAFJ+Aptos" style:font-name-complex="Times New Roman" fo:color="#000000"/>
    </style:style>
    <style:style style:name="T3607" style:parent-style-name="Policepardéfaut" style:family="text">
      <style:text-properties style:font-name="Times New Roman" style:font-name-asian="GPAFJ+Aptos" style:font-name-complex="Times New Roman" fo:color="#000000" style:text-scale="101%"/>
    </style:style>
    <style:style style:name="T3608" style:parent-style-name="Policepardéfaut" style:family="text">
      <style:text-properties style:font-name="Times New Roman" style:font-name-asian="GPAFJ+Aptos" style:font-name-complex="Times New Roman" fo:color="#000000"/>
    </style:style>
    <style:style style:name="T3609" style:parent-style-name="Policepardéfaut" style:family="text">
      <style:text-properties style:font-name="Times New Roman" style:font-name-asian="GPAFJ+Aptos" style:font-name-complex="Times New Roman" fo:color="#000000" style:text-scale="101%"/>
    </style:style>
    <style:style style:name="T3610" style:parent-style-name="Policepardéfaut" style:family="text">
      <style:text-properties style:font-name="Times New Roman" style:font-name-asian="GPAFJ+Aptos" style:font-name-complex="Times New Roman" fo:color="#000000" fo:letter-spacing="-0.0013in" style:text-scale="101%"/>
    </style:style>
    <style:style style:name="T3611" style:parent-style-name="Policepardéfaut" style:family="text">
      <style:text-properties style:font-name="Times New Roman" style:font-name-asian="GPAFJ+Aptos" style:font-name-complex="Times New Roman" fo:color="#000000"/>
    </style:style>
    <style:style style:name="T3612" style:parent-style-name="Policepardéfaut" style:family="text">
      <style:text-properties style:font-name="Times New Roman" style:font-name-asian="GPAFJ+Aptos" style:font-name-complex="Times New Roman" fo:color="#000000" fo:letter-spacing="-0.0006in"/>
    </style:style>
    <style:style style:name="T3613" style:parent-style-name="Policepardéfaut" style:family="text">
      <style:text-properties style:font-name="Times New Roman" style:font-name-asian="GPAFJ+Aptos" style:font-name-complex="Times New Roman" fo:color="#000000" fo:letter-spacing="-0.0006in" style:text-scale="101%"/>
    </style:style>
    <style:style style:name="T3614" style:parent-style-name="Policepardéfaut" style:family="text">
      <style:text-properties style:font-name="Times New Roman" style:font-name-asian="GPAFJ+Aptos" style:font-name-complex="Times New Roman" fo:color="#000000" fo:letter-spacing="0.0006in"/>
    </style:style>
    <style:style style:name="T3615" style:parent-style-name="Policepardéfaut" style:family="text">
      <style:text-properties style:font-name="Times New Roman" style:font-name-asian="GPAFJ+Aptos" style:font-name-complex="Times New Roman" fo:color="#000000"/>
    </style:style>
    <style:style style:name="T3616" style:parent-style-name="Policepardéfaut" style:family="text">
      <style:text-properties style:font-name="Times New Roman" style:font-name-asian="GPAFJ+Aptos" style:font-name-complex="Times New Roman" fo:color="#000000" fo:letter-spacing="-0.0006in"/>
    </style:style>
    <style:style style:name="T3617" style:parent-style-name="Policepardéfaut" style:family="text">
      <style:text-properties style:font-name="Times New Roman" style:font-name-asian="GPAFJ+Aptos" style:font-name-complex="Times New Roman" fo:color="#000000" fo:letter-spacing="-0.0006in" style:text-scale="101%"/>
    </style:style>
    <style:style style:name="T3618" style:parent-style-name="Policepardéfaut" style:family="text">
      <style:text-properties style:font-name="Times New Roman" style:font-name-asian="GPAFJ+Aptos" style:font-name-complex="Times New Roman" fo:color="#000000"/>
    </style:style>
    <style:style style:name="T3619" style:parent-style-name="Policepardéfaut" style:family="text">
      <style:text-properties style:font-name="Times New Roman" style:font-name-asian="GPAFJ+Aptos" style:font-name-complex="Times New Roman" fo:color="#000000" fo:letter-spacing="-0.0006in"/>
    </style:style>
    <style:style style:name="T3620" style:parent-style-name="Policepardéfaut" style:family="text">
      <style:text-properties style:font-name="Times New Roman" style:font-name-asian="GPAFJ+Aptos" style:font-name-complex="Times New Roman" fo:color="#000000" fo:letter-spacing="0.0006in" style:text-scale="101%"/>
    </style:style>
    <style:style style:name="T3621" style:parent-style-name="Policepardéfaut" style:family="text">
      <style:text-properties style:font-name="Times New Roman" style:font-name-asian="GPAFJ+Aptos" style:font-name-complex="Times New Roman" fo:color="#000000" fo:letter-spacing="-0.0006in"/>
    </style:style>
    <style:style style:name="T3622" style:parent-style-name="Policepardéfaut" style:family="text">
      <style:text-properties style:font-name="Times New Roman" style:font-name-asian="GPAFJ+Aptos" style:font-name-complex="Times New Roman" fo:color="#000000"/>
    </style:style>
    <style:style style:name="T3623" style:parent-style-name="Policepardéfaut" style:family="text">
      <style:text-properties style:font-name="Times New Roman" style:font-name-asian="GPAFJ+Aptos" style:font-name-complex="Times New Roman" fo:color="#000000" style:text-scale="101%"/>
    </style:style>
    <style:style style:name="T3624" style:parent-style-name="Policepardéfaut" style:family="text">
      <style:text-properties style:font-name="Times New Roman" style:font-name-asian="GPAFJ+Aptos" style:font-name-complex="Times New Roman" fo:color="#000000" fo:letter-spacing="-0.0006in" style:text-scale="101%"/>
    </style:style>
    <style:style style:name="T3625" style:parent-style-name="Policepardéfaut" style:family="text">
      <style:text-properties style:font-name="Times New Roman" style:font-name-asian="GPAFJ+Aptos" style:font-name-complex="Times New Roman" fo:color="#000000" style:text-scale="101%"/>
    </style:style>
    <style:style style:name="T3626" style:parent-style-name="Policepardéfaut" style:family="text">
      <style:text-properties style:font-name="Times New Roman" style:font-name-asian="GPAFJ+Aptos" style:font-name-complex="Times New Roman" fo:color="#000000"/>
    </style:style>
    <style:style style:name="T3627" style:parent-style-name="Policepardéfaut" style:family="text">
      <style:text-properties style:font-name="Times New Roman" style:font-name-asian="GPAFJ+Aptos" style:font-name-complex="Times New Roman" fo:color="#000000" fo:letter-spacing="-0.0013in" style:text-scale="101%"/>
    </style:style>
    <style:style style:name="T3628" style:parent-style-name="Policepardéfaut" style:family="text">
      <style:text-properties style:font-name="Times New Roman" style:font-name-asian="GPAFJ+Aptos" style:font-name-complex="Times New Roman" fo:color="#000000"/>
    </style:style>
    <style:style style:name="T3629" style:parent-style-name="Policepardéfaut" style:family="text">
      <style:text-properties style:font-name="Times New Roman" style:font-name-asian="GPAFJ+Aptos" style:font-name-complex="Times New Roman" fo:color="#000000" fo:letter-spacing="-0.0006in"/>
    </style:style>
    <style:style style:name="T3630" style:parent-style-name="Policepardéfaut" style:family="text">
      <style:text-properties style:font-name="Times New Roman" style:font-name-asian="GPAFJ+Aptos" style:font-name-complex="Times New Roman" fo:color="#000000"/>
    </style:style>
    <style:style style:name="T3631" style:parent-style-name="Policepardéfaut" style:family="text">
      <style:text-properties style:font-name="Times New Roman" style:font-name-asian="GPAFJ+Aptos" style:font-name-complex="Times New Roman" fo:color="#000000" fo:letter-spacing="0.0006in"/>
    </style:style>
    <style:style style:name="T3632" style:parent-style-name="Policepardéfaut" style:family="text">
      <style:text-properties style:font-name="Times New Roman" style:font-name-asian="GPAFJ+Aptos" style:font-name-complex="Times New Roman" fo:color="#000000"/>
    </style:style>
    <style:style style:name="T3633" style:parent-style-name="Policepardéfaut" style:family="text">
      <style:text-properties style:font-name="Times New Roman" style:font-name-asian="GPAFJ+Aptos" style:font-name-complex="Times New Roman" fo:color="#000000" fo:letter-spacing="-0.0013in" style:text-scale="101%"/>
    </style:style>
    <style:style style:name="T3634" style:parent-style-name="Policepardéfaut" style:family="text">
      <style:text-properties style:font-name="Times New Roman" style:font-name-asian="GPAFJ+Aptos" style:font-name-complex="Times New Roman" fo:color="#000000" style:text-scale="101%"/>
    </style:style>
    <style:style style:name="T3635" style:parent-style-name="Policepardéfaut" style:family="text">
      <style:text-properties style:font-name="Times New Roman" style:font-name-asian="GPAFJ+Aptos" style:font-name-complex="Times New Roman" fo:color="#000000" fo:letter-spacing="-0.0006in"/>
    </style:style>
    <style:style style:name="T3636" style:parent-style-name="Policepardéfaut" style:family="text">
      <style:text-properties style:font-name="Times New Roman" style:font-name-asian="GPAFJ+Aptos" style:font-name-complex="Times New Roman" fo:color="#000000"/>
    </style:style>
    <style:style style:name="T3637" style:parent-style-name="Policepardéfaut" style:family="text">
      <style:text-properties style:font-name="Times New Roman" style:font-name-asian="GPAFJ+Aptos" style:font-name-complex="Times New Roman" fo:color="#000000" fo:letter-spacing="-0.0006in"/>
    </style:style>
    <style:style style:name="T3638" style:parent-style-name="Policepardéfaut" style:family="text">
      <style:text-properties style:font-name="Times New Roman" style:font-name-asian="GPAFJ+Aptos" style:font-name-complex="Times New Roman" fo:color="#000000" fo:letter-spacing="-0.0006in" style:text-scale="101%"/>
    </style:style>
    <style:style style:name="T3639" style:parent-style-name="Policepardéfaut" style:family="text">
      <style:text-properties style:font-name="Times New Roman" style:font-name-asian="GPAFJ+Aptos" style:font-name-complex="Times New Roman" fo:color="#000000" style:text-scale="101%"/>
    </style:style>
    <style:style style:name="T3640" style:parent-style-name="Policepardéfaut" style:family="text">
      <style:text-properties style:font-name="Times New Roman" style:font-name-asian="GPAFJ+Aptos" style:font-name-complex="Times New Roman" fo:color="#000000" fo:letter-spacing="-0.0006in"/>
    </style:style>
    <style:style style:name="T3641" style:parent-style-name="Policepardéfaut" style:family="text">
      <style:text-properties style:font-name="Times New Roman" style:font-name-asian="GPAFJ+Aptos" style:font-name-complex="Times New Roman" fo:color="#000000" style:text-scale="101%"/>
    </style:style>
    <style:style style:name="T3642" style:parent-style-name="Policepardéfaut" style:family="text">
      <style:text-properties style:font-name="Times New Roman" style:font-name-asian="GPAFJ+Aptos" style:font-name-complex="Times New Roman" fo:color="#000000" fo:letter-spacing="-0.0006in" style:text-scale="101%"/>
    </style:style>
    <style:style style:name="T3643" style:parent-style-name="Policepardéfaut" style:family="text">
      <style:text-properties style:font-name="Times New Roman" style:font-name-asian="GPAFJ+Aptos" style:font-name-complex="Times New Roman" fo:color="#000000"/>
    </style:style>
    <style:style style:name="T3644" style:parent-style-name="Policepardéfaut" style:family="text">
      <style:text-properties style:font-name="Times New Roman" style:font-name-asian="GPAFJ+Aptos" style:font-name-complex="Times New Roman" fo:color="#000000" fo:letter-spacing="-0.0013in" style:text-scale="101%"/>
    </style:style>
    <style:style style:name="T3645" style:parent-style-name="Policepardéfaut" style:family="text">
      <style:text-properties style:font-name="Times New Roman" style:font-name-asian="GPAFJ+Aptos" style:font-name-complex="Times New Roman" fo:color="#000000" style:text-scale="101%"/>
    </style:style>
    <style:style style:name="T3646" style:parent-style-name="Policepardéfaut" style:family="text">
      <style:text-properties style:font-name="Times New Roman" style:font-name-asian="GPAFJ+Aptos" style:font-name-complex="Times New Roman" fo:color="#000000" fo:letter-spacing="0.0006in"/>
    </style:style>
    <style:style style:name="T3647" style:parent-style-name="Policepardéfaut" style:family="text">
      <style:text-properties style:font-name="Times New Roman" style:font-name-asian="GPAFJ+Aptos" style:font-name-complex="Times New Roman" fo:color="#000000" fo:letter-spacing="-0.0006in" style:text-scale="101%"/>
    </style:style>
    <style:style style:name="T3648" style:parent-style-name="Policepardéfaut" style:family="text">
      <style:text-properties style:font-name="Times New Roman" style:font-name-asian="GPAFJ+Aptos" style:font-name-complex="Times New Roman" fo:color="#000000" fo:letter-spacing="-0.0006in"/>
    </style:style>
    <style:style style:name="T3649" style:parent-style-name="Policepardéfaut" style:family="text">
      <style:text-properties style:font-name="Times New Roman" style:font-name-asian="GPAFJ+Aptos" style:font-name-complex="Times New Roman" fo:color="#000000"/>
    </style:style>
    <style:style style:name="T3650" style:parent-style-name="Policepardéfaut" style:family="text">
      <style:text-properties style:font-name="Times New Roman" style:font-name-asian="GPAFJ+Aptos" style:font-name-complex="Times New Roman" fo:color="#000000" style:text-scale="101%"/>
    </style:style>
    <style:style style:name="T3651" style:parent-style-name="Policepardéfaut" style:family="text">
      <style:text-properties style:font-name="Times New Roman" style:font-name-asian="GPAFJ+Aptos" style:font-name-complex="Times New Roman" fo:color="#000000"/>
    </style:style>
    <style:style style:name="T3652" style:parent-style-name="Policepardéfaut" style:family="text">
      <style:text-properties style:font-name="Times New Roman" style:font-name-asian="GPAFJ+Aptos" style:font-name-complex="Times New Roman" fo:color="#000000" fo:letter-spacing="0.0041in"/>
    </style:style>
    <style:style style:name="T3653" style:parent-style-name="Policepardéfaut" style:family="text">
      <style:text-properties style:font-name="Times New Roman" style:font-name-asian="GPAFJ+Aptos" style:font-name-complex="Times New Roman" fo:color="#000000" style:text-scale="101%"/>
    </style:style>
    <style:style style:name="T3654" style:parent-style-name="Policepardéfaut" style:family="text">
      <style:text-properties style:font-name="Times New Roman" style:font-name-asian="GPAFJ+Aptos" style:font-name-complex="Times New Roman" fo:color="#000000"/>
    </style:style>
    <style:style style:name="T3655" style:parent-style-name="Policepardéfaut" style:family="text">
      <style:text-properties style:font-name="Times New Roman" style:font-name-asian="GPAFJ+Aptos" style:font-name-complex="Times New Roman" fo:color="#000000" fo:letter-spacing="-0.0013in" style:text-scale="101%"/>
    </style:style>
    <style:style style:name="T3656" style:parent-style-name="Policepardéfaut" style:family="text">
      <style:text-properties style:font-name="Times New Roman" style:font-name-asian="GPAFJ+Aptos" style:font-name-complex="Times New Roman" fo:color="#000000"/>
    </style:style>
    <style:style style:name="T3657" style:parent-style-name="Policepardéfaut" style:family="text">
      <style:text-properties style:font-name="Times New Roman" style:font-name-asian="GPAFJ+Aptos" style:font-name-complex="Times New Roman" fo:color="#000000" fo:letter-spacing="-0.0013in" style:text-scale="101%"/>
    </style:style>
    <style:style style:name="T3658" style:parent-style-name="Policepardéfaut" style:family="text">
      <style:text-properties style:font-name="Times New Roman" style:font-name-asian="GPAFJ+Aptos" style:font-name-complex="Times New Roman" fo:color="#000000" style:text-scale="101%"/>
    </style:style>
    <style:style style:name="T3659" style:parent-style-name="Policepardéfaut" style:family="text">
      <style:text-properties style:font-name="Times New Roman" style:font-name-asian="GPAFJ+Aptos" style:font-name-complex="Times New Roman" fo:color="#000000" fo:letter-spacing="-0.0006in"/>
    </style:style>
    <style:style style:name="T3660" style:parent-style-name="Policepardéfaut" style:family="text">
      <style:text-properties style:font-name="Times New Roman" style:font-name-asian="GPAFJ+Aptos" style:font-name-complex="Times New Roman" fo:color="#000000" style:text-scale="101%"/>
    </style:style>
    <style:style style:name="T3661" style:parent-style-name="Policepardéfaut" style:family="text">
      <style:text-properties style:font-name="Times New Roman" style:font-name-asian="GPAFJ+Aptos" style:font-name-complex="Times New Roman" fo:color="#000000"/>
    </style:style>
    <style:style style:name="T3662" style:parent-style-name="Policepardéfaut" style:family="text">
      <style:text-properties style:font-name="Times New Roman" style:font-name-asian="GPAFJ+Aptos" style:font-name-complex="Times New Roman" fo:color="#000000" fo:letter-spacing="-0.0013in"/>
    </style:style>
    <style:style style:name="T3663" style:parent-style-name="Policepardéfaut" style:family="text">
      <style:text-properties style:font-name="Times New Roman" style:font-name-asian="GPAFJ+Aptos" style:font-name-complex="Times New Roman" fo:color="#000000"/>
    </style:style>
    <style:style style:name="T3664" style:parent-style-name="Policepardéfaut" style:family="text">
      <style:text-properties style:font-name="Times New Roman" style:font-name-asian="GPAFJ+Aptos" style:font-name-complex="Times New Roman" fo:color="#000000" fo:letter-spacing="0.0006in"/>
    </style:style>
    <style:style style:name="T3665" style:parent-style-name="Policepardéfaut" style:family="text">
      <style:text-properties style:font-name="Times New Roman" style:font-name-asian="GPAFJ+Aptos" style:font-name-complex="Times New Roman" fo:color="#000000"/>
    </style:style>
    <style:style style:name="T3666" style:parent-style-name="Policepardéfaut" style:family="text">
      <style:text-properties style:font-name="Times New Roman" style:font-name-asian="GPAFJ+Aptos" style:font-name-complex="Times New Roman" fo:color="#000000" style:text-scale="101%"/>
    </style:style>
    <style:style style:name="T3667" style:parent-style-name="Policepardéfaut" style:family="text">
      <style:text-properties style:font-name="Times New Roman" style:font-name-asian="GPAFJ+Aptos" style:font-name-complex="Times New Roman" fo:color="#000000"/>
    </style:style>
    <style:style style:name="T3668" style:parent-style-name="Policepardéfaut" style:family="text">
      <style:text-properties style:font-name="Times New Roman" style:font-name-asian="GPAFJ+Aptos" style:font-name-complex="Times New Roman" fo:color="#000000"/>
    </style:style>
    <style:style style:name="T3669" style:parent-style-name="Policepardéfaut" style:family="text">
      <style:text-properties style:font-name="Times New Roman" style:font-name-asian="GPAFJ+Aptos" style:font-name-complex="Times New Roman" fo:color="#000000"/>
    </style:style>
    <style:style style:name="T3670" style:parent-style-name="Policepardéfaut" style:family="text">
      <style:text-properties style:font-name="Times New Roman" style:font-name-asian="GPAFJ+Aptos" style:font-name-complex="Times New Roman" fo:color="#000000" fo:letter-spacing="-0.0006in" style:text-scale="101%"/>
    </style:style>
    <style:style style:name="T3671" style:parent-style-name="Policepardéfaut" style:family="text">
      <style:text-properties style:font-name="Times New Roman" style:font-name-asian="GPAFJ+Aptos" style:font-name-complex="Times New Roman" fo:color="#000000" fo:letter-spacing="-0.0006in"/>
    </style:style>
    <style:style style:name="T3672" style:parent-style-name="Policepardéfaut" style:family="text">
      <style:text-properties style:font-name="Times New Roman" style:font-name-asian="GPAFJ+Aptos" style:font-name-complex="Times New Roman" fo:color="#000000" fo:letter-spacing="0.0006in"/>
    </style:style>
    <style:style style:name="T3673" style:parent-style-name="Policepardéfaut" style:family="text">
      <style:text-properties style:font-name="Times New Roman" style:font-name-asian="GPAFJ+Aptos" style:font-name-complex="Times New Roman" fo:color="#000000"/>
    </style:style>
    <style:style style:name="T3674" style:parent-style-name="Policepardéfaut" style:family="text">
      <style:text-properties style:font-name="Times New Roman" style:font-name-asian="GPAFJ+Aptos" style:font-name-complex="Times New Roman" fo:color="#000000" style:text-scale="101%"/>
    </style:style>
    <style:style style:name="T3675" style:parent-style-name="Policepardéfaut" style:family="text">
      <style:text-properties style:font-name="Times New Roman" style:font-name-asian="GPAFJ+Aptos" style:font-name-complex="Times New Roman" fo:color="#000000" fo:letter-spacing="-0.0006in"/>
    </style:style>
    <style:style style:name="T3676" style:parent-style-name="Policepardéfaut" style:family="text">
      <style:text-properties style:font-name="Times New Roman" style:font-name-asian="GPAFJ+Aptos" style:font-name-complex="Times New Roman" fo:color="#000000"/>
    </style:style>
    <style:style style:name="T3677" style:parent-style-name="Policepardéfaut" style:family="text">
      <style:text-properties style:font-name="Times New Roman" style:font-name-asian="GPAFJ+Aptos" style:font-name-complex="Times New Roman" fo:color="#000000" fo:letter-spacing="-0.0006in" style:text-scale="101%"/>
    </style:style>
    <style:style style:name="T3678" style:parent-style-name="Policepardéfaut" style:family="text">
      <style:text-properties style:font-name="Times New Roman" style:font-name-asian="GPAFJ+Aptos" style:font-name-complex="Times New Roman" fo:color="#000000" fo:letter-spacing="-0.0006in"/>
    </style:style>
    <style:style style:name="T3679" style:parent-style-name="Policepardéfaut" style:family="text">
      <style:text-properties style:font-name="Times New Roman" style:font-name-asian="GPAFJ+Aptos" style:font-name-complex="Times New Roman" fo:color="#000000"/>
    </style:style>
    <style:style style:name="T3680" style:parent-style-name="Policepardéfaut" style:family="text">
      <style:text-properties style:font-name="Times New Roman" style:font-name-asian="GPAFJ+Aptos" style:font-name-complex="Times New Roman" fo:color="#000000" style:text-scale="101%"/>
    </style:style>
    <style:style style:name="T3681" style:parent-style-name="Policepardéfaut" style:family="text">
      <style:text-properties style:font-name="Times New Roman" style:font-name-asian="GPAFJ+Aptos" style:font-name-complex="Times New Roman" fo:color="#000000"/>
    </style:style>
    <style:style style:name="T3682" style:parent-style-name="Policepardéfaut" style:family="text">
      <style:text-properties style:font-name="Times New Roman" style:font-name-asian="GPAFJ+Aptos" style:font-name-complex="Times New Roman" fo:color="#000000" style:text-scale="101%"/>
    </style:style>
    <style:style style:name="T3683" style:parent-style-name="Policepardéfaut" style:family="text">
      <style:text-properties style:font-name="Times New Roman" style:font-name-asian="GPAFJ+Aptos" style:font-name-complex="Times New Roman" fo:color="#000000" fo:letter-spacing="-0.0006in"/>
    </style:style>
    <style:style style:name="T3684" style:parent-style-name="Policepardéfaut" style:family="text">
      <style:text-properties style:font-name="Times New Roman" style:font-name-asian="GPAFJ+Aptos" style:font-name-complex="Times New Roman" fo:color="#000000" style:text-scale="101%"/>
    </style:style>
    <style:style style:name="T3685" style:parent-style-name="Policepardéfaut" style:family="text">
      <style:text-properties style:font-name="Times New Roman" style:font-name-asian="GPAFJ+Aptos" style:font-name-complex="Times New Roman" fo:color="#000000" fo:letter-spacing="-0.0006in"/>
    </style:style>
    <style:style style:name="T3686" style:parent-style-name="Policepardéfaut" style:family="text">
      <style:text-properties style:font-name="Times New Roman" style:font-name-asian="GPAFJ+Aptos" style:font-name-complex="Times New Roman" fo:color="#000000"/>
    </style:style>
    <style:style style:name="T3687" style:parent-style-name="Policepardéfaut" style:family="text">
      <style:text-properties style:font-name="Times New Roman" style:font-name-asian="GPAFJ+Aptos" style:font-name-complex="Times New Roman" fo:color="#000000" style:text-scale="101%"/>
    </style:style>
    <style:style style:name="T3688" style:parent-style-name="Policepardéfaut" style:family="text">
      <style:text-properties style:font-name="Times New Roman" style:font-name-asian="GPAFJ+Aptos" style:font-name-complex="Times New Roman" fo:color="#000000" fo:letter-spacing="-0.0006in"/>
    </style:style>
    <style:style style:name="T3689" style:parent-style-name="Policepardéfaut" style:family="text">
      <style:text-properties style:font-name="Times New Roman" style:font-name-asian="GPAFJ+Aptos" style:font-name-complex="Times New Roman" fo:color="#000000" style:text-scale="101%"/>
    </style:style>
    <style:style style:name="T3690" style:parent-style-name="Policepardéfaut" style:family="text">
      <style:text-properties style:font-name="Times New Roman" style:font-name-asian="GPAFJ+Aptos" style:font-name-complex="Times New Roman" fo:color="#000000"/>
    </style:style>
    <style:style style:name="T3691" style:parent-style-name="Policepardéfaut" style:family="text">
      <style:text-properties style:font-name="Times New Roman" style:font-name-asian="GPAFJ+Aptos" style:font-name-complex="Times New Roman" fo:color="#000000" fo:letter-spacing="-0.0006in"/>
    </style:style>
    <style:style style:name="T3692" style:parent-style-name="Policepardéfaut" style:family="text">
      <style:text-properties style:font-name="Times New Roman" style:font-name-asian="GPAFJ+Aptos" style:font-name-complex="Times New Roman" fo:color="#000000" fo:letter-spacing="-0.0006in" style:text-scale="101%"/>
    </style:style>
    <style:style style:name="T3693" style:parent-style-name="Policepardéfaut" style:family="text">
      <style:text-properties style:font-name="Times New Roman" style:font-name-asian="GPAFJ+Aptos" style:font-name-complex="Times New Roman" fo:color="#000000"/>
    </style:style>
    <style:style style:name="T3694" style:parent-style-name="Policepardéfaut" style:family="text">
      <style:text-properties style:font-name="Times New Roman" style:font-name-asian="GPAFJ+Aptos" style:font-name-complex="Times New Roman" fo:color="#000000" style:text-scale="101%"/>
    </style:style>
    <style:style style:name="T3695" style:parent-style-name="Policepardéfaut" style:family="text">
      <style:text-properties style:font-name="Times New Roman" style:font-name-asian="GPAFJ+Aptos" style:font-name-complex="Times New Roman" fo:color="#000000" fo:letter-spacing="-0.0013in" style:text-scale="101%"/>
    </style:style>
    <style:style style:name="T3696" style:parent-style-name="Policepardéfaut" style:family="text">
      <style:text-properties style:font-name="Times New Roman" style:font-name-asian="GPAFJ+Aptos" style:font-name-complex="Times New Roman" fo:color="#000000" fo:letter-spacing="-0.0006in"/>
    </style:style>
    <style:style style:name="T3697" style:parent-style-name="Policepardéfaut" style:family="text">
      <style:text-properties style:font-name="Times New Roman" style:font-name-asian="GPAFJ+Aptos" style:font-name-complex="Times New Roman" fo:color="#000000" style:text-scale="101%"/>
    </style:style>
    <style:style style:name="T3698" style:parent-style-name="Policepardéfaut" style:family="text">
      <style:text-properties style:font-name="Times New Roman" style:font-name-asian="GPAFJ+Aptos" style:font-name-complex="Times New Roman" fo:color="#000000"/>
    </style:style>
    <style:style style:name="T3699" style:parent-style-name="Policepardéfaut" style:family="text">
      <style:text-properties style:font-name="Times New Roman" style:font-name-asian="GPAFJ+Aptos" style:font-name-complex="Times New Roman" fo:color="#000000" style:text-scale="101%"/>
    </style:style>
    <style:style style:name="T3700" style:parent-style-name="Policepardéfaut" style:family="text">
      <style:text-properties style:font-name="Times New Roman" style:font-name-asian="GPAFJ+Aptos" style:font-name-complex="Times New Roman" fo:color="#000000" fo:letter-spacing="-0.0006in"/>
    </style:style>
    <style:style style:name="T3701" style:parent-style-name="Policepardéfaut" style:family="text">
      <style:text-properties style:font-name="Times New Roman" style:font-name-asian="GPAFJ+Aptos" style:font-name-complex="Times New Roman" fo:color="#000000"/>
    </style:style>
    <style:style style:name="T3702" style:parent-style-name="Policepardéfaut" style:family="text">
      <style:text-properties style:font-name="Times New Roman" style:font-name-asian="GPAFJ+Aptos" style:font-name-complex="Times New Roman" fo:color="#000000" fo:letter-spacing="-0.0006in" style:text-scale="101%"/>
    </style:style>
    <style:style style:name="T3703" style:parent-style-name="Policepardéfaut" style:family="text">
      <style:text-properties style:font-name="Times New Roman" style:font-name-asian="GPAFJ+Aptos" style:font-name-complex="Times New Roman" fo:color="#000000"/>
    </style:style>
    <style:style style:name="T3704" style:parent-style-name="Policepardéfaut" style:family="text">
      <style:text-properties style:font-name="Times New Roman" style:font-name-asian="GPAFJ+Aptos" style:font-name-complex="Times New Roman" fo:color="#000000" style:text-scale="101%"/>
    </style:style>
    <style:style style:name="T3705" style:parent-style-name="Policepardéfaut" style:family="text">
      <style:text-properties style:font-name="Times New Roman" style:font-name-asian="GPAFJ+Aptos" style:font-name-complex="Times New Roman" fo:color="#000000"/>
    </style:style>
    <style:style style:name="T3706" style:parent-style-name="Policepardéfaut" style:family="text">
      <style:text-properties style:font-name="Times New Roman" style:font-name-asian="GPAFJ+Aptos" style:font-name-complex="Times New Roman" fo:color="#000000" fo:letter-spacing="-0.0006in" style:text-scale="101%"/>
    </style:style>
    <style:style style:name="T3707" style:parent-style-name="Policepardéfaut" style:family="text">
      <style:text-properties style:font-name="Times New Roman" style:font-name-asian="GPAFJ+Aptos" style:font-name-complex="Times New Roman" fo:color="#000000" style:text-scale="101%"/>
    </style:style>
    <style:style style:name="T3708" style:parent-style-name="Policepardéfaut" style:family="text">
      <style:text-properties style:font-name="Times New Roman" style:font-name-asian="GPAFJ+Aptos" style:font-name-complex="Times New Roman" fo:color="#000000" fo:letter-spacing="-0.0006in"/>
    </style:style>
    <style:style style:name="T3709" style:parent-style-name="Policepardéfaut" style:family="text">
      <style:text-properties style:font-name="Times New Roman" style:font-name-asian="GPAFJ+Aptos" style:font-name-complex="Times New Roman" fo:color="#000000" fo:letter-spacing="-0.0006in" style:text-scale="101%"/>
    </style:style>
    <style:style style:name="T3710" style:parent-style-name="Policepardéfaut" style:family="text">
      <style:text-properties style:font-name="Times New Roman" style:font-name-asian="GPAFJ+Aptos" style:font-name-complex="Times New Roman" fo:color="#000000" style:text-scale="101%"/>
    </style:style>
    <style:style style:name="T3711" style:parent-style-name="Policepardéfaut" style:family="text">
      <style:text-properties style:font-name="Times New Roman" style:font-name-asian="GPAFJ+Aptos" style:font-name-complex="Times New Roman" fo:color="#000000" fo:letter-spacing="-0.0013in"/>
    </style:style>
    <style:style style:name="T3712" style:parent-style-name="Policepardéfaut" style:family="text">
      <style:text-properties style:font-name="Times New Roman" style:font-name-asian="GPAFJ+Aptos" style:font-name-complex="Times New Roman" fo:color="#000000"/>
    </style:style>
    <style:style style:name="T3713" style:parent-style-name="Policepardéfaut" style:family="text">
      <style:text-properties style:font-name="Times New Roman" style:font-name-asian="GPAFJ+Aptos" style:font-name-complex="Times New Roman" fo:color="#000000" style:text-scale="101%"/>
    </style:style>
    <style:style style:name="T3714" style:parent-style-name="Policepardéfaut" style:family="text">
      <style:text-properties style:font-name="Times New Roman" style:font-name-asian="GPAFJ+Aptos" style:font-name-complex="Times New Roman" fo:color="#000000" fo:letter-spacing="-0.0006in" style:text-scale="101%"/>
    </style:style>
    <style:style style:name="T3715" style:parent-style-name="Policepardéfaut" style:family="text">
      <style:text-properties style:font-name="Times New Roman" style:font-name-asian="GPAFJ+Aptos" style:font-name-complex="Times New Roman" fo:color="#000000" fo:letter-spacing="-0.0006in"/>
    </style:style>
    <style:style style:name="T3716" style:parent-style-name="Policepardéfaut" style:family="text">
      <style:text-properties style:font-name="Times New Roman" style:font-name-asian="GPAFJ+Aptos" style:font-name-complex="Times New Roman" fo:color="#000000"/>
    </style:style>
    <style:style style:name="T3717" style:parent-style-name="Policepardéfaut" style:family="text">
      <style:text-properties style:font-name="Times New Roman" style:font-name-asian="GPAFJ+Aptos" style:font-name-complex="Times New Roman" fo:color="#000000" style:text-scale="101%"/>
    </style:style>
    <style:style style:name="T3718" style:parent-style-name="Policepardéfaut" style:family="text">
      <style:text-properties style:font-name="Times New Roman" style:font-name-asian="GPAFJ+Aptos" style:font-name-complex="Times New Roman" fo:color="#000000"/>
    </style:style>
    <style:style style:name="T3719" style:parent-style-name="Policepardéfaut" style:family="text">
      <style:text-properties style:font-name="Times New Roman" style:font-name-asian="GPAFJ+Aptos" style:font-name-complex="Times New Roman" fo:color="#000000" fo:letter-spacing="0.0006in" style:text-scale="101%"/>
    </style:style>
    <style:style style:name="T3720" style:parent-style-name="Policepardéfaut" style:family="text">
      <style:text-properties style:font-name="Times New Roman" style:font-name-asian="GPAFJ+Aptos" style:font-name-complex="Times New Roman" fo:color="#000000" fo:letter-spacing="-0.0013in" style:text-scale="101%"/>
    </style:style>
    <style:style style:name="T3721" style:parent-style-name="Policepardéfaut" style:family="text">
      <style:text-properties style:font-name="Times New Roman" style:font-name-asian="GPAFJ+Aptos" style:font-name-complex="Times New Roman" fo:color="#000000"/>
    </style:style>
    <style:style style:name="T3722" style:parent-style-name="Policepardéfaut" style:family="text">
      <style:text-properties style:font-name="Times New Roman" style:font-name-asian="GPAFJ+Aptos" style:font-name-complex="Times New Roman" fo:color="#000000" fo:letter-spacing="-0.0006in"/>
    </style:style>
    <style:style style:name="T3723" style:parent-style-name="Policepardéfaut" style:family="text">
      <style:text-properties style:font-name="Times New Roman" style:font-name-asian="GPAFJ+Aptos" style:font-name-complex="Times New Roman" fo:color="#000000" style:text-scale="101%"/>
    </style:style>
    <style:style style:name="T3724" style:parent-style-name="Policepardéfaut" style:family="text">
      <style:text-properties style:font-name="Times New Roman" style:font-name-asian="GPAFJ+Aptos" style:font-name-complex="Times New Roman" fo:color="#000000" fo:letter-spacing="-0.0006in"/>
    </style:style>
    <style:style style:name="T3725" style:parent-style-name="Policepardéfaut" style:family="text">
      <style:text-properties style:font-name="Times New Roman" style:font-name-asian="GPAFJ+Aptos" style:font-name-complex="Times New Roman" fo:color="#000000"/>
    </style:style>
    <style:style style:name="T3726" style:parent-style-name="Policepardéfaut" style:family="text">
      <style:text-properties style:font-name="Times New Roman" style:font-name-asian="GPAFJ+Aptos" style:font-name-complex="Times New Roman" fo:color="#000000" style:text-scale="101%"/>
    </style:style>
    <style:style style:name="T3727" style:parent-style-name="Policepardéfaut" style:family="text">
      <style:text-properties style:font-name="Times New Roman" style:font-name-asian="GPAFJ+Aptos" style:font-name-complex="Times New Roman" fo:color="#000000"/>
    </style:style>
    <style:style style:name="T3728" style:parent-style-name="Policepardéfaut" style:family="text">
      <style:text-properties style:font-name="Times New Roman" style:font-name-asian="GPAFJ+Aptos" style:font-name-complex="Times New Roman" fo:color="#000000" fo:letter-spacing="-0.0006in" style:text-scale="101%"/>
    </style:style>
    <style:style style:name="T3729" style:parent-style-name="Policepardéfaut" style:family="text">
      <style:text-properties style:font-name="Times New Roman" style:font-name-asian="GPAFJ+Aptos" style:font-name-complex="Times New Roman" fo:color="#000000" fo:letter-spacing="-0.0013in" style:text-scale="101%"/>
    </style:style>
    <style:style style:name="T3730" style:parent-style-name="Policepardéfaut" style:family="text">
      <style:text-properties style:font-name="Times New Roman" style:font-name-asian="GPAFJ+Aptos" style:font-name-complex="Times New Roman" fo:color="#000000"/>
    </style:style>
    <style:style style:name="T3731" style:parent-style-name="Policepardéfaut" style:family="text">
      <style:text-properties style:font-name="Times New Roman" style:font-name-asian="GPAFJ+Aptos" style:font-name-complex="Times New Roman" fo:color="#000000" fo:letter-spacing="-0.0006in"/>
    </style:style>
    <style:style style:name="T3732" style:parent-style-name="Policepardéfaut" style:family="text">
      <style:text-properties style:font-name="Times New Roman" style:font-name-asian="GPAFJ+Aptos" style:font-name-complex="Times New Roman" fo:color="#000000" style:text-scale="101%"/>
    </style:style>
    <style:style style:name="T3733" style:parent-style-name="Policepardéfaut" style:family="text">
      <style:text-properties style:font-name="Times New Roman" style:font-name-asian="GPAFJ+Aptos" style:font-name-complex="Times New Roman" fo:color="#000000" fo:letter-spacing="-0.0006in" style:text-scale="101%"/>
    </style:style>
    <style:style style:name="T3734" style:parent-style-name="Policepardéfaut" style:family="text">
      <style:text-properties style:font-name="Times New Roman" style:font-name-asian="GPAFJ+Aptos" style:font-name-complex="Times New Roman" fo:color="#000000" fo:letter-spacing="-0.0006in" style:text-scale="101%"/>
    </style:style>
    <style:style style:name="T3735" style:parent-style-name="Policepardéfaut" style:family="text">
      <style:text-properties style:font-name="Times New Roman" style:font-name-asian="GPAFJ+Aptos" style:font-name-complex="Times New Roman" fo:color="#000000" fo:letter-spacing="-0.0006in"/>
    </style:style>
    <style:style style:name="T3736" style:parent-style-name="Policepardéfaut" style:family="text">
      <style:text-properties style:font-name="Times New Roman" style:font-name-asian="GPAFJ+Aptos" style:font-name-complex="Times New Roman" fo:color="#000000" fo:letter-spacing="-0.0006in" style:text-scale="101%"/>
    </style:style>
    <style:style style:name="T3737" style:parent-style-name="Policepardéfaut" style:family="text">
      <style:text-properties style:font-name="Times New Roman" style:font-name-asian="GPAFJ+Aptos" style:font-name-complex="Times New Roman" fo:color="#000000"/>
    </style:style>
    <style:style style:name="T3738" style:parent-style-name="Policepardéfaut" style:family="text">
      <style:text-properties style:font-name="Times New Roman" style:font-name-asian="GPAFJ+Aptos" style:font-name-complex="Times New Roman" fo:color="#000000" fo:letter-spacing="-0.0013in"/>
    </style:style>
    <style:style style:name="T3739" style:parent-style-name="Policepardéfaut" style:family="text">
      <style:text-properties style:font-name="Times New Roman" style:font-name-asian="GPAFJ+Aptos" style:font-name-complex="Times New Roman" fo:color="#000000" style:text-scale="101%"/>
    </style:style>
    <style:style style:name="T3740" style:parent-style-name="Policepardéfaut" style:family="text">
      <style:text-properties style:font-name="Times New Roman" style:font-name-asian="GPAFJ+Aptos" style:font-name-complex="Times New Roman" fo:color="#000000"/>
    </style:style>
    <style:style style:name="T3741" style:parent-style-name="Policepardéfaut" style:family="text">
      <style:text-properties style:font-name="Times New Roman" style:font-name-asian="GPAFJ+Aptos" style:font-name-complex="Times New Roman" fo:color="#000000" fo:letter-spacing="-0.0006in"/>
    </style:style>
    <style:style style:name="T3742" style:parent-style-name="Policepardéfaut" style:family="text">
      <style:text-properties style:font-name="Times New Roman" style:font-name-asian="GPAFJ+Aptos" style:font-name-complex="Times New Roman" fo:color="#000000" style:text-scale="101%"/>
    </style:style>
    <style:style style:name="T3743" style:parent-style-name="Policepardéfaut" style:family="text">
      <style:text-properties style:font-name="Times New Roman" style:font-name-asian="GPAFJ+Aptos" style:font-name-complex="Times New Roman" fo:color="#000000"/>
    </style:style>
    <style:style style:name="T3744" style:parent-style-name="Policepardéfaut" style:family="text">
      <style:text-properties style:font-name="Times New Roman" style:font-name-asian="GPAFJ+Aptos" style:font-name-complex="Times New Roman" fo:color="#000000" fo:letter-spacing="-0.0006in" style:text-scale="101%"/>
    </style:style>
    <style:style style:name="T3745" style:parent-style-name="Policepardéfaut" style:family="text">
      <style:text-properties style:font-name="Times New Roman" style:font-name-asian="GPAFJ+Aptos" style:font-name-complex="Times New Roman" fo:color="#000000"/>
    </style:style>
    <style:style style:name="T3746" style:parent-style-name="Policepardéfaut" style:family="text">
      <style:text-properties style:font-name="Times New Roman" style:font-name-asian="GPAFJ+Aptos" style:font-name-complex="Times New Roman" fo:color="#000000" style:text-scale="101%"/>
    </style:style>
    <style:style style:name="T3747" style:parent-style-name="Policepardéfaut" style:family="text">
      <style:text-properties style:font-name="Times New Roman" style:font-name-asian="GPAFJ+Aptos" style:font-name-complex="Times New Roman" fo:color="#000000" fo:letter-spacing="-0.0006in"/>
    </style:style>
    <style:style style:name="T3748" style:parent-style-name="Policepardéfaut" style:family="text">
      <style:text-properties style:font-name="Times New Roman" style:font-name-asian="GPAFJ+Aptos" style:font-name-complex="Times New Roman" fo:color="#000000" fo:letter-spacing="-0.0006in" style:text-scale="101%"/>
    </style:style>
    <style:style style:name="T3749" style:parent-style-name="Policepardéfaut" style:family="text">
      <style:text-properties style:font-name="Times New Roman" style:font-name-asian="GPAFJ+Aptos" style:font-name-complex="Times New Roman" fo:color="#000000" style:text-scale="101%"/>
    </style:style>
    <style:style style:name="T3750" style:parent-style-name="Policepardéfaut" style:family="text">
      <style:text-properties style:font-name="Times New Roman" style:font-name-asian="GPAFJ+Aptos" style:font-name-complex="Times New Roman" fo:color="#000000" fo:letter-spacing="-0.0006in" style:text-scale="101%"/>
    </style:style>
    <style:style style:name="T3751" style:parent-style-name="Policepardéfaut" style:family="text">
      <style:text-properties style:font-name="Times New Roman" style:font-name-asian="GPAFJ+Aptos" style:font-name-complex="Times New Roman" fo:color="#000000" style:text-scale="101%"/>
    </style:style>
    <style:style style:name="T3752" style:parent-style-name="Policepardéfaut" style:family="text">
      <style:text-properties style:font-name="Times New Roman" style:font-name-asian="GPAFJ+Aptos" style:font-name-complex="Times New Roman" fo:color="#000000" fo:letter-spacing="-0.0013in"/>
    </style:style>
    <style:style style:name="T3753" style:parent-style-name="Policepardéfaut" style:family="text">
      <style:text-properties style:font-name="Times New Roman" style:font-name-asian="GPAFJ+Aptos" style:font-name-complex="Times New Roman" fo:color="#000000" style:text-scale="101%"/>
    </style:style>
    <style:style style:name="P3754" style:parent-style-name="Normal" style:family="paragraph">
      <style:paragraph-properties fo:widows="0" fo:orphans="0" fo:text-align="justify" fo:line-height="107%" fo:margin-right="0.3659in"/>
      <style:text-properties style:font-name="Times New Roman" style:font-name-asian="GPAFJ+Aptos" style:font-name-complex="Times New Roman" fo:color="#000000" style:text-scale="101%"/>
    </style:style>
    <style:style style:name="P3755" style:parent-style-name="Normal" style:family="paragraph">
      <style:paragraph-properties fo:widows="0" fo:orphans="0" fo:text-align="justify" fo:line-height="107%" fo:margin-right="0.3659in"/>
      <style:text-properties style:font-name="Times New Roman" style:font-name-asian="GPAFJ+Aptos" style:font-name-complex="Times New Roman" fo:color="#000000" style:text-scale="101%"/>
    </style:style>
    <style:style style:name="P3756" style:parent-style-name="Normal" style:family="paragraph">
      <style:paragraph-properties fo:widows="0" fo:orphans="0" fo:text-align="justify" fo:line-height="107%" fo:margin-right="0.3659in"/>
      <style:text-properties style:font-name="Times New Roman" style:font-name-asian="GPAFJ+Aptos" style:font-name-complex="Times New Roman" fo:color="#000000" style:text-scale="101%"/>
    </style:style>
    <style:style style:name="P3757" style:parent-style-name="Normal" style:family="paragraph">
      <style:paragraph-properties fo:widows="0" fo:orphans="0" fo:text-align="justify" fo:line-height="107%" fo:margin-right="0.3659in"/>
      <style:text-properties style:font-name="Times New Roman" style:font-name-asian="GPAFJ+Aptos" style:font-name-complex="Times New Roman" fo:color="#000000" style:text-scale="101%"/>
    </style:style>
    <style:style style:name="P3758" style:parent-style-name="Normal" style:family="paragraph">
      <style:paragraph-properties fo:widows="0" fo:orphans="0" fo:text-align="justify" fo:line-height="107%" fo:margin-right="0.3659in"/>
      <style:text-properties style:font-name="Times New Roman" style:font-name-asian="GPAFJ+Aptos" style:font-name-complex="Times New Roman" fo:color="#000000" style:text-scale="101%"/>
    </style:style>
    <style:style style:name="P3759" style:parent-style-name="Normal" style:family="paragraph">
      <style:paragraph-properties fo:widows="0" fo:orphans="0" fo:text-align="justify" fo:line-height="107%" fo:margin-right="0.3659in"/>
      <style:text-properties style:font-name="Times New Roman" style:font-name-asian="GPAFJ+Aptos" style:font-name-complex="Times New Roman" fo:color="#000000" style:text-scale="101%"/>
    </style:style>
    <style:style style:name="P3760" style:parent-style-name="Normal" style:family="paragraph">
      <style:paragraph-properties fo:widows="0" fo:orphans="0" fo:text-align="justify" fo:line-height="107%" fo:margin-right="0.3659in"/>
      <style:text-properties style:font-name="Times New Roman" style:font-name-asian="GPAFJ+Aptos" style:font-name-complex="Times New Roman" fo:color="#000000" style:text-scale="101%"/>
    </style:style>
    <style:style style:name="P3761" style:parent-style-name="Normal" style:family="paragraph">
      <style:paragraph-properties fo:widows="0" fo:orphans="0" fo:text-align="justify" fo:line-height="107%" fo:margin-right="0.3659in"/>
      <style:text-properties style:font-name="Times New Roman" style:font-name-asian="GPAFJ+Aptos" style:font-name-complex="Times New Roman" fo:color="#000000" style:text-scale="101%"/>
    </style:style>
    <style:style style:name="P3762" style:parent-style-name="Titre1" style:list-style-name="LFO18" style:family="paragraph">
      <style:paragraph-properties fo:text-align="justify"/>
    </style:style>
    <style:style style:name="T3763" style:parent-style-name="Policepardéfaut" style:family="text">
      <style:text-properties style:font-name-asian="GPAFJ+Aptos" style:text-scale="101%"/>
    </style:style>
    <style:style style:name="T3764" style:parent-style-name="Policepardéfaut" style:family="text">
      <style:text-properties style:font-name-asian="GPAFJ+Aptos" style:text-scale="101%"/>
    </style:style>
    <style:style style:name="T3765" style:parent-style-name="Policepardéfaut" style:family="text">
      <style:text-properties style:font-name-asian="GPAFJ+Aptos" style:text-scale="101%"/>
    </style:style>
    <style:style style:name="T3766" style:parent-style-name="Policepardéfaut" style:family="text">
      <style:text-properties style:font-name-asian="GPAFJ+Aptos" style:text-scale="101%"/>
    </style:style>
    <style:style style:name="T3767" style:parent-style-name="Policepardéfaut" style:family="text">
      <style:text-properties style:font-name-asian="GPAFJ+Aptos" style:text-scale="101%"/>
    </style:style>
    <style:style style:name="P3768" style:parent-style-name="Normal" style:family="paragraph">
      <style:paragraph-properties fo:widows="0" fo:orphans="0" fo:text-align="justify" fo:line-height="107%" fo:margin-right="0.3659in"/>
      <style:text-properties style:font-name="Times New Roman" style:font-name-asian="GPAFJ+Aptos" style:font-name-complex="Times New Roman" fo:color="#215E99" style:text-scale="101%" fo:font-size="12pt" style:font-size-asian="12pt" style:font-size-complex="12pt"/>
    </style:style>
    <style:style style:name="P3769" style:parent-style-name="Normal" style:family="paragraph">
      <style:paragraph-properties fo:widows="0" fo:orphans="0" fo:text-align="justify" fo:line-height="107%" fo:margin-right="0.3659in"/>
      <style:text-properties style:font-name="Times New Roman" style:font-name-asian="GPAFJ+Aptos" style:font-name-complex="Times New Roman" fo:color="#215E99" style:text-scale="101%" fo:font-size="12pt" style:font-size-asian="12pt" style:font-size-complex="12pt"/>
    </style:style>
    <style:style style:name="P3770" style:parent-style-name="Normal" style:family="paragraph">
      <style:paragraph-properties fo:widows="0" fo:orphans="0" fo:text-align="justify" fo:line-height="107%" fo:margin-right="0.5631in"/>
    </style:style>
    <style:style style:name="T3771" style:parent-style-name="Policepardéfaut" style:family="text">
      <style:text-properties style:font-name="Times New Roman" style:font-name-asian="GPAFJ+Aptos" style:font-name-complex="Times New Roman" fo:color="#000000" fo:font-size="12pt" style:font-size-asian="12pt" style:font-size-complex="12pt"/>
    </style:style>
    <style:style style:name="T3772" style:parent-style-name="Policepardéfaut" style:family="text">
      <style:text-properties style:font-name="Times New Roman" style:font-name-asian="GPAFJ+Aptos" style:font-name-complex="Times New Roman" fo:color="#000000" fo:font-size="12pt" style:font-size-asian="12pt" style:font-size-complex="12pt"/>
    </style:style>
    <style:style style:name="T377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774" style:parent-style-name="Policepardéfaut" style:family="text">
      <style:text-properties style:font-name="Times New Roman" style:font-name-asian="GPAFJ+Aptos" style:font-name-complex="Times New Roman" fo:color="#000000" fo:font-size="12pt" style:font-size-asian="12pt" style:font-size-complex="12pt"/>
    </style:style>
    <style:style style:name="T377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776" style:parent-style-name="Policepardéfaut" style:family="text">
      <style:text-properties style:font-name="Times New Roman" style:font-name-asian="GPAFJ+Aptos" style:font-name-complex="Times New Roman" fo:color="#000000" fo:font-size="12pt" style:font-size-asian="12pt" style:font-size-complex="12pt"/>
    </style:style>
    <style:style style:name="T3777"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77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779" style:parent-style-name="Policepardéfaut" style:family="text">
      <style:text-properties style:font-name="Times New Roman" style:font-name-asian="GPAFJ+Aptos" style:font-name-complex="Times New Roman" fo:color="#000000" fo:font-size="12pt" style:font-size-asian="12pt" style:font-size-complex="12pt"/>
    </style:style>
    <style:style style:name="T378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781"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78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783"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784" style:parent-style-name="Policepardéfaut" style:family="text">
      <style:text-properties style:font-name="Times New Roman" style:font-name-asian="GPAFJ+Aptos" style:font-name-complex="Times New Roman" fo:color="#000000" fo:font-size="12pt" style:font-size-asian="12pt" style:font-size-complex="12pt"/>
    </style:style>
    <style:style style:name="T3785"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78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78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788" style:parent-style-name="Policepardéfaut" style:family="text">
      <style:text-properties style:font-name="Times New Roman" style:font-name-asian="GPAFJ+Aptos" style:font-name-complex="Times New Roman" fo:color="#000000" fo:font-size="12pt" style:font-size-asian="12pt" style:font-size-complex="12pt"/>
    </style:style>
    <style:style style:name="T378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790" style:parent-style-name="Policepardéfaut" style:family="text">
      <style:text-properties style:font-name="Times New Roman" style:font-name-asian="GPAFJ+Aptos" style:font-name-complex="Times New Roman" fo:color="#000000" fo:font-size="12pt" style:font-size-asian="12pt" style:font-size-complex="12pt"/>
    </style:style>
    <style:style style:name="T379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792" style:parent-style-name="Policepardéfaut" style:family="text">
      <style:text-properties style:font-name="Times New Roman" style:font-name-asian="GPAFJ+Aptos" style:font-name-complex="Times New Roman" fo:color="#000000" fo:font-size="12pt" style:font-size-asian="12pt" style:font-size-complex="12pt"/>
    </style:style>
    <style:style style:name="T379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794"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79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796"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797" style:parent-style-name="Policepardéfaut" style:family="text">
      <style:text-properties style:font-name="Times New Roman" style:font-name-asian="GPAFJ+Aptos" style:font-name-complex="Times New Roman" fo:color="#000000" fo:font-size="12pt" style:font-size-asian="12pt" style:font-size-complex="12pt"/>
    </style:style>
    <style:style style:name="T379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799"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800"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801" style:parent-style-name="Policepardéfaut" style:family="text">
      <style:text-properties style:font-name="Times New Roman" style:font-name-asian="GPAFJ+Aptos" style:font-name-complex="Times New Roman" fo:color="#000000" fo:font-size="12pt" style:font-size-asian="12pt" style:font-size-complex="12pt"/>
    </style:style>
    <style:style style:name="T380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03" style:parent-style-name="Policepardéfaut" style:family="text">
      <style:text-properties style:font-name="Times New Roman" style:font-name-asian="GPAFJ+Aptos" style:font-name-complex="Times New Roman" fo:color="#000000" fo:font-size="12pt" style:font-size-asian="12pt" style:font-size-complex="12pt"/>
    </style:style>
    <style:style style:name="T380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05"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806" style:parent-style-name="Policepardéfaut" style:family="text">
      <style:text-properties style:font-name="Times New Roman" style:font-name-asian="GPAFJ+Aptos" style:font-name-complex="Times New Roman" fo:color="#000000" fo:font-size="12pt" style:font-size-asian="12pt" style:font-size-complex="12pt"/>
    </style:style>
    <style:style style:name="T380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808" style:parent-style-name="Policepardéfaut" style:family="text">
      <style:text-properties style:font-name="Times New Roman" style:font-name-asian="GPAFJ+Aptos" style:font-name-complex="Times New Roman" fo:color="#000000" fo:font-size="12pt" style:font-size-asian="12pt" style:font-size-complex="12pt"/>
    </style:style>
    <style:style style:name="T3809"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81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11"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81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13" style:parent-style-name="Policepardéfaut" style:family="text">
      <style:text-properties style:font-name="Times New Roman" style:font-name-asian="GPAFJ+Aptos" style:font-name-complex="Times New Roman" fo:color="#000000" fo:font-size="12pt" style:font-size-asian="12pt" style:font-size-complex="12pt"/>
    </style:style>
    <style:style style:name="T381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81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816"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817" style:parent-style-name="Policepardéfaut" style:family="text">
      <style:text-properties style:font-name="Times New Roman" style:font-name-asian="GPAFJ+Aptos" style:font-name-complex="Times New Roman" fo:color="#000000" fo:font-size="12pt" style:font-size-asian="12pt" style:font-size-complex="12pt"/>
    </style:style>
    <style:style style:name="T381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81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820"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821"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822" style:parent-style-name="Policepardéfaut" style:family="text">
      <style:text-properties style:font-name="Times New Roman" style:font-name-asian="GPAFJ+Aptos" style:font-name-complex="Times New Roman" fo:color="#000000" fo:font-size="12pt" style:font-size-asian="12pt" style:font-size-complex="12pt"/>
    </style:style>
    <style:style style:name="T382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82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825" style:parent-style-name="Policepardéfaut" style:family="text">
      <style:text-properties style:font-name="Times New Roman" style:font-name-asian="GPAFJ+Aptos" style:font-name-complex="Times New Roman" fo:color="#000000" fo:font-size="12pt" style:font-size-asian="12pt" style:font-size-complex="12pt"/>
    </style:style>
    <style:style style:name="T382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27" style:parent-style-name="Policepardéfaut" style:family="text">
      <style:text-properties style:font-name="Times New Roman" style:font-name-asian="GPAFJ+Aptos" style:font-name-complex="Times New Roman" fo:color="#000000" fo:font-size="12pt" style:font-size-asian="12pt" style:font-size-complex="12pt"/>
    </style:style>
    <style:style style:name="T3828"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829"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830" style:parent-style-name="Policepardéfaut" style:family="text">
      <style:text-properties style:font-name="Times New Roman" style:font-name-asian="GPAFJ+Aptos" style:font-name-complex="Times New Roman" fo:color="#000000" fo:font-size="12pt" style:font-size-asian="12pt" style:font-size-complex="12pt"/>
    </style:style>
    <style:style style:name="T3831"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83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3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83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835" style:parent-style-name="Policepardéfaut" style:family="text">
      <style:text-properties style:font-name="Times New Roman" style:font-name-asian="GPAFJ+Aptos" style:font-name-complex="Times New Roman" fo:color="#000000" fo:font-size="12pt" style:font-size-asian="12pt" style:font-size-complex="12pt"/>
    </style:style>
    <style:style style:name="T383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837" style:parent-style-name="Policepardéfaut" style:family="text">
      <style:text-properties style:font-name="Times New Roman" style:font-name-asian="GPAFJ+Aptos" style:font-name-complex="Times New Roman" fo:color="#000000" fo:font-size="12pt" style:font-size-asian="12pt" style:font-size-complex="12pt"/>
    </style:style>
    <style:style style:name="T383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39" style:parent-style-name="Policepardéfaut" style:family="text">
      <style:text-properties style:font-name="Times New Roman" style:font-name-asian="GPAFJ+Aptos" style:font-name-complex="Times New Roman" fo:color="#000000" fo:font-size="12pt" style:font-size-asian="12pt" style:font-size-complex="12pt"/>
    </style:style>
    <style:style style:name="T3840" style:parent-style-name="Policepardéfaut" style:family="text">
      <style:text-properties style:font-name="Times New Roman" style:font-name-asian="GPAFJ+Aptos" style:font-name-complex="Times New Roman" fo:color="#000000" fo:letter-spacing="0.0055in" style:text-scale="101%" fo:font-size="12pt" style:font-size-asian="12pt" style:font-size-complex="12pt"/>
    </style:style>
    <style:style style:name="T384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42" style:parent-style-name="Policepardéfaut" style:family="text">
      <style:text-properties style:font-name="Times New Roman" style:font-name-asian="GPAFJ+Aptos" style:font-name-complex="Times New Roman" fo:color="#000000" fo:font-size="12pt" style:font-size-asian="12pt" style:font-size-complex="12pt"/>
    </style:style>
    <style:style style:name="T384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44" style:parent-style-name="Policepardéfaut" style:family="text">
      <style:text-properties style:font-name="Times New Roman" style:font-name-asian="GPAFJ+Aptos" style:font-name-complex="Times New Roman" fo:color="#000000" fo:font-size="12pt" style:font-size-asian="12pt" style:font-size-complex="12pt"/>
    </style:style>
    <style:style style:name="T384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4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847" style:parent-style-name="Policepardéfaut" style:family="text">
      <style:text-properties style:font-name="Times New Roman" style:font-name-asian="GPAFJ+Aptos" style:font-name-complex="Times New Roman" fo:color="#000000" fo:font-size="12pt" style:font-size-asian="12pt" style:font-size-complex="12pt"/>
    </style:style>
    <style:style style:name="T384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49"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85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51"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852" style:parent-style-name="Policepardéfaut" style:family="text">
      <style:text-properties style:font-name="Times New Roman" style:font-name-asian="GPAFJ+Aptos" style:font-name-complex="Times New Roman" fo:color="#000000" fo:font-size="12pt" style:font-size-asian="12pt" style:font-size-complex="12pt"/>
    </style:style>
    <style:style style:name="T385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54" style:parent-style-name="Policepardéfaut" style:family="text">
      <style:text-properties style:font-name="Times New Roman" style:font-name-asian="GPAFJ+Aptos" style:font-name-complex="Times New Roman" fo:color="#000000" fo:font-size="12pt" style:font-size-asian="12pt" style:font-size-complex="12pt"/>
    </style:style>
    <style:style style:name="T385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85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857"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858" style:parent-style-name="Policepardéfaut" style:family="text">
      <style:text-properties style:font-name="Times New Roman" style:font-name-asian="GPAFJ+Aptos" style:font-name-complex="Times New Roman" fo:color="#000000" fo:font-size="12pt" style:font-size-asian="12pt" style:font-size-complex="12pt"/>
    </style:style>
    <style:style style:name="T385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60" style:parent-style-name="Policepardéfaut" style:family="text">
      <style:text-properties style:font-name="Times New Roman" style:font-name-asian="GPAFJ+Aptos" style:font-name-complex="Times New Roman" fo:color="#000000" fo:font-size="12pt" style:font-size-asian="12pt" style:font-size-complex="12pt"/>
    </style:style>
    <style:style style:name="T3861"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86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63" style:parent-style-name="Policepardéfaut" style:family="text">
      <style:text-properties style:font-name="Times New Roman" style:font-name-asian="GPAFJ+Aptos" style:font-name-complex="Times New Roman" fo:color="#000000" fo:font-size="12pt" style:font-size-asian="12pt" style:font-size-complex="12pt"/>
    </style:style>
    <style:style style:name="T386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865" style:parent-style-name="Policepardéfaut" style:family="text">
      <style:text-properties style:font-name="Times New Roman" style:font-name-asian="GPAFJ+Aptos" style:font-name-complex="Times New Roman" fo:color="#000000" fo:font-size="12pt" style:font-size-asian="12pt" style:font-size-complex="12pt"/>
    </style:style>
    <style:style style:name="T3866"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867" style:parent-style-name="Policepardéfaut" style:family="text">
      <style:text-properties style:font-name="Times New Roman" style:font-name-asian="GPAFJ+Aptos" style:font-name-complex="Times New Roman" fo:color="#000000" fo:font-size="12pt" style:font-size-asian="12pt" style:font-size-complex="12pt"/>
    </style:style>
    <style:style style:name="T386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869" style:parent-style-name="Policepardéfaut" style:family="text">
      <style:text-properties style:font-name="Times New Roman" style:font-name-asian="GPAFJ+Aptos" style:font-name-complex="Times New Roman" fo:color="#000000" fo:font-size="12pt" style:font-size-asian="12pt" style:font-size-complex="12pt"/>
    </style:style>
    <style:style style:name="T387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71" style:parent-style-name="Policepardéfaut" style:family="text">
      <style:text-properties style:font-name="Times New Roman" style:font-name-asian="GPAFJ+Aptos" style:font-name-complex="Times New Roman" fo:color="#000000" fo:font-size="12pt" style:font-size-asian="12pt" style:font-size-complex="12pt"/>
    </style:style>
    <style:style style:name="T387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873" style:parent-style-name="Policepardéfaut" style:family="text">
      <style:text-properties style:font-name="Times New Roman" style:font-name-asian="GPAFJ+Aptos" style:font-name-complex="Times New Roman" fo:color="#000000" fo:font-size="12pt" style:font-size-asian="12pt" style:font-size-complex="12pt"/>
    </style:style>
    <style:style style:name="T3874" style:parent-style-name="Policepardéfaut" style:family="text">
      <style:text-properties style:font-name="Times New Roman" style:font-name-asian="GPAFJ+Aptos" style:font-name-complex="Times New Roman" fo:color="#000000" fo:font-size="12pt" style:font-size-asian="12pt" style:font-size-complex="12pt"/>
    </style:style>
    <style:style style:name="T3875" style:parent-style-name="Policepardéfaut" style:family="text">
      <style:text-properties style:font-name="Times New Roman" style:font-name-asian="GPAFJ+Aptos" style:font-name-complex="Times New Roman" fo:color="#000000" fo:font-size="12pt" style:font-size-asian="12pt" style:font-size-complex="12pt"/>
    </style:style>
    <style:style style:name="T3876" style:parent-style-name="Policepardéfaut" style:family="text">
      <style:text-properties style:font-name="Times New Roman" style:font-name-asian="GPAFJ+Aptos" style:font-name-complex="Times New Roman" fo:color="#000000" fo:font-size="12pt" style:font-size-asian="12pt" style:font-size-complex="12pt"/>
    </style:style>
    <style:style style:name="T387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878" style:parent-style-name="Policepardéfaut" style:family="text">
      <style:text-properties style:font-name="Times New Roman" style:font-name-asian="GPAFJ+Aptos" style:font-name-complex="Times New Roman" fo:color="#000000" fo:font-size="12pt" style:font-size-asian="12pt" style:font-size-complex="12pt"/>
    </style:style>
    <style:style style:name="T387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80" style:parent-style-name="Policepardéfaut" style:family="text">
      <style:text-properties style:font-name="Times New Roman" style:font-name-asian="GPAFJ+Aptos" style:font-name-complex="Times New Roman" fo:color="#000000" fo:font-size="12pt" style:font-size-asian="12pt" style:font-size-complex="12pt"/>
    </style:style>
    <style:style style:name="T3881"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88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83" style:parent-style-name="Policepardéfaut" style:family="text">
      <style:text-properties style:font-name="Times New Roman" style:font-name-asian="GPAFJ+Aptos" style:font-name-complex="Times New Roman" fo:color="#000000" fo:font-size="12pt" style:font-size-asian="12pt" style:font-size-complex="12pt"/>
    </style:style>
    <style:style style:name="T388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8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886" style:parent-style-name="Policepardéfaut" style:family="text">
      <style:text-properties style:font-name="Times New Roman" style:font-name-asian="GPAFJ+Aptos" style:font-name-complex="Times New Roman" fo:color="#000000" fo:font-size="12pt" style:font-size-asian="12pt" style:font-size-complex="12pt"/>
    </style:style>
    <style:style style:name="T388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88" style:parent-style-name="Policepardéfaut" style:family="text">
      <style:text-properties style:font-name="Times New Roman" style:font-name-asian="GPAFJ+Aptos" style:font-name-complex="Times New Roman" fo:color="#000000" fo:font-size="12pt" style:font-size-asian="12pt" style:font-size-complex="12pt"/>
    </style:style>
    <style:style style:name="T3889"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89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91" style:parent-style-name="Policepardéfaut" style:family="text">
      <style:text-properties style:font-name="Times New Roman" style:font-name-asian="GPAFJ+Aptos" style:font-name-complex="Times New Roman" fo:color="#000000" fo:font-size="12pt" style:font-size-asian="12pt" style:font-size-complex="12pt"/>
    </style:style>
    <style:style style:name="T389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9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89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9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89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897" style:parent-style-name="Policepardéfaut" style:family="text">
      <style:text-properties style:font-name="Times New Roman" style:font-name-asian="GPAFJ+Aptos" style:font-name-complex="Times New Roman" fo:color="#000000" fo:font-size="12pt" style:font-size-asian="12pt" style:font-size-complex="12pt"/>
    </style:style>
    <style:style style:name="T3898"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899" style:parent-style-name="Policepardéfaut" style:family="text">
      <style:text-properties style:font-name="Times New Roman" style:font-name-asian="GPAFJ+Aptos" style:font-name-complex="Times New Roman" fo:color="#000000" fo:font-size="12pt" style:font-size-asian="12pt" style:font-size-complex="12pt"/>
    </style:style>
    <style:style style:name="T390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90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0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90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04" style:parent-style-name="Policepardéfaut" style:family="text">
      <style:text-properties style:font-name="Times New Roman" style:font-name-asian="GPAFJ+Aptos" style:font-name-complex="Times New Roman" fo:color="#000000" fo:font-size="12pt" style:font-size-asian="12pt" style:font-size-complex="12pt"/>
    </style:style>
    <style:style style:name="T390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0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907"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908" style:parent-style-name="Policepardéfaut" style:family="text">
      <style:text-properties style:font-name="Times New Roman" style:font-name-asian="GPAFJ+Aptos" style:font-name-complex="Times New Roman" fo:color="#000000" fo:font-size="12pt" style:font-size-asian="12pt" style:font-size-complex="12pt"/>
    </style:style>
    <style:style style:name="T390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910" style:parent-style-name="Policepardéfaut" style:family="text">
      <style:text-properties style:font-name="Times New Roman" style:font-name-asian="GPAFJ+Aptos" style:font-name-complex="Times New Roman" fo:color="#000000" fo:font-size="12pt" style:font-size-asian="12pt" style:font-size-complex="12pt"/>
    </style:style>
    <style:style style:name="T391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91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1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91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1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916"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91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918"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919" style:parent-style-name="Policepardéfaut" style:family="text">
      <style:text-properties style:font-name="Times New Roman" style:font-name-asian="GPAFJ+Aptos" style:font-name-complex="Times New Roman" fo:color="#000000" fo:font-size="12pt" style:font-size-asian="12pt" style:font-size-complex="12pt"/>
    </style:style>
    <style:style style:name="T392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21" style:parent-style-name="Policepardéfaut" style:family="text">
      <style:text-properties style:font-name="Times New Roman" style:font-name-asian="GPAFJ+Aptos" style:font-name-complex="Times New Roman" fo:color="#000000" fo:font-size="12pt" style:font-size-asian="12pt" style:font-size-complex="12pt"/>
    </style:style>
    <style:style style:name="T3922"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923" style:parent-style-name="Policepardéfaut" style:family="text">
      <style:text-properties style:font-name="Times New Roman" style:font-name-asian="GPAFJ+Aptos" style:font-name-complex="Times New Roman" fo:color="#000000" fo:font-size="12pt" style:font-size-asian="12pt" style:font-size-complex="12pt"/>
    </style:style>
    <style:style style:name="T392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92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P3926" style:parent-style-name="Normal" style:family="paragraph">
      <style:paragraph-properties fo:widows="0" fo:orphans="0" fo:text-align="justify" fo:line-height="107%" fo:margin-right="0.5631in"/>
      <style:text-properties style:font-name="Times New Roman" style:font-name-asian="GPAFJ+Aptos" style:font-name-complex="Times New Roman" fo:color="#000000" fo:font-size="12pt" style:font-size-asian="12pt" style:font-size-complex="12pt"/>
    </style:style>
    <style:style style:name="P3927" style:parent-style-name="Normal" style:family="paragraph">
      <style:paragraph-properties fo:widows="0" fo:orphans="0" fo:text-align="justify" fo:line-height="107%" fo:margin-right="0.5631in"/>
    </style:style>
    <style:style style:name="T3928" style:parent-style-name="Policepardéfaut" style:family="text">
      <style:text-properties style:font-name="Times New Roman" style:font-name-asian="GPAFJ+Aptos" style:font-name-complex="Times New Roman" fo:color="#000000" fo:font-size="12pt" style:font-size-asian="12pt" style:font-size-complex="12pt"/>
    </style:style>
    <style:style style:name="T3929" style:parent-style-name="Policepardéfaut" style:family="text">
      <style:text-properties style:font-name="Times New Roman" style:font-name-asian="GPAFJ+Aptos" style:font-name-complex="Times New Roman" fo:color="#000000" fo:font-size="12pt" style:font-size-asian="12pt" style:font-size-complex="12pt"/>
    </style:style>
    <style:style style:name="T3930" style:parent-style-name="Policepardéfaut" style:family="text">
      <style:text-properties style:font-name="Times New Roman" style:font-name-asian="GPAFJ+Aptos" style:font-name-complex="Times New Roman" fo:color="#000000" fo:font-size="12pt" style:font-size-asian="12pt" style:font-size-complex="12pt"/>
    </style:style>
    <style:style style:name="T3931" style:parent-style-name="Policepardéfaut" style:family="text">
      <style:text-properties style:font-name="Times New Roman" style:font-name-asian="GPAFJ+Aptos" style:font-name-complex="Times New Roman" fo:color="#000000" fo:font-size="12pt" style:font-size-asian="12pt" style:font-size-complex="12pt"/>
    </style:style>
    <style:style style:name="T3932" style:parent-style-name="Policepardéfaut" style:family="text">
      <style:text-properties style:font-name="Times New Roman" style:font-name-asian="GPAFJ+Aptos" style:font-name-complex="Times New Roman" fo:color="#000000" fo:font-size="12pt" style:font-size-asian="12pt" style:font-size-complex="12pt"/>
    </style:style>
    <style:style style:name="T3933" style:parent-style-name="Policepardéfaut" style:family="text">
      <style:text-properties style:font-name="Times New Roman" style:font-name-asian="GPAFJ+Aptos" style:font-name-complex="Times New Roman" fo:color="#000000" fo:font-size="12pt" style:font-size-asian="12pt" style:font-size-complex="12pt"/>
    </style:style>
    <style:style style:name="P3934" style:parent-style-name="Normal" style:family="paragraph">
      <style:paragraph-properties fo:widows="0" fo:orphans="0" fo:text-align="justify" fo:line-height="107%" fo:margin-right="0.5631in"/>
      <style:text-properties style:font-name="Times New Roman" style:font-name-asian="GPAFJ+Aptos" style:font-name-complex="Times New Roman" fo:color="#000000" fo:font-size="12pt" style:font-size-asian="12pt" style:font-size-complex="12pt"/>
    </style:style>
    <style:style style:name="P3935" style:parent-style-name="Normal" style:family="paragraph">
      <style:paragraph-properties fo:widows="0" fo:orphans="0" fo:text-align="justify" fo:line-height="107%" fo:margin-right="0.4333in"/>
    </style:style>
    <style:style style:name="T3936" style:parent-style-name="Policepardéfaut" style:family="text">
      <style:text-properties style:font-name="Times New Roman" style:font-name-asian="GPAFJ+Aptos" style:font-name-complex="Times New Roman" fo:color="#000000" fo:font-size="12pt" style:font-size-asian="12pt" style:font-size-complex="12pt"/>
    </style:style>
    <style:style style:name="T3937" style:parent-style-name="Policepardéfaut" style:family="text">
      <style:text-properties style:font-name="Times New Roman" style:font-name-asian="GPAFJ+Aptos" style:font-name-complex="Times New Roman" fo:color="#000000" fo:font-size="12pt" style:font-size-asian="12pt" style:font-size-complex="12pt"/>
    </style:style>
    <style:style style:name="T393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3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940" style:parent-style-name="Policepardéfaut" style:family="text">
      <style:text-properties style:font-name="Times New Roman" style:font-name-asian="GPAFJ+Aptos" style:font-name-complex="Times New Roman" fo:color="#000000" fo:font-size="12pt" style:font-size-asian="12pt" style:font-size-complex="12pt"/>
    </style:style>
    <style:style style:name="T394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42" style:parent-style-name="Policepardéfaut" style:family="text">
      <style:text-properties style:font-name="Times New Roman" style:font-name-asian="GPAFJ+Aptos" style:font-name-complex="Times New Roman" fo:color="#000000" fo:font-size="12pt" style:font-size-asian="12pt" style:font-size-complex="12pt"/>
    </style:style>
    <style:style style:name="T394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44" style:parent-style-name="Policepardéfaut" style:family="text">
      <style:text-properties style:font-name="Times New Roman" style:font-name-asian="GPAFJ+Aptos" style:font-name-complex="Times New Roman" fo:color="#000000" fo:font-size="12pt" style:font-size-asian="12pt" style:font-size-complex="12pt"/>
    </style:style>
    <style:style style:name="T3945"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946"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94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48" style:parent-style-name="Policepardéfaut" style:family="text">
      <style:text-properties style:font-name="Times New Roman" style:font-name-asian="GPAFJ+Aptos" style:font-name-complex="Times New Roman" fo:color="#000000" fo:font-size="12pt" style:font-size-asian="12pt" style:font-size-complex="12pt"/>
    </style:style>
    <style:style style:name="T3949"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95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5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95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5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954"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95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56"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395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95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59" style:parent-style-name="Policepardéfaut" style:family="text">
      <style:text-properties style:font-name="Times New Roman" style:font-name-asian="GPAFJ+Aptos" style:font-name-complex="Times New Roman" fo:color="#000000" fo:font-size="12pt" style:font-size-asian="12pt" style:font-size-complex="12pt"/>
    </style:style>
    <style:style style:name="T3960"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96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6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963"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964" style:parent-style-name="Policepardéfaut" style:family="text">
      <style:text-properties style:font-name="Times New Roman" style:font-name-asian="GPAFJ+Aptos" style:font-name-complex="Times New Roman" fo:color="#000000" fo:font-size="12pt" style:font-size-asian="12pt" style:font-size-complex="12pt"/>
    </style:style>
    <style:style style:name="T396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66"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96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6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96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7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971" style:parent-style-name="Policepardéfaut" style:family="text">
      <style:text-properties style:font-name="Times New Roman" style:font-name-asian="GPAFJ+Aptos" style:font-name-complex="Times New Roman" fo:color="#000000" fo:letter-spacing="0.002in" style:text-scale="101%" fo:font-size="12pt" style:font-size-asian="12pt" style:font-size-complex="12pt"/>
    </style:style>
    <style:style style:name="T397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73" style:parent-style-name="Policepardéfaut" style:family="text">
      <style:text-properties style:font-name="Times New Roman" style:font-name-asian="GPAFJ+Aptos" style:font-name-complex="Times New Roman" fo:color="#000000" fo:font-size="12pt" style:font-size-asian="12pt" style:font-size-complex="12pt"/>
    </style:style>
    <style:style style:name="T397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7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976" style:parent-style-name="Policepardéfaut" style:family="text">
      <style:text-properties style:font-name="Times New Roman" style:font-name-asian="GPAFJ+Aptos" style:font-name-complex="Times New Roman" fo:color="#000000" fo:font-size="12pt" style:font-size-asian="12pt" style:font-size-complex="12pt"/>
    </style:style>
    <style:style style:name="T397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978"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97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80" style:parent-style-name="Policepardéfaut" style:family="text">
      <style:text-properties style:font-name="Times New Roman" style:font-name-asian="GPAFJ+Aptos" style:font-name-complex="Times New Roman" fo:color="#000000" fo:font-size="12pt" style:font-size-asian="12pt" style:font-size-complex="12pt"/>
    </style:style>
    <style:style style:name="T398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8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983"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984" style:parent-style-name="Policepardéfaut" style:family="text">
      <style:text-properties style:font-name="Times New Roman" style:font-name-asian="GPAFJ+Aptos" style:font-name-complex="Times New Roman" fo:color="#000000" fo:font-size="12pt" style:font-size-asian="12pt" style:font-size-complex="12pt"/>
    </style:style>
    <style:style style:name="T398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986" style:parent-style-name="Policepardéfaut" style:family="text">
      <style:text-properties style:font-name="Times New Roman" style:font-name-asian="GPAFJ+Aptos" style:font-name-complex="Times New Roman" fo:color="#000000" fo:font-size="12pt" style:font-size-asian="12pt" style:font-size-complex="12pt"/>
    </style:style>
    <style:style style:name="T3987"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988" style:parent-style-name="Policepardéfaut" style:family="text">
      <style:text-properties style:font-name="Times New Roman" style:font-name-asian="GPAFJ+Aptos" style:font-name-complex="Times New Roman" fo:color="#000000" fo:font-size="12pt" style:font-size-asian="12pt" style:font-size-complex="12pt"/>
    </style:style>
    <style:style style:name="T398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990" style:parent-style-name="Policepardéfaut" style:family="text">
      <style:text-properties style:font-name="Times New Roman" style:font-name-asian="GPAFJ+Aptos" style:font-name-complex="Times New Roman" fo:color="#000000" fo:font-size="12pt" style:font-size-asian="12pt" style:font-size-complex="12pt"/>
    </style:style>
    <style:style style:name="T3991"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99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9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94"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399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399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3997"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3998" style:parent-style-name="Policepardéfaut" style:family="text">
      <style:text-properties style:font-name="Times New Roman" style:font-name-asian="GPAFJ+Aptos" style:font-name-complex="Times New Roman" fo:color="#000000" fo:font-size="12pt" style:font-size-asian="12pt" style:font-size-complex="12pt"/>
    </style:style>
    <style:style style:name="T399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00" style:parent-style-name="Policepardéfaut" style:family="text">
      <style:text-properties style:font-name="Times New Roman" style:font-name-asian="GPAFJ+Aptos" style:font-name-complex="Times New Roman" fo:color="#000000" fo:font-size="12pt" style:font-size-asian="12pt" style:font-size-complex="12pt"/>
    </style:style>
    <style:style style:name="T400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4002" style:parent-style-name="Policepardéfaut" style:family="text">
      <style:text-properties style:font-name="Times New Roman" style:font-name-asian="GPAFJ+Aptos" style:font-name-complex="Times New Roman" fo:color="#000000" fo:font-size="12pt" style:font-size-asian="12pt" style:font-size-complex="12pt"/>
    </style:style>
    <style:style style:name="T400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0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0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0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0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4008"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4009"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401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11"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401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13"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4014" style:parent-style-name="Policepardéfaut" style:family="text">
      <style:text-properties style:font-name="Times New Roman" style:font-name-asian="GPAFJ+Aptos" style:font-name-complex="Times New Roman" fo:color="#000000" fo:font-size="12pt" style:font-size-asian="12pt" style:font-size-complex="12pt"/>
    </style:style>
    <style:style style:name="T401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1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4017"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4018"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4019" style:parent-style-name="Policepardéfaut" style:family="text">
      <style:text-properties style:font-name="Times New Roman" style:font-name-asian="GPAFJ+Aptos" style:font-name-complex="Times New Roman" fo:color="#000000" fo:font-size="12pt" style:font-size-asian="12pt" style:font-size-complex="12pt"/>
    </style:style>
    <style:style style:name="T402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21" style:parent-style-name="Policepardéfaut" style:family="text">
      <style:text-properties style:font-name="Times New Roman" style:font-name-asian="GPAFJ+Aptos" style:font-name-complex="Times New Roman" fo:color="#000000" fo:font-size="12pt" style:font-size-asian="12pt" style:font-size-complex="12pt"/>
    </style:style>
    <style:style style:name="T4022"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402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24" style:parent-style-name="Policepardéfaut" style:family="text">
      <style:text-properties style:font-name="Times New Roman" style:font-name-asian="GPAFJ+Aptos" style:font-name-complex="Times New Roman" fo:color="#000000" fo:font-size="12pt" style:font-size-asian="12pt" style:font-size-complex="12pt"/>
    </style:style>
    <style:style style:name="T4025"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4026" style:parent-style-name="Policepardéfaut" style:family="text">
      <style:text-properties style:font-name="Times New Roman" style:font-name-asian="GPAFJ+Aptos" style:font-name-complex="Times New Roman" fo:color="#000000" fo:font-size="12pt" style:font-size-asian="12pt" style:font-size-complex="12pt"/>
    </style:style>
    <style:style style:name="T4027"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4028" style:parent-style-name="Policepardéfaut" style:family="text">
      <style:text-properties style:font-name="Times New Roman" style:font-name-asian="GPAFJ+Aptos" style:font-name-complex="Times New Roman" fo:color="#000000" fo:font-size="12pt" style:font-size-asian="12pt" style:font-size-complex="12pt"/>
    </style:style>
    <style:style style:name="T402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30" style:parent-style-name="Policepardéfaut" style:family="text">
      <style:text-properties style:font-name="Times New Roman" style:font-name-asian="GPAFJ+Aptos" style:font-name-complex="Times New Roman" fo:color="#000000" fo:font-size="12pt" style:font-size-asian="12pt" style:font-size-complex="12pt"/>
    </style:style>
    <style:style style:name="T4031"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4032" style:parent-style-name="Policepardéfaut" style:family="text">
      <style:text-properties style:font-name="Times New Roman" style:font-name-asian="GPAFJ+Aptos" style:font-name-complex="Times New Roman" fo:color="#000000" fo:font-size="12pt" style:font-size-asian="12pt" style:font-size-complex="12pt"/>
    </style:style>
    <style:style style:name="T4033" style:parent-style-name="Policepardéfaut" style:family="text">
      <style:text-properties style:font-name="Times New Roman" style:font-name-asian="GPAFJ+Aptos" style:font-name-complex="Times New Roman" fo:color="#000000" fo:font-size="12pt" style:font-size-asian="12pt" style:font-size-complex="12pt"/>
    </style:style>
    <style:style style:name="T4034"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403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3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4037" style:parent-style-name="Policepardéfaut" style:family="text">
      <style:text-properties style:font-name="Times New Roman" style:font-name-asian="GPAFJ+Aptos" style:font-name-complex="Times New Roman" fo:color="#000000" fo:font-size="12pt" style:font-size-asian="12pt" style:font-size-complex="12pt"/>
    </style:style>
    <style:style style:name="T403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39"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4040" style:parent-style-name="Policepardéfaut" style:family="text">
      <style:text-properties style:font-name="Times New Roman" style:font-name-asian="GPAFJ+Aptos" style:font-name-complex="Times New Roman" fo:color="#000000" fo:font-size="12pt" style:font-size-asian="12pt" style:font-size-complex="12pt"/>
    </style:style>
    <style:style style:name="T4041" style:parent-style-name="Policepardéfaut" style:family="text">
      <style:text-properties style:font-name="Times New Roman" style:font-name-asian="GPAFJ+Aptos" style:font-name-complex="Times New Roman" fo:color="#000000" fo:letter-spacing="-0.0013in" fo:font-size="12pt" style:font-size-asian="12pt" style:font-size-complex="12pt"/>
    </style:style>
    <style:style style:name="T4042" style:parent-style-name="Policepardéfaut" style:family="text">
      <style:text-properties style:font-name="Times New Roman" style:font-name-asian="GPAFJ+Aptos" style:font-name-complex="Times New Roman" fo:color="#000000" fo:font-size="12pt" style:font-size-asian="12pt" style:font-size-complex="12pt"/>
    </style:style>
    <style:style style:name="T404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44" style:parent-style-name="Policepardéfaut" style:family="text">
      <style:text-properties style:font-name="Times New Roman" style:font-name-asian="GPAFJ+Aptos" style:font-name-complex="Times New Roman" fo:color="#000000" fo:letter-spacing="-0.0013in" style:text-scale="101%" fo:font-size="12pt" style:font-size-asian="12pt" style:font-size-complex="12pt"/>
    </style:style>
    <style:style style:name="T4045" style:parent-style-name="Policepardéfaut" style:family="text">
      <style:text-properties style:font-name="Times New Roman" style:font-name-asian="GPAFJ+Aptos" style:font-name-complex="Times New Roman" fo:color="#000000" fo:font-size="12pt" style:font-size-asian="12pt" style:font-size-complex="12pt"/>
    </style:style>
    <style:style style:name="T404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4047"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4048" style:parent-style-name="Policepardéfaut" style:family="text">
      <style:text-properties style:font-name="Times New Roman" style:font-name-asian="GPAFJ+Aptos" style:font-name-complex="Times New Roman" fo:color="#000000" fo:font-size="12pt" style:font-size-asian="12pt" style:font-size-complex="12pt"/>
    </style:style>
    <style:style style:name="T404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5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4051" style:parent-style-name="Policepardéfaut" style:family="text">
      <style:text-properties style:font-name="Times New Roman" style:font-name-asian="GPAFJ+Aptos" style:font-name-complex="Times New Roman" fo:color="#000000" fo:font-size="12pt" style:font-size-asian="12pt" style:font-size-complex="12pt"/>
    </style:style>
    <style:style style:name="T405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53"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4054" style:parent-style-name="Policepardéfaut" style:family="text">
      <style:text-properties style:font-name="Times New Roman" style:font-name-asian="GPAFJ+Aptos" style:font-name-complex="Times New Roman" fo:color="#000000" fo:letter-spacing="-0.002in" style:text-scale="101%" fo:font-size="12pt" style:font-size-asian="12pt" style:font-size-complex="12pt"/>
    </style:style>
    <style:style style:name="T4055" style:parent-style-name="Policepardéfaut" style:family="text">
      <style:text-properties style:font-name="Times New Roman" style:font-name-asian="GPAFJ+Aptos" style:font-name-complex="Times New Roman" fo:color="#000000" fo:font-size="12pt" style:font-size-asian="12pt" style:font-size-complex="12pt"/>
    </style:style>
    <style:style style:name="T4056"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4057"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405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59" style:parent-style-name="Policepardéfaut" style:family="text">
      <style:text-properties style:font-name="Times New Roman" style:font-name-asian="GPAFJ+Aptos" style:font-name-complex="Times New Roman" fo:color="#000000" fo:font-size="12pt" style:font-size-asian="12pt" style:font-size-complex="12pt"/>
    </style:style>
    <style:style style:name="T4060" style:parent-style-name="Policepardéfaut" style:family="text">
      <style:text-properties style:font-name="Times New Roman" style:font-name-asian="GPAFJ+Aptos" style:font-name-complex="Times New Roman" fo:color="#000000" fo:letter-spacing="-0.0006in" fo:font-size="12pt" style:font-size-asian="12pt" style:font-size-complex="12pt"/>
    </style:style>
    <style:style style:name="T406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62"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4063" style:parent-style-name="Policepardéfaut" style:family="text">
      <style:text-properties style:font-name="Times New Roman" style:font-name-asian="GPAFJ+Aptos" style:font-name-complex="Times New Roman" fo:color="#000000" fo:letter-spacing="-0.0006in" style:text-scale="101%" fo:font-size="12pt" style:font-size-asian="12pt" style:font-size-complex="12pt"/>
    </style:style>
    <style:style style:name="T4064" style:parent-style-name="Policepardéfaut" style:family="text">
      <style:text-properties style:font-name="Times New Roman" style:font-name-asian="GPAFJ+Aptos" style:font-name-complex="Times New Roman" fo:color="#000000" fo:font-size="12pt" style:font-size-asian="12pt" style:font-size-complex="12pt"/>
    </style:style>
    <style:style style:name="T406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P4066" style:parent-style-name="Normal" style:family="paragraph">
      <style:paragraph-properties fo:widows="0" fo:orphans="0" fo:text-align="justify" fo:line-height="107%" fo:margin-right="0.4333in"/>
      <style:text-properties style:font-name="Times New Roman" style:font-name-asian="GPAFJ+Aptos" style:font-name-complex="Times New Roman" fo:color="#000000" style:text-scale="101%" fo:font-size="12pt" style:font-size-asian="12pt" style:font-size-complex="12pt"/>
    </style:style>
    <style:style style:name="P4067" style:parent-style-name="Normal" style:family="paragraph">
      <style:paragraph-properties fo:widows="0" fo:orphans="0" fo:text-align="justify" fo:line-height="107%" fo:margin-right="0.4333in"/>
    </style:style>
    <style:style style:name="T4068" style:parent-style-name="Policepardéfaut" style:family="text">
      <style:text-properties style:font-name="Times New Roman" style:font-name-asian="GPAFJ+Aptos" style:font-name-complex="Times New Roman" fo:color="#000000" fo:font-size="12pt" style:font-size-asian="12pt" style:font-size-complex="12pt"/>
    </style:style>
    <style:style style:name="T4069" style:parent-style-name="Policepardéfaut" style:family="text">
      <style:text-properties style:font-name="Times New Roman" style:font-name-asian="GPAFJ+Aptos" style:font-name-complex="Times New Roman" fo:color="#000000" fo:font-size="12pt" style:font-size-asian="12pt" style:font-size-complex="12pt"/>
    </style:style>
    <style:style style:name="P4070" style:parent-style-name="Normal" style:family="paragraph">
      <style:paragraph-properties fo:widows="0" fo:orphans="0" fo:text-align="justify" fo:line-height="107%" fo:margin-right="0.4333in"/>
      <style:text-properties style:font-name="Times New Roman" style:font-name-asian="GPAFJ+Aptos" style:font-name-complex="Times New Roman" fo:color="#000000" fo:font-size="12pt" style:font-size-asian="12pt" style:font-size-complex="12pt"/>
    </style:style>
    <style:style style:name="P4071" style:parent-style-name="Normal" style:family="paragraph">
      <style:paragraph-properties fo:widows="0" fo:orphans="0" fo:text-align="justify" fo:line-height="107%" fo:margin-right="0.4333in"/>
    </style:style>
    <style:style style:name="T4072" style:parent-style-name="Policepardéfaut" style:family="text">
      <style:text-properties style:font-name="Times New Roman" style:font-name-asian="GPAFJ+Aptos" style:font-name-complex="Times New Roman" fo:color="#000000" fo:font-size="12pt" style:font-size-asian="12pt" style:font-size-complex="12pt"/>
    </style:style>
    <style:style style:name="T4073" style:parent-style-name="Policepardéfaut" style:family="text">
      <style:text-properties style:font-name="Times New Roman" style:font-name-asian="GPAFJ+Aptos" style:font-name-complex="Times New Roman" fo:color="#000000" fo:font-size="12pt" style:font-size-asian="12pt" style:font-size-complex="12pt"/>
    </style:style>
    <style:style style:name="T4074" style:parent-style-name="Policepardéfaut" style:family="text">
      <style:text-properties style:font-name="Times New Roman" style:font-name-asian="GPAFJ+Aptos" style:font-name-complex="Times New Roman" fo:color="#000000" fo:font-size="12pt" style:font-size-asian="12pt" style:font-size-complex="12pt"/>
    </style:style>
    <style:style style:name="T4075" style:parent-style-name="Policepardéfaut" style:family="text">
      <style:text-properties style:font-name="Times New Roman" style:font-name-asian="GPAFJ+Aptos" style:font-name-complex="Times New Roman" fo:color="#000000" fo:font-size="12pt" style:font-size-asian="12pt" style:font-size-complex="12pt"/>
    </style:style>
    <style:style style:name="T4076" style:parent-style-name="Policepardéfaut" style:family="text">
      <style:text-properties style:font-name="Times New Roman" style:font-name-asian="GPAFJ+Aptos" style:font-name-complex="Times New Roman" fo:color="#000000" fo:font-size="12pt" style:font-size-asian="12pt" style:font-size-complex="12pt"/>
    </style:style>
    <style:style style:name="T4077" style:parent-style-name="Policepardéfaut" style:family="text">
      <style:text-properties style:font-name="Times New Roman" style:font-name-asian="GPAFJ+Aptos" style:font-name-complex="Times New Roman" fo:color="#000000" fo:font-size="12pt" style:font-size-asian="12pt" style:font-size-complex="12pt"/>
    </style:style>
    <style:style style:name="T4078" style:parent-style-name="Policepardéfaut" style:family="text">
      <style:text-properties style:font-name="Times New Roman" style:font-name-asian="GPAFJ+Aptos" style:font-name-complex="Times New Roman" fo:color="#000000" fo:font-size="12pt" style:font-size-asian="12pt" style:font-size-complex="12pt"/>
    </style:style>
    <style:style style:name="T4079" style:parent-style-name="Policepardéfaut" style:family="text">
      <style:text-properties style:font-name="Times New Roman" style:font-name-asian="GPAFJ+Aptos" style:font-name-complex="Times New Roman" fo:color="#000000" fo:font-size="12pt" style:font-size-asian="12pt" style:font-size-complex="12pt"/>
    </style:style>
    <style:style style:name="T4080" style:parent-style-name="Policepardéfaut" style:family="text">
      <style:text-properties style:font-name="Times New Roman" style:font-name-asian="GPAFJ+Aptos" style:font-name-complex="Times New Roman" fo:color="#000000" fo:font-size="12pt" style:font-size-asian="12pt" style:font-size-complex="12pt"/>
    </style:style>
    <style:style style:name="T4081" style:parent-style-name="Policepardéfaut" style:family="text">
      <style:text-properties style:font-name="Times New Roman" style:font-name-asian="GPAFJ+Aptos" style:font-name-complex="Times New Roman" fo:color="#000000" fo:font-size="12pt" style:font-size-asian="12pt" style:font-size-complex="12pt"/>
    </style:style>
    <style:style style:name="T4082" style:parent-style-name="Policepardéfaut" style:family="text">
      <style:text-properties style:font-name="Times New Roman" style:font-name-asian="GPAFJ+Aptos" style:font-name-complex="Times New Roman" fo:color="#000000" fo:font-size="12pt" style:font-size-asian="12pt" style:font-size-complex="12pt"/>
    </style:style>
    <style:style style:name="T4083" style:parent-style-name="Policepardéfaut" style:family="text">
      <style:text-properties style:font-name="Times New Roman" style:font-name-asian="GPAFJ+Aptos" style:font-name-complex="Times New Roman" fo:color="#000000" fo:font-size="12pt" style:font-size-asian="12pt" style:font-size-complex="12pt"/>
    </style:style>
    <style:style style:name="P4084" style:parent-style-name="Normal" style:family="paragraph">
      <style:paragraph-properties fo:widows="0" fo:orphans="0" fo:text-align="justify" fo:line-height="107%" fo:margin-right="0.4333in"/>
      <style:text-properties style:font-name="Times New Roman" style:font-name-asian="GPAFJ+Aptos" style:font-name-complex="Times New Roman" fo:color="#000000" style:text-scale="101%"/>
    </style:style>
    <style:style style:name="P4085" style:parent-style-name="Normal" style:family="paragraph">
      <style:paragraph-properties fo:widows="0" fo:orphans="0" fo:text-align="justify" fo:line-height="107%" fo:margin-right="0.4333in"/>
      <style:text-properties style:font-name="Times New Roman" style:font-name-asian="GPAFJ+Aptos" style:font-name-complex="Times New Roman" fo:color="#000000" style:text-scale="101%"/>
    </style:style>
    <style:style style:name="P4086" style:parent-style-name="Normal" style:family="paragraph">
      <style:paragraph-properties fo:widows="0" fo:orphans="0" fo:text-align="justify" fo:line-height="107%" fo:margin-right="0.4333in"/>
      <style:text-properties style:font-name="Times New Roman" style:font-name-asian="GPAFJ+Aptos" style:font-name-complex="Times New Roman" fo:color="#000000" style:text-scale="101%"/>
    </style:style>
    <style:style style:name="P4087" style:parent-style-name="Normal" style:family="paragraph">
      <style:paragraph-properties fo:widows="0" fo:orphans="0" fo:text-align="justify" fo:line-height="107%" fo:margin-right="0.4333in"/>
      <style:text-properties style:font-name="Times New Roman" style:font-name-asian="GPAFJ+Aptos" style:font-name-complex="Times New Roman" fo:color="#000000"/>
    </style:style>
    <style:style style:name="P4088" style:parent-style-name="Titre1" style:list-style-name="LFO18" style:family="paragraph">
      <style:paragraph-properties fo:text-align="justify"/>
    </style:style>
    <style:style style:name="P4089" style:parent-style-name="Normal" style:family="paragraph">
      <style:paragraph-properties fo:widows="0" fo:orphans="0" fo:text-align="justify" fo:line-height="107%" fo:margin-right="0.3659in"/>
      <style:text-properties style:font-name="Times New Roman" style:font-name-asian="GPAFJ+Aptos" style:font-name-complex="Times New Roman" fo:color="#000000" style:text-scale="101%" fo:font-size="12pt" style:font-size-asian="12pt" style:font-size-complex="12pt"/>
    </style:style>
    <style:style style:name="P4090" style:parent-style-name="Normal" style:family="paragraph">
      <style:paragraph-properties fo:widows="0" fo:orphans="0" fo:text-align="justify" fo:line-height="107%" fo:margin-right="0.3659in"/>
    </style:style>
    <style:style style:name="T409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9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9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9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9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9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9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9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09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0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0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P4102" style:parent-style-name="Normal" style:family="paragraph">
      <style:paragraph-properties fo:widows="0" fo:orphans="0" fo:text-align="justify" fo:line-height="107%" fo:margin-right="0.3659in"/>
      <style:text-properties style:font-name="Times New Roman" style:font-name-asian="GPAFJ+Aptos" style:font-name-complex="Times New Roman" fo:color="#000000" style:text-scale="101%" fo:font-size="12pt" style:font-size-asian="12pt" style:font-size-complex="12pt"/>
    </style:style>
    <style:style style:name="P4103" style:parent-style-name="Normal" style:family="paragraph">
      <style:paragraph-properties fo:widows="0" fo:orphans="0" fo:text-align="justify" fo:line-height="107%" fo:margin-right="0.3659in"/>
      <style:text-properties style:font-name="Times New Roman" style:font-name-asian="GPAFJ+Aptos" style:font-name-complex="Times New Roman" fo:color="#000000" style:text-scale="101%" fo:font-size="12pt" style:font-size-asian="12pt" style:font-size-complex="12pt"/>
    </style:style>
    <style:style style:name="P4104" style:parent-style-name="Normal" style:family="paragraph">
      <style:paragraph-properties fo:widows="0" fo:orphans="0" fo:text-align="justify" fo:line-height="107%" fo:margin-right="0.3659in"/>
    </style:style>
    <style:style style:name="T410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0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0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0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0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1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1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1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1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1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1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1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1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1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1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2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21"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2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23"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2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2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2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2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2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2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130"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P4131" style:parent-style-name="Normal" style:family="paragraph">
      <style:paragraph-properties fo:widows="0" fo:orphans="0" fo:text-align="justify" fo:line-height="107%" fo:margin-right="0.3659in"/>
    </style:style>
    <style:style style:name="T4132"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P4133"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134"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135" style:parent-style-name="Normal" style:family="paragraph">
      <style:paragraph-properties fo:widows="0" fo:orphans="0" fo:text-align="justify" fo:line-height="107%" fo:margin-right="0.3659in"/>
    </style:style>
    <style:style style:name="T4136" style:parent-style-name="Policepardéfaut" style:family="text">
      <style:text-properties style:font-name="Aptos" style:font-name-asian="Yu Mincho" style:font-name-complex="Arial" fo:color="#000000" fo:font-size="12pt" style:font-size-asian="12pt" style:font-size-complex="12pt"/>
    </style:style>
    <style:style style:name="P4137"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138" style:parent-style-name="Normal" style:family="paragraph">
      <style:paragraph-properties fo:widows="0" fo:orphans="0" fo:text-align="justify" fo:line-height="107%" fo:margin-right="0.3659in"/>
    </style:style>
    <style:style style:name="T4139" style:parent-style-name="Policepardéfaut" style:family="text">
      <style:text-properties style:font-name="Aptos" style:font-name-asian="Yu Mincho" style:font-name-complex="Arial" fo:color="#000000" fo:font-size="12pt" style:font-size-asian="12pt" style:font-size-complex="12pt"/>
    </style:style>
    <style:style style:name="P4140"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141" style:parent-style-name="Normal" style:family="paragraph">
      <style:paragraph-properties fo:widows="0" fo:orphans="0" fo:text-align="justify" fo:line-height="107%" fo:margin-right="0.3659in"/>
    </style:style>
    <style:style style:name="T4142" style:parent-style-name="Policepardéfaut" style:family="text">
      <style:text-properties style:font-name="Aptos" style:font-name-asian="Yu Mincho" style:font-name-complex="Arial" fo:color="#000000" fo:font-size="12pt" style:font-size-asian="12pt" style:font-size-complex="12pt"/>
    </style:style>
    <style:style style:name="P4143"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144" style:parent-style-name="Normal" style:family="paragraph">
      <style:paragraph-properties fo:text-align="justify" fo:line-height="107%" fo:margin-right="0.3659in"/>
    </style:style>
    <style:style style:name="T4145" style:parent-style-name="Policepardéfaut" style:family="text">
      <style:text-properties style:font-name="Aptos" style:font-name-asian="Yu Mincho" style:font-name-complex="Arial" fo:color="#000000" fo:font-size="12pt" style:font-size-asian="12pt" style:font-size-complex="12pt"/>
    </style:style>
    <style:style style:name="T4146" style:parent-style-name="Policepardéfaut" style:family="text">
      <style:text-properties style:font-name="Aptos" style:font-name-asian="Yu Mincho" style:font-name-complex="Arial" fo:color="#000000" fo:font-size="12pt" style:font-size-asian="12pt" style:font-size-complex="12pt"/>
    </style:style>
    <style:style style:name="T4147" style:parent-style-name="Policepardéfaut" style:family="text">
      <style:text-properties style:font-name="Aptos" style:font-name-asian="Yu Mincho" style:font-name-complex="Arial" fo:color="#000000" fo:font-size="12pt" style:font-size-asian="12pt" style:font-size-complex="12pt"/>
    </style:style>
    <style:style style:name="T4148" style:parent-style-name="Policepardéfaut" style:family="text">
      <style:text-properties style:font-name="Aptos" style:font-name-asian="Yu Mincho" style:font-name-complex="Arial" fo:color="#000000" fo:font-size="12pt" style:font-size-asian="12pt" style:font-size-complex="12pt"/>
    </style:style>
    <style:style style:name="P4149" style:parent-style-name="Normal" style:family="paragraph">
      <style:paragraph-properties fo:widows="0" fo:orphans="0" fo:text-align="justify" fo:line-height="107%" fo:margin-right="0.3659in"/>
    </style:style>
    <style:style style:name="T4150" style:parent-style-name="Policepardéfaut" style:family="text">
      <style:text-properties style:font-name="Aptos" style:font-name-asian="Yu Mincho" style:font-name-complex="Arial" fo:color="#000000" fo:font-size="12pt" style:font-size-asian="12pt" style:font-size-complex="12pt"/>
    </style:style>
    <style:style style:name="T4151" style:parent-style-name="Policepardéfaut" style:family="text">
      <style:text-properties style:font-name="Aptos" style:font-name-asian="Yu Mincho" style:font-name-complex="Arial" fo:color="#000000" fo:font-size="12pt" style:font-size-asian="12pt" style:font-size-complex="12pt"/>
    </style:style>
    <style:style style:name="T4152" style:parent-style-name="Policepardéfaut" style:family="text">
      <style:text-properties style:font-name="Aptos" style:font-name-asian="Yu Mincho" style:font-name-complex="Arial" fo:color="#000000" fo:font-size="12pt" style:font-size-asian="12pt" style:font-size-complex="12pt"/>
    </style:style>
    <style:style style:name="P4153"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154" style:parent-style-name="Normal" style:family="paragraph">
      <style:paragraph-properties fo:widows="0" fo:orphans="0" fo:text-align="justify" fo:line-height="107%" fo:margin-right="0.3659in"/>
    </style:style>
    <style:style style:name="T4155" style:parent-style-name="Policepardéfaut" style:family="text">
      <style:text-properties style:font-name="Aptos" style:font-name-asian="Yu Mincho" style:font-name-complex="Arial" fo:color="#000000" fo:font-size="12pt" style:font-size-asian="12pt" style:font-size-complex="12pt"/>
    </style:style>
    <style:style style:name="T4156" style:parent-style-name="Policepardéfaut" style:family="text">
      <style:text-properties style:font-name="Aptos" style:font-name-asian="Yu Mincho" style:font-name-complex="Arial" fo:color="#000000" fo:font-size="12pt" style:font-size-asian="12pt" style:font-size-complex="12pt"/>
    </style:style>
    <style:style style:name="T4157" style:parent-style-name="Policepardéfaut" style:family="text">
      <style:text-properties style:font-name="Aptos" style:font-name-asian="Yu Mincho" style:font-name-complex="Arial" fo:color="#000000" fo:font-size="12pt" style:font-size-asian="12pt" style:font-size-complex="12pt"/>
    </style:style>
    <style:style style:name="T4158" style:parent-style-name="Policepardéfaut" style:family="text">
      <style:text-properties style:font-name="Aptos" style:font-name-asian="Yu Mincho" style:font-name-complex="Arial" fo:color="#000000" fo:font-size="12pt" style:font-size-asian="12pt" style:font-size-complex="12pt"/>
    </style:style>
    <style:style style:name="T4159" style:parent-style-name="Policepardéfaut" style:family="text">
      <style:text-properties style:font-name="Aptos" style:font-name-asian="Yu Mincho" style:font-name-complex="Arial" fo:color="#000000" fo:font-size="12pt" style:font-size-asian="12pt" style:font-size-complex="12pt"/>
    </style:style>
    <style:style style:name="T4160" style:parent-style-name="Policepardéfaut" style:family="text">
      <style:text-properties style:font-name="Aptos" style:font-name-asian="Yu Mincho" style:font-name-complex="Arial" fo:color="#000000" fo:font-size="12pt" style:font-size-asian="12pt" style:font-size-complex="12pt"/>
    </style:style>
    <style:style style:name="T4161" style:parent-style-name="Policepardéfaut" style:family="text">
      <style:text-properties style:font-name="Aptos" style:font-name-asian="Yu Mincho" style:font-name-complex="Arial" fo:color="#000000" fo:font-size="12pt" style:font-size-asian="12pt" style:font-size-complex="12pt"/>
    </style:style>
    <style:style style:name="T4162" style:parent-style-name="Policepardéfaut" style:family="text">
      <style:text-properties style:font-name="Aptos" style:font-name-asian="Yu Mincho" style:font-name-complex="Arial" fo:color="#000000" fo:font-size="12pt" style:font-size-asian="12pt" style:font-size-complex="12pt"/>
    </style:style>
    <style:style style:name="T4163" style:parent-style-name="Policepardéfaut" style:family="text">
      <style:text-properties style:font-name="Aptos" style:font-name-asian="Yu Mincho" style:font-name-complex="Arial" fo:color="#000000" fo:font-size="12pt" style:font-size-asian="12pt" style:font-size-complex="12pt"/>
    </style:style>
    <style:style style:name="T4164" style:parent-style-name="Policepardéfaut" style:family="text">
      <style:text-properties style:font-name="Aptos" style:font-name-asian="Yu Mincho" style:font-name-complex="Arial" fo:color="#000000" fo:font-size="12pt" style:font-size-asian="12pt" style:font-size-complex="12pt"/>
    </style:style>
    <style:style style:name="T4165" style:parent-style-name="Policepardéfaut" style:family="text">
      <style:text-properties style:font-name="Aptos" style:font-name-asian="Yu Mincho" style:font-name-complex="Arial" fo:color="#000000" fo:font-size="12pt" style:font-size-asian="12pt" style:font-size-complex="12pt"/>
    </style:style>
    <style:style style:name="T4166" style:parent-style-name="Policepardéfaut" style:family="text">
      <style:text-properties style:font-name="Aptos" style:font-name-asian="Yu Mincho" style:font-name-complex="Arial" fo:color="#000000" fo:font-size="12pt" style:font-size-asian="12pt" style:font-size-complex="12pt"/>
    </style:style>
    <style:style style:name="T4167" style:parent-style-name="Policepardéfaut" style:family="text">
      <style:text-properties style:font-name="Aptos" style:font-name-asian="Yu Mincho" style:font-name-complex="Arial" fo:color="#000000" fo:font-size="12pt" style:font-size-asian="12pt" style:font-size-complex="12pt"/>
    </style:style>
    <style:style style:name="P4168" style:parent-style-name="Normal" style:family="paragraph">
      <style:paragraph-properties fo:widows="0" fo:orphans="0" fo:break-before="page" fo:line-height="107%"/>
    </style:style>
    <style:style style:name="P4169"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170" style:parent-style-name="Normal" style:family="paragraph">
      <style:paragraph-properties fo:margin-bottom="0.1111in" fo:line-height="115%"/>
    </style:style>
    <style:style style:name="P4171" style:parent-style-name="Titre1" style:list-style-name="LFO18" style:family="paragraph">
      <style:paragraph-properties fo:text-align="justify"/>
      <style:text-properties style:font-name-asian="GPAFJ+Aptos" style:text-scale="101%"/>
    </style:style>
    <style:style style:name="P4172" style:parent-style-name="Normal" style:family="paragraph">
      <style:text-properties style:font-name="Times New Roman" style:font-name-asian="GPAFJ+Aptos" style:font-name-complex="Times New Roman" fo:color="#000000" style:text-scale="101%" fo:font-size="12pt" style:font-size-asian="12pt" style:font-size-complex="12pt"/>
    </style:style>
    <style:style style:name="P4173" style:parent-style-name="Normal" style:family="paragraph">
      <style:paragraph-properties fo:widows="0" fo:orphans="0" fo:text-align="justify" fo:line-height="107%" fo:margin-right="0.3659in"/>
      <style:text-properties style:font-name="Times New Roman" style:font-name-asian="GPAFJ+Aptos" style:font-name-complex="Times New Roman" fo:font-weight="bold" style:font-weight-asian="bold" style:font-weight-complex="bold" fo:color="#000000" style:text-scale="101%" fo:font-size="12pt" style:font-size-asian="12pt" style:font-size-complex="12pt"/>
    </style:style>
    <style:style style:name="P4174" style:parent-style-name="Normal" style:family="paragraph">
      <style:paragraph-properties fo:widows="0" fo:orphans="0" fo:text-align="justify" fo:line-height="107%" fo:margin-right="0.3659in"/>
    </style:style>
    <style:style style:name="T4175" style:parent-style-name="Policepardéfaut" style:family="text">
      <style:text-properties style:font-name="Times New Roman" style:font-name-asian="GPAFJ+Aptos" style:font-name-complex="Times New Roman" fo:color="#000000" fo:font-size="12pt" style:font-size-asian="12pt" style:font-size-complex="12pt"/>
    </style:style>
    <style:style style:name="P4176" style:parent-style-name="Paragraphedeliste" style:list-style-name="LFO15"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177" style:parent-style-name="Paragraphedeliste" style:list-style-name="LFO15"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178" style:parent-style-name="Paragraphedeliste" style:list-style-name="LFO15"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179" style:parent-style-name="Paragraphedeliste" style:list-style-name="LFO15"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180" style:parent-style-name="Normal" style:family="paragraph">
      <style:paragraph-properties fo:widows="0" fo:orphans="0" fo:text-align="justify" fo:line-height="107%" fo:margin-right="0.3659in"/>
      <style:text-properties style:font-name="Times New Roman" style:font-name-asian="GPAFJ+Aptos" style:font-name-complex="Times New Roman" fo:font-size="12pt" style:font-size-asian="12pt" style:font-size-complex="12pt"/>
    </style:style>
    <style:style style:name="P4181"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182" style:parent-style-name="Paragraphedeliste" style:list-style-name="LFO14"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183" style:parent-style-name="Paragraphedeliste" style:list-style-name="LFO14"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184" style:parent-style-name="Normal" style:family="paragraph">
      <style:paragraph-properties fo:widows="0" fo:orphans="0" fo:text-align="justify" fo:line-height="107%" fo:margin-right="0.3659in"/>
      <style:text-properties style:font-name="Times New Roman" style:font-name-asian="GPAFJ+Aptos" style:font-name-complex="Times New Roman" fo:font-weight="bold" style:font-weight-asian="bold" style:font-weight-complex="bold" fo:color="#000000" fo:font-size="12pt" style:font-size-asian="12pt" style:font-size-complex="12pt"/>
    </style:style>
    <style:style style:name="P4185" style:parent-style-name="Normal" style:family="paragraph">
      <style:paragraph-properties fo:widows="0" fo:orphans="0" fo:text-align="justify" fo:line-height="107%" fo:margin-right="0.3659in"/>
      <style:text-properties style:font-name="Times New Roman" style:font-name-asian="GPAFJ+Aptos" style:font-name-complex="Times New Roman" fo:font-weight="bold" style:font-weight-asian="bold" style:font-weight-complex="bold" fo:color="#000000" style:text-scale="101%" fo:font-size="12pt" style:font-size-asian="12pt" style:font-size-complex="12pt"/>
    </style:style>
    <style:style style:name="P4186" style:parent-style-name="Paragraphedeliste" style:list-style-name="LFO13"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187" style:parent-style-name="Paragraphedeliste" style:list-style-name="LFO20" style:family="paragraph">
      <style:paragraph-properties fo:widows="0" fo:orphans="0" fo:text-align="justify" fo:line-height="107%" fo:margin-right="0.3659in"/>
      <style:text-properties style:font-name="Times New Roman" style:font-name-asian="GPAFJ+Aptos" style:font-name-complex="Times New Roman" fo:color="#000000" style:text-scale="101%" fo:font-size="12pt" style:font-size-asian="12pt" style:font-size-complex="12pt"/>
    </style:style>
    <style:style style:name="P4188" style:parent-style-name="Paragraphedeliste" style:list-style-name="LFO20" style:family="paragraph">
      <style:paragraph-properties fo:widows="0" fo:orphans="0" fo:text-align="justify" fo:line-height="107%" fo:margin-right="0.3659in"/>
      <style:text-properties style:font-name="Times New Roman" style:font-name-asian="GPAFJ+Aptos" style:font-name-complex="Times New Roman" fo:color="#000000" style:text-scale="101%" fo:font-size="12pt" style:font-size-asian="12pt" style:font-size-complex="12pt"/>
    </style:style>
    <style:style style:name="P4189" style:parent-style-name="Paragraphedeliste" style:list-style-name="LFO20" style:family="paragraph">
      <style:paragraph-properties fo:widows="0" fo:orphans="0" fo:text-align="justify" fo:line-height="107%" fo:margin-right="0.3659in"/>
    </style:style>
    <style:style style:name="T4190" style:parent-style-name="Policepardéfaut" style:family="text">
      <style:text-properties style:font-name="Times New Roman" style:font-name-asian="GPAFJ+Aptos" style:font-name-complex="Times New Roman" fo:color="#000000" fo:font-size="12pt" style:font-size-asian="12pt" style:font-size-complex="12pt"/>
    </style:style>
    <style:style style:name="T4191" style:parent-style-name="Policepardéfaut" style:family="text">
      <style:text-properties style:font-name="Times New Roman" style:font-name-asian="GPAFJ+Aptos" style:font-name-complex="Times New Roman" fo:color="#000000" fo:font-size="12pt" style:font-size-asian="12pt" style:font-size-complex="12pt"/>
    </style:style>
    <style:style style:name="T4192" style:parent-style-name="Policepardéfaut" style:family="text">
      <style:text-properties style:font-name="Times New Roman" style:font-name-asian="GPAFJ+Aptos" style:font-name-complex="Times New Roman" fo:color="#000000" fo:font-size="12pt" style:font-size-asian="12pt" style:font-size-complex="12pt"/>
    </style:style>
    <style:style style:name="P4193" style:parent-style-name="Paragraphedeliste" style:list-style-name="LFO12" style:family="paragraph">
      <style:paragraph-properties fo:text-align="justify" fo:line-height="107%" fo:margin-right="0.3659in"/>
    </style:style>
    <style:style style:name="T4194" style:parent-style-name="Policepardéfaut" style:family="text">
      <style:text-properties style:font-name="Aptos" style:font-name-asian="Yu Mincho" style:font-name-complex="Arial" fo:color="#000000" fo:font-size="12pt" style:font-size-asian="12pt" style:font-size-complex="12pt"/>
    </style:style>
    <style:style style:name="T4195" style:parent-style-name="Policepardéfaut" style:family="text">
      <style:text-properties style:font-name="Aptos" style:font-name-asian="Yu Mincho" style:font-name-complex="Arial" fo:color="#000000" fo:font-size="12pt" style:font-size-asian="12pt" style:font-size-complex="12pt"/>
    </style:style>
    <style:style style:name="T4196" style:parent-style-name="Policepardéfaut" style:family="text">
      <style:text-properties style:font-name="Aptos" style:font-name-asian="Yu Mincho" style:font-name-complex="Arial" fo:color="#000000" fo:font-size="12pt" style:font-size-asian="12pt" style:font-size-complex="12pt"/>
    </style:style>
    <style:style style:name="T4197" style:parent-style-name="Policepardéfaut" style:family="text">
      <style:text-properties style:font-name="Aptos" style:font-name-asian="Yu Mincho" style:font-name-complex="Arial" fo:color="#000000" fo:font-size="12pt" style:font-size-asian="12pt" style:font-size-complex="12pt"/>
    </style:style>
    <style:style style:name="T4198" style:parent-style-name="Policepardéfaut" style:family="text">
      <style:text-properties style:font-name="Aptos" style:font-name-asian="Yu Mincho" style:font-name-complex="Arial" fo:color="#000000" fo:font-size="12pt" style:font-size-asian="12pt" style:font-size-complex="12pt"/>
    </style:style>
    <style:style style:name="P4199" style:parent-style-name="Normal" style:family="paragraph">
      <style:text-properties style:font-name="Times New Roman" style:font-name-asian="GPAFJ+Aptos" style:font-name-complex="Times New Roman" fo:color="#000000" fo:font-size="12pt" style:font-size-asian="12pt" style:font-size-complex="12pt"/>
    </style:style>
    <style:style style:name="T4200"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P4201" style:parent-style-name="Paragraphedeliste" style:list-style-name="LFO4" style:family="paragraph">
      <style:paragraph-properties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02" style:parent-style-name="Paragraphedeliste" style:list-style-name="LFO3" style:family="paragraph">
      <style:paragraph-properties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03" style:parent-style-name="Paragraphedeliste" style:list-style-name="LFO2" style:family="paragraph">
      <style:paragraph-properties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04" style:parent-style-name="Paragraphedeliste" style:list-style-name="LFO1" style:family="paragraph">
      <style:paragraph-properties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05" style:parent-style-name="Normal" style:family="paragraph">
      <style:text-properties style:font-name="Times New Roman" style:font-name-asian="GPAFJ+Aptos" style:font-name-complex="Times New Roman" fo:color="#000000" fo:font-size="12pt" style:font-size-asian="12pt" style:font-size-complex="12pt"/>
    </style:style>
    <style:style style:name="T4206"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P4207" style:parent-style-name="Paragraphedeliste" style:list-style-name="LFO9" style:family="paragraph">
      <style:paragraph-properties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08" style:parent-style-name="Paragraphedeliste" style:list-style-name="LFO9" style:family="paragraph">
      <style:paragraph-properties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09" style:parent-style-name="Paragraphedeliste" style:list-style-name="LFO9" style:family="paragraph">
      <style:paragraph-properties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10" style:parent-style-name="Paragraphedeliste" style:list-style-name="LFO9" style:family="paragraph">
      <style:paragraph-properties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11" style:parent-style-name="Normal" style:family="paragraph">
      <style:text-properties style:font-name="Aptos" style:font-name-asian="Yu Mincho" style:font-name-complex="Arial" fo:font-weight="bold" style:font-weight-asian="bold" style:font-weight-complex="bold" fo:color="#000000" fo:font-size="12pt" style:font-size-asian="12pt" style:font-size-complex="12pt"/>
    </style:style>
    <style:style style:name="P4212" style:parent-style-name="Normal" style:family="paragraph">
      <style:text-properties style:font-name="Aptos" style:font-name-asian="Yu Mincho" style:font-name-complex="Arial" fo:font-weight="bold" style:font-weight-asian="bold" style:font-weight-complex="bold" fo:color="#000000" fo:font-size="12pt" style:font-size-asian="12pt" style:font-size-complex="12pt"/>
    </style:style>
    <style:style style:name="P4213" style:parent-style-name="Normal" style:family="paragraph">
      <style:text-properties style:font-name="Aptos" style:font-name-asian="Yu Mincho" style:font-name-complex="Arial" fo:font-weight="bold" style:font-weight-asian="bold" style:font-weight-complex="bold" fo:color="#000000" fo:font-size="12pt" style:font-size-asian="12pt" style:font-size-complex="12pt"/>
    </style:style>
    <style:style style:name="P4214" style:parent-style-name="Paragraphedeliste" style:list-style-name="LFO7" style:family="paragraph"/>
    <style:style style:name="T4215" style:parent-style-name="Policepardéfaut" style:family="text">
      <style:text-properties style:font-name="Aptos" style:font-name-asian="Yu Mincho" style:font-name-complex="Arial" fo:color="#000000" fo:font-size="12pt" style:font-size-asian="12pt" style:font-size-complex="12pt"/>
    </style:style>
    <style:style style:name="T4216" style:parent-style-name="Policepardéfaut" style:family="text">
      <style:text-properties style:font-name="Aptos" style:font-name-asian="Yu Mincho" style:font-name-complex="Arial" fo:color="#000000" fo:font-size="12pt" style:font-size-asian="12pt" style:font-size-complex="12pt"/>
    </style:style>
    <style:style style:name="T4217" style:parent-style-name="Policepardéfaut" style:family="text">
      <style:text-properties style:font-name="Aptos" style:font-name-asian="Yu Mincho" style:font-name-complex="Arial" fo:color="#000000" fo:font-size="12pt" style:font-size-asian="12pt" style:font-size-complex="12pt"/>
    </style:style>
    <style:style style:name="P4218" style:parent-style-name="Paragraphedeliste" style:list-style-name="LFO7" style:family="paragraph"/>
    <style:style style:name="T4219" style:parent-style-name="Policepardéfaut" style:family="text">
      <style:text-properties style:font-name="Aptos" style:font-name-asian="Yu Mincho" style:font-name-complex="Arial" fo:color="#000000" fo:font-size="12pt" style:font-size-asian="12pt" style:font-size-complex="12pt"/>
    </style:style>
    <style:style style:name="T4220" style:parent-style-name="Policepardéfaut" style:family="text">
      <style:text-properties style:font-name="Aptos" style:font-name-asian="Yu Mincho" style:font-name-complex="Arial" fo:color="#000000" fo:font-size="12pt" style:font-size-asian="12pt" style:font-size-complex="12pt"/>
    </style:style>
    <style:style style:name="T4221" style:parent-style-name="Policepardéfaut" style:family="text">
      <style:text-properties style:font-name="Aptos" style:font-name-asian="Yu Mincho" style:font-name-complex="Arial" fo:color="#000000" fo:font-size="12pt" style:font-size-asian="12pt" style:font-size-complex="12pt"/>
    </style:style>
    <style:style style:name="T4222" style:parent-style-name="Policepardéfaut" style:family="text">
      <style:text-properties style:font-name="Aptos" style:font-name-asian="Yu Mincho" style:font-name-complex="Arial" fo:color="#000000" fo:font-size="12pt" style:font-size-asian="12pt" style:font-size-complex="12pt"/>
    </style:style>
    <style:style style:name="T4223" style:parent-style-name="Policepardéfaut" style:family="text">
      <style:text-properties style:font-name="Aptos" style:font-name-asian="Yu Mincho" style:font-name-complex="Arial" fo:color="#000000" fo:font-size="12pt" style:font-size-asian="12pt" style:font-size-complex="12pt"/>
    </style:style>
    <style:style style:name="T4224" style:parent-style-name="Policepardéfaut" style:family="text">
      <style:text-properties style:font-name="Aptos" style:font-name-asian="Yu Mincho" style:font-name-complex="Arial" fo:color="#000000" fo:font-size="12pt" style:font-size-asian="12pt" style:font-size-complex="12pt"/>
    </style:style>
    <style:style style:name="T4225" style:parent-style-name="Policepardéfaut" style:family="text">
      <style:text-properties style:font-name="Aptos" style:font-name-asian="Yu Mincho" style:font-name-complex="Arial" fo:color="#000000" fo:font-size="12pt" style:font-size-asian="12pt" style:font-size-complex="12pt"/>
    </style:style>
    <style:style style:name="T4226" style:parent-style-name="Policepardéfaut" style:family="text">
      <style:text-properties style:font-name="Aptos" style:font-name-asian="Yu Mincho" style:font-name-complex="Arial" fo:color="#000000" fo:font-size="12pt" style:font-size-asian="12pt" style:font-size-complex="12pt"/>
    </style:style>
    <style:style style:name="T4227" style:parent-style-name="Policepardéfaut" style:family="text">
      <style:text-properties style:font-name="Aptos" style:font-name-asian="Yu Mincho" style:font-name-complex="Arial" fo:color="#000000" fo:font-size="12pt" style:font-size-asian="12pt" style:font-size-complex="12pt"/>
    </style:style>
    <style:style style:name="T4228" style:parent-style-name="Policepardéfaut" style:family="text">
      <style:text-properties style:font-name="Aptos" style:font-name-asian="Yu Mincho" style:font-name-complex="Arial" fo:color="#000000" fo:font-size="12pt" style:font-size-asian="12pt" style:font-size-complex="12pt"/>
    </style:style>
    <style:style style:name="T4229" style:parent-style-name="Policepardéfaut" style:family="text">
      <style:text-properties style:font-name="Aptos" style:font-name-asian="Yu Mincho" style:font-name-complex="Arial" fo:color="#000000" fo:font-size="12pt" style:font-size-asian="12pt" style:font-size-complex="12pt"/>
    </style:style>
    <style:style style:name="T4230" style:parent-style-name="Policepardéfaut" style:family="text">
      <style:text-properties style:font-name="Aptos" style:font-name-asian="Yu Mincho" style:font-name-complex="Arial" fo:color="#000000" fo:font-size="12pt" style:font-size-asian="12pt" style:font-size-complex="12pt"/>
    </style:style>
    <style:style style:name="P4231" style:parent-style-name="Paragraphedeliste" style:list-style-name="LFO7" style:family="paragraph"/>
    <style:style style:name="T4232" style:parent-style-name="Policepardéfaut" style:family="text">
      <style:text-properties style:font-name="Aptos" style:font-name-asian="Yu Mincho" style:font-name-complex="Arial" fo:color="#000000" fo:font-size="12pt" style:font-size-asian="12pt" style:font-size-complex="12pt"/>
    </style:style>
    <style:style style:name="T4233" style:parent-style-name="Policepardéfaut" style:family="text">
      <style:text-properties style:font-name="Aptos" style:font-name-asian="Yu Mincho" style:font-name-complex="Arial" fo:color="#000000" fo:font-size="12pt" style:font-size-asian="12pt" style:font-size-complex="12pt"/>
    </style:style>
    <style:style style:name="T4234" style:parent-style-name="Policepardéfaut" style:family="text">
      <style:text-properties style:font-name="Aptos" style:font-name-asian="Yu Mincho" style:font-name-complex="Arial" fo:color="#000000" fo:font-size="12pt" style:font-size-asian="12pt" style:font-size-complex="12pt"/>
    </style:style>
    <style:style style:name="T4235" style:parent-style-name="Policepardéfaut" style:family="text">
      <style:text-properties style:font-name="Aptos" style:font-name-asian="Yu Mincho" style:font-name-complex="Arial" fo:color="#000000" fo:font-size="12pt" style:font-size-asian="12pt" style:font-size-complex="12pt"/>
    </style:style>
    <style:style style:name="T4236" style:parent-style-name="Policepardéfaut" style:family="text">
      <style:text-properties style:font-name="Aptos" style:font-name-asian="Yu Mincho" style:font-name-complex="Arial" fo:color="#000000" fo:font-size="12pt" style:font-size-asian="12pt" style:font-size-complex="12pt"/>
    </style:style>
    <style:style style:name="P4237" style:parent-style-name="Paragraphedeliste" style:list-style-name="LFO7" style:family="paragraph"/>
    <style:style style:name="T4238" style:parent-style-name="Policepardéfaut" style:family="text">
      <style:text-properties style:font-name="Aptos" style:font-name-asian="Yu Mincho" style:font-name-complex="Arial" fo:color="#000000" fo:font-size="12pt" style:font-size-asian="12pt" style:font-size-complex="12pt"/>
    </style:style>
    <style:style style:name="T4239" style:parent-style-name="Policepardéfaut" style:family="text">
      <style:text-properties style:font-name="Aptos" style:font-name-asian="Yu Mincho" style:font-name-complex="Arial" fo:color="#000000" fo:font-size="12pt" style:font-size-asian="12pt" style:font-size-complex="12pt"/>
    </style:style>
    <style:style style:name="P4240" style:parent-style-name="Normal" style:family="paragraph">
      <style:paragraph-properties fo:widows="0" fo:orphans="0" fo:text-align="justify" fo:line-height="107%" fo:margin-right="0.3659in"/>
      <style:text-properties style:font-name="Times New Roman" style:font-name-asian="GPAFJ+Aptos" style:font-name-complex="Times New Roman" fo:color="#000000" style:text-scale="101%" fo:font-size="12pt" style:font-size-asian="12pt" style:font-size-complex="12pt"/>
    </style:style>
    <style:style style:name="P4241" style:parent-style-name="Normal" style:family="paragraph">
      <style:paragraph-properties fo:widows="0" fo:orphans="0" fo:text-align="justify" fo:line-height="107%" fo:margin-right="0.3659in"/>
      <style:text-properties style:font-name="Aptos" style:font-name-asian="Yu Mincho" style:font-name-complex="Arial" fo:font-weight="bold" style:font-weight-asian="bold" style:font-weight-complex="bold" fo:color="#000000" fo:font-size="12pt" style:font-size-asian="12pt" style:font-size-complex="12pt"/>
    </style:style>
    <style:style style:name="P4242" style:parent-style-name="Paragraphedeliste" style:list-style-name="LFO6" style:family="paragraph">
      <style:paragraph-properties fo:widows="0" fo:orphans="0" fo:text-align="justify" fo:line-height="107%" fo:margin-right="0.3659in"/>
      <style:text-properties style:font-name="Aptos" style:font-name-asian="Yu Mincho" style:font-name-complex="Arial" fo:color="#000000" fo:font-size="12pt" style:font-size-asian="12pt" style:font-size-complex="12pt"/>
    </style:style>
    <style:style style:name="P4243" style:parent-style-name="Paragraphedeliste" style:list-style-name="LFO6" style:family="paragraph">
      <style:paragraph-properties fo:widows="0" fo:orphans="0" fo:text-align="justify" fo:line-height="107%" fo:margin-right="0.3659in"/>
      <style:text-properties style:font-name="Aptos" style:font-name-asian="Yu Mincho" style:font-name-complex="Arial" fo:color="#000000" fo:font-size="12pt" style:font-size-asian="12pt" style:font-size-complex="12pt"/>
    </style:style>
    <style:style style:name="P4244" style:parent-style-name="Paragraphedeliste" style:list-style-name="LFO6" style:family="paragraph">
      <style:paragraph-properties fo:widows="0" fo:orphans="0" fo:text-align="justify" fo:line-height="107%" fo:margin-right="0.3659in"/>
      <style:text-properties style:font-name="Aptos" style:font-name-asian="Yu Mincho" style:font-name-complex="Arial" fo:color="#000000" fo:font-size="12pt" style:font-size-asian="12pt" style:font-size-complex="12pt"/>
    </style:style>
    <style:style style:name="P4245" style:parent-style-name="Paragraphedeliste" style:list-style-name="LFO6" style:family="paragraph">
      <style:paragraph-properties fo:widows="0" fo:orphans="0" fo:text-align="justify" fo:line-height="107%" fo:margin-right="0.3659in"/>
      <style:text-properties style:font-name="Aptos" style:font-name-asian="Yu Mincho" style:font-name-complex="Arial" fo:color="#000000" fo:font-size="12pt" style:font-size-asian="12pt" style:font-size-complex="12pt"/>
    </style:style>
    <style:style style:name="P4246"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47" style:parent-style-name="Normal" style:family="paragraph">
      <style:paragraph-properties fo:widows="0" fo:orphans="0" fo:text-align="justify" fo:line-height="107%" fo:margin-right="0.3659in"/>
      <style:text-properties style:font-name="Times New Roman" style:font-name-asian="GPAFJ+Aptos" style:font-name-complex="Times New Roman" fo:font-weight="bold" style:font-weight-asian="bold" style:font-weight-complex="bold" fo:color="#000000" fo:font-size="12pt" style:font-size-asian="12pt" style:font-size-complex="12pt"/>
    </style:style>
    <style:style style:name="P4248" style:parent-style-name="Paragraphedeliste" style:list-style-name="LFO5"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49" style:parent-style-name="Paragraphedeliste" style:list-style-name="LFO5"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50" style:parent-style-name="Paragraphedeliste" style:list-style-name="LFO5"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51" style:parent-style-name="Paragraphedeliste" style:list-style-name="LFO5"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52"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53"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54"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55"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56"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57"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58"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59"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60"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61"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62"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63"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64"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65"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66"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67"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68"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69"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70"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71"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72"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73"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74"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275" style:parent-style-name="Titre1" style:list-style-name="LFO18" style:family="paragraph">
      <style:paragraph-properties fo:text-align="justify"/>
      <style:text-properties style:font-name-asian="GPAFJ+Aptos" style:text-scale="101%"/>
    </style:style>
    <style:style style:name="P4276" style:parent-style-name="Normal" style:family="paragraph">
      <style:paragraph-properties fo:widows="0" fo:orphans="0" fo:text-align="justify" fo:line-height="107%" fo:margin-right="0.3659in"/>
      <style:text-properties style:font-name="Times New Roman" style:font-name-asian="GPAFJ+Aptos" style:font-name-complex="Times New Roman" fo:font-weight="bold" style:font-weight-asian="bold" style:font-weight-complex="bold" fo:color="#000000" style:text-scale="101%" fo:font-size="12pt" style:font-size-asian="12pt" style:font-size-complex="12pt"/>
    </style:style>
    <style:style style:name="P4277" style:parent-style-name="Normal" style:family="paragraph">
      <style:paragraph-properties fo:widows="0" fo:orphans="0" fo:text-align="justify" fo:line-height="107%" fo:margin-right="0.3659in"/>
    </style:style>
    <style:style style:name="T4278" style:parent-style-name="Policepardéfaut" style:family="text">
      <style:text-properties style:font-name="Times New Roman" style:font-name-asian="GPAFJ+Aptos" style:font-name-complex="Times New Roman" fo:font-weight="bold" style:font-weight-asian="bold" style:font-weight-complex="bold" fo:color="#000000" style:text-scale="101%" fo:font-size="12pt" style:font-size-asian="12pt" style:font-size-complex="12pt"/>
    </style:style>
    <style:style style:name="T4279" style:parent-style-name="Policepardéfaut" style:family="text">
      <style:text-properties style:font-name="Times New Roman" style:font-name-asian="GPAFJ+Aptos" style:font-name-complex="Times New Roman" fo:font-weight="bold" style:font-weight-asian="bold" style:font-weight-complex="bold" fo:color="#000000" style:text-scale="101%" fo:font-size="12pt" style:font-size-asian="12pt" style:font-size-complex="12pt"/>
    </style:style>
    <style:style style:name="T4280" style:parent-style-name="Policepardéfaut" style:family="text">
      <style:text-properties style:font-name="Times New Roman" style:font-name-asian="GPAFJ+Aptos" style:font-name-complex="Times New Roman" fo:font-weight="bold" style:font-weight-asian="bold" style:font-weight-complex="bold" fo:color="#000000" style:text-scale="101%" fo:font-size="12pt" style:font-size-asian="12pt" style:font-size-complex="12pt"/>
    </style:style>
    <style:style style:name="T4281" style:parent-style-name="Policepardéfaut" style:family="text">
      <style:text-properties style:font-name="Times New Roman" style:font-name-asian="GPAFJ+Aptos" style:font-name-complex="Times New Roman" fo:font-weight="bold" style:font-weight-asian="bold" style:font-weight-complex="bold" fo:color="#000000" style:text-scale="101%" fo:font-size="12pt" style:font-size-asian="12pt" style:font-size-complex="12pt"/>
    </style:style>
    <style:style style:name="T4282" style:parent-style-name="Policepardéfaut" style:family="text">
      <style:text-properties style:font-name="Times New Roman" style:font-name-asian="GPAFJ+Aptos" style:font-name-complex="Times New Roman" fo:font-weight="bold" style:font-weight-asian="bold" style:font-weight-complex="bold" fo:color="#000000" style:text-scale="101%" fo:font-size="12pt" style:font-size-asian="12pt" style:font-size-complex="12pt"/>
    </style:style>
    <style:style style:name="T4283" style:parent-style-name="Policepardéfaut" style:family="text">
      <style:text-properties style:font-name="Times New Roman" style:font-name-asian="GPAFJ+Aptos" style:font-name-complex="Times New Roman" fo:font-weight="bold" style:font-weight-asian="bold" style:font-weight-complex="bold" fo:color="#000000" style:text-scale="101%" fo:font-size="12pt" style:font-size-asian="12pt" style:font-size-complex="12pt"/>
    </style:style>
    <style:style style:name="T4284"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285"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286"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P4287" style:parent-style-name="Normal" style:family="paragraph">
      <style:paragraph-properties fo:widows="0" fo:orphans="0" fo:text-align="justify" fo:line-height="107%" fo:margin-right="0.3659in"/>
    </style:style>
    <style:style style:name="T4288" style:parent-style-name="Policepardéfaut" style:family="text">
      <style:text-properties style:font-name="Times New Roman" style:font-name-asian="GPAFJ+Aptos" style:font-name-complex="Times New Roman" fo:font-weight="bold" style:font-weight-asian="bold" style:font-weight-complex="bold" fo:color="#000000" style:text-scale="101%" fo:font-size="12pt" style:font-size-asian="12pt" style:font-size-complex="12pt"/>
    </style:style>
    <style:style style:name="T4289" style:parent-style-name="Policepardéfaut" style:family="text">
      <style:text-properties style:font-name="Times New Roman" style:font-name-asian="GPAFJ+Aptos" style:font-name-complex="Times New Roman" fo:font-weight="bold" style:font-weight-asian="bold" style:font-weight-complex="bold" fo:color="#000000" style:text-scale="101%" fo:font-size="12pt" style:font-size-asian="12pt" style:font-size-complex="12pt"/>
    </style:style>
    <style:style style:name="T4290" style:parent-style-name="Policepardéfaut" style:family="text">
      <style:text-properties style:font-name="Times New Roman" style:font-name-asian="GPAFJ+Aptos" style:font-name-complex="Times New Roman" fo:font-weight="bold" style:font-weight-asian="bold" style:font-weight-complex="bold" fo:color="#000000" style:text-scale="101%" fo:font-size="12pt" style:font-size-asian="12pt" style:font-size-complex="12pt"/>
    </style:style>
    <style:style style:name="T4291" style:parent-style-name="Policepardéfaut" style:family="text">
      <style:text-properties style:font-name="Times New Roman" style:font-name-asian="GPAFJ+Aptos" style:font-name-complex="Times New Roman" fo:font-weight="bold" style:font-weight-asian="bold" style:font-weight-complex="bold" fo:color="#000000" style:text-scale="101%" fo:font-size="12pt" style:font-size-asian="12pt" style:font-size-complex="12pt"/>
    </style:style>
    <style:style style:name="T4292" style:parent-style-name="Policepardéfaut" style:family="text">
      <style:text-properties style:font-name="Times New Roman" style:font-name-asian="GPAFJ+Aptos" style:font-name-complex="Times New Roman" fo:font-weight="bold" style:font-weight-asian="bold" style:font-weight-complex="bold" fo:color="#000000" style:text-scale="101%" fo:font-size="12pt" style:font-size-asian="12pt" style:font-size-complex="12pt"/>
    </style:style>
    <style:style style:name="T4293" style:parent-style-name="Policepardéfaut" style:family="text">
      <style:text-properties style:font-name="Times New Roman" style:font-name-asian="GPAFJ+Aptos" style:font-name-complex="Times New Roman" fo:font-weight="bold" style:font-weight-asian="bold" style:font-weight-complex="bold" fo:color="#000000" style:text-scale="101%" fo:font-size="12pt" style:font-size-asian="12pt" style:font-size-complex="12pt"/>
    </style:style>
    <style:style style:name="T4294" style:parent-style-name="Policepardéfaut" style:family="text">
      <style:text-properties style:font-name="Times New Roman" style:font-name-asian="GPAFJ+Aptos" style:font-name-complex="Times New Roman" fo:font-weight="bold" style:font-weight-asian="bold" style:font-weight-complex="bold" fo:color="#000000" style:text-scale="101%" fo:font-size="12pt" style:font-size-asian="12pt" style:font-size-complex="12pt"/>
    </style:style>
    <style:style style:name="T4295" style:parent-style-name="Policepardéfaut" style:family="text">
      <style:text-properties style:font-name="Times New Roman" style:font-name-asian="GPAFJ+Aptos" style:font-name-complex="Times New Roman" fo:font-weight="bold" style:font-weight-asian="bold" style:font-weight-complex="bold" fo:color="#000000" style:text-scale="101%" fo:font-size="12pt" style:font-size-asian="12pt" style:font-size-complex="12pt"/>
    </style:style>
    <style:style style:name="T4296" style:parent-style-name="Policepardéfaut" style:family="text">
      <style:text-properties style:font-name="Times New Roman" style:font-name-asian="GPAFJ+Aptos" style:font-name-complex="Times New Roman" fo:font-weight="bold" style:font-weight-asian="bold" style:font-weight-complex="bold" fo:color="#000000" style:text-scale="101%" fo:font-size="12pt" style:font-size-asian="12pt" style:font-size-complex="12pt"/>
    </style:style>
    <style:style style:name="T4297"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298"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T4299" style:parent-style-name="Policepardéfaut" style:family="text">
      <style:text-properties style:font-name="Times New Roman" style:font-name-asian="GPAFJ+Aptos" style:font-name-complex="Times New Roman" fo:color="#000000" style:text-scale="101%" fo:font-size="12pt" style:font-size-asian="12pt" style:font-size-complex="12pt"/>
    </style:style>
    <style:style style:name="P4300" style:parent-style-name="Normal" style:family="paragraph">
      <style:paragraph-properties fo:widows="0" fo:orphans="0" fo:text-align="justify" fo:line-height="107%" fo:margin-right="0.3659in"/>
      <style:text-properties style:font-name="Times New Roman" style:font-name-asian="GPAFJ+Aptos" style:font-name-complex="Times New Roman" fo:font-weight="bold" style:font-weight-asian="bold" style:font-weight-complex="bold" fo:color="#000000" fo:font-size="12pt" style:font-size-asian="12pt" style:font-size-complex="12pt"/>
    </style:style>
    <style:style style:name="P4301" style:parent-style-name="Normal" style:family="paragraph">
      <style:paragraph-properties fo:widows="0" fo:orphans="0" fo:text-align="justify" fo:line-height="107%" fo:margin-right="0.3659in"/>
    </style:style>
    <style:style style:name="T4302" style:parent-style-name="Policepardéfaut" style:family="text">
      <style:text-properties style:font-name="Times New Roman" style:font-name-asian="GPAFJ+Aptos" style:font-name-complex="Times New Roman" fo:font-weight="bold" style:font-weight-asian="bold" style:font-weight-complex="bold" fo:color="#000000" fo:font-size="12pt" style:font-size-asian="12pt" style:font-size-complex="12pt"/>
    </style:style>
    <style:style style:name="T4303" style:parent-style-name="Policepardéfaut" style:family="text">
      <style:text-properties style:font-name="Times New Roman" style:font-name-asian="GPAFJ+Aptos" style:font-name-complex="Times New Roman" fo:color="#000000" fo:font-size="12pt" style:font-size-asian="12pt" style:font-size-complex="12pt"/>
    </style:style>
    <style:style style:name="P4304" style:parent-style-name="Normal" style:family="paragraph">
      <style:paragraph-properties fo:widows="0" fo:orphans="0" fo:text-align="justify" fo:line-height="107%" fo:margin-right="0.3659in"/>
    </style:style>
    <style:style style:name="T4305" style:parent-style-name="Policepardéfaut" style:family="text">
      <style:text-properties style:font-name="Times New Roman" style:font-name-asian="GPAFJ+Aptos" style:font-name-complex="Times New Roman" fo:font-weight="bold" style:font-weight-asian="bold" style:font-weight-complex="bold" fo:color="#000000" fo:font-size="12pt" style:font-size-asian="12pt" style:font-size-complex="12pt"/>
    </style:style>
    <style:style style:name="T4306" style:parent-style-name="Policepardéfaut" style:family="text">
      <style:text-properties style:font-name="Times New Roman" style:font-name-asian="GPAFJ+Aptos" style:font-name-complex="Times New Roman" fo:color="#000000" fo:font-size="12pt" style:font-size-asian="12pt" style:font-size-complex="12pt"/>
    </style:style>
    <style:style style:name="P4307" style:parent-style-name="Normal" style:family="paragraph">
      <style:paragraph-properties fo:widows="0" fo:orphans="0" fo:text-align="justify" fo:line-height="107%" fo:margin-right="0.3659in"/>
    </style:style>
    <style:style style:name="T4308" style:parent-style-name="Policepardéfaut" style:family="text">
      <style:text-properties style:font-name="Times New Roman" style:font-name-asian="GPAFJ+Aptos" style:font-name-complex="Times New Roman" fo:font-weight="bold" style:font-weight-asian="bold" style:font-weight-complex="bold" fo:color="#000000" fo:font-size="12pt" style:font-size-asian="12pt" style:font-size-complex="12pt"/>
    </style:style>
    <style:style style:name="T4309" style:parent-style-name="Policepardéfaut" style:family="text">
      <style:text-properties style:font-name="Times New Roman" style:font-name-asian="GPAFJ+Aptos" style:font-name-complex="Times New Roman" fo:color="#000000" fo:font-size="12pt" style:font-size-asian="12pt" style:font-size-complex="12pt"/>
    </style:style>
    <style:style style:name="T4310" style:parent-style-name="Policepardéfaut" style:family="text">
      <style:text-properties style:font-name="Times New Roman" style:font-name-asian="GPAFJ+Aptos" style:font-name-complex="Times New Roman" fo:color="#000000" fo:font-size="12pt" style:font-size-asian="12pt" style:font-size-complex="12pt"/>
    </style:style>
    <style:style style:name="P4311"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312" style:parent-style-name="Normal" style:family="paragraph">
      <style:paragraph-properties fo:widows="0" fo:orphans="0" fo:text-align="justify" fo:line-height="107%" fo:margin-right="0.3659in"/>
    </style:style>
    <style:style style:name="T4313"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314" style:parent-style-name="Policepardéfaut" style:family="text">
      <style:text-properties style:font-name="Aptos" style:font-name-asian="Yu Mincho" style:font-name-complex="Arial" fo:color="#000000" fo:font-size="12pt" style:font-size-asian="12pt" style:font-size-complex="12pt"/>
    </style:style>
    <style:style style:name="T4315" style:parent-style-name="Policepardéfaut" style:family="text">
      <style:text-properties style:font-name="Aptos" style:font-name-asian="Yu Mincho" style:font-name-complex="Arial" fo:color="#000000" fo:font-size="12pt" style:font-size-asian="12pt" style:font-size-complex="12pt"/>
    </style:style>
    <style:style style:name="T4316" style:parent-style-name="Policepardéfaut" style:family="text">
      <style:text-properties style:font-name="Aptos" style:font-name-asian="Yu Mincho" style:font-name-complex="Arial" fo:color="#000000" fo:font-size="12pt" style:font-size-asian="12pt" style:font-size-complex="12pt"/>
    </style:style>
    <style:style style:name="P4317" style:parent-style-name="Normal" style:family="paragraph">
      <style:paragraph-properties fo:widows="0" fo:orphans="0" fo:text-align="justify" fo:line-height="107%" fo:margin-right="0.3659in"/>
    </style:style>
    <style:style style:name="T4318"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319" style:parent-style-name="Policepardéfaut" style:family="text">
      <style:text-properties style:font-name="Aptos" style:font-name-asian="Yu Mincho" style:font-name-complex="Arial" fo:color="#000000" fo:font-size="12pt" style:font-size-asian="12pt" style:font-size-complex="12pt"/>
    </style:style>
    <style:style style:name="T4320" style:parent-style-name="Policepardéfaut" style:family="text">
      <style:text-properties style:font-name="Aptos" style:font-name-asian="Yu Mincho" style:font-name-complex="Arial" fo:color="#000000" fo:font-size="12pt" style:font-size-asian="12pt" style:font-size-complex="12pt"/>
    </style:style>
    <style:style style:name="T4321" style:parent-style-name="Policepardéfaut" style:family="text">
      <style:text-properties style:font-name="Aptos" style:font-name-asian="Yu Mincho" style:font-name-complex="Arial" fo:color="#000000" fo:font-size="12pt" style:font-size-asian="12pt" style:font-size-complex="12pt"/>
    </style:style>
    <style:style style:name="T4322" style:parent-style-name="Policepardéfaut" style:family="text">
      <style:text-properties style:font-name="Aptos" style:font-name-asian="Yu Mincho" style:font-name-complex="Arial" fo:color="#000000" fo:font-size="12pt" style:font-size-asian="12pt" style:font-size-complex="12pt"/>
    </style:style>
    <style:style style:name="T4323" style:parent-style-name="Policepardéfaut" style:family="text">
      <style:text-properties style:font-name="Aptos" style:font-name-asian="Yu Mincho" style:font-name-complex="Arial" fo:color="#000000" fo:font-size="12pt" style:font-size-asian="12pt" style:font-size-complex="12pt"/>
    </style:style>
    <style:style style:name="P4324" style:parent-style-name="Normal" style:family="paragraph">
      <style:paragraph-properties fo:widows="0" fo:orphans="0" fo:text-align="justify" fo:line-height="107%" fo:margin-right="0.3659in"/>
    </style:style>
    <style:style style:name="T4325"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326" style:parent-style-name="Policepardéfaut" style:family="text">
      <style:text-properties style:font-name="Aptos" style:font-name-asian="Yu Mincho" style:font-name-complex="Arial" fo:color="#000000" fo:font-size="12pt" style:font-size-asian="12pt" style:font-size-complex="12pt"/>
    </style:style>
    <style:style style:name="P4327"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328" style:parent-style-name="Normal" style:family="paragraph">
      <style:paragraph-properties fo:widows="0" fo:orphans="0" fo:text-align="justify" fo:line-height="107%" fo:margin-right="0.3659in"/>
    </style:style>
    <style:style style:name="T4329"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330" style:parent-style-name="Policepardéfaut" style:family="text">
      <style:text-properties style:font-name="Aptos" style:font-name-asian="Yu Mincho" style:font-name-complex="Arial" fo:color="#000000" fo:font-size="12pt" style:font-size-asian="12pt" style:font-size-complex="12pt"/>
    </style:style>
    <style:style style:name="T4331" style:parent-style-name="Policepardéfaut" style:family="text">
      <style:text-properties style:font-name="Aptos" style:font-name-asian="Yu Mincho" style:font-name-complex="Arial" fo:color="#000000" fo:font-size="12pt" style:font-size-asian="12pt" style:font-size-complex="12pt"/>
    </style:style>
    <style:style style:name="T4332" style:parent-style-name="Policepardéfaut" style:family="text">
      <style:text-properties style:font-name="Aptos" style:font-name-asian="Yu Mincho" style:font-name-complex="Arial" fo:color="#000000" fo:font-size="12pt" style:font-size-asian="12pt" style:font-size-complex="12pt"/>
    </style:style>
    <style:style style:name="P4333" style:parent-style-name="Normal" style:family="paragraph">
      <style:paragraph-properties fo:widows="0" fo:orphans="0" fo:text-align="justify" fo:line-height="107%" fo:margin-right="0.3659in"/>
    </style:style>
    <style:style style:name="T4334"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335" style:parent-style-name="Policepardéfaut" style:family="text">
      <style:text-properties style:font-name="Aptos" style:font-name-asian="Yu Mincho" style:font-name-complex="Arial" fo:color="#000000" fo:font-size="12pt" style:font-size-asian="12pt" style:font-size-complex="12pt"/>
    </style:style>
    <style:style style:name="T4336" style:parent-style-name="Policepardéfaut" style:family="text">
      <style:text-properties style:font-name="Aptos" style:font-name-asian="Yu Mincho" style:font-name-complex="Arial" fo:color="#000000" fo:font-size="12pt" style:font-size-asian="12pt" style:font-size-complex="12pt"/>
    </style:style>
    <style:style style:name="T4337" style:parent-style-name="Policepardéfaut" style:family="text">
      <style:text-properties style:font-name="Aptos" style:font-name-asian="Yu Mincho" style:font-name-complex="Arial" fo:color="#000000" fo:font-size="12pt" style:font-size-asian="12pt" style:font-size-complex="12pt"/>
    </style:style>
    <style:style style:name="T4338" style:parent-style-name="Policepardéfaut" style:family="text">
      <style:text-properties style:font-name="Aptos" style:font-name-asian="Yu Mincho" style:font-name-complex="Arial" fo:color="#000000" fo:font-size="12pt" style:font-size-asian="12pt" style:font-size-complex="12pt"/>
    </style:style>
    <style:style style:name="P4339" style:parent-style-name="Normal" style:family="paragraph">
      <style:paragraph-properties fo:widows="0" fo:orphans="0" fo:text-align="justify" fo:line-height="107%" fo:margin-right="0.3659in"/>
    </style:style>
    <style:style style:name="T4340"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341" style:parent-style-name="Policepardéfaut" style:family="text">
      <style:text-properties style:font-name="Aptos" style:font-name-asian="Yu Mincho" style:font-name-complex="Arial" fo:color="#000000" fo:font-size="12pt" style:font-size-asian="12pt" style:font-size-complex="12pt"/>
    </style:style>
    <style:style style:name="P4342" style:parent-style-name="Normal" style:family="paragraph">
      <style:paragraph-properties fo:widows="0" fo:orphans="0" fo:text-align="justify" fo:line-height="107%" fo:margin-right="0.3659in"/>
    </style:style>
    <style:style style:name="T4343"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344" style:parent-style-name="Policepardéfaut" style:family="text">
      <style:text-properties style:font-name="Aptos" style:font-name-asian="Yu Mincho" style:font-name-complex="Arial" fo:color="#000000" fo:font-size="12pt" style:font-size-asian="12pt" style:font-size-complex="12pt"/>
    </style:style>
    <style:style style:name="P4345" style:parent-style-name="Normal" style:family="paragraph">
      <style:paragraph-properties fo:widows="0" fo:orphans="0" fo:text-align="justify" fo:line-height="107%" fo:margin-right="0.3659in"/>
    </style:style>
    <style:style style:name="T4346"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347" style:parent-style-name="Policepardéfaut" style:family="text">
      <style:text-properties style:font-name="Aptos" style:font-name-asian="Yu Mincho" style:font-name-complex="Arial" fo:color="#000000" fo:font-size="12pt" style:font-size-asian="12pt" style:font-size-complex="12pt"/>
    </style:style>
    <style:style style:name="T4348" style:parent-style-name="Policepardéfaut" style:family="text">
      <style:text-properties style:font-name="Aptos" style:font-name-asian="Yu Mincho" style:font-name-complex="Arial" fo:color="#000000" fo:font-size="12pt" style:font-size-asian="12pt" style:font-size-complex="12pt"/>
    </style:style>
    <style:style style:name="T4349" style:parent-style-name="Policepardéfaut" style:family="text">
      <style:text-properties style:font-name="Aptos" style:font-name-asian="Yu Mincho" style:font-name-complex="Arial" fo:color="#000000" fo:font-size="12pt" style:font-size-asian="12pt" style:font-size-complex="12pt"/>
    </style:style>
    <style:style style:name="T4350" style:parent-style-name="Policepardéfaut" style:family="text">
      <style:text-properties style:font-name="Aptos" style:font-name-asian="Yu Mincho" style:font-name-complex="Arial" fo:color="#000000" fo:font-size="12pt" style:font-size-asian="12pt" style:font-size-complex="12pt"/>
    </style:style>
    <style:style style:name="T4351" style:parent-style-name="Policepardéfaut" style:family="text">
      <style:text-properties style:font-name="Aptos" style:font-name-asian="Yu Mincho" style:font-name-complex="Arial" fo:color="#000000" fo:font-size="12pt" style:font-size-asian="12pt" style:font-size-complex="12pt"/>
    </style:style>
    <style:style style:name="T4352" style:parent-style-name="Policepardéfaut" style:family="text">
      <style:text-properties style:font-name="Aptos" style:font-name-asian="Yu Mincho" style:font-name-complex="Arial" fo:color="#000000" fo:font-size="12pt" style:font-size-asian="12pt" style:font-size-complex="12pt"/>
    </style:style>
    <style:style style:name="P4353" style:parent-style-name="Normal" style:family="paragraph">
      <style:paragraph-properties fo:widows="0" fo:orphans="0" fo:text-align="justify" fo:line-height="107%" fo:margin-right="0.3659in"/>
    </style:style>
    <style:style style:name="T4354"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355" style:parent-style-name="Policepardéfaut" style:family="text">
      <style:text-properties style:font-name="Aptos" style:font-name-asian="Yu Mincho" style:font-name-complex="Arial" fo:color="#000000" fo:font-size="12pt" style:font-size-asian="12pt" style:font-size-complex="12pt"/>
    </style:style>
    <style:style style:name="T4356" style:parent-style-name="Policepardéfaut" style:family="text">
      <style:text-properties style:font-name="Aptos" style:font-name-asian="Yu Mincho" style:font-name-complex="Arial" fo:color="#000000" fo:font-size="12pt" style:font-size-asian="12pt" style:font-size-complex="12pt"/>
    </style:style>
    <style:style style:name="P4357" style:parent-style-name="Normal" style:family="paragraph">
      <style:paragraph-properties fo:widows="0" fo:orphans="0" fo:text-align="justify" fo:line-height="107%" fo:margin-right="0.3659in"/>
    </style:style>
    <style:style style:name="T4358"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359" style:parent-style-name="Policepardéfaut" style:family="text">
      <style:text-properties style:font-name="Aptos" style:font-name-asian="Yu Mincho" style:font-name-complex="Arial" fo:color="#000000" fo:font-size="12pt" style:font-size-asian="12pt" style:font-size-complex="12pt"/>
    </style:style>
    <style:style style:name="T4360" style:parent-style-name="Policepardéfaut" style:family="text">
      <style:text-properties style:font-name="Aptos" style:font-name-asian="Yu Mincho" style:font-name-complex="Arial" fo:color="#000000" fo:font-size="12pt" style:font-size-asian="12pt" style:font-size-complex="12pt"/>
    </style:style>
    <style:style style:name="T4361" style:parent-style-name="Policepardéfaut" style:family="text">
      <style:text-properties style:font-name="Aptos" style:font-name-asian="Yu Mincho" style:font-name-complex="Arial" fo:color="#000000" fo:font-size="12pt" style:font-size-asian="12pt" style:font-size-complex="12pt"/>
    </style:style>
    <style:style style:name="T4362" style:parent-style-name="Policepardéfaut" style:family="text">
      <style:text-properties style:font-name="Aptos" style:font-name-asian="Yu Mincho" style:font-name-complex="Arial" fo:color="#000000" fo:font-size="12pt" style:font-size-asian="12pt" style:font-size-complex="12pt"/>
    </style:style>
    <style:style style:name="T4363" style:parent-style-name="Policepardéfaut" style:family="text">
      <style:text-properties style:font-name="Aptos" style:font-name-asian="Yu Mincho" style:font-name-complex="Arial" fo:color="#000000" fo:font-size="12pt" style:font-size-asian="12pt" style:font-size-complex="12pt"/>
    </style:style>
    <style:style style:name="T4364" style:parent-style-name="Policepardéfaut" style:family="text">
      <style:text-properties style:font-name="Aptos" style:font-name-asian="Yu Mincho" style:font-name-complex="Arial" fo:color="#000000" fo:font-size="12pt" style:font-size-asian="12pt" style:font-size-complex="12pt"/>
    </style:style>
    <style:style style:name="P4365" style:parent-style-name="Normal" style:family="paragraph">
      <style:paragraph-properties fo:widows="0" fo:orphans="0" fo:text-align="justify" fo:line-height="107%" fo:margin-right="0.3659in"/>
      <style:text-properties style:font-name="Times New Roman" style:font-name-asian="GPAFJ+Aptos" style:font-name-complex="Times New Roman" fo:color="#000000" fo:font-size="12pt" style:font-size-asian="12pt" style:font-size-complex="12pt"/>
    </style:style>
    <style:style style:name="P4366" style:parent-style-name="Normal" style:family="paragraph">
      <style:paragraph-properties fo:widows="0" fo:orphans="0" fo:text-align="justify" fo:line-height="107%" fo:margin-right="0.3659in"/>
    </style:style>
    <style:style style:name="T4367"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368" style:parent-style-name="Policepardéfaut" style:family="text">
      <style:text-properties style:font-name="Aptos" style:font-name-asian="Yu Mincho" style:font-name-complex="Arial" fo:color="#000000" fo:font-size="12pt" style:font-size-asian="12pt" style:font-size-complex="12pt"/>
    </style:style>
    <style:style style:name="T4369" style:parent-style-name="Policepardéfaut" style:family="text">
      <style:text-properties style:font-name="Aptos" style:font-name-asian="Yu Mincho" style:font-name-complex="Arial" fo:color="#000000" fo:font-size="12pt" style:font-size-asian="12pt" style:font-size-complex="12pt"/>
    </style:style>
    <style:style style:name="P4370" style:parent-style-name="Normal" style:family="paragraph">
      <style:paragraph-properties fo:widows="0" fo:orphans="0" fo:text-align="justify" fo:line-height="107%" fo:margin-right="0.3659in"/>
    </style:style>
    <style:style style:name="T4371"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372" style:parent-style-name="Policepardéfaut" style:family="text">
      <style:text-properties style:font-name="Aptos" style:font-name-asian="Yu Mincho" style:font-name-complex="Arial" fo:color="#000000" fo:font-size="12pt" style:font-size-asian="12pt" style:font-size-complex="12pt"/>
    </style:style>
    <style:style style:name="T4373" style:parent-style-name="Policepardéfaut" style:family="text">
      <style:text-properties style:font-name="Aptos" style:font-name-asian="Yu Mincho" style:font-name-complex="Arial" fo:color="#000000" fo:font-size="12pt" style:font-size-asian="12pt" style:font-size-complex="12pt"/>
    </style:style>
    <style:style style:name="P4374" style:parent-style-name="Normal" style:family="paragraph">
      <style:paragraph-properties fo:widows="0" fo:orphans="0" fo:text-align="justify" fo:line-height="107%" fo:margin-right="0.3659in"/>
    </style:style>
    <style:style style:name="T4375"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376" style:parent-style-name="Policepardéfaut" style:family="text">
      <style:text-properties style:font-name="Aptos" style:font-name-asian="Yu Mincho" style:font-name-complex="Arial" fo:color="#000000" fo:font-size="12pt" style:font-size-asian="12pt" style:font-size-complex="12pt"/>
    </style:style>
    <style:style style:name="T4377" style:parent-style-name="Policepardéfaut" style:family="text">
      <style:text-properties style:font-name="Aptos" style:font-name-asian="Yu Mincho" style:font-name-complex="Arial" fo:color="#000000" fo:font-size="12pt" style:font-size-asian="12pt" style:font-size-complex="12pt"/>
    </style:style>
    <style:style style:name="P4378" style:parent-style-name="Normal" style:family="paragraph">
      <style:paragraph-properties fo:widows="0" fo:orphans="0" fo:line-height="107%" fo:margin-right="0.3659in"/>
    </style:style>
    <style:style style:name="T4379"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380" style:parent-style-name="Policepardéfaut" style:family="text">
      <style:text-properties style:font-name="Aptos" style:font-name-asian="Yu Mincho" style:font-name-complex="Arial" fo:color="#000000" fo:font-size="12pt" style:font-size-asian="12pt" style:font-size-complex="12pt"/>
    </style:style>
    <style:style style:name="T4381" style:parent-style-name="Policepardéfaut" style:family="text">
      <style:text-properties style:font-name="Aptos" style:font-name-asian="Yu Mincho" style:font-name-complex="Arial" fo:color="#000000" fo:font-size="12pt" style:font-size-asian="12pt" style:font-size-complex="12pt"/>
    </style:style>
    <style:style style:name="P4382" style:parent-style-name="Normal" style:family="paragraph">
      <style:paragraph-properties fo:widows="0" fo:orphans="0" fo:line-height="107%" fo:margin-right="0.3659in"/>
      <style:text-properties style:font-name="Times New Roman" style:font-name-asian="GPAFJ+Aptos" style:font-name-complex="Times New Roman" fo:color="#000000" fo:font-size="12pt" style:font-size-asian="12pt" style:font-size-complex="12pt"/>
    </style:style>
    <style:style style:name="P4383" style:parent-style-name="Normal" style:family="paragraph">
      <style:paragraph-properties fo:widows="0" fo:orphans="0" fo:line-height="107%" fo:margin-right="0.3659in"/>
    </style:style>
    <style:style style:name="T4384"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385" style:parent-style-name="Policepardéfaut" style:family="text">
      <style:text-properties style:font-name="Aptos" style:font-name-asian="Yu Mincho" style:font-name-complex="Arial" fo:color="#000000" fo:font-size="12pt" style:font-size-asian="12pt" style:font-size-complex="12pt"/>
    </style:style>
    <style:style style:name="P4386" style:parent-style-name="Normal" style:family="paragraph">
      <style:paragraph-properties fo:widows="0" fo:orphans="0" fo:line-height="107%" fo:margin-right="0.3659in"/>
    </style:style>
    <style:style style:name="T4387"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388" style:parent-style-name="Policepardéfaut" style:family="text">
      <style:text-properties style:font-name="Aptos" style:font-name-asian="Yu Mincho" style:font-name-complex="Arial" fo:color="#000000" fo:font-size="12pt" style:font-size-asian="12pt" style:font-size-complex="12pt"/>
    </style:style>
    <style:style style:name="T4389" style:parent-style-name="Policepardéfaut" style:family="text">
      <style:text-properties style:font-name="Aptos" style:font-name-asian="Yu Mincho" style:font-name-complex="Arial" fo:color="#000000" fo:font-size="12pt" style:font-size-asian="12pt" style:font-size-complex="12pt"/>
    </style:style>
    <style:style style:name="P4390" style:parent-style-name="Normal" style:family="paragraph">
      <style:paragraph-properties fo:widows="0" fo:orphans="0" fo:line-height="107%" fo:margin-right="0.3659in"/>
    </style:style>
    <style:style style:name="T4391"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392" style:parent-style-name="Policepardéfaut" style:family="text">
      <style:text-properties style:font-name="Aptos" style:font-name-asian="Yu Mincho" style:font-name-complex="Arial" fo:color="#000000" fo:font-size="12pt" style:font-size-asian="12pt" style:font-size-complex="12pt"/>
    </style:style>
    <style:style style:name="T4393" style:parent-style-name="Policepardéfaut" style:family="text">
      <style:text-properties style:font-name="Aptos" style:font-name-asian="Yu Mincho" style:font-name-complex="Arial" fo:color="#000000" fo:font-size="12pt" style:font-size-asian="12pt" style:font-size-complex="12pt"/>
    </style:style>
    <style:style style:name="T4394" style:parent-style-name="Policepardéfaut" style:family="text">
      <style:text-properties style:font-name="Aptos" style:font-name-asian="Yu Mincho" style:font-name-complex="Arial" fo:color="#000000" fo:font-size="12pt" style:font-size-asian="12pt" style:font-size-complex="12pt"/>
    </style:style>
    <style:style style:name="T4395" style:parent-style-name="Policepardéfaut" style:family="text">
      <style:text-properties style:font-name="Aptos" style:font-name-asian="Yu Mincho" style:font-name-complex="Arial" fo:color="#000000" fo:font-size="12pt" style:font-size-asian="12pt" style:font-size-complex="12pt"/>
    </style:style>
    <style:style style:name="P4396" style:parent-style-name="Normal" style:family="paragraph">
      <style:paragraph-properties fo:widows="0" fo:orphans="0" fo:line-height="107%" fo:margin-right="0.3659in"/>
    </style:style>
    <style:style style:name="T4397"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398" style:parent-style-name="Policepardéfaut" style:family="text">
      <style:text-properties style:font-name="Aptos" style:font-name-asian="Yu Mincho" style:font-name-complex="Arial" fo:color="#000000" fo:font-size="12pt" style:font-size-asian="12pt" style:font-size-complex="12pt"/>
    </style:style>
    <style:style style:name="T4399" style:parent-style-name="Policepardéfaut" style:family="text">
      <style:text-properties style:font-name="Aptos" style:font-name-asian="Yu Mincho" style:font-name-complex="Arial" fo:color="#000000" fo:font-size="12pt" style:font-size-asian="12pt" style:font-size-complex="12pt"/>
    </style:style>
    <style:style style:name="P4400" style:parent-style-name="Normal" style:family="paragraph">
      <style:paragraph-properties fo:widows="0" fo:orphans="0" fo:line-height="107%" fo:margin-right="0.3659in"/>
    </style:style>
    <style:style style:name="T4401"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402" style:parent-style-name="Policepardéfaut" style:family="text">
      <style:text-properties style:font-name="Aptos" style:font-name-asian="Yu Mincho" style:font-name-complex="Arial" fo:color="#000000" fo:font-size="12pt" style:font-size-asian="12pt" style:font-size-complex="12pt"/>
    </style:style>
    <style:style style:name="T4403" style:parent-style-name="Policepardéfaut" style:family="text">
      <style:text-properties style:font-name="Aptos" style:font-name-asian="Yu Mincho" style:font-name-complex="Arial" fo:color="#000000" fo:font-size="12pt" style:font-size-asian="12pt" style:font-size-complex="12pt"/>
    </style:style>
    <style:style style:name="P4404" style:parent-style-name="Normal" style:family="paragraph">
      <style:paragraph-properties fo:widows="0" fo:orphans="0" fo:line-height="107%" fo:margin-right="0.3659in"/>
      <style:text-properties style:font-name="Times New Roman" style:font-name-asian="GPAFJ+Aptos" style:font-name-complex="Times New Roman" fo:color="#000000" fo:font-size="12pt" style:font-size-asian="12pt" style:font-size-complex="12pt"/>
    </style:style>
    <style:style style:name="P4405" style:parent-style-name="Normal" style:family="paragraph">
      <style:paragraph-properties fo:widows="0" fo:orphans="0" fo:line-height="107%" fo:margin-right="0.3659in"/>
    </style:style>
    <style:style style:name="T4406"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407"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408"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409" style:parent-style-name="Policepardéfaut" style:family="text">
      <style:text-properties style:font-name="Aptos" style:font-name-asian="Yu Mincho" style:font-name-complex="Arial" fo:color="#000000" fo:font-size="12pt" style:font-size-asian="12pt" style:font-size-complex="12pt"/>
    </style:style>
    <style:style style:name="P4410" style:parent-style-name="Normal" style:family="paragraph">
      <style:paragraph-properties fo:widows="0" fo:orphans="0" fo:line-height="107%" fo:margin-right="0.3659in"/>
    </style:style>
    <style:style style:name="T4411" style:parent-style-name="Policepardéfaut" style:family="text">
      <style:text-properties style:font-name="Aptos" style:font-name-asian="Yu Mincho" style:font-name-complex="Arial" fo:font-weight="bold" style:font-weight-asian="bold" style:font-weight-complex="bold" fo:color="#000000" fo:font-size="12pt" style:font-size-asian="12pt" style:font-size-complex="12pt"/>
    </style:style>
    <style:style style:name="T4412" style:parent-style-name="Policepardéfaut" style:family="text">
      <style:text-properties style:font-name="Aptos" style:font-name-asian="Yu Mincho" style:font-name-complex="Arial" fo:color="#000000" fo:font-size="12pt" style:font-size-asian="12pt" style:font-size-complex="12pt"/>
    </style:style>
    <style:style style:name="T4413" style:parent-style-name="Policepardéfaut" style:family="text">
      <style:text-properties style:font-name="Aptos" style:font-name-asian="Yu Mincho" style:font-name-complex="Arial" fo:color="#000000" fo:font-size="12pt" style:font-size-asian="12pt" style:font-size-complex="12pt"/>
    </style:style>
    <style:style style:name="T4414" style:parent-style-name="Policepardéfaut" style:family="text">
      <style:text-properties style:font-name="Aptos" style:font-name-asian="Yu Mincho" style:font-name-complex="Arial" fo:color="#000000" fo:font-size="12pt" style:font-size-asian="12pt" style:font-size-complex="12pt"/>
    </style:style>
    <style:style style:name="T4415" style:parent-style-name="Policepardéfaut" style:family="text">
      <style:text-properties style:font-name="Aptos" style:font-name-asian="Yu Mincho" style:font-name-complex="Arial" fo:color="#000000" fo:font-size="12pt" style:font-size-asian="12pt" style:font-size-complex="12pt"/>
    </style:style>
    <style:style style:name="T4416" style:parent-style-name="Policepardéfaut" style:family="text">
      <style:text-properties style:font-name="Aptos" style:font-name-asian="Yu Mincho" style:font-name-complex="Arial" fo:color="#000000" fo:font-size="12pt" style:font-size-asian="12pt" style:font-size-complex="12pt"/>
    </style:style>
    <style:style style:name="T4417" style:parent-style-name="Policepardéfaut" style:family="text">
      <style:text-properties style:font-name="Aptos" style:font-name-asian="Yu Mincho" style:font-name-complex="Arial" fo:color="#000000" fo:font-size="12pt" style:font-size-asian="12pt" style:font-size-complex="12pt"/>
    </style:style>
    <style:style style:name="T4418" style:parent-style-name="Policepardéfaut" style:family="text">
      <style:text-properties style:font-name="Aptos" style:font-name-asian="Yu Mincho" style:font-name-complex="Arial" fo:color="#000000" fo:font-size="12pt" style:font-size-asian="12pt" style:font-size-complex="12pt"/>
    </style:style>
    <style:style style:name="P4419" style:parent-style-name="Normal" style:family="paragraph">
      <style:paragraph-properties fo:break-before="page" fo:margin-bottom="0.1111in" fo:line-height="115%"/>
      <style:text-properties style:font-name="Times New Roman" style:font-name-asian="GPAFJ+Aptos" style:font-name-complex="Times New Roman" fo:color="#000000" style:text-scale="101%" fo:font-size="12pt" style:font-size-asian="12pt" style:font-size-complex="12pt"/>
    </style:style>
    <style:style style:name="P4420" style:parent-style-name="Titre1" style:list-style-name="LFO18" style:family="paragraph">
      <style:text-properties style:font-name-asian="GPAFJ+Aptos" style:text-scale="101%"/>
    </style:style>
    <style:style style:name="P4421" style:parent-style-name="Normal" style:family="paragraph">
      <style:paragraph-properties fo:break-before="page"/>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text:p>
      <text:p text:style-name="P3"><draw:frame draw:z-index="251659264" draw:style-name="a0" draw:name="drawingObject1" text:anchor-type="paragraph" svg:x="0.98403in" svg:y="-0.30619in" svg:width="2.075in" svg:height="0.82272in" style:rel-width="scale" style:rel-height="scale"><draw:image xlink:href="media/image1.jpeg" xlink:type="simple" xlink:show="embed" xlink:actuate="onLoad"/><svg:title/><svg:desc>Une image contenant texte, logo, Graphique, Police

Le contenu généré par l’IA peut être incorrect.</svg:desc></draw:frame><text:span text:style-name="T4">G</text:span><text:span text:style-name="T5">U</text:span><text:span text:style-name="T6">I</text:span><text:span text:style-name="T7">T</text:span><text:span text:style-name="T8">O</text:span><text:span text:style-name="T9">U</text:span></text:p>
      <text:p text:style-name="P10"/>
      <text:p text:style-name="P11"><text:span text:style-name="T12">J</text:span><text:span text:style-name="T13">é</text:span><text:span text:style-name="T14">r</text:span><text:span text:style-name="T15">é</text:span><text:span text:style-name="T16">my</text:span></text:p>
      <text:p text:style-name="P17"/>
      <text:p text:style-name="P18"/>
      <text:p text:style-name="P19">BTS SIO (Services<text:s/>Informatiques<text:s/>au Organisations)<text:s/></text:p>
      <text:p text:style-name="P20">Option SLAM<text:s/>(Solutions Logicielles et Applications Métiers)</text:p>
      <text:p text:style-name="P21"/>
      <text:p text:style-name="P22"/>
      <text:p text:style-name="P23"/>
      <text:p text:style-name="P24">Période de stage :<text:s/>05<text:s/>janvier<text:s/>au 20<text:s/>février<text:s/>2026.</text:p>
      <text:p text:style-name="P25"/>
      <text:p text:style-name="P26">Tuteur : Abdallah LAANANI</text:p>
      <text:p text:style-name="P27"/>
      <text:p text:style-name="P28">Lycée Paul Louis Courrier</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Rapport d’activité hebdomadaire</text:p>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list text:style-name="LFO18" text:continue-numbering="true">
        <text:list-item>
          <text:p text:style-name="P61"><text:bookmark-start text:name="_Toc486565914"/><text:span text:style-name="T62">Remerciement</text:span><text:span text:style-name="T63">s</text:span><text:bookmark-end text:name="_Toc486565914"/></text:p>
        </text:list-item>
      </text:list>
      <text:p text:style-name="P64"/>
      <text:p text:style-name="P65"/>
      <text:p text:style-name="P66"/>
      <text:p text:style-name="P67"><text:span text:style-name="T68">Je tiens à<text:s/></text:span><text:span text:style-name="T69">e</text:span><text:span text:style-name="T70">xprim</text:span><text:span text:style-name="T71">e</text:span><text:span text:style-name="T72">r ma sinc</text:span><text:span text:style-name="T73">è</text:span><text:span text:style-name="T74">re</text:span><text:span text:style-name="T75"><text:s/></text:span><text:span text:style-name="T76">g</text:span><text:span text:style-name="T77">r</text:span><text:span text:style-name="T78">a</text:span><text:span text:style-name="T79">t</text:span><text:span text:style-name="T80">i</text:span><text:span text:style-name="T81">tude à toutes<text:s/></text:span><text:span text:style-name="T82">l</text:span><text:span text:style-name="T83">es p</text:span><text:span text:style-name="T84">e</text:span><text:span text:style-name="T85">rsonn</text:span><text:span text:style-name="T86">e</text:span><text:span text:style-name="T87">s qui ont con</text:span><text:span text:style-name="T88">t</text:span><text:span text:style-name="T89">ribué à</text:span><text:span text:style-name="T90"><text:s/></text:span><text:span text:style-name="T91">la</text:span><text:span text:style-name="T92"><text:s/></text:span><text:span text:style-name="T93">r</text:span><text:span text:style-name="T94">éussite de<text:s/></text:span><text:span text:style-name="T95">c</text:span><text:span text:style-name="T96">e</text:span><text:span text:style-name="T97"><text:s/></text:span><text:span text:style-name="T98">sta</text:span><text:span text:style-name="T99">g</text:span><text:span text:style-name="T100">e.</text:span></text:p>
      <text:p text:style-name="P101"/>
      <text:p text:style-name="P102"/>
      <text:p text:style-name="P103"/>
      <text:p text:style-name="P104"><text:span text:style-name="T105">Je r</text:span><text:span text:style-name="T106">e</text:span><text:span text:style-name="T107">me</text:span><text:span text:style-name="T108">r</text:span><text:span text:style-name="T109">cie tout d'abord</text:span><text:span text:style-name="T110"><text:s/>P</text:span><text:span text:style-name="T111">ASQUET Olivier de</text:span><text:span text:style-name="T112"><text:s/></text:span><text:span text:style-name="T113">l'</text:span><text:span text:style-name="T114">A</text:span><text:span text:style-name="T115">G2R pour m'avoir<text:s/></text:span><text:span text:style-name="T116">re</text:span><text:span text:style-name="T117">donné</text:span><text:span text:style-name="T118"><text:s/></text:span><text:span text:style-name="T119">l'opportun</text:span><text:span text:style-name="T120">i</text:span><text:span text:style-name="T121">té d'ef</text:span><text:span text:style-name="T122">f</text:span><text:span text:style-name="T123">e</text:span><text:span text:style-name="T124">ctuer</text:span><text:span text:style-name="T125"><text:s/></text:span><text:span text:style-name="T126">ce</text:span><text:span text:style-name="T127"><text:s/></text:span><text:span text:style-name="T128">sta</text:span><text:span text:style-name="T129">g</text:span><text:span text:style-name="T130">e<text:s/></text:span><text:span text:style-name="T131">a</text:span><text:span text:style-name="T132">u s</text:span><text:span text:style-name="T133">e</text:span><text:span text:style-name="T134">i</text:span><text:span text:style-name="T135">n de son<text:s/></text:span><text:span text:style-name="T136">é</text:span><text:span text:style-name="T137">quipe. Sa co</text:span><text:span text:style-name="T138">n</text:span><text:span text:style-name="T139">fian</text:span><text:span text:style-name="T140">c</text:span><text:span text:style-name="T141">e, s</text:span><text:span text:style-name="T142">e</text:span><text:span text:style-name="T143">s</text:span><text:span text:style-name="T144"><text:s/></text:span><text:span text:style-name="T145">conseils avisés</text:span><text:span text:style-name="T146"><text:s/></text:span><text:span text:style-name="T147">et son en</text:span><text:span text:style-name="T148">ca</text:span><text:span text:style-name="T149">d</text:span><text:span text:style-name="T150">r</text:span><text:span text:style-name="T151">ement ont été</text:span><text:span text:style-name="T152"><text:s/></text:span><text:span text:style-name="T153">ess</text:span><text:span text:style-name="T154">e</text:span><text:span text:style-name="T155">nt</text:span><text:span text:style-name="T156">i</text:span><text:span text:style-name="T157">els à mon apprentissa</text:span><text:span text:style-name="T158">g</text:span><text:span text:style-name="T159">e<text:s/></text:span><text:span text:style-name="T160">e</text:span><text:span text:style-name="T161">t à mon dé</text:span><text:span text:style-name="T162">v</text:span><text:span text:style-name="T163">eloppeme</text:span><text:span text:style-name="T164">n</text:span><text:span text:style-name="T165">t prof</text:span><text:span text:style-name="T166">e</text:span><text:span text:style-name="T167">ssionne</text:span><text:span text:style-name="T168">l</text:span><text:span text:style-name="T169">.</text:span></text:p>
      <text:p text:style-name="P170"/>
      <text:p text:style-name="P171"/>
      <text:p text:style-name="P172"/>
      <text:p text:style-name="P173"><text:span text:style-name="T174">Je suis ég</text:span><text:span text:style-name="T175">a</text:span><text:span text:style-name="T176">lement<text:s/></text:span><text:span text:style-name="T177">r</text:span><text:span text:style-name="T178">e</text:span><text:span text:style-name="T179">c</text:span><text:span text:style-name="T180">on</text:span><text:span text:style-name="T181">n</text:span><text:span text:style-name="T182">ais</text:span><text:span text:style-name="T183">s</text:span><text:span text:style-name="T184">ant env</text:span><text:span text:style-name="T185">e</text:span><text:span text:style-name="T186">rs</text:span><text:span text:style-name="T187"><text:s/>mon tuteur</text:span><text:span text:style-name="T188"><text:s/></text:span><text:span text:style-name="T189">L</text:span><text:span text:style-name="T190">AAN</text:span><text:span text:style-name="T191">A</text:span><text:span text:style-name="T192">N</text:span><text:span text:style-name="T193">I Abd</text:span><text:span text:style-name="T194">a</text:span><text:span text:style-name="T195">llah pour</text:span><text:span text:style-name="T196"><text:s/></text:span><text:span text:style-name="T197">son</text:span><text:span text:style-name="T198"><text:s/></text:span><text:span text:style-name="T199">a</text:span><text:span text:style-name="T200">cc</text:span><text:span text:style-name="T201">o</text:span><text:span text:style-name="T202">mpagnement quotidien. Sa disponibili</text:span><text:span text:style-name="T203">t</text:span><text:span text:style-name="T204">é</text:span><text:span text:style-name="T205">, sa patience et son ex</text:span><text:span text:style-name="T206">pe</text:span><text:span text:style-name="T207">rtise m'ont permis de m</text:span><text:span text:style-name="T208">e</text:span><text:span text:style-name="T209">ner à</text:span><text:span text:style-name="T210"><text:s/></text:span><text:span text:style-name="T211">bien les missions qui m'ont</text:span><text:span text:style-name="T212"><text:s/></text:span><text:span text:style-name="T213">été<text:s/></text:span><text:span text:style-name="T214">c</text:span><text:span text:style-name="T215">o</text:span><text:span text:style-name="T216">nfi</text:span><text:span text:style-name="T217">ée</text:span><text:span text:style-name="T218">s.</text:span></text:p>
      <text:p text:style-name="P219"/>
      <text:p text:style-name="P220"/>
      <text:p text:style-name="P221"/>
      <text:p text:style-name="P222"><text:span text:style-name="T223">Je r</text:span><text:span text:style-name="T224">e</text:span><text:span text:style-name="T225">me</text:span><text:span text:style-name="T226">r</text:span><text:span text:style-name="T227">cie<text:s/></text:span><text:span text:style-name="T228">é</text:span><text:span text:style-name="T229">g</text:span><text:span text:style-name="T230">alement l'</text:span><text:span text:style-name="T231">e</text:span><text:span text:style-name="T232">nsemble de</text:span><text:span text:style-name="T233"><text:s/></text:span><text:span text:style-name="T234">l'équipe de</text:span><text:span text:style-name="T235"><text:s/></text:span><text:span text:style-name="T236">l</text:span><text:span text:style-name="T237">a</text:span><text:span text:style-name="T238"><text:s/></text:span><text:span text:style-name="T239">retr</text:span><text:span text:style-name="T240">a</text:span><text:span text:style-name="T241">ite</text:span><text:span text:style-name="T242"><text:s/></text:span><text:span text:style-name="T243">complémentaire</text:span><text:span text:style-name="T244"><text:s/></text:span><text:span text:style-name="T245">de l'AG2R pour leur accu</text:span><text:span text:style-name="T246">e</text:span><text:span text:style-name="T247">il cha</text:span><text:span text:style-name="T248">l</text:span><text:span text:style-name="T249">eur</text:span><text:span text:style-name="T250">e</text:span><text:span text:style-name="T251">ux</text:span><text:span text:style-name="T252"><text:s/></text:span><text:span text:style-name="T253">e</text:span><text:span text:style-name="T254">t<text:s/></text:span><text:span text:style-name="T255">l</text:span><text:span text:style-name="T256">eur<text:s/></text:span><text:span text:style-name="T257">e</text:span><text:span text:style-name="T258">sprit de<text:s/></text:span><text:span text:style-name="T259">c</text:span><text:span text:style-name="T260">ol</text:span><text:span text:style-name="T261">l</text:span><text:span text:style-name="T262">ab</text:span><text:span text:style-name="T263">o</text:span><text:span text:style-name="T264">ra</text:span><text:span text:style-name="T265">t</text:span><text:span text:style-name="T266">ion.<text:s/></text:span><text:span text:style-name="T267">J</text:span><text:span text:style-name="T268">'ai be</text:span><text:span text:style-name="T269">a</text:span><text:span text:style-name="T270">u</text:span><text:span text:style-name="T271">c</text:span><text:span text:style-name="T272">oup<text:s/></text:span><text:span text:style-name="T273">a</text:span><text:span text:style-name="T274">p</text:span><text:span text:style-name="T275">p</text:span><text:span text:style-name="T276">ris</text:span><text:span text:style-name="T277"><text:s/></text:span><text:span text:style-name="T278">en travaillant à leurs<text:s/></text:span><text:span text:style-name="T279">c</text:span><text:span text:style-name="T280">ôtés et en<text:s/></text:span><text:span text:style-name="T281">p</text:span><text:span text:style-name="T282">articip</text:span><text:span text:style-name="T283">a</text:span><text:span text:style-name="T284">nt aux diff</text:span><text:span text:style-name="T285">é</text:span><text:span text:style-name="T286">rents projets.</text:span></text:p>
      <text:p text:style-name="P287"/>
      <text:p text:style-name="P288"/>
      <text:p text:style-name="P289"/>
      <text:p text:style-name="P290"><text:span text:style-name="T291">Je suis aussi reconn</text:span><text:span text:style-name="T292">a</text:span><text:span text:style-name="T293">issant envers<text:s/></text:span><text:span text:style-name="T294">K</text:span><text:span text:style-name="T295">ER</text:span><text:span text:style-name="T296">F</text:span><text:span text:style-name="T297">ERS</text:span><text:span text:style-name="T298"><text:s/></text:span><text:span text:style-name="T299">Damien pour son<text:s/></text:span><text:span text:style-name="T300">a</text:span><text:span text:style-name="T301">c</text:span><text:span text:style-name="T302">c</text:span><text:span text:style-name="T303">om</text:span><text:span text:style-name="T304">p</text:span><text:span text:style-name="T305">a</text:span><text:span text:style-name="T306">g</text:span><text:span text:style-name="T307">nement sur le sujet du dév</text:span><text:span text:style-name="T308">e</text:span><text:span text:style-name="T309">loppement.<text:s/></text:span><text:span text:style-name="T310">S</text:span><text:span text:style-name="T311">a d</text:span><text:span text:style-name="T312">i</text:span><text:span text:style-name="T313">sponibili</text:span><text:span text:style-name="T314">té,</text:span><text:span text:style-name="T315"><text:s/>sa p</text:span><text:span text:style-name="T316">a</text:span><text:span text:style-name="T317">tien</text:span><text:span text:style-name="T318">c</text:span><text:span text:style-name="T319">e<text:s/></text:span><text:span text:style-name="T320">e</text:span><text:span text:style-name="T321">t</text:span><text:span text:style-name="T322"><text:s/></text:span><text:span text:style-name="T323">son expertise m'ont pe</text:span><text:span text:style-name="T324">r</text:span><text:span text:style-name="T325">m</text:span><text:span text:style-name="T326">i</text:span><text:span text:style-name="T327">s de pro</text:span><text:span text:style-name="T328">g</text:span><text:span text:style-name="T329">r</text:span><text:span text:style-name="T330">e</text:span><text:span text:style-name="T331">sser r</text:span><text:span text:style-name="T332">a</text:span><text:span text:style-name="T333">pidement et de<text:s/></text:span><text:span text:style-name="T334">m</text:span><text:span text:style-name="T335">en</text:span><text:span text:style-name="T336">e</text:span><text:span text:style-name="T337">r</text:span><text:span text:style-name="T338"><text:s/></text:span><text:span text:style-name="T339">à</text:span><text:span text:style-name="T340"><text:s/></text:span><text:span text:style-name="T341">bien les m</text:span><text:span text:style-name="T342">i</text:span><text:span text:style-name="T343">ss</text:span><text:span text:style-name="T344">i</text:span><text:span text:style-name="T345">ons<text:s/></text:span><text:span text:style-name="T346">de développement<text:s/></text:span><text:span text:style-name="T347">qui</text:span><text:span text:style-name="T348"><text:s/></text:span><text:span text:style-name="T349">m</text:span><text:span text:style-name="T350">'</text:span><text:span text:style-name="T351">ont été confiées.</text:span></text:p>
      <text:p text:style-name="P352"/>
      <text:p text:style-name="P353"/>
      <text:p text:style-name="P354"/>
      <text:p text:style-name="P355"><text:span text:style-name="T356">Enfin, je souhaite<text:s/></text:span><text:span text:style-name="T357">e</text:span><text:span text:style-name="T358">xpri</text:span><text:span text:style-name="T359">m</text:span><text:span text:style-name="T360">er ma reconn</text:span><text:span text:style-name="T361">a</text:span><text:span text:style-name="T362">issa</text:span><text:span text:style-name="T363">n</text:span><text:span text:style-name="T364">ce<text:s/></text:span><text:span text:style-name="T365">à</text:span><text:span text:style-name="T366"><text:s/></text:span><text:span text:style-name="T367">C</text:span><text:span text:style-name="T368">hristèle<text:s/></text:span><text:span text:style-name="T369">F</text:span><text:span text:style-name="T370">ER</text:span><text:span text:style-name="T371">R</text:span><text:span text:style-name="T372">E</text:span><text:span text:style-name="T373">I</text:span><text:span text:style-name="T374">RA</text:span><text:span text:style-name="T375"><text:s/>et<text:s/></text:span><text:span text:style-name="T376">Patricia D</text:span><text:span text:style-name="T377">E</text:span><text:span text:style-name="T378">LOUCHE. L</text:span><text:span text:style-name="T379">e</text:span><text:span text:style-name="T380">ur soutien</text:span><text:span text:style-name="T381"><text:s/></text:span><text:span text:style-name="T382">et le</text:span><text:span text:style-name="T383">u</text:span><text:span text:style-name="T384">rs<text:s/></text:span><text:span text:style-name="T385">e</text:span><text:span text:style-name="T386">ncouragements ont été pr</text:span><text:span text:style-name="T387">éc</text:span><text:span text:style-name="T388">i</text:span><text:span text:style-name="T389">eux tout</text:span><text:span text:style-name="T390"><text:s/></text:span><text:span text:style-name="T391">au long de<text:s/></text:span><text:span text:style-name="T392">ce</text:span><text:span text:style-name="T393">t</text:span><text:span text:style-name="T394">t</text:span><text:span text:style-name="T395">e</text:span><text:span text:style-name="T396"><text:s/></text:span><text:span text:style-name="T397">expéri</text:span><text:span text:style-name="T398">e</text:span><text:span text:style-name="T399">n</text:span><text:span text:style-name="T400">ce.</text:span></text:p>
      <text:p text:style-name="P401"/>
      <text:p text:style-name="P402"/>
      <text:p text:style-name="P403"/>
      <text:p text:style-name="P404"><text:span text:style-name="T405">Ce stage au sein de l'AG2R a été une expérience très enrichissante sur le plan professionnel. J'ai pu approfondir des notions déjà vues auparavant et monter en compétences en travaillant sur des projets au sein de l'équipe.</text:span></text:p>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Normal"><text:span text:style-name="T425">Sommaire</text:span><text:span text:style-name="T426"> :</text:span></text:p>
      <text:p text:style-name="P427"/>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28"><text:a xlink:href="#_Toc486565914" office:target-frame-name="_top" xlink:show="replace"><text:span text:style-name="Lienhypertexte">1.</text:span><text:tab/><text:span text:style-name="Lienhypertexte">Remerciements</text:span><text:tab/><text:span text:style-name="Lienhypertexte">1</text:span></text:a></text:p>
          <text:p text:style-name="P429"><text:a xlink:href="#_Toc1195091280" office:target-frame-name="_top" xlink:show="replace"><text:span text:style-name="Lienhypertexte">2.</text:span><text:tab/><text:span text:style-name="Lienhypertexte">Présentation de l’entreprise</text:span><text:tab/><text:span text:style-name="Lienhypertexte">3</text:span></text:a></text:p>
          <text:p text:style-name="P430"><text:a xlink:href="#_Toc1973571164" office:target-frame-name="_top" xlink:show="replace"><text:span text:style-name="Lienhypertexte">3.</text:span><text:tab/><text:span text:style-name="Lienhypertexte">Présentation du service</text:span><text:tab/><text:span text:style-name="Lienhypertexte">4</text:span></text:a></text:p>
          <text:p text:style-name="P431"><text:a xlink:href="#_Toc715893137" office:target-frame-name="_top" xlink:show="replace"><text:span text:style-name="Lienhypertexte">4.</text:span><text:tab/><text:span text:style-name="Lienhypertexte">Présentation de l’environnement matériel et logiciel de l’entreprise</text:span><text:tab/><text:span text:style-name="Lienhypertexte">5</text:span></text:a></text:p>
          <text:p text:style-name="P432"><text:a xlink:href="#_Toc1023031681" office:target-frame-name="_top" xlink:show="replace"><text:span text:style-name="Lienhypertexte">5.</text:span><text:tab/><text:span text:style-name="Lienhypertexte">Présentation des contextes des situations professionnelles</text:span><text:tab/><text:span text:style-name="Lienhypertexte">6</text:span></text:a></text:p>
          <text:p text:style-name="P433"><text:a xlink:href="#_Toc1167746802" office:target-frame-name="_top" xlink:show="replace"><text:span text:style-name="Lienhypertexte">6.</text:span><text:tab/><text:span text:style-name="Lienhypertexte">Présentation des missions qui m'ont été confiés</text:span><text:tab/><text:span text:style-name="Lienhypertexte">6</text:span></text:a></text:p>
          <text:p text:style-name="P434"><text:a xlink:href="#_Toc1394039128" office:target-frame-name="_top" xlink:show="replace"><text:span text:style-name="Lienhypertexte">7.</text:span><text:tab/><text:span text:style-name="Lienhypertexte">Les tâches réalisées</text:span><text:tab/><text:span text:style-name="Lienhypertexte">9</text:span></text:a></text:p>
          <text:p text:style-name="P435"><text:a xlink:href="#_Toc390273462" office:target-frame-name="_top" xlink:show="replace"><text:span text:style-name="Lienhypertexte">8.</text:span><text:tab/><text:span text:style-name="Lienhypertexte">Participation à des entretiens ou réunions</text:span><text:tab/><text:span text:style-name="Lienhypertexte">11</text:span></text:a></text:p>
          <text:p text:style-name="P436"><text:a xlink:href="#_Toc1291158741" office:target-frame-name="_top" xlink:show="replace"><text:span text:style-name="Lienhypertexte">9.</text:span><text:tab/><text:span text:style-name="Lienhypertexte">Documents annexes</text:span><text:tab/><text:span text:style-name="Lienhypertexte">12</text:span></text:a></text:p>
        </text:index-body>
      </text:table-of-content>
      <text:p text:style-name="P437"/>
      <text:p text:style-name="P438"/>
      <text:p text:style-name="P439"/>
      <text:p text:style-name="P440"/>
      <text:p text:style-name="P441"/>
      <text:p text:style-name="P442"/>
      <text:p text:style-name="P443"/>
      <text:p text:style-name="P444"/>
      <text:list text:style-name="LFO18" text:continue-numbering="true">
        <text:list-item>
          <text:p text:style-name="P445"><text:bookmark-start text:name="_Toc1195091280"/>Présentation de l’entreprise<text:bookmark-end text:name="_Toc1195091280"/><text:s/></text:p>
        </text:list-item>
      </text:list>
      <text:p text:style-name="P446"/>
      <text:p text:style-name="Normal"><text:span text:style-name="T447">AG2</text:span><text:span text:style-name="T448">R</text:span><text:span text:style-name="T449"><text:s/></text:span><text:span text:style-name="T450">L</text:span><text:span text:style-name="T451">a</text:span><text:span text:style-name="T452"><text:s/>M</text:span><text:span text:style-name="T453">o</text:span><text:span text:style-name="T454">n</text:span><text:span text:style-name="T455">di</text:span><text:span text:style-name="T456">a</text:span><text:span text:style-name="T457">l</text:span><text:span text:style-name="T458">e</text:span><text:span text:style-name="T459"><text:s/></text:span><text:span text:style-name="T460">e</text:span><text:span text:style-name="T461">s</text:span><text:span text:style-name="T462">t<text:s/></text:span><text:span text:style-name="T463">u</text:span><text:span text:style-name="T464">n gr</text:span><text:span text:style-name="T465">o</text:span><text:span text:style-name="T466">u</text:span><text:span text:style-name="T467">p</text:span><text:span text:style-name="T468">e</text:span><text:span text:style-name="T469"><text:s/>fran</text:span><text:span text:style-name="T470">ç</text:span><text:span text:style-name="T471">a</text:span><text:span text:style-name="T472">is</text:span><text:span text:style-name="T473"><text:s/></text:span><text:span text:style-name="T474">m</text:span><text:span text:style-name="T475">a</text:span><text:span text:style-name="T476">j</text:span><text:span text:style-name="T477">e</text:span><text:span text:style-name="T478">u</text:span><text:span text:style-name="T479">r<text:s/></text:span><text:span text:style-name="T480">d</text:span><text:span text:style-name="T481">e</text:span><text:span text:style-name="T482"><text:s/></text:span><text:span text:style-name="T483">l'</text:span><text:span text:style-name="T484">a</text:span><text:span text:style-name="T485">ss</text:span><text:span text:style-name="T486">u</text:span><text:span text:style-name="T487">r</text:span><text:span text:style-name="T488">an</text:span><text:span text:style-name="T489">c</text:span><text:span text:style-name="T490">e,</text:span><text:span text:style-name="T491"><text:s/></text:span><text:span text:style-name="T492">de</text:span><text:span text:style-name="T493"><text:s/>la</text:span><text:span text:style-name="T494"><text:s/></text:span><text:span text:style-name="T495">pr</text:span><text:span text:style-name="T496">é</text:span><text:span text:style-name="T497">v</text:span><text:span text:style-name="T498">o</text:span><text:span text:style-name="T499">yan</text:span><text:span text:style-name="T500">c</text:span><text:span text:style-name="T501">e,</text:span><text:span text:style-name="T502"><text:s/></text:span><text:span text:style-name="T503">de</text:span><text:span text:style-name="T504"><text:s/>l'</text:span><text:span text:style-name="T505">é</text:span><text:span text:style-name="T506">p</text:span><text:span text:style-name="T507">a</text:span><text:span text:style-name="T508">rgn</text:span><text:span text:style-name="T509">e</text:span><text:span text:style-name="T510"><text:s/></text:span><text:span text:style-name="T511">e</text:span><text:span text:style-name="T512">t</text:span><text:span text:style-name="T513"><text:s/></text:span><text:span text:style-name="T514">de</text:span><text:span text:style-name="T515"><text:s/></text:span><text:span text:style-name="T516">l</text:span><text:span text:style-name="T517">a<text:s/></text:span><text:span text:style-name="T518">r</text:span><text:span text:style-name="T519">e</text:span><text:span text:style-name="T520">t</text:span><text:span text:style-name="T521">ra</text:span><text:span text:style-name="T522">i</text:span><text:span text:style-name="T523">t</text:span><text:span text:style-name="T524">e</text:span><text:span text:style-name="T525">,</text:span><text:span text:style-name="T526"><text:s/>n</text:span><text:span text:style-name="T527">é</text:span><text:span text:style-name="T528"><text:s/></text:span><text:span text:style-name="T529">de</text:span><text:span text:style-name="T530"><text:s/></text:span><text:span text:style-name="T531">la<text:s/></text:span><text:span text:style-name="T532">f</text:span><text:span text:style-name="T533">u</text:span><text:span text:style-name="T534">sio</text:span><text:span text:style-name="T535">n<text:s/></text:span><text:span text:style-name="T536">d</text:span><text:span text:style-name="T537">'A</text:span><text:span text:style-name="T538">G</text:span><text:span text:style-name="T539">2</text:span><text:span text:style-name="T540">R</text:span><text:span text:style-name="T541"><text:s/></text:span><text:span text:style-name="T542">e</text:span><text:span text:style-name="T543">t<text:s/></text:span><text:span text:style-name="T544">d</text:span><text:span text:style-name="T545">e</text:span><text:span text:style-name="T546"><text:s/></text:span><text:span text:style-name="T547">L</text:span><text:span text:style-name="T548">a</text:span><text:span text:style-name="T549"><text:s/></text:span><text:span text:style-name="T550">M</text:span><text:span text:style-name="T551">o</text:span><text:span text:style-name="T552">n</text:span><text:span text:style-name="T553">di</text:span><text:span text:style-name="T554">a</text:span><text:span text:style-name="T555">l</text:span><text:span text:style-name="T556">e</text:span><text:span text:style-name="T557"><text:s/></text:span><text:span text:style-name="T558">e</text:span><text:span text:style-name="T559">n</text:span><text:span text:style-name="T560"><text:s/></text:span><text:span text:style-name="T561">2008</text:span><text:span text:style-name="T562">.</text:span><text:span text:style-name="T563"><text:s/></text:span><text:span text:style-name="T564">A</text:span><text:span text:style-name="T565">G</text:span><text:span text:style-name="T566">2</text:span><text:span text:style-name="T567">R,</text:span><text:span text:style-name="T568"><text:s/></text:span><text:span text:style-name="T569">c</text:span><text:span text:style-name="T570">r</text:span><text:span text:style-name="T571">é</text:span><text:span text:style-name="T572">ée</text:span><text:span text:style-name="T573"><text:s/></text:span><text:span text:style-name="T574">e</text:span><text:span text:style-name="T575">n 1951</text:span><text:span text:style-name="T576">,</text:span><text:span text:style-name="T577"><text:s/></text:span><text:span text:style-name="T578">é</text:span><text:span text:style-name="T579">ta</text:span><text:span text:style-name="T580">i</text:span><text:span text:style-name="T581">t<text:s/></text:span><text:span text:style-name="T582">s</text:span><text:span text:style-name="T583">p</text:span><text:span text:style-name="T584">éci</text:span><text:span text:style-name="T585">al</text:span><text:span text:style-name="T586">isé</text:span><text:span text:style-name="T587">e</text:span><text:span text:style-name="T588"><text:s/></text:span><text:span text:style-name="T589">d</text:span><text:span text:style-name="T590">a</text:span><text:span text:style-name="T591">n</text:span><text:span text:style-name="T592">s</text:span><text:span text:style-name="T593"><text:s/>la<text:s/></text:span><text:span text:style-name="T594">r</text:span><text:span text:style-name="T595">e</text:span><text:span text:style-name="T596">t</text:span><text:span text:style-name="T597">r</text:span><text:span text:style-name="T598">a</text:span><text:span text:style-name="T599">i</text:span><text:span text:style-name="T600">t</text:span><text:span text:style-name="T601">e</text:span><text:span text:style-name="T602"><text:s/></text:span><text:span text:style-name="T603">d</text:span><text:span text:style-name="T604">e</text:span><text:span text:style-name="T605">s</text:span><text:span text:style-name="T606"><text:s/></text:span><text:span text:style-name="T607">c</text:span><text:span text:style-name="T608">a</text:span><text:span text:style-name="T609">d</text:span><text:span text:style-name="T610">r</text:span><text:span text:style-name="T611">es,</text:span><text:span text:style-name="T612"><text:s/>t</text:span><text:span text:style-name="T613">a</text:span><text:span text:style-name="T614">n</text:span><text:span text:style-name="T615">d</text:span><text:span text:style-name="T616">is</text:span><text:span text:style-name="T617"><text:s/></text:span><text:span text:style-name="T618">q</text:span><text:span text:style-name="T619">u</text:span><text:span text:style-name="T620">e</text:span><text:span text:style-name="T621"><text:s/></text:span><text:span text:style-name="T622">L</text:span><text:span text:style-name="T623">a</text:span><text:span text:style-name="T624"><text:s/></text:span><text:span text:style-name="T625">M</text:span><text:span text:style-name="T626">o</text:span><text:span text:style-name="T627">n</text:span><text:span text:style-name="T628">di</text:span><text:span text:style-name="T629">a</text:span><text:span text:style-name="T630">l</text:span><text:span text:style-name="T631">e</text:span><text:span text:style-name="T632">,</text:span><text:span text:style-name="T633"><text:s/></text:span><text:span text:style-name="T634">f</text:span><text:span text:style-name="T635">o</text:span><text:span text:style-name="T636">n</text:span><text:span text:style-name="T637">dé</text:span><text:span text:style-name="T638">e</text:span><text:span text:style-name="T639"><text:s/></text:span><text:span text:style-name="T640">e</text:span><text:span text:style-name="T641">n<text:s/></text:span><text:span text:style-name="T642">1</text:span><text:span text:style-name="T643">905</text:span><text:span text:style-name="T644">,</text:span><text:span text:style-name="T645"><text:s/></text:span><text:span text:style-name="T646">o</text:span><text:span text:style-name="T647">f</text:span><text:span text:style-name="T648">f</text:span><text:span text:style-name="T649">ra</text:span><text:span text:style-name="T650">i</text:span><text:span text:style-name="T651">t</text:span><text:span text:style-name="T652"><text:s/></text:span><text:span text:style-name="T653">d</text:span><text:span text:style-name="T654">e</text:span><text:span text:style-name="T655">s</text:span><text:span text:style-name="T656"><text:s/>a</text:span><text:span text:style-name="T657">s</text:span><text:span text:style-name="T658">s</text:span><text:span text:style-name="T659">u</text:span><text:span text:style-name="T660">r</text:span><text:span text:style-name="T661">an</text:span><text:span text:style-name="T662">c</text:span><text:span text:style-name="T663">es</text:span><text:span text:style-name="T664"><text:s/>a</text:span><text:span text:style-name="T665">u</text:span><text:span text:style-name="T666">x</text:span><text:span text:style-name="T667"><text:s/></text:span><text:span text:style-name="T668">trava</text:span><text:span text:style-name="T669">i</text:span><text:span text:style-name="T670">ll</text:span><text:span text:style-name="T671">e</text:span><text:span text:style-name="T672">u</text:span><text:span text:style-name="T673">r</text:span><text:span text:style-name="T674">s.</text:span><text:span text:style-name="T675"><text:s/></text:span><text:span text:style-name="T676">L</text:span><text:span text:style-name="T677">a f</text:span><text:span text:style-name="T678">u</text:span><text:span text:style-name="T679">si</text:span><text:span text:style-name="T680">o</text:span><text:span text:style-name="T681">n</text:span><text:span text:style-name="T682"><text:s/></text:span><text:span text:style-name="T683">a<text:s/></text:span><text:span text:style-name="T684">p</text:span><text:span text:style-name="T685">e</text:span><text:span text:style-name="T686">rm</text:span><text:span text:style-name="T687">i</text:span><text:span text:style-name="T688">s</text:span><text:span text:style-name="T689"><text:s/></text:span><text:span text:style-name="T690">de</text:span><text:span text:style-name="T691"><text:s/></text:span><text:span text:style-name="T692">c</text:span><text:span text:style-name="T693">r</text:span><text:span text:style-name="T694">ée</text:span><text:span text:style-name="T695">r</text:span><text:span text:style-name="T696"><text:s/></text:span><text:span text:style-name="T697">u</text:span><text:span text:style-name="T698">n a</text:span><text:span text:style-name="T699">c</text:span><text:span text:style-name="T700">t</text:span><text:span text:style-name="T701">eu</text:span><text:span text:style-name="T702">r</text:span><text:span text:style-name="T703"><text:s/></text:span><text:span text:style-name="T704">d</text:span><text:span text:style-name="T705">i</text:span><text:span text:style-name="T706">v</text:span><text:span text:style-name="T707">e</text:span><text:span text:style-name="T708">r</text:span><text:span text:style-name="T709">si</text:span><text:span text:style-name="T710">f</text:span><text:span text:style-name="T711">i</text:span><text:span text:style-name="T712">é,</text:span><text:span text:style-name="T713"><text:s/></text:span><text:span text:style-name="T714">c</text:span><text:span text:style-name="T715">o</text:span><text:span text:style-name="T716">mp</text:span><text:span text:style-name="T717">t</text:span><text:span text:style-name="T718">a</text:span><text:span text:style-name="T719">nt a</text:span><text:span text:style-name="T720">ujou</text:span><text:span text:style-name="T721">r</text:span><text:span text:style-name="T722">d</text:span><text:span text:style-name="T723">'</text:span><text:span text:style-name="T724">h</text:span><text:span text:style-name="T725">ui</text:span><text:span text:style-name="T726"><text:s/>pl</text:span><text:span text:style-name="T727">u</text:span><text:span text:style-name="T728">s</text:span><text:span text:style-name="T729"><text:s/></text:span><text:span text:style-name="T730">de</text:span><text:span text:style-name="T731"><text:s/>15</text:span><text:span text:style-name="T732"><text:s/></text:span><text:span text:style-name="T733">m</text:span><text:span text:style-name="T734">i</text:span><text:span text:style-name="T735">l</text:span><text:span text:style-name="T736">l</text:span><text:span text:style-name="T737">io</text:span><text:span text:style-name="T738">n</text:span><text:span text:style-name="T739">s</text:span><text:span text:style-name="T740"><text:s/></text:span><text:span text:style-name="T741">de</text:span><text:span text:style-name="T742"><text:s/></text:span><text:span text:style-name="T743">c</text:span><text:span text:style-name="T744">l</text:span><text:span text:style-name="T745">i</text:span><text:span text:style-name="T746">e</text:span><text:span text:style-name="T747">n</text:span><text:span text:style-name="T748">t</text:span><text:span text:style-name="T749">s.</text:span><text:span text:style-name="T750"><text:s/></text:span></text:p>
      <text:p text:style-name="Normal"><text:span text:style-name="T751">En</text:span><text:span text:style-name="T752"><text:s/></text:span><text:span text:style-name="T753">2020</text:span><text:span text:style-name="T754">,</text:span><text:span text:style-name="T755"><text:s/></text:span><text:span text:style-name="T756">A</text:span><text:span text:style-name="T757">G</text:span><text:span text:style-name="T758">2</text:span><text:span text:style-name="T759">R</text:span><text:span text:style-name="T760"><text:s/></text:span><text:span text:style-name="T761">L</text:span><text:span text:style-name="T762">a</text:span><text:span text:style-name="T763"><text:s/>M</text:span><text:span text:style-name="T764">o</text:span><text:span text:style-name="T765">n</text:span><text:span text:style-name="T766">di</text:span><text:span text:style-name="T767">a</text:span><text:span text:style-name="T768">l</text:span><text:span text:style-name="T769">e</text:span><text:span text:style-name="T770"><text:s/></text:span><text:span text:style-name="T771">a</text:span><text:span text:style-name="T772"><text:s/></text:span><text:span text:style-name="T773">r</text:span><text:span text:style-name="T774">é</text:span><text:span text:style-name="T775">a</text:span><text:span text:style-name="T776">l</text:span><text:span text:style-name="T777">i</text:span><text:span text:style-name="T778">sé</text:span><text:span text:style-name="T779"><text:s/></text:span><text:span text:style-name="T780">u</text:span><text:span text:style-name="T781">n<text:s/></text:span><text:span text:style-name="T782">c</text:span><text:span text:style-name="T783">h</text:span><text:span text:style-name="T784">i</text:span><text:span text:style-name="T785">f</text:span><text:span text:style-name="T786">f</text:span><text:span text:style-name="T787">r</text:span><text:span text:style-name="T788">e</text:span><text:span text:style-name="T789"><text:s/></text:span><text:span text:style-name="T790">d</text:span><text:span text:style-name="T791">'affa</text:span><text:span text:style-name="T792">i</text:span><text:span text:style-name="T793">r</text:span><text:span text:style-name="T794">es</text:span><text:span text:style-name="T795"><text:s/></text:span><text:span text:style-name="T796">d</text:span><text:span text:style-name="T797">e</text:span><text:span text:style-name="T798"><text:s/></text:span><text:span text:style-name="T799">9</text:span><text:span text:style-name="T800">,</text:span><text:span text:style-name="T801">3</text:span><text:span text:style-name="T802"><text:s/>m</text:span><text:span text:style-name="T803">i</text:span><text:span text:style-name="T804">ll</text:span><text:span text:style-name="T805">i</text:span><text:span text:style-name="T806">a</text:span><text:span text:style-name="T807">r</text:span><text:span text:style-name="T808">ds</text:span><text:span text:style-name="T809"><text:s/></text:span><text:span text:style-name="T810">d</text:span><text:span text:style-name="T811">'</text:span><text:span text:style-name="T812">eu</text:span><text:span text:style-name="T813">r</text:span><text:span text:style-name="T814">os</text:span><text:span text:style-name="T815"><text:s/></text:span><text:span text:style-name="T816">d</text:span><text:span text:style-name="T817">a</text:span><text:span text:style-name="T818">n</text:span><text:span text:style-name="T819">s</text:span><text:span text:style-name="T820"><text:s/></text:span><text:span text:style-name="T821">l</text:span><text:span text:style-name="T822">e</text:span><text:span text:style-name="T823"><text:s/></text:span><text:span text:style-name="T824">s</text:span><text:span text:style-name="T825">ec</text:span><text:span text:style-name="T826">t</text:span><text:span text:style-name="T827">e</text:span><text:span text:style-name="T828">u</text:span><text:span text:style-name="T829">r<text:s/></text:span><text:span text:style-name="T830">d</text:span><text:span text:style-name="T831">e</text:span><text:span text:style-name="T832"><text:s/></text:span><text:span text:style-name="T833">l'</text:span><text:span text:style-name="T834">a</text:span><text:span text:style-name="T835">ss</text:span><text:span text:style-name="T836">u</text:span><text:span text:style-name="T837">r</text:span><text:span text:style-name="T838">a</text:span><text:span text:style-name="T839">n</text:span><text:span text:style-name="T840">c</text:span><text:span text:style-name="T841">e</text:span><text:span text:style-name="T842"><text:s/></text:span><text:span text:style-name="T843">e</text:span><text:span text:style-name="T844">t a</text:span><text:span text:style-name="T845"><text:s/></text:span><text:span text:style-name="T846">e</text:span><text:span text:style-name="T847">n</text:span><text:span text:style-name="T848">r</text:span><text:span text:style-name="T849">e</text:span><text:span text:style-name="T850">g</text:span><text:span text:style-name="T851">i</text:span><text:span text:style-name="T852">s</text:span><text:span text:style-name="T853">tr</text:span><text:span text:style-name="T854">é</text:span><text:span text:style-name="T855"><text:s/>17</text:span><text:span text:style-name="T856">,</text:span><text:span text:style-name="T857">7</text:span><text:span text:style-name="T858"><text:s/></text:span><text:span text:style-name="T859">m</text:span><text:span text:style-name="T860">i</text:span><text:span text:style-name="T861">ll</text:span><text:span text:style-name="T862">i</text:span><text:span text:style-name="T863">a</text:span><text:span text:style-name="T864">r</text:span><text:span text:style-name="T865">ds</text:span><text:span text:style-name="T866"><text:s/></text:span><text:span text:style-name="T867">d</text:span><text:span text:style-name="T868">'</text:span><text:span text:style-name="T869">eu</text:span><text:span text:style-name="T870">r</text:span><text:span text:style-name="T871">os</text:span><text:span text:style-name="T872"><text:s/></text:span><text:span text:style-name="T873">d</text:span><text:span text:style-name="T874">e</text:span><text:span text:style-name="T875"><text:s/></text:span><text:span text:style-name="T876">c</text:span><text:span text:style-name="T877">o</text:span><text:span text:style-name="T878">t</text:span><text:span text:style-name="T879">i</text:span><text:span text:style-name="T880">s</text:span><text:span text:style-name="T881">at</text:span><text:span text:style-name="T882">i</text:span><text:span text:style-name="T883">o</text:span><text:span text:style-name="T884">n</text:span><text:span text:style-name="T885">s</text:span><text:span text:style-name="T886"><text:s/></text:span><text:span text:style-name="T887">d</text:span><text:span text:style-name="T888">e</text:span><text:span text:style-name="T889"><text:s/></text:span><text:span text:style-name="T890">r</text:span><text:span text:style-name="T891">e</text:span><text:span text:style-name="T892">t</text:span><text:span text:style-name="T893">r</text:span><text:span text:style-name="T894">a</text:span><text:span text:style-name="T895">i</text:span><text:span text:style-name="T896">t</text:span><text:span text:style-name="T897">e</text:span><text:span text:style-name="T898"><text:s/></text:span><text:span text:style-name="T899">c</text:span><text:span text:style-name="T900">o</text:span><text:span text:style-name="T901">mp</text:span><text:span text:style-name="T902">l</text:span><text:span text:style-name="T903">é</text:span><text:span text:style-name="T904">m</text:span><text:span text:style-name="T905">e</text:span><text:span text:style-name="T906">n</text:span><text:span text:style-name="T907">t</text:span><text:span text:style-name="T908">a</text:span><text:span text:style-name="T909">i</text:span><text:span text:style-name="T910">r</text:span><text:span text:style-name="T911">e.</text:span><text:span text:style-name="T912"><text:s/></text:span></text:p>
      <text:p text:style-name="Normal"><text:span text:style-name="T913">Le</text:span><text:span text:style-name="T914"><text:s/>g</text:span><text:span text:style-name="T915">r</text:span><text:span text:style-name="T916">ou</text:span><text:span text:style-name="T917">p</text:span><text:span text:style-name="T918">e</text:span><text:span text:style-name="T919"><text:s/></text:span><text:span text:style-name="T920">se</text:span><text:span text:style-name="T921"><text:s/></text:span><text:span text:style-name="T922">d</text:span><text:span text:style-name="T923">i</text:span><text:span text:style-name="T924">s</text:span><text:span text:style-name="T925">t</text:span><text:span text:style-name="T926">i</text:span><text:span text:style-name="T927">ng</text:span><text:span text:style-name="T928">u</text:span><text:span text:style-name="T929">e</text:span><text:span text:style-name="T930"><text:s/></text:span><text:span text:style-name="T931">p</text:span><text:span text:style-name="T932">a</text:span><text:span text:style-name="T933">r</text:span><text:span text:style-name="T934"><text:s/></text:span><text:span text:style-name="T935">s</text:span><text:span text:style-name="T936">a<text:s/></text:span><text:span text:style-name="T937">c</text:span><text:span text:style-name="T938">a</text:span><text:span text:style-name="T939">pa</text:span><text:span text:style-name="T940">ci</text:span><text:span text:style-name="T941">t</text:span><text:span text:style-name="T942">é</text:span><text:span text:style-name="T943"><text:s/></text:span><text:span text:style-name="T944">d</text:span><text:span text:style-name="T945">'a</text:span><text:span text:style-name="T946">d</text:span><text:span text:style-name="T947">ap</text:span><text:span text:style-name="T948">t</text:span><text:span text:style-name="T949">at</text:span><text:span text:style-name="T950">io</text:span><text:span text:style-name="T951">n</text:span><text:span text:style-name="T952">,</text:span><text:span text:style-name="T953"><text:s/></text:span><text:span text:style-name="T954">s</text:span><text:span text:style-name="T955">o</text:span><text:span text:style-name="T956">n</text:span><text:span text:style-name="T957"><text:s/></text:span><text:span text:style-name="T958">o</text:span><text:span text:style-name="T959">f</text:span><text:span text:style-name="T960">f</text:span><text:span text:style-name="T961">r</text:span><text:span text:style-name="T962">e</text:span><text:span text:style-name="T963"><text:s/>v</text:span><text:span text:style-name="T964">a</text:span><text:span text:style-name="T965">r</text:span><text:span text:style-name="T966">iée</text:span><text:span text:style-name="T967"><text:s/></text:span><text:span text:style-name="T968">e</text:span><text:span text:style-name="T969">t<text:s/></text:span><text:span text:style-name="T970">s</text:span><text:span text:style-name="T971">es</text:span><text:span text:style-name="T972"><text:s/>v</text:span><text:span text:style-name="T973">al</text:span><text:span text:style-name="T974">eu</text:span><text:span text:style-name="T975">r</text:span><text:span text:style-name="T976">s</text:span><text:span text:style-name="T977"><text:s/></text:span><text:span text:style-name="T978">de</text:span><text:span text:style-name="T979"><text:s/></text:span><text:span text:style-name="T980">s</text:span><text:span text:style-name="T981">o</text:span><text:span text:style-name="T982">l</text:span><text:span text:style-name="T983">i</text:span><text:span text:style-name="T984">d</text:span><text:span text:style-name="T985">ar</text:span><text:span text:style-name="T986">i</text:span><text:span text:style-name="T987">t</text:span><text:span text:style-name="T988">é</text:span><text:span text:style-name="T989">,</text:span><text:span text:style-name="T990"><text:s/></text:span><text:span text:style-name="T991">d</text:span><text:span text:style-name="T992">'</text:span><text:span text:style-name="T993">e</text:span><text:span text:style-name="T994">s</text:span><text:span text:style-name="T995">pr</text:span><text:span text:style-name="T996">i</text:span><text:span text:style-name="T997">t<text:s/></text:span><text:span text:style-name="T998">d</text:span><text:span text:style-name="T999">'</text:span><text:span text:style-name="T1000">e</text:span><text:span text:style-name="T1001">n</text:span><text:span text:style-name="T1002">t</text:span><text:span text:style-name="T1003">r</text:span><text:span text:style-name="T1004">e</text:span><text:span text:style-name="T1005">p</text:span><text:span text:style-name="T1006">r</text:span><text:span text:style-name="T1007">i</text:span><text:span text:style-name="T1008">s</text:span><text:span text:style-name="T1009">e,</text:span><text:span text:style-name="T1010"><text:s/></text:span><text:span text:style-name="T1011">de</text:span><text:span text:style-name="T1012"><text:s/>t</text:span><text:span text:style-name="T1013">r</text:span><text:span text:style-name="T1014">an</text:span><text:span text:style-name="T1015">s</text:span><text:span text:style-name="T1016">p</text:span><text:span text:style-name="T1017">a</text:span><text:span text:style-name="T1018">r</text:span><text:span text:style-name="T1019">e</text:span><text:span text:style-name="T1020">n</text:span><text:span text:style-name="T1021">ce,</text:span><text:span text:style-name="T1022"><text:s/></text:span><text:span text:style-name="T1023">d</text:span><text:span text:style-name="T1024">'</text:span><text:span text:style-name="T1025">e</text:span><text:span text:style-name="T1026">ng</text:span><text:span text:style-name="T1027">ag</text:span><text:span text:style-name="T1028">e</text:span><text:span text:style-name="T1029">m</text:span><text:span text:style-name="T1030">e</text:span><text:span text:style-name="T1031">nt<text:s/></text:span><text:span text:style-name="T1032">e</text:span><text:span text:style-name="T1033">t<text:s/></text:span><text:span text:style-name="T1034">d</text:span><text:span text:style-name="T1035">e</text:span><text:span text:style-name="T1036"><text:s/>pr</text:span><text:span text:style-name="T1037">o</text:span><text:span text:style-name="T1038">x</text:span><text:span text:style-name="T1039">i</text:span><text:span text:style-name="T1040">m</text:span><text:span text:style-name="T1041">i</text:span><text:span text:style-name="T1042">t</text:span><text:span text:style-name="T1043">é.</text:span><text:span text:style-name="T1044"><text:s/>AG</text:span><text:span text:style-name="T1045">2</text:span><text:span text:style-name="T1046">R</text:span><text:span text:style-name="T1047"><text:s/></text:span><text:span text:style-name="T1048">L</text:span><text:span text:style-name="T1049">a</text:span><text:span text:style-name="T1050"><text:s/>M</text:span><text:span text:style-name="T1051">o</text:span><text:span text:style-name="T1052">n</text:span><text:span text:style-name="T1053">di</text:span><text:span text:style-name="T1054">a</text:span><text:span text:style-name="T1055">l</text:span><text:span text:style-name="T1056">e</text:span><text:span text:style-name="T1057"><text:s/></text:span><text:span text:style-name="T1058">e</text:span><text:span text:style-name="T1059">s</text:span><text:span text:style-name="T1060">t</text:span><text:span text:style-name="T1061"><text:s/></text:span><text:span text:style-name="T1062">e</text:span><text:span text:style-name="T1063">ng</text:span><text:span text:style-name="T1064">ag</text:span><text:span text:style-name="T1065">é</text:span><text:span text:style-name="T1066"><text:s/></text:span><text:span text:style-name="T1067">d</text:span><text:span text:style-name="T1068">an</text:span><text:span text:style-name="T1069">s</text:span><text:span text:style-name="T1070"><text:s/></text:span><text:span text:style-name="T1071">l</text:span><text:span text:style-name="T1072">e</text:span><text:span text:style-name="T1073"><text:s/></text:span><text:span text:style-name="T1074">d</text:span><text:span text:style-name="T1075">é</text:span><text:span text:style-name="T1076">v</text:span><text:span text:style-name="T1077">e</text:span><text:span text:style-name="T1078">l</text:span><text:span text:style-name="T1079">o</text:span><text:span text:style-name="T1080">p</text:span><text:span text:style-name="T1081">p</text:span><text:span text:style-name="T1082">e</text:span><text:span text:style-name="T1083">m</text:span><text:span text:style-name="T1084">e</text:span><text:span text:style-name="T1085">n</text:span><text:span text:style-name="T1086">t<text:s/></text:span><text:span text:style-name="T1087">d</text:span><text:span text:style-name="T1088">u</text:span><text:span text:style-name="T1089">r</text:span><text:span text:style-name="T1090">a</text:span><text:span text:style-name="T1091">bl</text:span><text:span text:style-name="T1092">e</text:span><text:span text:style-name="T1093">.</text:span></text:p>
      <text:p text:style-name="P1094"/>
      <text:p text:style-name="P1095"><text:span text:style-name="T1096">V</text:span><text:span text:style-name="T1097">o</text:span><text:span text:style-name="T1098">i</text:span><text:span text:style-name="T1099">c</text:span><text:span text:style-name="T1100">i</text:span><text:span text:style-name="T1101"><text:s/></text:span><text:span text:style-name="T1102">q</text:span><text:span text:style-name="T1103">u</text:span><text:span text:style-name="T1104">e</text:span><text:span text:style-name="T1105">l</text:span><text:span text:style-name="T1106">q</text:span><text:span text:style-name="T1107">u</text:span><text:span text:style-name="T1108">es</text:span><text:span text:style-name="T1109"><text:s/>p</text:span><text:span text:style-name="T1110">o</text:span><text:span text:style-name="T1111">i</text:span><text:span text:style-name="T1112">n</text:span><text:span text:style-name="T1113">t</text:span><text:span text:style-name="T1114">s</text:span><text:span text:style-name="T1115"><text:s/></text:span><text:span text:style-name="T1116">c</text:span><text:span text:style-name="T1117">l</text:span><text:span text:style-name="T1118">é</text:span><text:span text:style-name="T1119">s</text:span><text:span text:style-name="T1120"><text:s/></text:span><text:span text:style-name="T1121">:</text:span></text:p>
      <text:p text:style-name="P1122"/>
      <text:p text:style-name="P1123"><text:span text:style-name="T1124">·</text:span><text:span text:style-name="T1125"><text:tab/></text:span><text:span text:style-name="T1126">T</text:span><text:span text:style-name="T1127">y</text:span><text:span text:style-name="T1128">pe</text:span><text:span text:style-name="T1129"><text:s/></text:span><text:span text:style-name="T1130">d</text:span><text:span text:style-name="T1131">’</text:span><text:span text:style-name="T1132">o</text:span><text:span text:style-name="T1133">rg</text:span><text:span text:style-name="T1134">a</text:span><text:span text:style-name="T1135">n</text:span><text:span text:style-name="T1136">i</text:span><text:span text:style-name="T1137">sa</text:span><text:span text:style-name="T1138">t</text:span><text:span text:style-name="T1139">ion</text:span><text:span text:style-name="T1140"><text:s/></text:span><text:span text:style-name="T1141">:</text:span><text:span text:style-name="T1142"><text:s/></text:span><text:span text:style-name="T1143">Organ</text:span><text:span text:style-name="T1144">i</text:span><text:span text:style-name="T1145">s</text:span><text:span text:style-name="T1146">m</text:span><text:span text:style-name="T1147">e</text:span><text:span text:style-name="T1148"><text:s/>à</text:span><text:span text:style-name="T1149"><text:s/></text:span><text:span text:style-name="T1150">b</text:span><text:span text:style-name="T1151">u</text:span><text:span text:style-name="T1152">t</text:span><text:span text:style-name="T1153"><text:s/></text:span><text:span text:style-name="T1154">n</text:span><text:span text:style-name="T1155">o</text:span><text:span text:style-name="T1156">n</text:span><text:span text:style-name="T1157"><text:s/></text:span><text:span text:style-name="T1158">l</text:span><text:span text:style-name="T1159">u</text:span><text:span text:style-name="T1160">c</text:span><text:span text:style-name="T1161">r</text:span><text:span text:style-name="T1162">a</text:span><text:span text:style-name="T1163">t</text:span><text:span text:style-name="T1164">i</text:span><text:span text:style-name="T1165">f</text:span><text:span text:style-name="T1166">.</text:span></text:p>
      <text:p text:style-name="P1167"/>
      <text:p text:style-name="P1168"><text:span text:style-name="T1169">·</text:span><text:span text:style-name="T1170"><text:tab/></text:span><text:span text:style-name="T1171">Cl</text:span><text:span text:style-name="T1172">ientè</text:span><text:span text:style-name="T1173">l</text:span><text:span text:style-name="T1174">e</text:span><text:span text:style-name="T1175"><text:s/></text:span><text:span text:style-name="T1176">:</text:span><text:span text:style-name="T1177"><text:s/></text:span><text:span text:style-name="T1178">A</text:span><text:span text:style-name="T1179">s</text:span><text:span text:style-name="T1180">s</text:span><text:span text:style-name="T1181">u</text:span><text:span text:style-name="T1182">r</text:span><text:span text:style-name="T1183">e</text:span><text:span text:style-name="T1184"><text:s/></text:span><text:span text:style-name="T1185">pl</text:span><text:span text:style-name="T1186">us</text:span><text:span text:style-name="T1187"><text:s/></text:span><text:span text:style-name="T1188">d</text:span><text:span text:style-name="T1189">e</text:span><text:span text:style-name="T1190"><text:s/></text:span><text:span text:style-name="T1191">15</text:span><text:span text:style-name="T1192"><text:s/></text:span><text:span text:style-name="T1193">m</text:span><text:span text:style-name="T1194">i</text:span><text:span text:style-name="T1195">ll</text:span><text:span text:style-name="T1196">i</text:span><text:span text:style-name="T1197">o</text:span><text:span text:style-name="T1198">n</text:span><text:span text:style-name="T1199">s</text:span><text:span text:style-name="T1200"><text:s/></text:span><text:span text:style-name="T1201">d</text:span><text:span text:style-name="T1202">e</text:span><text:span text:style-name="T1203"><text:s/></text:span><text:span text:style-name="T1204">c</text:span><text:span text:style-name="T1205">l</text:span><text:span text:style-name="T1206">i</text:span><text:span text:style-name="T1207">e</text:span><text:span text:style-name="T1208">nt</text:span><text:span text:style-name="T1209">s</text:span><text:span text:style-name="T1210"><text:s/></text:span><text:span text:style-name="T1211">i</text:span><text:span text:style-name="T1212">n</text:span><text:span text:style-name="T1213">di</text:span><text:span text:style-name="T1214">v</text:span><text:span text:style-name="T1215">idue</text:span><text:span text:style-name="T1216">l</text:span><text:span text:style-name="T1217">s</text:span><text:span text:style-name="T1218"><text:s/></text:span><text:span text:style-name="T1219">e</text:span><text:span text:style-name="T1220">t</text:span><text:span text:style-name="T1221"><text:s/></text:span><text:span text:style-name="T1222">500 000</text:span><text:span text:style-name="T1223"><text:s/></text:span><text:span text:style-name="T1224">e</text:span><text:span text:style-name="T1225">n</text:span><text:span text:style-name="T1226">t</text:span><text:span text:style-name="T1227">r</text:span><text:span text:style-name="T1228">e</text:span><text:span text:style-name="T1229">pr</text:span><text:span text:style-name="T1230">i</text:span><text:span text:style-name="T1231">se</text:span><text:span text:style-name="T1232">s.</text:span></text:p>
      <text:p text:style-name="P1233"/>
      <text:p text:style-name="P1234"><text:span text:style-name="T1235">·</text:span><text:span text:style-name="T1236"><text:tab/></text:span><text:span text:style-name="T1237">E</text:span><text:span text:style-name="T1238">x</text:span><text:span text:style-name="T1239">pe</text:span><text:span text:style-name="T1240">r</text:span><text:span text:style-name="T1241">t</text:span><text:span text:style-name="T1242">i</text:span><text:span text:style-name="T1243">s</text:span><text:span text:style-name="T1244">e</text:span><text:span text:style-name="T1245"><text:s/></text:span><text:span text:style-name="T1246">:</text:span><text:span text:style-name="T1247"><text:s/></text:span><text:span text:style-name="T1248">S</text:span><text:span text:style-name="T1249">p</text:span><text:span text:style-name="T1250">éci</text:span><text:span text:style-name="T1251">al</text:span><text:span text:style-name="T1252">i</text:span><text:span text:style-name="T1253">sé</text:span><text:span text:style-name="T1254"><text:s/></text:span><text:span text:style-name="T1255">d</text:span><text:span text:style-name="T1256">a</text:span><text:span text:style-name="T1257">n</text:span><text:span text:style-name="T1258">s</text:span><text:span text:style-name="T1259"><text:s/></text:span><text:span text:style-name="T1260">l</text:span><text:span text:style-name="T1261">'</text:span><text:span text:style-name="T1262">é</text:span><text:span text:style-name="T1263">p</text:span><text:span text:style-name="T1264">argn</text:span><text:span text:style-name="T1265">e,</text:span><text:span text:style-name="T1266"><text:s/>la<text:s/></text:span><text:span text:style-name="T1267">r</text:span><text:span text:style-name="T1268">e</text:span><text:span text:style-name="T1269">t</text:span><text:span text:style-name="T1270">ra</text:span><text:span text:style-name="T1271">i</text:span><text:span text:style-name="T1272">t</text:span><text:span text:style-name="T1273">e,</text:span><text:span text:style-name="T1274"><text:s/></text:span><text:span text:style-name="T1275">l</text:span><text:span text:style-name="T1276">a<text:s/></text:span><text:span text:style-name="T1277">s</text:span><text:span text:style-name="T1278">a</text:span><text:span text:style-name="T1279">n</text:span><text:span text:style-name="T1280">t</text:span><text:span text:style-name="T1281">é</text:span><text:span text:style-name="T1282"><text:s/></text:span><text:span text:style-name="T1283">e</text:span><text:span text:style-name="T1284">t la</text:span><text:span text:style-name="T1285"><text:s/></text:span><text:span text:style-name="T1286">pr</text:span><text:span text:style-name="T1287">é</text:span><text:span text:style-name="T1288">v</text:span><text:span text:style-name="T1289">o</text:span><text:span text:style-name="T1290">y</text:span><text:span text:style-name="T1291">a</text:span><text:span text:style-name="T1292">n</text:span><text:span text:style-name="T1293">c</text:span><text:span text:style-name="T1294">e.</text:span></text:p>
      <text:p text:style-name="P1295"/>
      <text:p text:style-name="P1296"><text:span text:style-name="T1297">·</text:span><text:span text:style-name="T1298"><text:tab/></text:span><text:span text:style-name="T1299">C</text:span><text:span text:style-name="T1300">h</text:span><text:span text:style-name="T1301">i</text:span><text:span text:style-name="T1302">f</text:span><text:span text:style-name="T1303">f</text:span><text:span text:style-name="T1304">re</text:span><text:span text:style-name="T1305"><text:s/></text:span><text:span text:style-name="T1306">d'a</text:span><text:span text:style-name="T1307">f</text:span><text:span text:style-name="T1308">f</text:span><text:span text:style-name="T1309">a</text:span><text:span text:style-name="T1310">ire</text:span><text:span text:style-name="T1311">s</text:span><text:span text:style-name="T1312"><text:s/></text:span><text:span text:style-name="T1313">:</text:span><text:span text:style-name="T1314"><text:s/></text:span><text:span text:style-name="T1315">33</text:span><text:span text:style-name="T1316">,</text:span><text:span text:style-name="T1317">7</text:span><text:span text:style-name="T1318"><text:s/></text:span><text:span text:style-name="T1319">m</text:span><text:span text:style-name="T1320">i</text:span><text:span text:style-name="T1321">ll</text:span><text:span text:style-name="T1322">i</text:span><text:span text:style-name="T1323">a</text:span><text:span text:style-name="T1324">r</text:span><text:span text:style-name="T1325">ds</text:span><text:span text:style-name="T1326"><text:s/></text:span><text:span text:style-name="T1327">d</text:span><text:span text:style-name="T1328">'</text:span><text:span text:style-name="T1329">e</text:span><text:span text:style-name="T1330">u</text:span><text:span text:style-name="T1331">r</text:span><text:span text:style-name="T1332">os</text:span><text:span text:style-name="T1333"><text:s/></text:span><text:span text:style-name="T1334">d</text:span><text:span text:style-name="T1335">e</text:span><text:span text:style-name="T1336"><text:s/></text:span><text:span text:style-name="T1337">c</text:span><text:span text:style-name="T1338">o</text:span><text:span text:style-name="T1339">l</text:span><text:span text:style-name="T1340">l</text:span><text:span text:style-name="T1341">ec</text:span><text:span text:style-name="T1342">t</text:span><text:span text:style-name="T1343">e</text:span><text:span text:style-name="T1344"><text:s/>br</text:span><text:span text:style-name="T1345">u</text:span><text:span text:style-name="T1346">t</text:span><text:span text:style-name="T1347">e</text:span><text:span text:style-name="T1348"><text:s/></text:span><text:span text:style-name="T1349">e</text:span><text:span text:style-name="T1350">n 2023</text:span><text:span text:style-name="T1351">,</text:span><text:span text:style-name="T1352"><text:s/></text:span><text:span text:style-name="T1353">d</text:span><text:span text:style-name="T1354">o</text:span><text:span text:style-name="T1355">nt<text:s/></text:span><text:span text:style-name="T1356">1</text:span><text:span text:style-name="T1357">1</text:span><text:span text:style-name="T1358">,</text:span><text:span text:style-name="T1359">6<text:s/></text:span><text:span text:style-name="T1360">m</text:span><text:span text:style-name="T1361">i</text:span><text:span text:style-name="T1362">ll</text:span><text:span text:style-name="T1363">i</text:span><text:span text:style-name="T1364">a</text:span><text:span text:style-name="T1365">r</text:span><text:span text:style-name="T1366">ds</text:span><text:span text:style-name="T1367"><text:s/></text:span><text:span text:style-name="T1368">d</text:span><text:span text:style-name="T1369">'</text:span><text:span text:style-name="T1370">eu</text:span><text:span text:style-name="T1371">r</text:span><text:span text:style-name="T1372">os</text:span><text:span text:style-name="T1373"><text:s/></text:span><text:span text:style-name="T1374">d</text:span><text:span text:style-name="T1375">e</text:span><text:span text:style-name="T1376"><text:s/></text:span><text:span text:style-name="T1377">c</text:span><text:span text:style-name="T1378">o</text:span><text:span text:style-name="T1379">t</text:span><text:span text:style-name="T1380">i</text:span><text:span text:style-name="T1381">s</text:span><text:span text:style-name="T1382">at</text:span><text:span text:style-name="T1383">i</text:span><text:span text:style-name="T1384">o</text:span><text:span text:style-name="T1385">n</text:span><text:span text:style-name="T1386">s</text:span><text:span text:style-name="T1387"><text:s/></text:span><text:span text:style-name="T1388">a</text:span><text:span text:style-name="T1389">s</text:span><text:span text:style-name="T1390">s</text:span><text:span text:style-name="T1391">u</text:span><text:span text:style-name="T1392">ra</text:span><text:span text:style-name="T1393">n</text:span><text:span text:style-name="T1394">t</text:span><text:span text:style-name="T1395">i</text:span><text:span text:style-name="T1396">e</text:span><text:span text:style-name="T1397">l</text:span><text:span text:style-name="T1398">l</text:span><text:span text:style-name="T1399">e</text:span><text:span text:style-name="T1400">s.</text:span></text:p>
      <text:p text:style-name="P1401"/>
      <text:p text:style-name="P1402"><text:span text:style-name="T1403">·</text:span><text:span text:style-name="T1404"><text:tab/></text:span><text:span text:style-name="T1405">E</text:span><text:span text:style-name="T1406">f</text:span><text:span text:style-name="T1407">f</text:span><text:span text:style-name="T1408">e</text:span><text:span text:style-name="T1409">c</text:span><text:span text:style-name="T1410">t</text:span><text:span text:style-name="T1411">i</text:span><text:span text:style-name="T1412">f</text:span><text:span text:style-name="T1413"><text:s/></text:span><text:span text:style-name="T1414">:</text:span><text:span text:style-name="T1415"><text:s/></text:span><text:span text:style-name="T1416">E</text:span><text:span text:style-name="T1417">n</text:span><text:span text:style-name="T1418">v</text:span><text:span text:style-name="T1419">i</text:span><text:span text:style-name="T1420">r</text:span><text:span text:style-name="T1421">o</text:span><text:span text:style-name="T1422">n 15 000</text:span><text:span text:style-name="T1423"><text:s/></text:span><text:span text:style-name="T1424">c</text:span><text:span text:style-name="T1425">o</text:span><text:span text:style-name="T1426">ll</text:span><text:span text:style-name="T1427">a</text:span><text:span text:style-name="T1428">b</text:span><text:span text:style-name="T1429">o</text:span><text:span text:style-name="T1430">r</text:span><text:span text:style-name="T1431">at</text:span><text:span text:style-name="T1432">e</text:span><text:span text:style-name="T1433">u</text:span><text:span text:style-name="T1434">r</text:span><text:span text:style-name="T1435">s.</text:span></text:p>
      <text:p text:style-name="P1436"/>
      <text:p text:style-name="P1437"/>
      <text:p text:style-name="P1438"/>
      <text:p text:style-name="P1439"><text:span text:style-name="T1440">AG2</text:span><text:span text:style-name="T1441">R</text:span><text:span text:style-name="T1442"><text:s/></text:span><text:span text:style-name="T1443">L</text:span><text:span text:style-name="T1444">a</text:span><text:span text:style-name="T1445"><text:s/>M</text:span><text:span text:style-name="T1446">o</text:span><text:span text:style-name="T1447">n</text:span><text:span text:style-name="T1448">di</text:span><text:span text:style-name="T1449">a</text:span><text:span text:style-name="T1450">l</text:span><text:span text:style-name="T1451">e</text:span><text:span text:style-name="T1452"><text:s/></text:span><text:span text:style-name="T1453">e</text:span><text:span text:style-name="T1454">s</text:span><text:span text:style-name="T1455">t<text:s/></text:span><text:span text:style-name="T1456">u</text:span><text:span text:style-name="T1457">n</text:span><text:span text:style-name="T1458">e</text:span><text:span text:style-name="T1459"><text:s/></text:span><text:span text:style-name="T1460">e</text:span><text:span text:style-name="T1461">n</text:span><text:span text:style-name="T1462">t</text:span><text:span text:style-name="T1463">r</text:span><text:span text:style-name="T1464">e</text:span><text:span text:style-name="T1465">p</text:span><text:span text:style-name="T1466">r</text:span><text:span text:style-name="T1467">ise</text:span><text:span text:style-name="T1468"><text:s/></text:span><text:span text:style-name="T1469">fran</text:span><text:span text:style-name="T1470">ç</text:span><text:span text:style-name="T1471">a</text:span><text:span text:style-name="T1472">i</text:span><text:span text:style-name="T1473">s</text:span><text:span text:style-name="T1474">e</text:span><text:span text:style-name="T1475"><text:s/>m</text:span><text:span text:style-name="T1476">u</text:span><text:span text:style-name="T1477">lt</text:span><text:span text:style-name="T1478">i</text:span><text:span text:style-name="T1479">n</text:span><text:span text:style-name="T1480">a</text:span><text:span text:style-name="T1481">t</text:span><text:span text:style-name="T1482">i</text:span><text:span text:style-name="T1483">o</text:span><text:span text:style-name="T1484">na</text:span><text:span text:style-name="T1485">l</text:span><text:span text:style-name="T1486">e</text:span><text:span text:style-name="T1487"><text:s/></text:span><text:span text:style-name="T1488">d</text:span><text:span text:style-name="T1489">'a</text:span><text:span text:style-name="T1490">s</text:span><text:span text:style-name="T1491">s</text:span><text:span text:style-name="T1492">u</text:span><text:span text:style-name="T1493">ra</text:span><text:span text:style-name="T1494">n</text:span><text:span text:style-name="T1495">ce</text:span><text:span text:style-name="T1496"><text:s/></text:span><text:span text:style-name="T1497">d</text:span><text:span text:style-name="T1498">o</text:span><text:span text:style-name="T1499">nt l</text:span><text:span text:style-name="T1500">e</text:span><text:span text:style-name="T1501"><text:s/></text:span><text:span text:style-name="T1502">s</text:span><text:span text:style-name="T1503">i</text:span><text:span text:style-name="T1504">è</text:span><text:span text:style-name="T1505">g</text:span><text:span text:style-name="T1506">e</text:span><text:span text:style-name="T1507"><text:s/></text:span><text:span text:style-name="T1508">s</text:span><text:span text:style-name="T1509">oci</text:span><text:span text:style-name="T1510">al<text:s/></text:span><text:span text:style-name="T1511">e</text:span><text:span text:style-name="T1512">s</text:span><text:span text:style-name="T1513">t<text:s/></text:span><text:span text:style-name="T1514">à</text:span><text:span text:style-name="T1515"><text:s/>Par</text:span><text:span text:style-name="T1516">i</text:span><text:span text:style-name="T1517">s.</text:span><text:span text:style-name="T1518"><text:s/></text:span><text:span text:style-name="T1519">V</text:span><text:span text:style-name="T1520">oici</text:span><text:span text:style-name="T1521"><text:s/></text:span><text:span text:style-name="T1522">u</text:span><text:span text:style-name="T1523">n</text:span><text:span text:style-name="T1524"><text:s/></text:span><text:span text:style-name="T1525">a</text:span><text:span text:style-name="T1526">p</text:span><text:span text:style-name="T1527">e</text:span><text:span text:style-name="T1528">r</text:span><text:span text:style-name="T1529">ç</text:span><text:span text:style-name="T1530">u</text:span><text:span text:style-name="T1531"><text:s/></text:span><text:span text:style-name="T1532">de</text:span><text:span text:style-name="T1533"><text:s/></text:span><text:span text:style-name="T1534">l'</text:span><text:span text:style-name="T1535">e</text:span><text:span text:style-name="T1536">n</text:span><text:span text:style-name="T1537">t</text:span><text:span text:style-name="T1538">r</text:span><text:span text:style-name="T1539">e</text:span><text:span text:style-name="T1540">p</text:span><text:span text:style-name="T1541">r</text:span><text:span text:style-name="T1542">ise</text:span><text:span text:style-name="T1543"><text:s/></text:span><text:span text:style-name="T1544">:</text:span></text:p>
      <text:p text:style-name="P1545"/>
      <text:p text:style-name="P1546"><text:span text:style-name="T1547">A</text:span><text:span text:style-name="T1548">c</text:span><text:span text:style-name="T1549">t</text:span><text:span text:style-name="T1550">i</text:span><text:span text:style-name="T1551">v</text:span><text:span text:style-name="T1552">i</text:span><text:span text:style-name="T1553">t</text:span><text:span text:style-name="T1554">é</text:span><text:span text:style-name="T1555">s</text:span><text:span text:style-name="T1556"><text:s/></text:span><text:span text:style-name="T1557">pr</text:span><text:span text:style-name="T1558">i</text:span><text:span text:style-name="T1559">n</text:span><text:span text:style-name="T1560">c</text:span><text:span text:style-name="T1561">i</text:span><text:span text:style-name="T1562">p</text:span><text:span text:style-name="T1563">al</text:span><text:span text:style-name="T1564">e</text:span><text:span text:style-name="T1565">s</text:span><text:span text:style-name="T1566"><text:s/></text:span><text:span text:style-name="T1567">:</text:span></text:p>
      <text:p text:style-name="P1568"/>
      <text:p text:style-name="P1569"><text:span text:style-name="T1570">·</text:span><text:span text:style-name="T1571"><text:tab/></text:span><text:span text:style-name="T1572">A</text:span><text:span text:style-name="T1573">s</text:span><text:span text:style-name="T1574">s</text:span><text:span text:style-name="T1575">u</text:span><text:span text:style-name="T1576">r</text:span><text:span text:style-name="T1577">a</text:span><text:span text:style-name="T1578">n</text:span><text:span text:style-name="T1579">c</text:span><text:span text:style-name="T1580">e</text:span><text:span text:style-name="T1581"><text:s/></text:span><text:span text:style-name="T1582">:</text:span><text:span text:style-name="T1583"><text:s/>AG</text:span><text:span text:style-name="T1584">2</text:span><text:span text:style-name="T1585">R</text:span><text:span text:style-name="T1586"><text:s/></text:span><text:span text:style-name="T1587">L</text:span><text:span text:style-name="T1588">a<text:s/></text:span><text:span text:style-name="T1589">M</text:span><text:span text:style-name="T1590">o</text:span><text:span text:style-name="T1591">n</text:span><text:span text:style-name="T1592">di</text:span><text:span text:style-name="T1593">a</text:span><text:span text:style-name="T1594">l</text:span><text:span text:style-name="T1595">e</text:span><text:span text:style-name="T1596"><text:s/></text:span><text:span text:style-name="T1597">p</text:span><text:span text:style-name="T1598">r</text:span><text:span text:style-name="T1599">o</text:span><text:span text:style-name="T1600">p</text:span><text:span text:style-name="T1601">o</text:span><text:span text:style-name="T1602">se</text:span><text:span text:style-name="T1603"><text:s/></text:span><text:span text:style-name="T1604">u</text:span><text:span text:style-name="T1605">n</text:span><text:span text:style-name="T1606">e</text:span><text:span text:style-name="T1607"><text:s/></text:span><text:span text:style-name="T1608">g</text:span><text:span text:style-name="T1609">a</text:span><text:span text:style-name="T1610">m</text:span><text:span text:style-name="T1611">m</text:span><text:span text:style-name="T1612">e</text:span><text:span text:style-name="T1613"><text:s/></text:span><text:span text:style-name="T1614">c</text:span><text:span text:style-name="T1615">o</text:span><text:span text:style-name="T1616">m</text:span><text:span text:style-name="T1617">p</text:span><text:span text:style-name="T1618">l</text:span><text:span text:style-name="T1619">è</text:span><text:span text:style-name="T1620">t</text:span><text:span text:style-name="T1621">e</text:span><text:span text:style-name="T1622"><text:s/></text:span><text:span text:style-name="T1623">d</text:span><text:span text:style-name="T1624">e</text:span><text:span text:style-name="T1625"><text:s/>p</text:span><text:span text:style-name="T1626">r</text:span><text:span text:style-name="T1627">odu</text:span><text:span text:style-name="T1628">i</text:span><text:span text:style-name="T1629">t</text:span><text:span text:style-name="T1630">s</text:span><text:span text:style-name="T1631"><text:s/></text:span><text:span text:style-name="T1632">e</text:span><text:span text:style-name="T1633">t<text:s/></text:span><text:span text:style-name="T1634">s</text:span><text:span text:style-name="T1635">e</text:span><text:span text:style-name="T1636">rv</text:span><text:span text:style-name="T1637">i</text:span><text:span text:style-name="T1638">ce</text:span><text:span text:style-name="T1639">s</text:span><text:span text:style-name="T1640"><text:s/></text:span><text:span text:style-name="T1641">d</text:span><text:span text:style-name="T1642">'a</text:span><text:span text:style-name="T1643">s</text:span><text:span text:style-name="T1644">s</text:span><text:span text:style-name="T1645">u</text:span><text:span text:style-name="T1646">ran</text:span><text:span text:style-name="T1647">c</text:span><text:span text:style-name="T1648">e</text:span><text:span text:style-name="T1649"><text:s/>p</text:span><text:span text:style-name="T1650">o</text:span><text:span text:style-name="T1651">u</text:span><text:span text:style-name="T1652">r</text:span><text:span text:style-name="T1653"><text:s/></text:span><text:span text:style-name="T1654">l</text:span><text:span text:style-name="T1655">es</text:span><text:span text:style-name="T1656"><text:s/></text:span><text:span text:style-name="T1657">p</text:span><text:span text:style-name="T1658">a</text:span><text:span text:style-name="T1659">rt</text:span><text:span text:style-name="T1660">i</text:span><text:span text:style-name="T1661">cu</text:span><text:span text:style-name="T1662">l</text:span><text:span text:style-name="T1663">ie</text:span><text:span text:style-name="T1664">r</text:span><text:span text:style-name="T1665">s,</text:span><text:span text:style-name="T1666"><text:s/></text:span><text:span text:style-name="T1667">l</text:span><text:span text:style-name="T1668">es</text:span><text:span text:style-name="T1669"><text:s/>p</text:span><text:span text:style-name="T1670">r</text:span><text:span text:style-name="T1671">o</text:span><text:span text:style-name="T1672">f</text:span><text:span text:style-name="T1673">e</text:span><text:span text:style-name="T1674">ssi</text:span><text:span text:style-name="T1675">o</text:span><text:span text:style-name="T1676">n</text:span><text:span text:style-name="T1677">n</text:span><text:span text:style-name="T1678">e</text:span><text:span text:style-name="T1679">l</text:span><text:span text:style-name="T1680">s</text:span><text:span text:style-name="T1681"><text:s/></text:span><text:span text:style-name="T1682">e</text:span><text:span text:style-name="T1683">t</text:span><text:span text:style-name="T1684"><text:s/></text:span><text:span text:style-name="T1685">l</text:span><text:span text:style-name="T1686">e</text:span><text:span text:style-name="T1687">s</text:span><text:span text:style-name="T1688"><text:s/></text:span><text:span text:style-name="T1689">e</text:span><text:span text:style-name="T1690">n</text:span><text:span text:style-name="T1691">tr</text:span><text:span text:style-name="T1692">e</text:span><text:span text:style-name="T1693">p</text:span><text:span text:style-name="T1694">r</text:span><text:span text:style-name="T1695">i</text:span><text:span text:style-name="T1696">s</text:span><text:span text:style-name="T1697">es.</text:span><text:span text:style-name="T1698"><text:s/></text:span><text:span text:style-name="T1699">C</text:span><text:span text:style-name="T1700">e</text:span><text:span text:style-name="T1701">la<text:s/></text:span><text:span text:style-name="T1702">i</text:span><text:span text:style-name="T1703">n</text:span><text:span text:style-name="T1704">c</text:span><text:span text:style-name="T1705">l</text:span><text:span text:style-name="T1706">u</text:span><text:span text:style-name="T1707">t l'a</text:span><text:span text:style-name="T1708">ssu</text:span><text:span text:style-name="T1709">r</text:span><text:span text:style-name="T1710">a</text:span><text:span text:style-name="T1711">n</text:span><text:span text:style-name="T1712">c</text:span><text:span text:style-name="T1713">e</text:span><text:span text:style-name="T1714"><text:s/></text:span><text:span text:style-name="T1715">s</text:span><text:span text:style-name="T1716">ant</text:span><text:span text:style-name="T1717">é,</text:span><text:span text:style-name="T1718"><text:s/></text:span><text:span text:style-name="T1719">l'a</text:span><text:span text:style-name="T1720">ss</text:span><text:span text:style-name="T1721">u</text:span><text:span text:style-name="T1722">r</text:span><text:span text:style-name="T1723">an</text:span><text:span text:style-name="T1724">ce</text:span><text:span text:style-name="T1725"><text:s/></text:span><text:span text:style-name="T1726">p</text:span><text:span text:style-name="T1727">r</text:span><text:span text:style-name="T1728">é</text:span><text:span text:style-name="T1729">v</text:span><text:span text:style-name="T1730">o</text:span><text:span text:style-name="T1731">y</text:span><text:span text:style-name="T1732">a</text:span><text:span text:style-name="T1733">n</text:span><text:span text:style-name="T1734">ce</text:span><text:span text:style-name="T1735"><text:s/></text:span><text:span text:style-name="T1736">(dé</text:span><text:span text:style-name="T1737">c</text:span><text:span text:style-name="T1738">ès,</text:span><text:span text:style-name="T1739"><text:s/></text:span><text:span text:style-name="T1740">i</text:span><text:span text:style-name="T1741">nval</text:span><text:span text:style-name="T1742">id</text:span><text:span text:style-name="T1743">i</text:span><text:span text:style-name="T1744">t</text:span><text:span text:style-name="T1745">é,</text:span><text:span text:style-name="T1746"><text:s/></text:span><text:span text:style-name="T1747">d</text:span><text:span text:style-name="T1748">é</text:span><text:span text:style-name="T1749">p</text:span><text:span text:style-name="T1750">e</text:span><text:span text:style-name="T1751">n</text:span><text:span text:style-name="T1752">d</text:span><text:span text:style-name="T1753">a</text:span><text:span text:style-name="T1754">n</text:span><text:span text:style-name="T1755">c</text:span><text:span text:style-name="T1756">e),</text:span><text:span text:style-name="T1757"><text:s/>l</text:span><text:span text:style-name="T1758">'</text:span><text:span text:style-name="T1759">a</text:span><text:span text:style-name="T1760">s</text:span><text:span text:style-name="T1761">s</text:span><text:span text:style-name="T1762">u</text:span><text:span text:style-name="T1763">r</text:span><text:span text:style-name="T1764">an</text:span><text:span text:style-name="T1765">c</text:span><text:span text:style-name="T1766">e</text:span><text:span text:style-name="T1767"><text:s/>a</text:span><text:span text:style-name="T1768">c</text:span><text:span text:style-name="T1769">c</text:span><text:span text:style-name="T1770">id</text:span><text:span text:style-name="T1771">e</text:span><text:span text:style-name="T1772">n</text:span><text:span text:style-name="T1773">t</text:span><text:span text:style-name="T1774">s</text:span><text:span text:style-name="T1775"><text:s/></text:span><text:span text:style-name="T1776">de</text:span><text:span text:style-name="T1777"><text:s/></text:span><text:span text:style-name="T1778">la v</text:span><text:span text:style-name="T1779">i</text:span><text:span text:style-name="T1780">e,</text:span><text:span text:style-name="T1781"><text:s/></text:span><text:span text:style-name="T1782">e</text:span><text:span text:style-name="T1783">t</text:span><text:span text:style-name="T1784">c.</text:span></text:p>
      <text:p text:style-name="P1785"/>
      <text:p text:style-name="P1786"><text:span text:style-name="T1787">·</text:span><text:span text:style-name="T1788"><text:tab/></text:span><text:span text:style-name="T1789">Ser</text:span><text:span text:style-name="T1790">v</text:span><text:span text:style-name="T1791">i</text:span><text:span text:style-name="T1792">c</text:span><text:span text:style-name="T1793">e</text:span><text:span text:style-name="T1794">s</text:span><text:span text:style-name="T1795"><text:s/></text:span><text:span text:style-name="T1796">f</text:span><text:span text:style-name="T1797">in</text:span><text:span text:style-name="T1798">a</text:span><text:span text:style-name="T1799">n</text:span><text:span text:style-name="T1800">c</text:span><text:span text:style-name="T1801">i</text:span><text:span text:style-name="T1802">e</text:span><text:span text:style-name="T1803">r</text:span><text:span text:style-name="T1804">s</text:span><text:span text:style-name="T1805"><text:s/></text:span><text:span text:style-name="T1806">:</text:span><text:span text:style-name="T1807"><text:s/></text:span><text:span text:style-name="T1808">L</text:span><text:span text:style-name="T1809">'</text:span><text:span text:style-name="T1810">e</text:span><text:span text:style-name="T1811">n</text:span><text:span text:style-name="T1812">tr</text:span><text:span text:style-name="T1813">e</text:span><text:span text:style-name="T1814">pr</text:span><text:span text:style-name="T1815">is</text:span><text:span text:style-name="T1816">e</text:span><text:span text:style-name="T1817"><text:s/></text:span><text:span text:style-name="T1818">o</text:span><text:span text:style-name="T1819">ff</text:span><text:span text:style-name="T1820">r</text:span><text:span text:style-name="T1821">e</text:span><text:span text:style-name="T1822"><text:s/></text:span><text:span text:style-name="T1823">d</text:span><text:span text:style-name="T1824">es</text:span><text:span text:style-name="T1825"><text:s/></text:span><text:span text:style-name="T1826">s</text:span><text:span text:style-name="T1827">e</text:span><text:span text:style-name="T1828">r</text:span><text:span text:style-name="T1829">v</text:span><text:span text:style-name="T1830">ices</text:span><text:span text:style-name="T1831"><text:s/></text:span><text:span text:style-name="T1832">d</text:span><text:span text:style-name="T1833">'</text:span><text:span text:style-name="T1834">é</text:span><text:span text:style-name="T1835">p</text:span><text:span text:style-name="T1836">a</text:span><text:span text:style-name="T1837">rgn</text:span><text:span text:style-name="T1838">e</text:span><text:span text:style-name="T1839"><text:s/></text:span><text:span text:style-name="T1840">i</text:span><text:span text:style-name="T1841">n</text:span><text:span text:style-name="T1842">d</text:span><text:span text:style-name="T1843">i</text:span><text:span text:style-name="T1844">v</text:span><text:span text:style-name="T1845">id</text:span><text:span text:style-name="T1846">u</text:span><text:span text:style-name="T1847">e</text:span><text:span text:style-name="T1848">l</text:span><text:span text:style-name="T1849">l</text:span><text:span text:style-name="T1850">e</text:span><text:span text:style-name="T1851"><text:s/></text:span><text:span text:style-name="T1852">e</text:span><text:span text:style-name="T1853">t</text:span><text:span text:style-name="T1854"><text:s/></text:span><text:span text:style-name="T1855">c</text:span><text:span text:style-name="T1856">o</text:span><text:span text:style-name="T1857">ll</text:span><text:span text:style-name="T1858">e</text:span><text:span text:style-name="T1859">c</text:span><text:span text:style-name="T1860">t</text:span><text:span text:style-name="T1861">i</text:span><text:span text:style-name="T1862">v</text:span><text:span text:style-name="T1863">e,</text:span><text:span text:style-name="T1864"><text:s/></text:span><text:span text:style-name="T1865">de</text:span><text:span text:style-name="T1866"><text:s/></text:span><text:span text:style-name="T1867">r</text:span><text:span text:style-name="T1868">e</text:span><text:span text:style-name="T1869">t</text:span><text:span text:style-name="T1870">r</text:span><text:span text:style-name="T1871">a</text:span><text:span text:style-name="T1872">i</text:span><text:span text:style-name="T1873">t</text:span><text:span text:style-name="T1874">e</text:span><text:span text:style-name="T1875"><text:s/></text:span><text:span text:style-name="T1876">s</text:span><text:span text:style-name="T1877">u</text:span><text:span text:style-name="T1878">p</text:span><text:span text:style-name="T1879">p</text:span><text:span text:style-name="T1880">l</text:span><text:span text:style-name="T1881">é</text:span><text:span text:style-name="T1882">m</text:span><text:span text:style-name="T1883">e</text:span><text:span text:style-name="T1884">n</text:span><text:span text:style-name="T1885">ta</text:span><text:span text:style-name="T1886">i</text:span><text:span text:style-name="T1887">r</text:span><text:span text:style-name="T1888">e</text:span><text:span text:style-name="T1889"><text:s/></text:span><text:span text:style-name="T1890">e</text:span><text:span text:style-name="T1891">t<text:s/></text:span><text:span text:style-name="T1892">d</text:span><text:span text:style-name="T1893">e</text:span><text:span text:style-name="T1894"><text:s/></text:span><text:span text:style-name="T1895">g</text:span><text:span text:style-name="T1896">es</text:span><text:span text:style-name="T1897">t</text:span><text:span text:style-name="T1898">i</text:span><text:span text:style-name="T1899">o</text:span><text:span text:style-name="T1900">n<text:s/></text:span><text:span text:style-name="T1901">de</text:span><text:span text:style-name="T1902"><text:s/>p</text:span><text:span text:style-name="T1903">a</text:span><text:span text:style-name="T1904">tr</text:span><text:span text:style-name="T1905">i</text:span><text:span text:style-name="T1906">m</text:span><text:span text:style-name="T1907">o</text:span><text:span text:style-name="T1908">i</text:span><text:span text:style-name="T1909">n</text:span><text:span text:style-name="T1910">e</text:span><text:span text:style-name="T1911">.</text:span></text:p>
      <text:p text:style-name="P1912"/>
      <text:p text:style-name="P1913"><text:span text:style-name="T1914">·</text:span><text:span text:style-name="T1915"><text:tab/></text:span><text:span text:style-name="T1916">R</text:span><text:span text:style-name="T1917">etr</text:span><text:span text:style-name="T1918">a</text:span><text:span text:style-name="T1919">i</text:span><text:span text:style-name="T1920">te</text:span><text:span text:style-name="T1921"><text:s/></text:span><text:span text:style-name="T1922">c</text:span><text:span text:style-name="T1923">omp</text:span><text:span text:style-name="T1924">l</text:span><text:span text:style-name="T1925">éme</text:span><text:span text:style-name="T1926">n</text:span><text:span text:style-name="T1927">t</text:span><text:span text:style-name="T1928">a</text:span><text:span text:style-name="T1929">i</text:span><text:span text:style-name="T1930">r</text:span><text:span text:style-name="T1931">e</text:span><text:span text:style-name="T1932"><text:s/></text:span><text:span text:style-name="T1933">:</text:span><text:span text:style-name="T1934"><text:s/>AG2</text:span><text:span text:style-name="T1935">R</text:span><text:span text:style-name="T1936"><text:s/></text:span><text:span text:style-name="T1937">L</text:span><text:span text:style-name="T1938">a</text:span><text:span text:style-name="T1939"><text:s/></text:span><text:span text:style-name="T1940">M</text:span><text:span text:style-name="T1941">o</text:span><text:span text:style-name="T1942">n</text:span><text:span text:style-name="T1943">d</text:span><text:span text:style-name="T1944">i</text:span><text:span text:style-name="T1945">a</text:span><text:span text:style-name="T1946">l</text:span><text:span text:style-name="T1947">e</text:span><text:span text:style-name="T1948"><text:s/></text:span><text:span text:style-name="T1949">e</text:span><text:span text:style-name="T1950">s</text:span><text:span text:style-name="T1951">t</text:span><text:span text:style-name="T1952"><text:s/></text:span><text:span text:style-name="T1953">u</text:span><text:span text:style-name="T1954">n</text:span><text:span text:style-name="T1955"><text:s/></text:span><text:span text:style-name="T1956">a</text:span><text:span text:style-name="T1957">c</text:span><text:span text:style-name="T1958">t</text:span><text:span text:style-name="T1959">eu</text:span><text:span text:style-name="T1960">r m</text:span><text:span text:style-name="T1961">a</text:span><text:span text:style-name="T1962">j</text:span><text:span text:style-name="T1963">e</text:span><text:span text:style-name="T1964">u</text:span><text:span text:style-name="T1965">r</text:span><text:span text:style-name="T1966"><text:s/></text:span><text:span text:style-name="T1967">d</text:span><text:span text:style-name="T1968">e</text:span><text:span text:style-name="T1969"><text:s/>la r</text:span><text:span text:style-name="T1970">e</text:span><text:span text:style-name="T1971">t</text:span><text:span text:style-name="T1972">r</text:span><text:span text:style-name="T1973">a</text:span><text:span text:style-name="T1974">i</text:span><text:span text:style-name="T1975">t</text:span><text:span text:style-name="T1976">e</text:span><text:span text:style-name="T1977"><text:s/></text:span><text:span text:style-name="T1978">co</text:span><text:span text:style-name="T1979">mp</text:span><text:span text:style-name="T1980">l</text:span><text:span text:style-name="T1981">é</text:span><text:span text:style-name="T1982">m</text:span><text:span text:style-name="T1983">e</text:span><text:span text:style-name="T1984">n</text:span><text:span text:style-name="T1985">ta</text:span><text:span text:style-name="T1986">i</text:span><text:span text:style-name="T1987">r</text:span><text:span text:style-name="T1988">e</text:span><text:span text:style-name="T1989"><text:s/></text:span><text:span text:style-name="T1990">e</text:span><text:span text:style-name="T1991">n</text:span><text:span text:style-name="T1992"><text:s/></text:span><text:span text:style-name="T1993">F</text:span><text:span text:style-name="T1994">r</text:span><text:span text:style-name="T1995">an</text:span><text:span text:style-name="T1996">c</text:span><text:span text:style-name="T1997">e,</text:span><text:span text:style-name="T1998"><text:s/></text:span><text:span text:style-name="T1999">g</text:span><text:span text:style-name="T2000">é</text:span><text:span text:style-name="T2001">rant</text:span><text:span text:style-name="T2002"><text:s/></text:span><text:span text:style-name="T2003">u</text:span><text:span text:style-name="T2004">n</text:span><text:span text:style-name="T2005"><text:s/></text:span><text:span text:style-name="T2006">q</text:span><text:span text:style-name="T2007">u</text:span><text:span text:style-name="T2008">a</text:span><text:span text:style-name="T2009">rt<text:s/></text:span><text:span text:style-name="T2010">des</text:span><text:span text:style-name="T2011"><text:s/></text:span><text:span text:style-name="T2012">e</text:span><text:span text:style-name="T2013">m</text:span><text:span text:style-name="T2014">pl</text:span><text:span text:style-name="T2015">o</text:span><text:span text:style-name="T2016">y</text:span><text:span text:style-name="T2017">és</text:span><text:span text:style-name="T2018"><text:s/></text:span><text:span text:style-name="T2019">du</text:span><text:span text:style-name="T2020"><text:s/></text:span><text:span text:style-name="T2021">s</text:span><text:span text:style-name="T2022">ec</text:span><text:span text:style-name="T2023">t</text:span><text:span text:style-name="T2024">eu</text:span><text:span text:style-name="T2025">r<text:s/></text:span><text:span text:style-name="T2026">p</text:span><text:span text:style-name="T2027">r</text:span><text:span text:style-name="T2028">i</text:span><text:span text:style-name="T2029">v</text:span><text:span text:style-name="T2030">é.</text:span></text:p>
      <text:p text:style-name="P2031"/>
      <text:p text:style-name="P2032"><text:span text:style-name="T2033">·</text:span><text:span text:style-name="T2034"><text:tab/></text:span><text:span text:style-name="T2035">A</text:span><text:span text:style-name="T2036">c</text:span><text:span text:style-name="T2037">tion<text:s/></text:span><text:span text:style-name="T2038">s</text:span><text:span text:style-name="T2039">o</text:span><text:span text:style-name="T2040">c</text:span><text:span text:style-name="T2041">i</text:span><text:span text:style-name="T2042">al</text:span><text:span text:style-name="T2043">e</text:span><text:span text:style-name="T2044"><text:s/></text:span><text:span text:style-name="T2045">:</text:span><text:span text:style-name="T2046"><text:s/></text:span><text:span text:style-name="T2047">Le</text:span><text:span text:style-name="T2048"><text:s/></text:span><text:span text:style-name="T2049">g</text:span><text:span text:style-name="T2050">r</text:span><text:span text:style-name="T2051">o</text:span><text:span text:style-name="T2052">u</text:span><text:span text:style-name="T2053">p</text:span><text:span text:style-name="T2054">e</text:span><text:span text:style-name="T2055"><text:s/></text:span><text:span text:style-name="T2056">m</text:span><text:span text:style-name="T2057">è</text:span><text:span text:style-name="T2058">n</text:span><text:span text:style-name="T2059">e</text:span><text:span text:style-name="T2060"><text:s/></text:span><text:span text:style-name="T2061">d</text:span><text:span text:style-name="T2062">e</text:span><text:span text:style-name="T2063">s</text:span><text:span text:style-name="T2064"><text:s/></text:span><text:span text:style-name="T2065">a</text:span><text:span text:style-name="T2066">c</text:span><text:span text:style-name="T2067">t</text:span><text:span text:style-name="T2068">i</text:span><text:span text:style-name="T2069">o</text:span><text:span text:style-name="T2070">n</text:span><text:span text:style-name="T2071">s</text:span><text:span text:style-name="T2072"><text:s/></text:span><text:span text:style-name="T2073">s</text:span><text:span text:style-name="T2074">oci</text:span><text:span text:style-name="T2075">a</text:span><text:span text:style-name="T2076">l</text:span><text:span text:style-name="T2077">es</text:span><text:span text:style-name="T2078"><text:s/>p</text:span><text:span text:style-name="T2079">ou</text:span><text:span text:style-name="T2080">r</text:span><text:span text:style-name="T2081"><text:s/></text:span><text:span text:style-name="T2082">sou</text:span><text:span text:style-name="T2083">t</text:span><text:span text:style-name="T2084">e</text:span><text:span text:style-name="T2085">n</text:span><text:span text:style-name="T2086">i</text:span><text:span text:style-name="T2087">r</text:span><text:span text:style-name="T2088"><text:s/></text:span><text:span text:style-name="T2089">s</text:span><text:span text:style-name="T2090">e</text:span><text:span text:style-name="T2091">s</text:span><text:span text:style-name="T2092"><text:s/></text:span><text:span text:style-name="T2093">a</text:span><text:span text:style-name="T2094">s</text:span><text:span text:style-name="T2095">su</text:span><text:span text:style-name="T2096">r</text:span><text:span text:style-name="T2097">és,</text:span><text:span text:style-name="T2098"><text:s/>n</text:span><text:span text:style-name="T2099">o</text:span><text:span text:style-name="T2100">tam</text:span><text:span text:style-name="T2101">m</text:span><text:span text:style-name="T2102">e</text:span><text:span text:style-name="T2103">n</text:span><text:span text:style-name="T2104">t</text:span><text:span text:style-name="T2105"><text:s/></text:span><text:span text:style-name="T2106">d</text:span><text:span text:style-name="T2107">an</text:span><text:span text:style-name="T2108">s</text:span><text:span text:style-name="T2109"><text:s/></text:span><text:span text:style-name="T2110">l</text:span><text:span text:style-name="T2111">e</text:span><text:span text:style-name="T2112">s</text:span><text:span text:style-name="T2113"><text:s/></text:span><text:span text:style-name="T2114">s</text:span><text:span text:style-name="T2115">i</text:span><text:span text:style-name="T2116">t</text:span><text:span text:style-name="T2117">u</text:span><text:span text:style-name="T2118">a</text:span><text:span text:style-name="T2119">t</text:span><text:span text:style-name="T2120">io</text:span><text:span text:style-name="T2121">n</text:span><text:span text:style-name="T2122">s</text:span><text:span text:style-name="T2123"><text:s/></text:span><text:span text:style-name="T2124">d</text:span><text:span text:style-name="T2125">'</text:span><text:span text:style-name="T2126">e</text:span><text:span text:style-name="T2127">x</text:span><text:span text:style-name="T2128">c</text:span><text:span text:style-name="T2129">l</text:span><text:span text:style-name="T2130">us</text:span><text:span text:style-name="T2131">i</text:span><text:span text:style-name="T2132">o</text:span><text:span text:style-name="T2133">n</text:span><text:span text:style-name="T2134">,</text:span><text:span text:style-name="T2135"><text:s/></text:span><text:span text:style-name="T2136">e</text:span><text:span text:style-name="T2137">t</text:span><text:span text:style-name="T2138"><text:s/>f</text:span><text:span text:style-name="T2139">a</text:span><text:span text:style-name="T2140">v</text:span><text:span text:style-name="T2141">o</text:span><text:span text:style-name="T2142">r</text:span><text:span text:style-name="T2143">i</text:span><text:span text:style-name="T2144">s</text:span><text:span text:style-name="T2145">e</text:span><text:span text:style-name="T2146">r<text:s/></text:span><text:span text:style-name="T2147">l</text:span><text:span text:style-name="T2148">e</text:span><text:span text:style-name="T2149"><text:s/></text:span><text:span text:style-name="T2150">l</text:span><text:span text:style-name="T2151">i</text:span><text:span text:style-name="T2152">e</text:span><text:span text:style-name="T2153">n<text:s/></text:span><text:span text:style-name="T2154">s</text:span><text:span text:style-name="T2155">oci</text:span><text:span text:style-name="T2156">a</text:span><text:span text:style-name="T2157">l</text:span><text:span text:style-name="T2158">.</text:span></text:p>
      <text:p text:style-name="P2159"/>
      <text:list text:style-name="LFO18" text:continue-numbering="true">
        <text:list-item>
          <text:p text:style-name="P2160"><text:bookmark-start text:name="_Toc1973571164"/>Présentation du service<text:bookmark-end text:name="_Toc1973571164"/><text:s/></text:p>
        </text:list-item>
      </text:list>
      <text:p text:style-name="P2161"/>
      <text:p text:style-name="P2162"><text:span text:style-name="T2163">Le</text:span><text:span text:style-name="T2164"><text:s/></text:span><text:span text:style-name="T2165">s</text:span><text:span text:style-name="T2166">e</text:span><text:span text:style-name="T2167">rv</text:span><text:span text:style-name="T2168">i</text:span><text:span text:style-name="T2169">c</text:span><text:span text:style-name="T2170">e</text:span><text:span text:style-name="T2171"><text:s/>D</text:span><text:span text:style-name="T2172">S</text:span><text:span text:style-name="T2173">I</text:span><text:span text:style-name="T2174"><text:s/></text:span><text:span text:style-name="T2175">R</text:span><text:span text:style-name="T2176">C</text:span><text:span text:style-name="T2177"><text:s/></text:span><text:span text:style-name="T2178">(</text:span><text:span text:style-name="T2179">D</text:span><text:span text:style-name="T2180">i</text:span><text:span text:style-name="T2181">r</text:span><text:span text:style-name="T2182">e</text:span><text:span text:style-name="T2183">c</text:span><text:span text:style-name="T2184">t</text:span><text:span text:style-name="T2185">i</text:span><text:span text:style-name="T2186">o</text:span><text:span text:style-name="T2187">n<text:s/></text:span><text:span text:style-name="T2188">d</text:span><text:span text:style-name="T2189">es</text:span><text:span text:style-name="T2190"><text:s/></text:span><text:span text:style-name="T2191">S</text:span><text:span text:style-name="T2192">y</text:span><text:span text:style-name="T2193">s</text:span><text:span text:style-name="T2194">t</text:span><text:span text:style-name="T2195">è</text:span><text:span text:style-name="T2196">m</text:span><text:span text:style-name="T2197">es</text:span><text:span text:style-name="T2198"><text:s/></text:span><text:span text:style-name="T2199">d</text:span><text:span text:style-name="T2200">'In</text:span><text:span text:style-name="T2201">f</text:span><text:span text:style-name="T2202">o</text:span><text:span text:style-name="T2203">r</text:span><text:span text:style-name="T2204">m</text:span><text:span text:style-name="T2205">at</text:span><text:span text:style-name="T2206">io</text:span><text:span text:style-name="T2207">n</text:span><text:span text:style-name="T2208"><text:s/></text:span><text:span text:style-name="T2209">R</text:span><text:span text:style-name="T2210">e</text:span><text:span text:style-name="T2211">tr</text:span><text:span text:style-name="T2212">a</text:span><text:span text:style-name="T2213">i</text:span><text:span text:style-name="T2214">t</text:span><text:span text:style-name="T2215">e</text:span><text:span text:style-name="T2216"><text:s/></text:span><text:span text:style-name="T2217">C</text:span><text:span text:style-name="T2218">o</text:span><text:span text:style-name="T2219">mp</text:span><text:span text:style-name="T2220">l</text:span><text:span text:style-name="T2221">é</text:span><text:span text:style-name="T2222">m</text:span><text:span text:style-name="T2223">e</text:span><text:span text:style-name="T2224">nta</text:span><text:span text:style-name="T2225">i</text:span><text:span text:style-name="T2226">r</text:span><text:span text:style-name="T2227">e</text:span><text:span text:style-name="T2228">)</text:span><text:span text:style-name="T2229">, est responsable</text:span><text:span text:style-name="T2230"><text:s/></text:span><text:span text:style-name="T2231">de</text:span><text:span text:style-name="T2232"><text:s/></text:span><text:span text:style-name="T2233">l</text:span><text:span text:style-name="T2234">'</text:span><text:span text:style-name="T2235">e</text:span><text:span text:style-name="T2236">n</text:span><text:span text:style-name="T2237">s</text:span><text:span text:style-name="T2238">e</text:span><text:span text:style-name="T2239">m</text:span><text:span text:style-name="T2240">b</text:span><text:span text:style-name="T2241">l</text:span><text:span text:style-name="T2242">e</text:span><text:span text:style-name="T2243"><text:s/></text:span><text:span text:style-name="T2244">de</text:span><text:span text:style-name="T2245">s</text:span><text:span text:style-name="T2246"><text:s/></text:span><text:span text:style-name="T2247">s</text:span><text:span text:style-name="T2248">y</text:span><text:span text:style-name="T2249">s</text:span><text:span text:style-name="T2250">t</text:span><text:span text:style-name="T2251">è</text:span><text:span text:style-name="T2252">m</text:span><text:span text:style-name="T2253">es</text:span><text:span text:style-name="T2254"><text:s/></text:span><text:span text:style-name="T2255">i</text:span><text:span text:style-name="T2256">nf</text:span><text:span text:style-name="T2257">o</text:span><text:span text:style-name="T2258">r</text:span><text:span text:style-name="T2259">mat</text:span><text:span text:style-name="T2260">i</text:span><text:span text:style-name="T2261">q</text:span><text:span text:style-name="T2262">ue</text:span><text:span text:style-name="T2263">s.</text:span><text:span text:style-name="T2264"><text:s/></text:span><text:span text:style-name="T2265">A</text:span><text:span text:style-name="T2266">u</text:span><text:span text:style-name="T2267"><text:s/></text:span><text:span text:style-name="T2268">se</text:span><text:span text:style-name="T2269">i</text:span><text:span text:style-name="T2270">n<text:s/></text:span><text:span text:style-name="T2271">d</text:span><text:span text:style-name="T2272">e</text:span><text:span text:style-name="T2273"><text:s/>l’</text:span><text:span text:style-name="T2274">e</text:span><text:span text:style-name="T2275">n</text:span><text:span text:style-name="T2276">t</text:span><text:span text:style-name="T2277">r</text:span><text:span text:style-name="T2278">e</text:span><text:span text:style-name="T2279">pr</text:span><text:span text:style-name="T2280">i</text:span><text:span text:style-name="T2281">s</text:span><text:span text:style-name="T2282">e.</text:span><text:span text:style-name="T2283"><text:s/></text:span><text:span text:style-name="T2284">L</text:span><text:span text:style-name="T2285">’a</text:span><text:span text:style-name="T2286">jou</text:span><text:span text:style-name="T2287">t</text:span><text:span text:style-name="T2288"><text:s/></text:span><text:span text:style-name="T2289">de</text:span><text:span text:style-name="T2290"><text:s/></text:span><text:span text:style-name="T2291">« </text:span><text:span text:style-name="T2292">R</text:span><text:span text:style-name="T2293">C</text:span><text:span text:style-name="T2294"> »,</text:span><text:span text:style-name="T2295"><text:s/></text:span><text:span text:style-name="T2296">s</text:span><text:span text:style-name="T2297">p</text:span><text:span text:style-name="T2298">éci</text:span><text:span text:style-name="T2299">f</text:span><text:span text:style-name="T2300">ie</text:span><text:span text:style-name="T2301"><text:s/></text:span><text:span text:style-name="T2302">que</text:span><text:span text:style-name="T2303"><text:s/></text:span><text:span text:style-name="T2304">ce</text:span><text:span text:style-name="T2305">t</text:span><text:span text:style-name="T2306">t</text:span><text:span text:style-name="T2307">e</text:span><text:span text:style-name="T2308"><text:s/></text:span><text:span text:style-name="T2309">D</text:span><text:span text:style-name="T2310">S</text:span><text:span text:style-name="T2311">I</text:span><text:span text:style-name="T2312"><text:s/></text:span><text:span text:style-name="T2313">e</text:span><text:span text:style-name="T2314">s</text:span><text:span text:style-name="T2315">t<text:s/></text:span><text:span text:style-name="T2316">s</text:span><text:span text:style-name="T2317">p</text:span><text:span text:style-name="T2318">éci</text:span><text:span text:style-name="T2319">f</text:span><text:span text:style-name="T2320">i</text:span><text:span text:style-name="T2321">q</text:span><text:span text:style-name="T2322">ue</text:span><text:span text:style-name="T2323">m</text:span><text:span text:style-name="T2324">e</text:span><text:span text:style-name="T2325">n</text:span><text:span text:style-name="T2326">t<text:s/></text:span><text:span text:style-name="T2327">d</text:span><text:span text:style-name="T2328">é</text:span><text:span text:style-name="T2329">d</text:span><text:span text:style-name="T2330">i</text:span><text:span text:style-name="T2331">ée</text:span><text:span text:style-name="T2332"><text:s/></text:span><text:span text:style-name="T2333">a</text:span><text:span text:style-name="T2334">u</text:span><text:span text:style-name="T2335">x</text:span><text:span text:style-name="T2336"><text:s/></text:span><text:span text:style-name="T2337">s</text:span><text:span text:style-name="T2338">y</text:span><text:span text:style-name="T2339">s</text:span><text:span text:style-name="T2340">t</text:span><text:span text:style-name="T2341">è</text:span><text:span text:style-name="T2342">m</text:span><text:span text:style-name="T2343">es</text:span><text:span text:style-name="T2344"><text:s/></text:span><text:span text:style-name="T2345">d</text:span><text:span text:style-name="T2346">'</text:span><text:span text:style-name="T2347">i</text:span><text:span text:style-name="T2348">n</text:span><text:span text:style-name="T2349">f</text:span><text:span text:style-name="T2350">o</text:span><text:span text:style-name="T2351">rmat</text:span><text:span text:style-name="T2352">i</text:span><text:span text:style-name="T2353">o</text:span><text:span text:style-name="T2354">n l</text:span><text:span text:style-name="T2355">i</text:span><text:span text:style-name="T2356">és</text:span><text:span text:style-name="T2357"><text:s/></text:span><text:span text:style-name="T2358">à</text:span><text:span text:style-name="T2359"><text:s/></text:span><text:span text:style-name="T2360">l</text:span><text:span text:style-name="T2361">a</text:span><text:span text:style-name="T2362"><text:s/></text:span><text:span text:style-name="T2363">Re</text:span><text:span text:style-name="T2364">tra</text:span><text:span text:style-name="T2365">i</text:span><text:span text:style-name="T2366">t</text:span><text:span text:style-name="T2367">e</text:span><text:span text:style-name="T2368"><text:s/>C</text:span><text:span text:style-name="T2369">o</text:span><text:span text:style-name="T2370">mp</text:span><text:span text:style-name="T2371">l</text:span><text:span text:style-name="T2372">é</text:span><text:span text:style-name="T2373">m</text:span><text:span text:style-name="T2374">e</text:span><text:span text:style-name="T2375">nta</text:span><text:span text:style-name="T2376">i</text:span><text:span text:style-name="T2377">r</text:span><text:span text:style-name="T2378">e.</text:span></text:p>
      <text:p text:style-name="P2379">Depuis, la DSI RC s’est engagée a aidé<text:s/>à<text:s/>l’implémentation de l’intelligence artificielle ALMIA<text:s/>au sein de toute l’équipe de la retraite complémentaire.<text:s/></text:p>
      <text:p text:style-name="P2380"/>
      <text:p text:style-name="P2381"/>
      <text:p text:style-name="P2382"><text:span text:style-name="T2383">R</text:span><text:span text:style-name="T2384">ô</text:span><text:span text:style-name="T2385">l</text:span><text:span text:style-name="T2386">e</text:span><text:span text:style-name="T2387">s</text:span><text:span text:style-name="T2388"><text:s/></text:span><text:span text:style-name="T2389">et</text:span><text:span text:style-name="T2390"><text:s/></text:span><text:span text:style-name="T2391">re</text:span><text:span text:style-name="T2392">s</text:span><text:span text:style-name="T2393">p</text:span><text:span text:style-name="T2394">on</text:span><text:span text:style-name="T2395">s</text:span><text:span text:style-name="T2396">a</text:span><text:span text:style-name="T2397">bi</text:span><text:span text:style-name="T2398">l</text:span><text:span text:style-name="T2399">ité</text:span><text:span text:style-name="T2400">s</text:span><text:span text:style-name="T2401"><text:s/></text:span><text:span text:style-name="T2402">d</text:span><text:span text:style-name="T2403">e<text:s/></text:span><text:span text:style-name="T2404">la</text:span><text:span text:style-name="T2405"><text:s/></text:span><text:span text:style-name="T2406">DS</text:span><text:span text:style-name="T2407">I</text:span><text:span text:style-name="T2408"><text:s/></text:span><text:span text:style-name="T2409">R</text:span><text:span text:style-name="T2410">etr</text:span><text:span text:style-name="T2411">a</text:span><text:span text:style-name="T2412">ite</text:span><text:span text:style-name="T2413"><text:s/></text:span><text:span text:style-name="T2414">C</text:span><text:span text:style-name="T2415">o</text:span><text:span text:style-name="T2416">mp</text:span><text:span text:style-name="T2417">l</text:span><text:span text:style-name="T2418">é</text:span><text:span text:style-name="T2419">ment</text:span><text:span text:style-name="T2420">a</text:span><text:span text:style-name="T2421">ire</text:span><text:span text:style-name="T2422"><text:s/></text:span><text:span text:style-name="T2423">:</text:span></text:p>
      <text:p text:style-name="P2424"/>
      <text:p text:style-name="P2425"/>
      <text:p text:style-name="P2426"><text:span text:style-name="T2427">-</text:span><text:span text:style-name="T2428"><text:tab/>D</text:span><text:span text:style-name="T2429">é</text:span><text:span text:style-name="T2430">v</text:span><text:span text:style-name="T2431">e</text:span><text:span text:style-name="T2432">l</text:span><text:span text:style-name="T2433">o</text:span><text:span text:style-name="T2434">p</text:span><text:span text:style-name="T2435">p</text:span><text:span text:style-name="T2436">e</text:span><text:span text:style-name="T2437">m</text:span><text:span text:style-name="T2438">e</text:span><text:span text:style-name="T2439">n</text:span><text:span text:style-name="T2440">t<text:s/></text:span><text:span text:style-name="T2441">e</text:span><text:span text:style-name="T2442">t<text:s/></text:span><text:span text:style-name="T2443">m</text:span><text:span text:style-name="T2444">a</text:span><text:span text:style-name="T2445">i</text:span><text:span text:style-name="T2446">nt</text:span><text:span text:style-name="T2447">e</text:span><text:span text:style-name="T2448">n</text:span><text:span text:style-name="T2449">a</text:span><text:span text:style-name="T2450">n</text:span><text:span text:style-name="T2451">c</text:span><text:span text:style-name="T2452">e</text:span><text:span text:style-name="T2453"><text:s/></text:span><text:span text:style-name="T2454">de</text:span><text:span text:style-name="T2455">s</text:span><text:span text:style-name="T2456"><text:s/></text:span><text:span text:style-name="T2457">a</text:span><text:span text:style-name="T2458">ppl</text:span><text:span text:style-name="T2459">ic</text:span><text:span text:style-name="T2460">at</text:span><text:span text:style-name="T2461">i</text:span><text:span text:style-name="T2462">o</text:span><text:span text:style-name="T2463">n</text:span><text:span text:style-name="T2464">s</text:span><text:span text:style-name="T2465"><text:s/></text:span><text:span text:style-name="T2466">:</text:span><text:span text:style-name="T2467"><text:s/></text:span><text:span text:style-name="T2468">C</text:span><text:span text:style-name="T2469">o</text:span><text:span text:style-name="T2470">n</text:span><text:span text:style-name="T2471">c</text:span><text:span text:style-name="T2472">e</text:span><text:span text:style-name="T2473">v</text:span><text:span text:style-name="T2474">o</text:span><text:span text:style-name="T2475">i</text:span><text:span text:style-name="T2476">r</text:span><text:span text:style-name="T2477">,</text:span><text:span text:style-name="T2478"><text:s/></text:span><text:span text:style-name="T2479">d</text:span><text:span text:style-name="T2480">é</text:span><text:span text:style-name="T2481">v</text:span><text:span text:style-name="T2482">e</text:span><text:span text:style-name="T2483">l</text:span><text:span text:style-name="T2484">o</text:span><text:span text:style-name="T2485">pp</text:span><text:span text:style-name="T2486">e</text:span><text:span text:style-name="T2487">r</text:span><text:span text:style-name="T2488">,</text:span><text:span text:style-name="T2489"><text:s/></text:span><text:span text:style-name="T2490">t</text:span><text:span text:style-name="T2491">e</text:span><text:span text:style-name="T2492">s</text:span><text:span text:style-name="T2493">t</text:span><text:span text:style-name="T2494">e</text:span><text:span text:style-name="T2495">r<text:s/></text:span><text:span text:style-name="T2496">e</text:span><text:span text:style-name="T2497">t<text:s/></text:span><text:span text:style-name="T2498">m</text:span><text:span text:style-name="T2499">a</text:span><text:span text:style-name="T2500">i</text:span><text:span text:style-name="T2501">n</text:span><text:span text:style-name="T2502">t</text:span><text:span text:style-name="T2503">e</text:span><text:span text:style-name="T2504">n</text:span><text:span text:style-name="T2505">i</text:span><text:span text:style-name="T2506">r<text:s/></text:span><text:span text:style-name="T2507">l</text:span><text:span text:style-name="T2508">e</text:span><text:span text:style-name="T2509">s</text:span><text:span text:style-name="T2510"><text:s/></text:span><text:span text:style-name="T2511">a</text:span><text:span text:style-name="T2512">p</text:span><text:span text:style-name="T2513">p</text:span><text:span text:style-name="T2514">l</text:span><text:span text:style-name="T2515">i</text:span><text:span text:style-name="T2516">c</text:span><text:span text:style-name="T2517">at</text:span><text:span text:style-name="T2518">i</text:span><text:span text:style-name="T2519">o</text:span><text:span text:style-name="T2520">n</text:span><text:span text:style-name="T2521">s</text:span><text:span text:style-name="T2522"><text:s/></text:span><text:span text:style-name="T2523">u</text:span><text:span text:style-name="T2524">t</text:span><text:span text:style-name="T2525">i</text:span><text:span text:style-name="T2526">l</text:span><text:span text:style-name="T2527">is</text:span><text:span text:style-name="T2528">ées</text:span><text:span text:style-name="T2529"><text:s/></text:span><text:span text:style-name="T2530">p</text:span><text:span text:style-name="T2531">ou</text:span><text:span text:style-name="T2532">r</text:span><text:span text:style-name="T2533"><text:s/></text:span><text:span text:style-name="T2534">g</text:span><text:span text:style-name="T2535">é</text:span><text:span text:style-name="T2536">r</text:span><text:span text:style-name="T2537">e</text:span><text:span text:style-name="T2538">r l</text:span><text:span text:style-name="T2539">e</text:span><text:span text:style-name="T2540">s</text:span><text:span text:style-name="T2541"><text:s/></text:span><text:span text:style-name="T2542">c</text:span><text:span text:style-name="T2543">o</text:span><text:span text:style-name="T2544">t</text:span><text:span text:style-name="T2545">i</text:span><text:span text:style-name="T2546">s</text:span><text:span text:style-name="T2547">at</text:span><text:span text:style-name="T2548">i</text:span><text:span text:style-name="T2549">o</text:span><text:span text:style-name="T2550">n</text:span><text:span text:style-name="T2551">s,</text:span><text:span text:style-name="T2552"><text:s/></text:span><text:span text:style-name="T2553">l</text:span><text:span text:style-name="T2554">e</text:span><text:span text:style-name="T2555">s</text:span><text:span text:style-name="T2556"><text:s/></text:span><text:span text:style-name="T2557">d</text:span><text:span text:style-name="T2558">r</text:span><text:span text:style-name="T2559">oi</text:span><text:span text:style-name="T2560">t</text:span><text:span text:style-name="T2561">s,</text:span><text:span text:style-name="T2562"><text:s/></text:span><text:span text:style-name="T2563">l</text:span><text:span text:style-name="T2564">es</text:span><text:span text:style-name="T2565"><text:s/></text:span><text:span text:style-name="T2566">pa</text:span><text:span text:style-name="T2567">i</text:span><text:span text:style-name="T2568">e</text:span><text:span text:style-name="T2569">m</text:span><text:span text:style-name="T2570">e</text:span><text:span text:style-name="T2571">nt</text:span><text:span text:style-name="T2572">s</text:span><text:span text:style-name="T2573">,</text:span><text:span text:style-name="T2574"><text:s/></text:span><text:span text:style-name="T2575">e</text:span><text:span text:style-name="T2576">t</text:span><text:span text:style-name="T2577">c.</text:span></text:p>
      <text:p text:style-name="P2578"/>
      <text:p text:style-name="P2579"><text:span text:style-name="T2580">-</text:span><text:span text:style-name="T2581"><text:tab/>G</text:span><text:span text:style-name="T2582">es</text:span><text:span text:style-name="T2583">t</text:span><text:span text:style-name="T2584">i</text:span><text:span text:style-name="T2585">o</text:span><text:span text:style-name="T2586">n<text:s/></text:span><text:span text:style-name="T2587">d</text:span><text:span text:style-name="T2588">e</text:span><text:span text:style-name="T2589">s</text:span><text:span text:style-name="T2590"><text:s/></text:span><text:span text:style-name="T2591">i</text:span><text:span text:style-name="T2592">nfra</text:span><text:span text:style-name="T2593">s</text:span><text:span text:style-name="T2594">tr</text:span><text:span text:style-name="T2595">uc</text:span><text:span text:style-name="T2596">t</text:span><text:span text:style-name="T2597">u</text:span><text:span text:style-name="T2598">r</text:span><text:span text:style-name="T2599">es</text:span><text:span text:style-name="T2600"><text:s/></text:span><text:span text:style-name="T2601">:</text:span><text:span text:style-name="T2602"><text:s/></text:span><text:span text:style-name="T2603">G</text:span><text:span text:style-name="T2604">é</text:span><text:span text:style-name="T2605">r</text:span><text:span text:style-name="T2606">e</text:span><text:span text:style-name="T2607">r<text:s/></text:span><text:span text:style-name="T2608">l</text:span><text:span text:style-name="T2609">e</text:span><text:span text:style-name="T2610">s</text:span><text:span text:style-name="T2611"><text:s/></text:span><text:span text:style-name="T2612">s</text:span><text:span text:style-name="T2613">e</text:span><text:span text:style-name="T2614">rv</text:span><text:span text:style-name="T2615">eu</text:span><text:span text:style-name="T2616">r</text:span><text:span text:style-name="T2617">s,</text:span><text:span text:style-name="T2618"><text:s/></text:span><text:span text:style-name="T2619">l</text:span><text:span text:style-name="T2620">es</text:span><text:span text:style-name="T2621"><text:s/></text:span><text:span text:style-name="T2622">r</text:span><text:span text:style-name="T2623">é</text:span><text:span text:style-name="T2624">s</text:span><text:span text:style-name="T2625">e</text:span><text:span text:style-name="T2626">a</text:span><text:span text:style-name="T2627">u</text:span><text:span text:style-name="T2628">x</text:span><text:span text:style-name="T2629">,</text:span><text:span text:style-name="T2630"><text:s/></text:span><text:span text:style-name="T2631">l</text:span><text:span text:style-name="T2632">es</text:span><text:span text:style-name="T2633"><text:s/></text:span><text:span text:style-name="T2634">b</text:span><text:span text:style-name="T2635">a</text:span><text:span text:style-name="T2636">ses</text:span><text:span text:style-name="T2637"><text:s/></text:span><text:span text:style-name="T2638">d</text:span><text:span text:style-name="T2639">e</text:span><text:span text:style-name="T2640"><text:s/></text:span><text:span text:style-name="T2641">d</text:span><text:span text:style-name="T2642">o</text:span><text:span text:style-name="T2643">n</text:span><text:span text:style-name="T2644">n</text:span><text:span text:style-name="T2645">é</text:span><text:span text:style-name="T2646">es</text:span><text:span text:style-name="T2647"><text:s/></text:span><text:span text:style-name="T2648">e</text:span><text:span text:style-name="T2649">t</text:span><text:span text:style-name="T2650"><text:s/>a</text:span><text:span text:style-name="T2651">u</text:span><text:span text:style-name="T2652">tr</text:span><text:span text:style-name="T2653">es</text:span><text:span text:style-name="T2654"><text:s/></text:span><text:span text:style-name="T2655">i</text:span><text:span text:style-name="T2656">n</text:span><text:span text:style-name="T2657">f</text:span><text:span text:style-name="T2658">ra</text:span><text:span text:style-name="T2659">s</text:span><text:span text:style-name="T2660">tr</text:span><text:span text:style-name="T2661">u</text:span><text:span text:style-name="T2662">c</text:span><text:span text:style-name="T2663">t</text:span><text:span text:style-name="T2664">u</text:span><text:span text:style-name="T2665">r</text:span><text:span text:style-name="T2666">es</text:span><text:span text:style-name="T2667"><text:s/></text:span><text:span text:style-name="T2668">n</text:span><text:span text:style-name="T2669">éce</text:span><text:span text:style-name="T2670">ss</text:span><text:span text:style-name="T2671">a</text:span><text:span text:style-name="T2672">i</text:span><text:span text:style-name="T2673">r</text:span><text:span text:style-name="T2674">es</text:span><text:span text:style-name="T2675"><text:s/></text:span><text:span text:style-name="T2676">a</text:span><text:span text:style-name="T2677">u</text:span><text:span text:style-name="T2678"><text:s/></text:span><text:span text:style-name="T2679">f</text:span><text:span text:style-name="T2680">o</text:span><text:span text:style-name="T2681">n</text:span><text:span text:style-name="T2682">c</text:span><text:span text:style-name="T2683">t</text:span><text:span text:style-name="T2684">i</text:span><text:span text:style-name="T2685">o</text:span><text:span text:style-name="T2686">n</text:span><text:span text:style-name="T2687">n</text:span><text:span text:style-name="T2688">e</text:span><text:span text:style-name="T2689">m</text:span><text:span text:style-name="T2690">e</text:span><text:span text:style-name="T2691">n</text:span><text:span text:style-name="T2692">t<text:s/></text:span><text:span text:style-name="T2693">d</text:span><text:span text:style-name="T2694">e</text:span><text:span text:style-name="T2695">s</text:span><text:span text:style-name="T2696"><text:s/></text:span><text:span text:style-name="T2697">s</text:span><text:span text:style-name="T2698">y</text:span><text:span text:style-name="T2699">s</text:span><text:span text:style-name="T2700">t</text:span><text:span text:style-name="T2701">è</text:span><text:span text:style-name="T2702">m</text:span><text:span text:style-name="T2703">es.</text:span></text:p>
      <text:p text:style-name="P2704"/>
      <text:p text:style-name="P2705"><text:span text:style-name="T2706">-</text:span><text:span text:style-name="T2707"><text:tab/></text:span><text:span text:style-name="T2708">Séc</text:span><text:span text:style-name="T2709">u</text:span><text:span text:style-name="T2710">r</text:span><text:span text:style-name="T2711">i</text:span><text:span text:style-name="T2712">t</text:span><text:span text:style-name="T2713">é</text:span><text:span text:style-name="T2714"><text:s/></text:span><text:span text:style-name="T2715">i</text:span><text:span text:style-name="T2716">n</text:span><text:span text:style-name="T2717">f</text:span><text:span text:style-name="T2718">o</text:span><text:span text:style-name="T2719">r</text:span><text:span text:style-name="T2720">m</text:span><text:span text:style-name="T2721">a</text:span><text:span text:style-name="T2722">t</text:span><text:span text:style-name="T2723">iq</text:span><text:span text:style-name="T2724">u</text:span><text:span text:style-name="T2725">e</text:span><text:span text:style-name="T2726"><text:s/></text:span><text:span text:style-name="T2727">:</text:span><text:span text:style-name="T2728"><text:s/></text:span><text:span text:style-name="T2729">A</text:span><text:span text:style-name="T2730">s</text:span><text:span text:style-name="T2731">s</text:span><text:span text:style-name="T2732">u</text:span><text:span text:style-name="T2733">r</text:span><text:span text:style-name="T2734">e</text:span><text:span text:style-name="T2735">r</text:span><text:span text:style-name="T2736"><text:s/>la<text:s/></text:span><text:span text:style-name="T2737">s</text:span><text:span text:style-name="T2738">é</text:span><text:span text:style-name="T2739">cu</text:span><text:span text:style-name="T2740">r</text:span><text:span text:style-name="T2741">i</text:span><text:span text:style-name="T2742">t</text:span><text:span text:style-name="T2743">é</text:span><text:span text:style-name="T2744"><text:s/></text:span><text:span text:style-name="T2745">d</text:span><text:span text:style-name="T2746">es</text:span><text:span text:style-name="T2747"><text:s/></text:span><text:span text:style-name="T2748">s</text:span><text:span text:style-name="T2749">y</text:span><text:span text:style-name="T2750">s</text:span><text:span text:style-name="T2751">t</text:span><text:span text:style-name="T2752">è</text:span><text:span text:style-name="T2753">m</text:span><text:span text:style-name="T2754">es</text:span><text:span text:style-name="T2755"><text:s/></text:span><text:span text:style-name="T2756">e</text:span><text:span text:style-name="T2757">t<text:s/></text:span><text:span text:style-name="T2758">d</text:span><text:span text:style-name="T2759">es</text:span><text:span text:style-name="T2760"><text:s/></text:span><text:span text:style-name="T2761">d</text:span><text:span text:style-name="T2762">o</text:span><text:span text:style-name="T2763">nn</text:span><text:span text:style-name="T2764">ées</text:span><text:span text:style-name="T2765"><text:s/></text:span><text:span text:style-name="T2766">c</text:span><text:span text:style-name="T2767">o</text:span><text:span text:style-name="T2768">n</text:span><text:span text:style-name="T2769">tr</text:span><text:span text:style-name="T2770">e</text:span><text:span text:style-name="T2771"><text:s/></text:span><text:span text:style-name="T2772">l</text:span><text:span text:style-name="T2773">es</text:span><text:span text:style-name="T2774"><text:s/>m</text:span><text:span text:style-name="T2775">e</text:span><text:span text:style-name="T2776">na</text:span><text:span text:style-name="T2777">c</text:span><text:span text:style-name="T2778">es</text:span><text:span text:style-name="T2779"><text:s/></text:span><text:span text:style-name="T2780">i</text:span><text:span text:style-name="T2781">n</text:span><text:span text:style-name="T2782">t</text:span><text:span text:style-name="T2783">e</text:span><text:span text:style-name="T2784">r</text:span><text:span text:style-name="T2785">n</text:span><text:span text:style-name="T2786">es</text:span><text:span text:style-name="T2787"><text:s/></text:span><text:span text:style-name="T2788">e</text:span><text:span text:style-name="T2789">t</text:span><text:span text:style-name="T2790"><text:s/></text:span><text:span text:style-name="T2791">e</text:span><text:span text:style-name="T2792">x</text:span><text:span text:style-name="T2793">t</text:span><text:span text:style-name="T2794">e</text:span><text:span text:style-name="T2795">r</text:span><text:span text:style-name="T2796">n</text:span><text:span text:style-name="T2797">es.</text:span></text:p>
      <text:p text:style-name="P2798"/>
      <text:p text:style-name="P2799"><text:span text:style-name="T2800">-</text:span><text:span text:style-name="T2801"><text:tab/></text:span><text:span text:style-name="T2802">S</text:span><text:span text:style-name="T2803">u</text:span><text:span text:style-name="T2804">pp</text:span><text:span text:style-name="T2805">o</text:span><text:span text:style-name="T2806">rt a</text:span><text:span text:style-name="T2807">u</text:span><text:span text:style-name="T2808">x</text:span><text:span text:style-name="T2809"><text:s/></text:span><text:span text:style-name="T2810">u</text:span><text:span text:style-name="T2811">t</text:span><text:span text:style-name="T2812">i</text:span><text:span text:style-name="T2813">l</text:span><text:span text:style-name="T2814">is</text:span><text:span text:style-name="T2815">a</text:span><text:span text:style-name="T2816">t</text:span><text:span text:style-name="T2817">e</text:span><text:span text:style-name="T2818">u</text:span><text:span text:style-name="T2819">r</text:span><text:span text:style-name="T2820">s</text:span><text:span text:style-name="T2821"><text:s/></text:span><text:span text:style-name="T2822">:</text:span><text:span text:style-name="T2823"><text:s/>F</text:span><text:span text:style-name="T2824">o</text:span><text:span text:style-name="T2825">u</text:span><text:span text:style-name="T2826">rn</text:span><text:span text:style-name="T2827">i</text:span><text:span text:style-name="T2828">r<text:s/></text:span><text:span text:style-name="T2829">u</text:span><text:span text:style-name="T2830">n</text:span><text:span text:style-name="T2831"><text:s/></text:span><text:span text:style-name="T2832">s</text:span><text:span text:style-name="T2833">u</text:span><text:span text:style-name="T2834">p</text:span><text:span text:style-name="T2835">p</text:span><text:span text:style-name="T2836">o</text:span><text:span text:style-name="T2837">rt t</text:span><text:span text:style-name="T2838">e</text:span><text:span text:style-name="T2839">c</text:span><text:span text:style-name="T2840">hn</text:span><text:span text:style-name="T2841">i</text:span><text:span text:style-name="T2842">q</text:span><text:span text:style-name="T2843">u</text:span><text:span text:style-name="T2844">e</text:span><text:span text:style-name="T2845"><text:s/></text:span><text:span text:style-name="T2846">a</text:span><text:span text:style-name="T2847">u</text:span><text:span text:style-name="T2848">x</text:span><text:span text:style-name="T2849"><text:s/></text:span><text:span text:style-name="T2850">u</text:span><text:span text:style-name="T2851">t</text:span><text:span text:style-name="T2852">i</text:span><text:span text:style-name="T2853">l</text:span><text:span text:style-name="T2854">is</text:span><text:span text:style-name="T2855">a</text:span><text:span text:style-name="T2856">t</text:span><text:span text:style-name="T2857">e</text:span><text:span text:style-name="T2858">u</text:span><text:span text:style-name="T2859">r</text:span><text:span text:style-name="T2860">s</text:span><text:span text:style-name="T2861"><text:s/></text:span><text:span text:style-name="T2862">d</text:span><text:span text:style-name="T2863">es</text:span><text:span text:style-name="T2864"><text:s/></text:span><text:span text:style-name="T2865">s</text:span><text:span text:style-name="T2866">y</text:span><text:span text:style-name="T2867">s</text:span><text:span text:style-name="T2868">t</text:span><text:span text:style-name="T2869">è</text:span><text:span text:style-name="T2870">m</text:span><text:span text:style-name="T2871">e</text:span><text:span text:style-name="T2872">s</text:span><text:span text:style-name="T2873"><text:s/></text:span><text:span text:style-name="T2874">(e</text:span><text:span text:style-name="T2875">mp</text:span><text:span text:style-name="T2876">l</text:span><text:span text:style-name="T2877">o</text:span><text:span text:style-name="T2878">y</text:span><text:span text:style-name="T2879">é</text:span><text:span text:style-name="T2880">s</text:span><text:span text:style-name="T2881"><text:s/></text:span><text:span text:style-name="T2882">d</text:span><text:span text:style-name="T2883">'</text:span><text:span text:style-name="T2884">AG</text:span><text:span text:style-name="T2885">2</text:span><text:span text:style-name="T2886">R</text:span><text:span text:style-name="T2887"><text:s/></text:span><text:span text:style-name="T2888">L</text:span><text:span text:style-name="T2889">a</text:span><text:span text:style-name="T2890"><text:s/></text:span><text:span text:style-name="T2891">M</text:span><text:span text:style-name="T2892">o</text:span><text:span text:style-name="T2893">n</text:span><text:span text:style-name="T2894">di</text:span><text:span text:style-name="T2895">a</text:span><text:span text:style-name="T2896">l</text:span><text:span text:style-name="T2897">e,</text:span><text:span text:style-name="T2898"><text:s/></text:span><text:span text:style-name="T2899">e</text:span><text:span text:style-name="T2900">ntr</text:span><text:span text:style-name="T2901">e</text:span><text:span text:style-name="T2902">pr</text:span><text:span text:style-name="T2903">i</text:span><text:span text:style-name="T2904">s</text:span><text:span text:style-name="T2905">e</text:span><text:span text:style-name="T2906">s</text:span><text:span text:style-name="T2907"><text:s/></text:span><text:span text:style-name="T2908">c</text:span><text:span text:style-name="T2909">l</text:span><text:span text:style-name="T2910">i</text:span><text:span text:style-name="T2911">e</text:span><text:span text:style-name="T2912">n</text:span><text:span text:style-name="T2913">t</text:span><text:span text:style-name="T2914">e</text:span><text:span text:style-name="T2915">s,</text:span><text:span text:style-name="T2916"><text:s/></text:span><text:span text:style-name="T2917">a</text:span><text:span text:style-name="T2918">s</text:span><text:span text:style-name="T2919">s</text:span><text:span text:style-name="T2920">u</text:span><text:span text:style-name="T2921">r</text:span><text:span text:style-name="T2922">és).</text:span></text:p>
      <text:p text:style-name="P2923"/>
      <text:p text:style-name="P2924"><text:span text:style-name="T2925">-</text:span><text:span text:style-name="T2926"><text:tab/>G</text:span><text:span text:style-name="T2927">es</text:span><text:span text:style-name="T2928">t</text:span><text:span text:style-name="T2929">i</text:span><text:span text:style-name="T2930">o</text:span><text:span text:style-name="T2931">n<text:s/></text:span><text:span text:style-name="T2932">de</text:span><text:span text:style-name="T2933"><text:s/>p</text:span><text:span text:style-name="T2934">r</text:span><text:span text:style-name="T2935">o</text:span><text:span text:style-name="T2936">j</text:span><text:span text:style-name="T2937">e</text:span><text:span text:style-name="T2938">t</text:span><text:span text:style-name="T2939">s</text:span><text:span text:style-name="T2940"><text:s/></text:span><text:span text:style-name="T2941">:</text:span><text:span text:style-name="T2942"><text:s/></text:span><text:span text:style-name="T2943">P</text:span><text:span text:style-name="T2944">i</text:span><text:span text:style-name="T2945">l</text:span><text:span text:style-name="T2946">o</text:span><text:span text:style-name="T2947">t</text:span><text:span text:style-name="T2948">e</text:span><text:span text:style-name="T2949">r</text:span><text:span text:style-name="T2950"><text:s/></text:span><text:span text:style-name="T2951">l</text:span><text:span text:style-name="T2952">es</text:span><text:span text:style-name="T2953"><text:s/></text:span><text:span text:style-name="T2954">pr</text:span><text:span text:style-name="T2955">o</text:span><text:span text:style-name="T2956">j</text:span><text:span text:style-name="T2957">e</text:span><text:span text:style-name="T2958">t</text:span><text:span text:style-name="T2959">s</text:span><text:span text:style-name="T2960"><text:s/></text:span><text:span text:style-name="T2961">i</text:span><text:span text:style-name="T2962">n</text:span><text:span text:style-name="T2963">f</text:span><text:span text:style-name="T2964">o</text:span><text:span text:style-name="T2965">rm</text:span><text:span text:style-name="T2966">at</text:span><text:span text:style-name="T2967">i</text:span><text:span text:style-name="T2968">q</text:span><text:span text:style-name="T2969">ue</text:span><text:span text:style-name="T2970">s</text:span><text:span text:style-name="T2971"><text:s/>l</text:span><text:span text:style-name="T2972">i</text:span><text:span text:style-name="T2973">és</text:span><text:span text:style-name="T2974"><text:s/></text:span><text:span text:style-name="T2975">à</text:span><text:span text:style-name="T2976"><text:s/></text:span><text:span text:style-name="T2977">l</text:span><text:span text:style-name="T2978">a r</text:span><text:span text:style-name="T2979">e</text:span><text:span text:style-name="T2980">tra</text:span><text:span text:style-name="T2981">i</text:span><text:span text:style-name="T2982">t</text:span><text:span text:style-name="T2983">e</text:span><text:span text:style-name="T2984"><text:s/></text:span><text:span text:style-name="T2985">c</text:span><text:span text:style-name="T2986">o</text:span><text:span text:style-name="T2987">m</text:span><text:span text:style-name="T2988">p</text:span><text:span text:style-name="T2989">l</text:span><text:span text:style-name="T2990">é</text:span><text:span text:style-name="T2991">m</text:span><text:span text:style-name="T2992">e</text:span><text:span text:style-name="T2993">n</text:span><text:span text:style-name="T2994">t</text:span><text:span text:style-name="T2995">a</text:span><text:span text:style-name="T2996">i</text:span><text:span text:style-name="T2997">r</text:span><text:span text:style-name="T2998">e</text:span><text:span text:style-name="T2999"><text:s/></text:span><text:span text:style-name="T3000">(</text:span><text:span text:style-name="T3001">n</text:span><text:span text:style-name="T3002">ou</text:span><text:span text:style-name="T3003">v</text:span><text:span text:style-name="T3004">e</text:span><text:span text:style-name="T3005">l</text:span><text:span text:style-name="T3006">l</text:span><text:span text:style-name="T3007">es</text:span><text:span text:style-name="T3008"><text:s/></text:span><text:span text:style-name="T3009">a</text:span><text:span text:style-name="T3010">p</text:span><text:span text:style-name="T3011">p</text:span><text:span text:style-name="T3012">l</text:span><text:span text:style-name="T3013">ic</text:span><text:span text:style-name="T3014">a</text:span><text:span text:style-name="T3015">t</text:span><text:span text:style-name="T3016">i</text:span><text:span text:style-name="T3017">o</text:span><text:span text:style-name="T3018">n</text:span><text:span text:style-name="T3019">s,</text:span><text:span text:style-name="T3020"><text:s/></text:span><text:span text:style-name="T3021">m</text:span><text:span text:style-name="T3022">i</text:span><text:span text:style-name="T3023">se</text:span><text:span text:style-name="T3024">s</text:span><text:span text:style-name="T3025"><text:s/></text:span><text:span text:style-name="T3026">à</text:span><text:span text:style-name="T3027"><text:s/></text:span><text:span text:style-name="T3028">jou</text:span><text:span text:style-name="T3029">r</text:span><text:span text:style-name="T3030">,</text:span><text:span text:style-name="T3031"><text:s/></text:span><text:span text:style-name="T3032">e</text:span><text:span text:style-name="T3033">t</text:span><text:span text:style-name="T3034">c.).</text:span></text:p>
      <text:p text:style-name="P3035"/>
      <text:p text:style-name="P3036"><text:span text:style-name="T3037">-</text:span><text:span text:style-name="T3038"><text:tab/>Inn</text:span><text:span text:style-name="T3039">o</text:span><text:span text:style-name="T3040">v</text:span><text:span text:style-name="T3041">a</text:span><text:span text:style-name="T3042">t</text:span><text:span text:style-name="T3043">i</text:span><text:span text:style-name="T3044">o</text:span><text:span text:style-name="T3045">n</text:span><text:span text:style-name="T3046"><text:s/></text:span><text:span text:style-name="T3047">:</text:span><text:span text:style-name="T3048"><text:s/></text:span><text:span text:style-name="T3049">I</text:span><text:span text:style-name="T3050">d</text:span><text:span text:style-name="T3051">e</text:span><text:span text:style-name="T3052">n</text:span><text:span text:style-name="T3053">t</text:span><text:span text:style-name="T3054">i</text:span><text:span text:style-name="T3055">f</text:span><text:span text:style-name="T3056">i</text:span><text:span text:style-name="T3057">e</text:span><text:span text:style-name="T3058">r<text:s/></text:span><text:span text:style-name="T3059">e</text:span><text:span text:style-name="T3060">t</text:span><text:span text:style-name="T3061"><text:s/>m</text:span><text:span text:style-name="T3062">e</text:span><text:span text:style-name="T3063">t</text:span><text:span text:style-name="T3064">t</text:span><text:span text:style-name="T3065">r</text:span><text:span text:style-name="T3066">e</text:span><text:span text:style-name="T3067"><text:s/></text:span><text:span text:style-name="T3068">e</text:span><text:span text:style-name="T3069">n œ</text:span><text:span text:style-name="T3070">u</text:span><text:span text:style-name="T3071">vr</text:span><text:span text:style-name="T3072">e</text:span><text:span text:style-name="T3073"><text:s/></text:span><text:span text:style-name="T3074">de</text:span><text:span text:style-name="T3075"><text:s/>n</text:span><text:span text:style-name="T3076">ou</text:span><text:span text:style-name="T3077">v</text:span><text:span text:style-name="T3078">e</text:span><text:span text:style-name="T3079">l</text:span><text:span text:style-name="T3080">l</text:span><text:span text:style-name="T3081">es</text:span><text:span text:style-name="T3082"><text:s/>t</text:span><text:span text:style-name="T3083">ec</text:span><text:span text:style-name="T3084">hn</text:span><text:span text:style-name="T3085">o</text:span><text:span text:style-name="T3086">l</text:span><text:span text:style-name="T3087">o</text:span><text:span text:style-name="T3088">g</text:span><text:span text:style-name="T3089">i</text:span><text:span text:style-name="T3090">es</text:span><text:span text:style-name="T3091"><text:s/>p</text:span><text:span text:style-name="T3092">ou</text:span><text:span text:style-name="T3093">r<text:s/></text:span><text:span text:style-name="T3094">a</text:span><text:span text:style-name="T3095">m</text:span><text:span text:style-name="T3096">é</text:span><text:span text:style-name="T3097">l</text:span><text:span text:style-name="T3098">i</text:span><text:span text:style-name="T3099">o</text:span><text:span text:style-name="T3100">r</text:span><text:span text:style-name="T3101">e</text:span><text:span text:style-name="T3102">r</text:span><text:span text:style-name="T3103"><text:s/>l'</text:span><text:span text:style-name="T3104">e</text:span><text:span text:style-name="T3105">ff</text:span><text:span text:style-name="T3106">i</text:span><text:span text:style-name="T3107">c</text:span><text:span text:style-name="T3108">a</text:span><text:span text:style-name="T3109">ci</text:span><text:span text:style-name="T3110">t</text:span><text:span text:style-name="T3111">é</text:span><text:span text:style-name="T3112"><text:s/></text:span><text:span text:style-name="T3113">d</text:span><text:span text:style-name="T3114">e</text:span><text:span text:style-name="T3115">s</text:span><text:span text:style-name="T3116"><text:s/></text:span><text:span text:style-name="T3117">s</text:span><text:span text:style-name="T3118">y</text:span><text:span text:style-name="T3119">s</text:span><text:span text:style-name="T3120">t</text:span><text:span text:style-name="T3121">è</text:span><text:span text:style-name="T3122">m</text:span><text:span text:style-name="T3123">es</text:span><text:span text:style-name="T3124"><text:s/></text:span><text:span text:style-name="T3125">e</text:span><text:span text:style-name="T3126">t</text:span><text:span text:style-name="T3127"><text:s/></text:span><text:span text:style-name="T3128">la<text:s/></text:span><text:span text:style-name="T3129">q</text:span><text:span text:style-name="T3130">u</text:span><text:span text:style-name="T3131">al</text:span><text:span text:style-name="T3132">i</text:span><text:span text:style-name="T3133">t</text:span><text:span text:style-name="T3134">é</text:span><text:span text:style-name="T3135"><text:s/></text:span><text:span text:style-name="T3136">d</text:span><text:span text:style-name="T3137">es</text:span><text:span text:style-name="T3138"><text:s/></text:span><text:span text:style-name="T3139">s</text:span><text:span text:style-name="T3140">e</text:span><text:span text:style-name="T3141">r</text:span><text:span text:style-name="T3142">v</text:span><text:span text:style-name="T3143">i</text:span><text:span text:style-name="T3144">c</text:span><text:span text:style-name="T3145">es.</text:span></text:p>
      <text:p text:style-name="P3146"/>
      <text:p text:style-name="P3147"><text:span text:style-name="T3148">-</text:span><text:span text:style-name="T3149"><text:tab/>C</text:span><text:span text:style-name="T3150">o</text:span><text:span text:style-name="T3151">nf</text:span><text:span text:style-name="T3152">o</text:span><text:span text:style-name="T3153">r</text:span><text:span text:style-name="T3154">m</text:span><text:span text:style-name="T3155">i</text:span><text:span text:style-name="T3156">t</text:span><text:span text:style-name="T3157">é</text:span><text:span text:style-name="T3158"><text:s/></text:span><text:span text:style-name="T3159">r</text:span><text:span text:style-name="T3160">é</text:span><text:span text:style-name="T3161">gl</text:span><text:span text:style-name="T3162">e</text:span><text:span text:style-name="T3163">m</text:span><text:span text:style-name="T3164">e</text:span><text:span text:style-name="T3165">n</text:span><text:span text:style-name="T3166">ta</text:span><text:span text:style-name="T3167">i</text:span><text:span text:style-name="T3168">r</text:span><text:span text:style-name="T3169">e</text:span><text:span text:style-name="T3170"><text:s/></text:span><text:span text:style-name="T3171">:</text:span><text:span text:style-name="T3172"><text:s/></text:span><text:span text:style-name="T3173">S</text:span><text:span text:style-name="T3174">'a</text:span><text:span text:style-name="T3175">s</text:span><text:span text:style-name="T3176">s</text:span><text:span text:style-name="T3177">u</text:span><text:span text:style-name="T3178">r</text:span><text:span text:style-name="T3179">e</text:span><text:span text:style-name="T3180">r</text:span><text:span text:style-name="T3181"><text:s/></text:span><text:span text:style-name="T3182">q</text:span><text:span text:style-name="T3183">u</text:span><text:span text:style-name="T3184">e</text:span><text:span text:style-name="T3185"><text:s/>l</text:span><text:span text:style-name="T3186">e</text:span><text:span text:style-name="T3187">s</text:span><text:span text:style-name="T3188"><text:s/></text:span><text:span text:style-name="T3189">s</text:span><text:span text:style-name="T3190">y</text:span><text:span text:style-name="T3191">s</text:span><text:span text:style-name="T3192">t</text:span><text:span text:style-name="T3193">è</text:span><text:span text:style-name="T3194">m</text:span><text:span text:style-name="T3195">es</text:span><text:span text:style-name="T3196"><text:s/></text:span><text:span text:style-name="T3197">s</text:span><text:span text:style-name="T3198">o</text:span><text:span text:style-name="T3199">nt</text:span><text:span text:style-name="T3200"><text:s/></text:span><text:span text:style-name="T3201">c</text:span><text:span text:style-name="T3202">o</text:span><text:span text:style-name="T3203">n</text:span><text:span text:style-name="T3204">f</text:span><text:span text:style-name="T3205">o</text:span><text:span text:style-name="T3206">rm</text:span><text:span text:style-name="T3207">es</text:span><text:span text:style-name="T3208"><text:s/></text:span><text:span text:style-name="T3209">a</text:span><text:span text:style-name="T3210">u</text:span><text:span text:style-name="T3211">x</text:span><text:span text:style-name="T3212"><text:s/>r</text:span><text:span text:style-name="T3213">é</text:span><text:span text:style-name="T3214">gl</text:span><text:span text:style-name="T3215">e</text:span><text:span text:style-name="T3216">m</text:span><text:span text:style-name="T3217">e</text:span><text:span text:style-name="T3218">n</text:span><text:span text:style-name="T3219">tat</text:span><text:span text:style-name="T3220">io</text:span><text:span text:style-name="T3221">n</text:span><text:span text:style-name="T3222">s</text:span><text:span text:style-name="T3223"><text:s/></text:span><text:span text:style-name="T3224">e</text:span><text:span text:style-name="T3225">n<text:s/></text:span><text:span text:style-name="T3226">v</text:span><text:span text:style-name="T3227">i</text:span><text:span text:style-name="T3228">g</text:span><text:span text:style-name="T3229">u</text:span><text:span text:style-name="T3230">eu</text:span><text:span text:style-name="T3231">r</text:span><text:span text:style-name="T3232"><text:s/></text:span><text:span text:style-name="T3233">(R</text:span><text:span text:style-name="T3234">GPD</text:span><text:span text:style-name="T3235">,</text:span><text:span text:style-name="T3236"><text:s/></text:span><text:span text:style-name="T3237">e</text:span><text:span text:style-name="T3238">t</text:span><text:span text:style-name="T3239">c.).</text:span></text:p>
      <text:p text:style-name="P3240"/>
      <text:p text:style-name="P3241"><text:span text:style-name="T3242">-</text:span><text:span text:style-name="T3243"><text:tab/></text:span><text:span text:style-name="T3244">S</text:span><text:span text:style-name="T3245">trat</text:span><text:span text:style-name="T3246">é</text:span><text:span text:style-name="T3247">g</text:span><text:span text:style-name="T3248">i</text:span><text:span text:style-name="T3249">e</text:span><text:span text:style-name="T3250"><text:s/></text:span><text:span text:style-name="T3251">S</text:span><text:span text:style-name="T3252">I<text:s/></text:span><text:span text:style-name="T3253">:</text:span><text:span text:style-name="T3254"><text:s/>D</text:span><text:span text:style-name="T3255">é</text:span><text:span text:style-name="T3256">f</text:span><text:span text:style-name="T3257">i</text:span><text:span text:style-name="T3258">n</text:span><text:span text:style-name="T3259">i</text:span><text:span text:style-name="T3260">r<text:s/></text:span><text:span text:style-name="T3261">e</text:span><text:span text:style-name="T3262">t</text:span><text:span text:style-name="T3263"><text:s/></text:span><text:span text:style-name="T3264">m</text:span><text:span text:style-name="T3265">e</text:span><text:span text:style-name="T3266">ttr</text:span><text:span text:style-name="T3267">e</text:span><text:span text:style-name="T3268"><text:s/></text:span><text:span text:style-name="T3269">e</text:span><text:span text:style-name="T3270">n œ</text:span><text:span text:style-name="T3271">u</text:span><text:span text:style-name="T3272">v</text:span><text:span text:style-name="T3273">r</text:span><text:span text:style-name="T3274">e</text:span><text:span text:style-name="T3275"><text:s/>la<text:s/></text:span><text:span text:style-name="T3276">s</text:span><text:span text:style-name="T3277">t</text:span><text:span text:style-name="T3278">rat</text:span><text:span text:style-name="T3279">é</text:span><text:span text:style-name="T3280">g</text:span><text:span text:style-name="T3281">ie</text:span><text:span text:style-name="T3282"><text:s/></text:span><text:span text:style-name="T3283">i</text:span><text:span text:style-name="T3284">nf</text:span><text:span text:style-name="T3285">o</text:span><text:span text:style-name="T3286">r</text:span><text:span text:style-name="T3287">ma</text:span><text:span text:style-name="T3288">t</text:span><text:span text:style-name="T3289">iq</text:span><text:span text:style-name="T3290">u</text:span><text:span text:style-name="T3291">e</text:span><text:span text:style-name="T3292"><text:s/></text:span><text:span text:style-name="T3293">p</text:span><text:span text:style-name="T3294">ou</text:span><text:span text:style-name="T3295">r<text:s/></text:span><text:span text:style-name="T3296">l</text:span><text:span text:style-name="T3297">a r</text:span><text:span text:style-name="T3298">e</text:span><text:span text:style-name="T3299">t</text:span><text:span text:style-name="T3300">r</text:span><text:span text:style-name="T3301">a</text:span><text:span text:style-name="T3302">i</text:span><text:span text:style-name="T3303">t</text:span><text:span text:style-name="T3304">e</text:span><text:span text:style-name="T3305"><text:s/></text:span><text:span text:style-name="T3306">co</text:span><text:span text:style-name="T3307">mp</text:span><text:span text:style-name="T3308">l</text:span><text:span text:style-name="T3309">é</text:span><text:span text:style-name="T3310">m</text:span><text:span text:style-name="T3311">e</text:span><text:span text:style-name="T3312">n</text:span><text:span text:style-name="T3313">ta</text:span><text:span text:style-name="T3314">i</text:span><text:span text:style-name="T3315">r</text:span><text:span text:style-name="T3316">e</text:span><text:span text:style-name="T3317">,</text:span><text:span text:style-name="T3318"><text:s/></text:span><text:span text:style-name="T3319">e</text:span><text:span text:style-name="T3320">n</text:span><text:span text:style-name="T3321"><text:s/></text:span><text:span text:style-name="T3322">al</text:span><text:span text:style-name="T3323">i</text:span><text:span text:style-name="T3324">g</text:span><text:span text:style-name="T3325">n</text:span><text:span text:style-name="T3326">e</text:span><text:span text:style-name="T3327">m</text:span><text:span text:style-name="T3328">e</text:span><text:span text:style-name="T3329">nt av</text:span><text:span text:style-name="T3330">ec</text:span><text:span text:style-name="T3331"><text:s/></text:span><text:span text:style-name="T3332">l</text:span><text:span text:style-name="T3333">a</text:span><text:span text:style-name="T3334"><text:s/></text:span><text:span text:style-name="T3335">s</text:span><text:span text:style-name="T3336">t</text:span><text:span text:style-name="T3337">r</text:span><text:span text:style-name="T3338">at</text:span><text:span text:style-name="T3339">é</text:span><text:span text:style-name="T3340">g</text:span><text:span text:style-name="T3341">i</text:span><text:span text:style-name="T3342">e</text:span><text:span text:style-name="T3343"><text:s/></text:span><text:span text:style-name="T3344">g</text:span><text:span text:style-name="T3345">l</text:span><text:span text:style-name="T3346">o</text:span><text:span text:style-name="T3347">bal</text:span><text:span text:style-name="T3348">e</text:span><text:span text:style-name="T3349"><text:s/></text:span><text:span text:style-name="T3350">d</text:span><text:span text:style-name="T3351">'</text:span><text:span text:style-name="T3352">AG2</text:span><text:span text:style-name="T3353">R</text:span><text:span text:style-name="T3354"><text:s/></text:span><text:span text:style-name="T3355">L</text:span><text:span text:style-name="T3356">a</text:span><text:span text:style-name="T3357"><text:s/></text:span><text:span text:style-name="T3358">M</text:span><text:span text:style-name="T3359">o</text:span><text:span text:style-name="T3360">n</text:span><text:span text:style-name="T3361">d</text:span><text:span text:style-name="T3362">i</text:span><text:span text:style-name="T3363">a</text:span><text:span text:style-name="T3364">l</text:span><text:span text:style-name="T3365">e</text:span><text:span text:style-name="T3366">.</text:span></text:p>
      <text:p text:style-name="P3367"/>
      <text:p text:style-name="P3368"><text:span text:style-name="T3369">-</text:span><text:tab/><text:span text:style-name="T3370">Mise en place du déploiement assister d’ALMIA au sein de la retraite complémentaire et autre service.<text:s/></text:span></text:p>
      <text:p text:style-name="P3371"/>
      <text:p text:style-name="P3372"/>
      <text:p text:style-name="P3373"/>
      <text:p text:style-name="P3374"><text:span text:style-name="T3375">En</text:span><text:span text:style-name="T3376"><text:s/></text:span><text:span text:style-name="T3377">r</text:span><text:span text:style-name="T3378">és</text:span><text:span text:style-name="T3379">u</text:span><text:span text:style-name="T3380">m</text:span><text:span text:style-name="T3381">é,</text:span><text:span text:style-name="T3382"><text:s/>la D</text:span><text:span text:style-name="T3383">S</text:span><text:span text:style-name="T3384">I</text:span><text:span text:style-name="T3385"><text:s/></text:span><text:span text:style-name="T3386">R</text:span><text:span text:style-name="T3387">C</text:span><text:span text:style-name="T3388"><text:s/></text:span><text:span text:style-name="T3389">e</text:span><text:span text:style-name="T3390">s</text:span><text:span text:style-name="T3391">t</text:span><text:span text:style-name="T3392"><text:s/></text:span><text:span text:style-name="T3393">l</text:span><text:span text:style-name="T3394">e</text:span><text:span text:style-name="T3395"><text:s/></text:span><text:span text:style-name="T3396">d</text:span><text:span text:style-name="T3397">é</text:span><text:span text:style-name="T3398">p</text:span><text:span text:style-name="T3399">a</text:span><text:span text:style-name="T3400">rt</text:span><text:span text:style-name="T3401">e</text:span><text:span text:style-name="T3402">m</text:span><text:span text:style-name="T3403">e</text:span><text:span text:style-name="T3404">nt<text:s/></text:span><text:span text:style-name="T3405">d</text:span><text:span text:style-name="T3406">'</text:span><text:span text:style-name="T3407">AG2</text:span><text:span text:style-name="T3408">R</text:span><text:span text:style-name="T3409"><text:s/></text:span><text:span text:style-name="T3410">L</text:span><text:span text:style-name="T3411">a</text:span><text:span text:style-name="T3412"><text:s/>M</text:span><text:span text:style-name="T3413">o</text:span><text:span text:style-name="T3414">n</text:span><text:span text:style-name="T3415">d</text:span><text:span text:style-name="T3416">i</text:span><text:span text:style-name="T3417">a</text:span><text:span text:style-name="T3418">l</text:span><text:span text:style-name="T3419">e</text:span><text:span text:style-name="T3420"><text:s/></text:span><text:span text:style-name="T3421">c</text:span><text:span text:style-name="T3422">h</text:span><text:span text:style-name="T3423">arg</text:span><text:span text:style-name="T3424">é</text:span><text:span text:style-name="T3425"><text:s/></text:span><text:span text:style-name="T3426">de</text:span><text:span text:style-name="T3427"><text:s/></text:span><text:span text:style-name="T3428">fa</text:span><text:span text:style-name="T3429">i</text:span><text:span text:style-name="T3430">r</text:span><text:span text:style-name="T3431">e</text:span><text:span text:style-name="T3432"><text:s/></text:span><text:span text:style-name="T3433">f</text:span><text:span text:style-name="T3434">o</text:span><text:span text:style-name="T3435">n</text:span><text:span text:style-name="T3436">c</text:span><text:span text:style-name="T3437">t</text:span><text:span text:style-name="T3438">i</text:span><text:span text:style-name="T3439">o</text:span><text:span text:style-name="T3440">nn</text:span><text:span text:style-name="T3441">e</text:span><text:span text:style-name="T3442">r</text:span><text:span text:style-name="T3443">,</text:span><text:span text:style-name="T3444"><text:s/></text:span><text:span text:style-name="T3445">d</text:span><text:span text:style-name="T3446">'am</text:span><text:span text:style-name="T3447">é</text:span><text:span text:style-name="T3448">l</text:span><text:span text:style-name="T3449">i</text:span><text:span text:style-name="T3450">o</text:span><text:span text:style-name="T3451">r</text:span><text:span text:style-name="T3452">e</text:span><text:span text:style-name="T3453">r<text:s/></text:span><text:span text:style-name="T3454">e</text:span><text:span text:style-name="T3455">t</text:span><text:span text:style-name="T3456"><text:s/></text:span><text:span text:style-name="T3457">de</text:span><text:span text:style-name="T3458"><text:s/></text:span><text:span text:style-name="T3459">s</text:span><text:span text:style-name="T3460">éc</text:span><text:span text:style-name="T3461">u</text:span><text:span text:style-name="T3462">r</text:span><text:span text:style-name="T3463">i</text:span><text:span text:style-name="T3464">s</text:span><text:span text:style-name="T3465">e</text:span><text:span text:style-name="T3466">r</text:span><text:span text:style-name="T3467"><text:s/></text:span><text:span text:style-name="T3468">t</text:span><text:span text:style-name="T3469">ous</text:span><text:span text:style-name="T3470"><text:s/></text:span><text:span text:style-name="T3471">l</text:span><text:span text:style-name="T3472">e</text:span><text:span text:style-name="T3473">s</text:span><text:span text:style-name="T3474"><text:s/></text:span><text:span text:style-name="T3475">s</text:span><text:span text:style-name="T3476">y</text:span><text:span text:style-name="T3477">s</text:span><text:span text:style-name="T3478">t</text:span><text:span text:style-name="T3479">è</text:span><text:span text:style-name="T3480">m</text:span><text:span text:style-name="T3481">es</text:span><text:span text:style-name="T3482"><text:s/></text:span><text:span text:style-name="T3483">i</text:span><text:span text:style-name="T3484">n</text:span><text:span text:style-name="T3485">f</text:span><text:span text:style-name="T3486">o</text:span><text:span text:style-name="T3487">r</text:span><text:span text:style-name="T3488">ma</text:span><text:span text:style-name="T3489">t</text:span><text:span text:style-name="T3490">iq</text:span><text:span text:style-name="T3491">u</text:span><text:span text:style-name="T3492">e</text:span><text:span text:style-name="T3493">s</text:span><text:span text:style-name="T3494"><text:s/></text:span><text:span text:style-name="T3495">u</text:span><text:span text:style-name="T3496">t</text:span><text:span text:style-name="T3497">i</text:span><text:span text:style-name="T3498">l</text:span><text:span text:style-name="T3499">i</text:span><text:span text:style-name="T3500">s</text:span><text:span text:style-name="T3501">é</text:span><text:span text:style-name="T3502">s</text:span><text:span text:style-name="T3503"><text:s/></text:span><text:span text:style-name="T3504">p</text:span><text:span text:style-name="T3505">ou</text:span><text:span text:style-name="T3506">r</text:span><text:span text:style-name="T3507"><text:s/></text:span><text:span text:style-name="T3508">la g</text:span><text:span text:style-name="T3509">es</text:span><text:span text:style-name="T3510">t</text:span><text:span text:style-name="T3511">i</text:span><text:span text:style-name="T3512">o</text:span><text:span text:style-name="T3513">n<text:s/></text:span><text:span text:style-name="T3514">de</text:span><text:span text:style-name="T3515"><text:s/></text:span><text:span text:style-name="T3516">l</text:span><text:span text:style-name="T3517">a</text:span><text:span text:style-name="T3518"><text:s/></text:span><text:span text:style-name="T3519">r</text:span><text:span text:style-name="T3520">e</text:span><text:span text:style-name="T3521">t</text:span><text:span text:style-name="T3522">r</text:span><text:span text:style-name="T3523">a</text:span><text:span text:style-name="T3524">i</text:span><text:span text:style-name="T3525">t</text:span><text:span text:style-name="T3526">e</text:span><text:span text:style-name="T3527"><text:s/></text:span><text:span text:style-name="T3528">co</text:span><text:span text:style-name="T3529">mp</text:span><text:span text:style-name="T3530">l</text:span><text:span text:style-name="T3531">é</text:span><text:span text:style-name="T3532">m</text:span><text:span text:style-name="T3533">e</text:span><text:span text:style-name="T3534">n</text:span><text:span text:style-name="T3535">ta</text:span><text:span text:style-name="T3536">i</text:span><text:span text:style-name="T3537">r</text:span><text:span text:style-name="T3538">e</text:span><text:span text:style-name="T3539">.</text:span><text:span text:style-name="T3540"><text:s/></text:span><text:span text:style-name="T3541">C'</text:span><text:span text:style-name="T3542">e</text:span><text:span text:style-name="T3543">s</text:span><text:span text:style-name="T3544">t</text:span><text:span text:style-name="T3545"><text:s/></text:span><text:span text:style-name="T3546">u</text:span><text:span text:style-name="T3547">n a</text:span><text:span text:style-name="T3548">c</text:span><text:span text:style-name="T3549">t</text:span><text:span text:style-name="T3550">e</text:span><text:span text:style-name="T3551">u</text:span><text:span text:style-name="T3552">r<text:s/></text:span><text:span text:style-name="T3553">c</text:span><text:span text:style-name="T3554">l</text:span><text:span text:style-name="T3555">é</text:span><text:span text:style-name="T3556"><text:s/></text:span><text:span text:style-name="T3557">p</text:span><text:span text:style-name="T3558">ou</text:span><text:span text:style-name="T3559">r<text:s/></text:span><text:span text:style-name="T3560">a</text:span><text:span text:style-name="T3561">ss</text:span><text:span text:style-name="T3562">u</text:span><text:span text:style-name="T3563">r</text:span><text:span text:style-name="T3564">e</text:span><text:span text:style-name="T3565">r</text:span><text:span text:style-name="T3566"><text:s/></text:span><text:span text:style-name="T3567">la</text:span><text:span text:style-name="T3568"><text:s/></text:span><text:span text:style-name="T3569">q</text:span><text:span text:style-name="T3570">u</text:span><text:span text:style-name="T3571">al</text:span><text:span text:style-name="T3572">i</text:span><text:span text:style-name="T3573">t</text:span><text:span text:style-name="T3574">é</text:span><text:span text:style-name="T3575"><text:s/></text:span><text:span text:style-name="T3576">e</text:span><text:span text:style-name="T3577">t la</text:span><text:span text:style-name="T3578"><text:s/></text:span><text:span text:style-name="T3579">c</text:span><text:span text:style-name="T3580">o</text:span><text:span text:style-name="T3581">nt</text:span><text:span text:style-name="T3582">i</text:span><text:span text:style-name="T3583">n</text:span><text:span text:style-name="T3584">ui</text:span><text:span text:style-name="T3585">t</text:span><text:span text:style-name="T3586">é</text:span><text:span text:style-name="T3587"><text:s/></text:span><text:span text:style-name="T3588">de</text:span><text:span text:style-name="T3589"><text:s/></text:span><text:span text:style-name="T3590">ce</text:span><text:span text:style-name="T3591"><text:s/></text:span><text:span text:style-name="T3592">s</text:span><text:span text:style-name="T3593">e</text:span><text:span text:style-name="T3594">r</text:span><text:span text:style-name="T3595">v</text:span><text:span text:style-name="T3596">ice.</text:span></text:p>
      <text:p text:style-name="P3597"/>
      <text:list text:style-name="LFO18" text:continue-numbering="true">
        <text:list-item>
          <text:p text:style-name="P3598"><text:bookmark-start text:name="_Toc715893137"/>Présentation de l’environnement matériel et logiciel de l’entreprise<text:bookmark-end text:name="_Toc715893137"/></text:p>
        </text:list-item>
      </text:list>
      <text:p text:style-name="P3599"/>
      <text:p text:style-name="P3600"/>
      <text:p text:style-name="P3601"/>
      <text:p text:style-name="P3602">L’entreprise AG2R LA MONDIALE dispose de poste d’ordinateur portable pour permettent aux employés de pouvoir travailler aussi bien sur site<text:s/>qu’en<text:s/>télétravail. Les machines<text:s/>utilisent le système d’exploitation Windows<text:s/>11 et elles sont souvent mises à jour. Les outils les plus utilisé sont ceux de Microsoft (WORD, EXCEL, POWERPOINT, Microsoft Teams…) ainsi que Outlook pour les mails et les plannings.</text:p>
      <text:p text:style-name="P3603">Je travaille également avec le même matériel que les employés. J’utilise<text:s/>les<text:s/>mêmes outils qui sont à disposition dans l’entreprise<text:s/>tels que Git, GitLab et Visual studio code.</text:p>
      <text:p text:style-name="P3604"/>
      <text:p text:style-name="P3605"><text:span text:style-name="T3606">A</text:span><text:span text:style-name="T3607">u</text:span><text:span text:style-name="T3608"><text:s/></text:span><text:span text:style-name="T3609">se</text:span><text:span text:style-name="T3610">i</text:span><text:span text:style-name="T3611">n</text:span><text:span text:style-name="T3612"><text:s/></text:span><text:span text:style-name="T3613">de</text:span><text:span text:style-name="T3614"><text:s/></text:span><text:span text:style-name="T3615">l</text:span><text:span text:style-name="T3616">’</text:span><text:span text:style-name="T3617">e</text:span><text:span text:style-name="T3618">nt</text:span><text:span text:style-name="T3619">r</text:span><text:span text:style-name="T3620">e</text:span><text:span text:style-name="T3621">p</text:span><text:span text:style-name="T3622">r</text:span><text:span text:style-name="T3623">i</text:span><text:span text:style-name="T3624">s</text:span><text:span text:style-name="T3625">e,</text:span><text:span text:style-name="T3626"><text:s/></text:span><text:span text:style-name="T3627">i</text:span><text:span text:style-name="T3628">l</text:span><text:span text:style-name="T3629"><text:s/></text:span><text:span text:style-name="T3630">y</text:span><text:span text:style-name="T3631"><text:s/></text:span><text:span text:style-name="T3632">a<text:s/></text:span><text:span text:style-name="T3633">d</text:span><text:span text:style-name="T3634">es</text:span><text:span text:style-name="T3635"><text:s/>g</text:span><text:span text:style-name="T3636">ra</text:span><text:span text:style-name="T3637">n</text:span><text:span text:style-name="T3638">d</text:span><text:span text:style-name="T3639">s</text:span><text:span text:style-name="T3640"><text:s/></text:span><text:span text:style-name="T3641">e</text:span><text:span text:style-name="T3642">s</text:span><text:span text:style-name="T3643">pa</text:span><text:span text:style-name="T3644">c</text:span><text:span text:style-name="T3645">es</text:span><text:span text:style-name="T3646"><text:s/></text:span><text:span text:style-name="T3647">(</text:span><text:span text:style-name="T3648">O</text:span><text:span text:style-name="T3649">p</text:span><text:span text:style-name="T3650">e</text:span><text:span text:style-name="T3651">n</text:span><text:span text:style-name="T3652"><text:s/></text:span><text:span text:style-name="T3653">–</text:span><text:span text:style-name="T3654"><text:s/></text:span><text:span text:style-name="T3655">S</text:span><text:span text:style-name="T3656">pa</text:span><text:span text:style-name="T3657">c</text:span><text:span text:style-name="T3658">e)</text:span><text:span text:style-name="T3659"><text:s/></text:span><text:span text:style-name="T3660">ou</text:span><text:span text:style-name="T3661"><text:s/></text:span><text:span text:style-name="T3662">t</text:span><text:span text:style-name="T3663">r</text:span><text:span text:style-name="T3664">a</text:span><text:span text:style-name="T3665">va</text:span><text:span text:style-name="T3666">i</text:span><text:span text:style-name="T3667">l</text:span><text:span text:style-name="T3668">le</text:span><text:span text:style-name="T3669"><text:s/></text:span><text:span text:style-name="T3670">u</text:span><text:span text:style-name="T3671">n</text:span><text:span text:style-name="T3672"><text:s/></text:span><text:span text:style-name="T3673">gran</text:span><text:span text:style-name="T3674">d</text:span><text:span text:style-name="T3675"><text:s/></text:span><text:span text:style-name="T3676">n</text:span><text:span text:style-name="T3677">o</text:span><text:span text:style-name="T3678">m</text:span><text:span text:style-name="T3679">br</text:span><text:span text:style-name="T3680">e</text:span><text:span text:style-name="T3681"><text:s/></text:span><text:span text:style-name="T3682">d</text:span><text:span text:style-name="T3683">’</text:span><text:span text:style-name="T3684">e</text:span><text:span text:style-name="T3685">m</text:span><text:span text:style-name="T3686">pl</text:span><text:span text:style-name="T3687">o</text:span><text:span text:style-name="T3688">y</text:span><text:span text:style-name="T3689">ées.</text:span><text:span text:style-name="T3690"><text:s/>Il</text:span><text:span text:style-name="T3691"><text:s/></text:span><text:span text:style-name="T3692">e</text:span><text:span text:style-name="T3693">x</text:span><text:span text:style-name="T3694">i</text:span><text:span text:style-name="T3695">s</text:span><text:span text:style-name="T3696">t</text:span><text:span text:style-name="T3697">e</text:span><text:span text:style-name="T3698"><text:s/></text:span><text:span text:style-name="T3699">é</text:span><text:span text:style-name="T3700">ga</text:span><text:span text:style-name="T3701">l</text:span><text:span text:style-name="T3702">e</text:span><text:span text:style-name="T3703">m</text:span><text:span text:style-name="T3704">e</text:span><text:span text:style-name="T3705">nt<text:s/></text:span><text:span text:style-name="T3706">d</text:span><text:span text:style-name="T3707">es</text:span><text:span text:style-name="T3708"><text:s/></text:span><text:span text:style-name="T3709">e</text:span><text:span text:style-name="T3710">s</text:span><text:span text:style-name="T3711">p</text:span><text:span text:style-name="T3712">a</text:span><text:span text:style-name="T3713">c</text:span><text:span text:style-name="T3714">es</text:span><text:span text:style-name="T3715"><text:s/></text:span><text:span text:style-name="T3716">pl</text:span><text:span text:style-name="T3717">us</text:span><text:span text:style-name="T3718"><text:s/>r</text:span><text:span text:style-name="T3719">e</text:span><text:span text:style-name="T3720">s</text:span><text:span text:style-name="T3721">t</text:span><text:span text:style-name="T3722">r</text:span><text:span text:style-name="T3723">ei</text:span><text:span text:style-name="T3724">n</text:span><text:span text:style-name="T3725">t</text:span><text:span text:style-name="T3726">s</text:span><text:span text:style-name="T3727"><text:s/></text:span><text:span text:style-name="T3728">c</text:span><text:span text:style-name="T3729">o</text:span><text:span text:style-name="T3730">m</text:span><text:span text:style-name="T3731">p</text:span><text:span text:style-name="T3732">o</text:span><text:span text:style-name="T3733">s</text:span><text:span text:style-name="T3734">és</text:span><text:span text:style-name="T3735"><text:s/></text:span><text:span text:style-name="T3736">de</text:span><text:span text:style-name="T3737"><text:s/>p</text:span><text:span text:style-name="T3738">l</text:span><text:span text:style-name="T3739">us</text:span><text:span text:style-name="T3740"><text:s/></text:span><text:span text:style-name="T3741">p</text:span><text:span text:style-name="T3742">e</text:span><text:span text:style-name="T3743">t</text:span><text:span text:style-name="T3744">i</text:span><text:span text:style-name="T3745">t</text:span><text:span text:style-name="T3746">es</text:span><text:span text:style-name="T3747"><text:s/></text:span><text:span text:style-name="T3748">é</text:span><text:span text:style-name="T3749">q</text:span><text:span text:style-name="T3750">u</text:span><text:span text:style-name="T3751">i</text:span><text:span text:style-name="T3752">p</text:span><text:span text:style-name="T3753">es.</text:span></text:p>
      <text:p text:style-name="P3754"/>
      <text:p text:style-name="P3755"/>
      <text:p text:style-name="P3756"/>
      <text:p text:style-name="P3757"/>
      <text:p text:style-name="P3758"/>
      <text:p text:style-name="P3759"/>
      <text:p text:style-name="P3760"/>
      <text:p text:style-name="P3761"/>
      <text:list text:style-name="LFO18" text:continue-numbering="true">
        <text:list-item>
          <text:p text:style-name="P3762"><text:bookmark-start text:name="_Toc1023031681"/><text:span text:style-name="T3763">Présentation d</text:span><text:span text:style-name="T3764">es</text:span><text:span text:style-name="T3765"><text:s/>contexte</text:span><text:span text:style-name="T3766">s</text:span><text:span text:style-name="T3767"><text:s/>des situations professionnelles</text:span><text:bookmark-end text:name="_Toc1023031681"/></text:p>
        </text:list-item>
      </text:list>
      <text:p text:style-name="P3768"/>
      <text:p text:style-name="P3769"/>
      <text:p text:style-name="P3770"><text:span text:style-name="T3771">-</text:span><text:span text:style-name="T3772"><text:tab/>I</text:span><text:span text:style-name="T3773">n</text:span><text:span text:style-name="T3774">t</text:span><text:span text:style-name="T3775">é</text:span><text:span text:style-name="T3776">grat</text:span><text:span text:style-name="T3777">i</text:span><text:span text:style-name="T3778">o</text:span><text:span text:style-name="T3779">n a</text:span><text:span text:style-name="T3780">u</text:span><text:span text:style-name="T3781"><text:s/></text:span><text:span text:style-name="T3782">se</text:span><text:span text:style-name="T3783">i</text:span><text:span text:style-name="T3784">n<text:s/></text:span><text:span text:style-name="T3785">d</text:span><text:span text:style-name="T3786">e</text:span><text:span text:style-name="T3787"><text:s/></text:span><text:span text:style-name="T3788">l’</text:span><text:span text:style-name="T3789">équi</text:span><text:span text:style-name="T3790">p</text:span><text:span text:style-name="T3791">e</text:span><text:span text:style-name="T3792"><text:s/></text:span><text:span text:style-name="T3793">du</text:span><text:span text:style-name="T3794"><text:s/></text:span><text:span text:style-name="T3795">s</text:span><text:span text:style-name="T3796">e</text:span><text:span text:style-name="T3797">rv</text:span><text:span text:style-name="T3798">i</text:span><text:span text:style-name="T3799">c</text:span><text:span text:style-name="T3800">e</text:span><text:span text:style-name="T3801"><text:s/></text:span><text:span text:style-name="T3802">i</text:span><text:span text:style-name="T3803">nf</text:span><text:span text:style-name="T3804">o</text:span><text:span text:style-name="T3805">r</text:span><text:span text:style-name="T3806">m</text:span><text:span text:style-name="T3807">a</text:span><text:span text:style-name="T3808">t</text:span><text:span text:style-name="T3809">i</text:span><text:span text:style-name="T3810">q</text:span><text:span text:style-name="T3811">u</text:span><text:span text:style-name="T3812">e</text:span><text:span text:style-name="T3813"><text:s/></text:span><text:span text:style-name="T3814">de</text:span><text:span text:style-name="T3815"><text:s/></text:span><text:span text:style-name="T3816">l</text:span><text:span text:style-name="T3817">a</text:span><text:span text:style-name="T3818"><text:s/></text:span><text:span text:style-name="T3819">r</text:span><text:span text:style-name="T3820">e</text:span><text:span text:style-name="T3821">t</text:span><text:span text:style-name="T3822">r</text:span><text:span text:style-name="T3823">a</text:span><text:span text:style-name="T3824">i</text:span><text:span text:style-name="T3825">t</text:span><text:span text:style-name="T3826">e</text:span><text:span text:style-name="T3827"><text:s/></text:span><text:span text:style-name="T3828">c</text:span><text:span text:style-name="T3829">o</text:span><text:span text:style-name="T3830">mp</text:span><text:span text:style-name="T3831">l</text:span><text:span text:style-name="T3832">é</text:span><text:span text:style-name="T3833">m</text:span><text:span text:style-name="T3834">e</text:span><text:span text:style-name="T3835">n</text:span><text:span text:style-name="T3836">t</text:span><text:span text:style-name="T3837">a</text:span><text:span text:style-name="T3838">i</text:span><text:span text:style-name="T3839">r</text:span><text:span text:style-name="T3840">e</text:span><text:span text:style-name="T3841">,</text:span><text:span text:style-name="T3842"><text:s/></text:span><text:span text:style-name="T3843">j</text:span><text:span text:style-name="T3844">’a</text:span><text:span text:style-name="T3845">ide</text:span><text:span text:style-name="T3846"><text:s/></text:span><text:span text:style-name="T3847">a</text:span><text:span text:style-name="T3848">u</text:span><text:span text:style-name="T3849"><text:s/></text:span><text:span text:style-name="T3850">d</text:span><text:span text:style-name="T3851">é</text:span><text:span text:style-name="T3852">v</text:span><text:span text:style-name="T3853">e</text:span><text:span text:style-name="T3854">l</text:span><text:span text:style-name="T3855">o</text:span><text:span text:style-name="T3856">pp</text:span><text:span text:style-name="T3857">e</text:span><text:span text:style-name="T3858">m</text:span><text:span text:style-name="T3859">e</text:span><text:span text:style-name="T3860">nt</text:span><text:span text:style-name="T3861"><text:s/></text:span><text:span text:style-name="T3862">de</text:span><text:span text:style-name="T3863"><text:s/></text:span><text:span text:style-name="T3864">p</text:span><text:span text:style-name="T3865">r</text:span><text:span text:style-name="T3866">o</text:span><text:span text:style-name="T3867">mpt</text:span><text:span text:style-name="T3868"><text:s/></text:span><text:span text:style-name="T3869">p</text:span><text:span text:style-name="T3870">ou</text:span><text:span text:style-name="T3871">r</text:span><text:span text:style-name="T3872"><text:s/></text:span><text:span text:style-name="T3873">IA</text:span><text:span text:style-name="T3874">,</text:span><text:span text:style-name="T3875"><text:s/></text:span><text:span text:style-name="T3876">d</text:span><text:span text:style-name="T3877">a</text:span><text:span text:style-name="T3878">n</text:span><text:span text:style-name="T3879">s</text:span><text:span text:style-name="T3880"><text:s/></text:span><text:span text:style-name="T3881">l</text:span><text:span text:style-name="T3882">e</text:span><text:span text:style-name="T3883"><text:s/>b</text:span><text:span text:style-name="T3884">u</text:span><text:span text:style-name="T3885">t</text:span><text:span text:style-name="T3886"><text:s/></text:span><text:span text:style-name="T3887">de</text:span><text:span text:style-name="T3888"><text:s/></text:span><text:span text:style-name="T3889">r</text:span><text:span text:style-name="T3890">é</text:span><text:span text:style-name="T3891">p</text:span><text:span text:style-name="T3892">o</text:span><text:span text:style-name="T3893">n</text:span><text:span text:style-name="T3894">d</text:span><text:span text:style-name="T3895">r</text:span><text:span text:style-name="T3896">e</text:span><text:span text:style-name="T3897"><text:s/>a</text:span><text:span text:style-name="T3898">u</text:span><text:span text:style-name="T3899">x</text:span><text:span text:style-name="T3900"><text:s/>b</text:span><text:span text:style-name="T3901">e</text:span><text:span text:style-name="T3902">s</text:span><text:span text:style-name="T3903">oi</text:span><text:span text:style-name="T3904">n</text:span><text:span text:style-name="T3905">s</text:span><text:span text:style-name="T3906"><text:s/></text:span><text:span text:style-name="T3907">des</text:span><text:span text:style-name="T3908"><text:s/></text:span><text:span text:style-name="T3909">e</text:span><text:span text:style-name="T3910">mp</text:span><text:span text:style-name="T3911">l</text:span><text:span text:style-name="T3912">o</text:span><text:span text:style-name="T3913">y</text:span><text:span text:style-name="T3914">és</text:span><text:span text:style-name="T3915"><text:s/></text:span><text:span text:style-name="T3916">de</text:span><text:span text:style-name="T3917"><text:s/></text:span><text:span text:style-name="T3918">l</text:span><text:span text:style-name="T3919">’</text:span><text:span text:style-name="T3920">e</text:span><text:span text:style-name="T3921">ntr</text:span><text:span text:style-name="T3922">e</text:span><text:span text:style-name="T3923">pr</text:span><text:span text:style-name="T3924">is</text:span><text:span text:style-name="T3925">e.</text:span></text:p>
      <text:p text:style-name="P3926"/>
      <text:p text:style-name="P3927"><text:span text:style-name="T3928">-</text:span><text:tab/><text:span text:style-name="T3929">Mission sur la migration d’un projet<text:s/></text:span><text:span text:style-name="T3930">cod</text:span><text:span text:style-name="T3931">é</text:span><text:span text:style-name="T3932"><text:s/>en JAVA-7</text:span><text:span text:style-name="T3933"><text:s/>en JAVA-8.</text:span></text:p>
      <text:p text:style-name="P3934"/>
      <text:p text:style-name="P3935"><text:span text:style-name="T3936">-</text:span><text:span text:style-name="T3937"><text:tab/>Part</text:span><text:span text:style-name="T3938">ic</text:span><text:span text:style-name="T3939">i</text:span><text:span text:style-name="T3940">pat</text:span><text:span text:style-name="T3941">io</text:span><text:span text:style-name="T3942">n a</text:span><text:span text:style-name="T3943">u</text:span><text:span text:style-name="T3944">x</text:span><text:span text:style-name="T3945"><text:s/></text:span><text:span text:style-name="T3946">r</text:span><text:span text:style-name="T3947">éu</text:span><text:span text:style-name="T3948">n</text:span><text:span text:style-name="T3949">i</text:span><text:span text:style-name="T3950">o</text:span><text:span text:style-name="T3951">n</text:span><text:span text:style-name="T3952">s</text:span><text:span text:style-name="T3953"><text:s/></text:span><text:span text:style-name="T3954">T</text:span><text:span text:style-name="T3955">e</text:span><text:span text:style-name="T3956">a</text:span><text:span text:style-name="T3957">m</text:span><text:span text:style-name="T3958">s</text:span><text:span text:style-name="T3959"><text:s/></text:span><text:span text:style-name="T3960">d</text:span><text:span text:style-name="T3961">e</text:span><text:span text:style-name="T3962"><text:s/></text:span><text:span text:style-name="T3963">l</text:span><text:span text:style-name="T3964">’</text:span><text:span text:style-name="T3965">éq</text:span><text:span text:style-name="T3966">u</text:span><text:span text:style-name="T3967">i</text:span><text:span text:style-name="T3968">p</text:span><text:span text:style-name="T3969">e</text:span><text:span text:style-name="T3970"><text:s/></text:span><text:span text:style-name="T3971">(</text:span><text:span text:style-name="T3972">un</text:span><text:span text:style-name="T3973"><text:s/>p</text:span><text:span text:style-name="T3974">o</text:span><text:span text:style-name="T3975">i</text:span><text:span text:style-name="T3976">n</text:span><text:span text:style-name="T3977">t</text:span><text:span text:style-name="T3978"><text:s/></text:span><text:span text:style-name="T3979">de</text:span><text:span text:style-name="T3980"><text:s/></text:span><text:span text:style-name="T3981">s</text:span><text:span text:style-name="T3982">u</text:span><text:span text:style-name="T3983">i</text:span><text:span text:style-name="T3984">v</text:span><text:span text:style-name="T3985">i</text:span><text:span text:style-name="T3986"><text:s/>par<text:s/></text:span><text:span text:style-name="T3987">se</text:span><text:span text:style-name="T3988">ma</text:span><text:span text:style-name="T3989">i</text:span><text:span text:style-name="T3990">n</text:span><text:span text:style-name="T3991">e</text:span><text:span text:style-name="T3992">,</text:span><text:span text:style-name="T3993"><text:s/></text:span><text:span text:style-name="T3994">c</text:span><text:span text:style-name="T3995">o</text:span><text:span text:style-name="T3996">m</text:span><text:span text:style-name="T3997">i</text:span><text:span text:style-name="T3998">t</text:span><text:span text:style-name="T3999">é</text:span><text:span text:style-name="T4000"><text:s/></text:span><text:span text:style-name="T4001">a</text:span><text:span text:style-name="T4002">v</text:span><text:span text:style-name="T4003">ec</text:span><text:span text:style-name="T4004"><text:s/>les différentes équipes sur les sites différent</text:span><text:span text:style-name="T4005">s</text:span><text:span text:style-name="T4006"><text:s/></text:span><text:span text:style-name="T4007">m</text:span><text:span text:style-name="T4008">e</text:span><text:span text:style-name="T4009">n</text:span><text:span text:style-name="T4010">s</text:span><text:span text:style-name="T4011">u</text:span><text:span text:style-name="T4012">e</text:span><text:span text:style-name="T4013">l</text:span><text:span text:style-name="T4014">l</text:span><text:span text:style-name="T4015">e</text:span><text:span text:style-name="T4016">m</text:span><text:span text:style-name="T4017">e</text:span><text:span text:style-name="T4018">n</text:span><text:span text:style-name="T4019">t</text:span><text:span text:style-name="T4020">,</text:span><text:span text:style-name="T4021"><text:s/></text:span><text:span text:style-name="T4022">r</text:span><text:span text:style-name="T4023">éu</text:span><text:span text:style-name="T4024">n</text:span><text:span text:style-name="T4025">io</text:span><text:span text:style-name="T4026">n n</text:span><text:span text:style-name="T4027">o</text:span><text:span text:style-name="T4028">n pr</text:span><text:span text:style-name="T4029">o</text:span><text:span text:style-name="T4030">gra</text:span><text:span text:style-name="T4031">m</text:span><text:span text:style-name="T4032">m</text:span><text:span text:style-name="T4033">és</text:span><text:span text:style-name="T4034"><text:s/></text:span><text:span text:style-name="T4035">(</text:span><text:span text:style-name="T4036">p</text:span><text:span text:style-name="T4037">r</text:span><text:span text:style-name="T4038">és</text:span><text:span text:style-name="T4039">e</text:span><text:span text:style-name="T4040">n</text:span><text:span text:style-name="T4041">t</text:span><text:span text:style-name="T4042">at</text:span><text:span text:style-name="T4043">i</text:span><text:span text:style-name="T4044">o</text:span><text:span text:style-name="T4045">n</text:span><text:span text:style-name="T4046"><text:s/></text:span><text:span text:style-name="T4047">d</text:span><text:span text:style-name="T4048">’</text:span><text:span text:style-name="T4049">u</text:span><text:span text:style-name="T4050">n<text:s/></text:span><text:span text:style-name="T4051">pr</text:span><text:span text:style-name="T4052">od</text:span><text:span text:style-name="T4053">u</text:span><text:span text:style-name="T4054">i</text:span><text:span text:style-name="T4055">t</text:span><text:span text:style-name="T4056"><text:s/></text:span><text:span text:style-name="T4057">r</text:span><text:span text:style-name="T4058">é</text:span><text:span text:style-name="T4059">a</text:span><text:span text:style-name="T4060">l</text:span><text:span text:style-name="T4061">i</text:span><text:span text:style-name="T4062">s</text:span><text:span text:style-name="T4063">é</text:span><text:span text:style-name="T4064">…</text:span><text:span text:style-name="T4065">))</text:span></text:p>
      <text:p text:style-name="P4066"/>
      <text:p text:style-name="P4067"><text:span text:style-name="T4068">-</text:span><text:tab/><text:span text:style-name="T4069">Aide au débutant sur le sujet de l’intelligence artificielle.<text:s/></text:span></text:p>
      <text:p text:style-name="P4070"/>
      <text:p text:style-name="P4071"><text:span text:style-name="T4072">-<text:s/></text:span><text:tab/><text:span text:style-name="T4073">Réalisation d’un projet JAVA<text:s/></text:span><text:span text:style-name="T4074">pour l’équipe DSI RC.<text:s/></text:span><text:span text:style-name="T4075">(</text:span><text:span text:style-name="T4076">Mettre</text:span><text:span text:style-name="T4077"><text:s/>en place une<text:s/></text:span><text:span text:style-name="T4078">fonction</text:span><text:span text:style-name="T4079"><text:s/>qui permet de tester les prompts et assistants sur le web.<text:s/></text:span><text:span text:style-name="T4080">Utilisation de la bibliothèque<text:s/></text:span><text:span text:style-name="T4081">S</text:span><text:span text:style-name="T4082">elenium</text:span><text:span text:style-name="T4083">, Maven.)</text:span></text:p>
      <text:p text:style-name="P4084"/>
      <text:p text:style-name="P4085"/>
      <text:p text:style-name="P4086"/>
      <text:p text:style-name="P4087"/>
      <text:list text:style-name="LFO18" text:continue-numbering="true">
        <text:list-item>
          <text:p text:style-name="P4088"><text:bookmark-start text:name="_Toc1167746802"/>Présentation des missions qui<text:s/>m'ont<text:s/>été<text:s/>confiés<text:bookmark-end text:name="_Toc1167746802"/><text:s/></text:p>
        </text:list-item>
      </text:list>
      <text:p text:style-name="P4089"/>
      <text:p text:style-name="P4090"><text:span text:style-name="T4091">La mission qui m’a été confi</text:span><text:span text:style-name="T4092">é</text:span><text:span text:style-name="T4093"><text:s/>la semaine du</text:span><text:span text:style-name="T4094"><text:s/>05</text:span><text:span text:style-name="T4095"><text:s/>au<text:s/></text:span><text:span text:style-name="T4096">09</text:span><text:span text:style-name="T4097"><text:s/></text:span><text:span text:style-name="T4098">janvier<text:s/></text:span><text:span text:style-name="T4099">consiste à créer<text:s/></text:span><text:span text:style-name="T4100">des assistants</text:span><text:span text:style-name="T4101"><text:s/>IA.</text:span></text:p>
      <text:p text:style-name="P4102">Les assistants ont pour but d’aider les employées en réduisant les tâches répétitives et contraignante qui peuvent être faites par un agent IA.<text:s/>L’assistant sur lequel j’ai travaillé<text:s/>lors de la première semaine<text:s/>à<text:s/>pour sujet<text:s/>l’analyse approfondi d’un PowerPoint et<text:s/>de<text:s/>fournir un résumer à l’utilisateur. <text:s/>Le deuxième consiste à effectuer une recherche<text:s/>et une analyse<text:s/>sur les offres dans le cadre<text:s/>des<text:s/>marchés<text:s/>publics.<text:s/></text:p>
      <text:p text:style-name="P4103"/>
      <text:p text:style-name="P4104"><text:span text:style-name="T4105">Lors de la deuxième semaine</text:span><text:span text:style-name="T4106"><text:s/>de stage, (</text:span><text:span text:style-name="T4107">12</text:span><text:span text:style-name="T4108"><text:s/>au<text:s/></text:span><text:span text:style-name="T4109">16</text:span><text:span text:style-name="T4110"><text:s/></text:span><text:span text:style-name="T4111">janvier</text:span><text:span text:style-name="T4112">)</text:span><text:span text:style-name="T4113">, j’ai commencé un nouveau projet sur JAVA<text:s/></text:span><text:span text:style-name="T4114">avec</text:span><text:span text:style-name="T4115"><text:s/>le<text:s/></text:span><text:span text:style-name="T4116">développeur</text:span><text:span text:style-name="T4117"><text:s/>de l’équipe</text:span><text:span text:style-name="T4118">. Le projet consiste<text:s/></text:span><text:span text:style-name="T4119">à faire évoluer un code écrit en JAVA-7, vers une version plus récente (JAVA-8).<text:s/></text:span><text:span text:style-name="T4120">Les problèmes que j’ai rencontrés sont le fait de ne pas comprendre la fonctionnalité du code, et comment faire en sorte que je puisse réécrire la fonction avec une<text:s/></text:span><text:span text:style-name="T4121">version plus récente de JAVA, en conservant l’efficacité de la fonction. J’ai pour cela eu recours<text:s/></text:span><text:span text:style-name="T4122">à</text:span><text:span text:style-name="T4123"><text:s/>l’usage de l’</text:span><text:span text:style-name="T4124">intelligence</text:span><text:span text:style-name="T4125"><text:s/>artificielle pour comprendre ce que faisait la fonction, pour essayer de<text:s/></text:span><text:span text:style-name="T4126">proposer une version plus récente.<text:s/></text:span><text:span text:style-name="T4127">Je n’ai pas<text:s/></text:span><text:span text:style-name="T4128">passé</text:span><text:span text:style-name="T4129"><text:s/>beaucoup de temps sur ce projet, car<text:s/></text:span><text:span text:style-name="T4130">il prenait trop de temps et qu'un autre projet JAVA plus intéressant pour l’équipe ma été confié.<text:s/></text:span></text:p>
      <text:p text:style-name="P4131"><text:span text:style-name="T4132">J’ai également appris à demander des jours d’absence, et comprendre comment cela fonctionnait en entreprise.</text:span></text:p>
      <text:p text:style-name="P4133">J’ai aussi poursuivi le traitement des demandes concernant les assistants IA.<text:s/>J’ai réalisé des<text:s/>formulaires pour récupérer l’avis des utilisateurs. Ces questionnaires sont les deux premiers que j’avais réalisé lors de mon premier stage au sein de l’entreprise AG2R La Mondiale.</text:p>
      <text:p text:style-name="P4134"/>
      <text:p text:style-name="P4135"><text:span text:style-name="T4136">Durant ma troisième semaine, j'ai débuté un nouveau projet en Java dont l'objectif est d'automatiser le test d'assistants virtuels internes. Ces bots sont conçus pour aider les employés d'AG2R La Mondiale à optimiser leur temps de travail. Mon rôle consiste à vérifier la pertinence des requêtes que je leur soumets (les "prompts") et la qualité des réponses qu'ils fournissent, notamment lorsqu'il s'agit d'analyser des documents complexes. Pour y parvenir, j'utilise la bibliothèque Selenium WebDriver. Mon programme automatise plusieurs actions : il se connecte à la page web où se trouvent les assistants, navigue jusqu'à eux et leur envoie des demandes spécifiques. Ensuite, je récupère les réponses fournies par le bot directement depuis la page web. Ces réponses sont actuellement affichées dans la console de VSCode, et je suis en train de travailler à les structurer sous forme de fichiers JSON pour faciliter leur analyse. La prochaine étape cruciale sera d'implémenter la logique pour vérifier si les tests sont réussis ou échoués. Ce projet me permet d'appliquer l'automatisation web pour l'assurance qualité des outils internes.</text:span></text:p>
      <text:p text:style-name="P4137"/>
      <text:p text:style-name="P4138"><text:span text:style-name="T4139">Pendant la quatrième semaine, à la suite de réunions Teams sur le sujet de l'intelligence artificielle, j'ai reçu trois nouvelles missions. Pour aider les utilisateurs à bien formuler leurs prompts, on m'a confié le suivi de l'avancement de la production d'un assistant qui vérifie et analyse une demande de projet. J'ai par la suite eu des points avec les personnes qui m'avaient confié cette mission pour vérifier si tout se passait bien. Je travaille en parallèle sur un autre assistant, dont le but est de synthétiser et d'analyser les BIE (Bilan d'Information d'Entreprise) d'AG2R La Mondiale AGIRC-ARRCO. J'ai pour cela utilisé un assistant que j'avais réalisé au début de mon stage. En ce qui concerne le troisième assistant, je n’ai pas pu travailler beaucoup dessus car il est arrivé sur mon bureau le vendredi après-midi. L’objectif de celui-ci est de pouvoir répondre aux questions que se posent les employés de l’entreprise sur un thème précis. Pour réaliser cette tâche, il dispose d'une trentaine de documents dans sa base de connaissances. Le problème que j’ai rencontré quand j’ai commencé à tester cet assistant est l’écrasement de données. En effet, dans certains documents, les informations se contredisent ou ne sont plus d’actualité. En parallèle du travail sur les assistants, j’ai poursuivi le projet JAVA qu’on m’a confié la semaine dernière.<text:s/></text:span></text:p>
      <text:p text:style-name="P4140"/>
      <text:p text:style-name="P4141"><text:span text:style-name="T4142">Lors de la cinquième semaine de stage, j’ai finalisé les premières versions des assistants. La livraison des première versions c’est bien déroulé pour deux assistants sur les trois. J’ai octroyé l’accès aux assistants aux personnes qui m’avaient transmis leurs besoins pour qu’ils puissent tester de leurs coté le comportement des assistants et me faire un retour pour d'éventuelles modifications. Des réunions sont prévues la semaine prochaine pour la présentation et discuter d’amélioration sur un assistant. J’ai rencontré des problèmes sur un assistant qui avait du mal à analyser des graphes complexe dans des PowerPoint. Ce cas-là est toujours en travail de mon côté, je suis dans l’attente d’un retour des équipes spécialisé dans l’intelligence artificielle. Ils sont actuellement en train de travailler sur deux problèmes liés aux assistants que je leurs ai fait part. J’ai également aidé une personne en direct, à bien utiliser un assistant. Je traite également les demandes qui me sont faites via Teams dans les plus brefs délais. Ce jeudi et vendredi, j’ai également travaillé sur le projet JAVA débuter deux semaines auparavant. J’ai aussi commencé à recevoir les retours des questionnaires que j’ai envoyé en milieu de semaine aux personnes concernées, sur le sujet des assistants en tests depuis plusieurs mois.</text:span></text:p>
      <text:p text:style-name="P4143"/>
      <text:p text:style-name="P4144"><text:span text:style-name="T4145">Durant la sixième semaine,<text:s/></text:span><text:span text:style-name="T4146">j'ai travaillé sur plusieurs sujets liés à l'IA. J'ai modifié l'assistant pour résumer les fiches de projets ESPAS pour qu'il refonctionne<text:s/></text:span><text:span text:style-name="T4147">à la suite d'une</text:span><text:span text:style-name="T4148"><text:s/>mise à jour du modèle d'IA dans l'entreprise. J'ai également présenté une nouvelle fonctionnalité (Les agents IA) lors de la réunion mensuelle IA, en vue de sa mise à disposition.<text:s/></text:span></text:p>
      <text:p text:style-name="P4149"><text:span text:style-name="T4150">Pour ma veille</text:span><text:span text:style-name="T4151"><text:s/>et ma culture personnelle</text:span><text:span text:style-name="T4152">, j'ai visionné des reportages sur l'implémentation de l'IA en entreprise. Enfin, j'ai mis à jour d'autres assistants existants pour les conformer aux dernières évolutions internes.</text:span></text:p>
      <text:p text:style-name="P4153"/>
      <text:p text:style-name="P4154"><text:span text:style-name="T4155">Pendant la dernière semaine du stage, J'ai optimisé les prompts et assistants pour garantir la livraison des assistants<text:s/></text:span><text:span text:style-name="T4156">effectué</text:span><text:span text:style-name="T4157">, j'ai<text:s/></text:span><text:span text:style-name="T4158">également<text:s/></text:span><text:span text:style-name="T4159">mis à disposition mes projets de stage dans un répertoire partagé pour assurer l</text:span><text:span text:style-name="T4160">eur</text:span><text:span text:style-name="T4161"><text:s/></text:span><text:span text:style-name="T4162">disponibilité et leur<text:s/></text:span><text:span text:style-name="T4163">continuité. J'ai<text:s/></text:span><text:span text:style-name="T4164">aussi</text:span><text:span text:style-name="T4165"><text:s/>effectué une veille technologique sur l'IA, la tech et le développement. Enfin, j'ai participé<text:s/></text:span><text:span text:style-name="T4166">à un</text:span><text:span text:style-name="T4167"><text:s/>point sur les retours utilisateurs avec mon chef et mon tuteur, en parallèle du bilan de mon stage.</text:span></text:p>
      <text:p text:style-name="P4168"/>
      <text:p text:style-name="P4169"/>
      <text:p text:style-name="P4170"/>
      <text:list text:style-name="LFO18" text:continue-numbering="true">
        <text:list-item>
          <text:p text:style-name="P4171"><text:bookmark-start text:name="_Toc1394039128"/>Les tâches réalisées<text:bookmark-end text:name="_Toc1394039128"/><text:s/></text:p>
        </text:list-item>
      </text:list>
      <text:p text:style-name="P4172"/>
      <text:p text:style-name="P4173">Semaine du<text:s/>05<text:s/>au<text:s/>09<text:s/>janvier<text:s/>:</text:p>
      <text:p text:style-name="P4174"><text:span text:style-name="T4175">Début difficile à la suite de la rencontre de plusieurs problèmes tels que :</text:span></text:p>
      <text:list text:style-name="LFO15" text:continue-numbering="true">
        <text:list-item>
          <text:p text:style-name="P4176">Pas d’accès à l’intelligence artificielle de l’entreprise<text:s/></text:p>
        </text:list-item>
        <text:list-item>
          <text:p text:style-name="P4177">Pas d’accès à l'application pour réaliser les formations obligatoires.</text:p>
        </text:list-item>
        <text:list-item>
          <text:p text:style-name="P4178">Des<text:s/>problèmes de matériel</text:p>
        </text:list-item>
        <text:list-item>
          <text:p text:style-name="P4179">Pas d’accès aux applications de Microsoft (Word, Excel...)</text:p>
        </text:list-item>
      </text:list>
      <text:p text:style-name="P4180">Heureusement, les problèmes se sont résolus<text:s/>à la suite des<text:s/>tickets que j'ai ouverts auprès des différentes équipes qui pouvaient m'aider.</text:p>
      <text:p text:style-name="P4181">J’ai donc pu commencer à réaliser les missions qui m’ont été confié tels que<text:s/></text:p>
      <text:list text:style-name="LFO14" text:continue-numbering="true">
        <text:list-item>
          <text:p text:style-name="P4182">Aide à la réalisation d’agent IA.</text:p>
        </text:list-item>
        <text:list-item>
          <text:p text:style-name="P4183">Simplification<text:s/>et migration<text:s/>d’un projet JAVA-7 en JAVA-8.</text:p>
        </text:list-item>
      </text:list>
      <text:p text:style-name="P4184"/>
      <text:p text:style-name="P4185">Semaine du<text:s/>12<text:s/>au<text:s/>16<text:s/>janvier :</text:p>
      <text:list text:style-name="LFO13" text:continue-numbering="true">
        <text:list-item>
          <text:p text:style-name="P4186">Visionnage des formations obligatoires<text:s/></text:p>
        </text:list-item>
      </text:list>
      <text:list text:style-name="LFO20" text:continue-numbering="true">
        <text:list-item>
          <text:p text:style-name="P4187">Poursuite du projet de simplification de code JAVA<text:s/></text:p>
        </text:list-item>
        <text:list-item>
          <text:p text:style-name="P4188">Utilisation d’outils tels que VSCode, Git, Gitlab.</text:p>
        </text:list-item>
        <text:list-item>
          <text:p text:style-name="P4189"><text:span text:style-name="T4190">Réalisation de questionnaires pour avoir un retour sur<text:s/></text:span><text:span text:style-name="T4191">les assistants déployés</text:span><text:span text:style-name="T4192"><text:s/>et réaliser lors de mon premier stage au sein de l’entreprise.<text:s/></text:span></text:p>
        </text:list-item>
      </text:list>
      <text:list text:style-name="LFO12" text:continue-numbering="true">
        <text:list-item>
          <text:p text:style-name="P4193"><text:span text:style-name="T4194">Poursuite du traitement des demandes liée</text:span><text:span text:style-name="T4195">s</text:span><text:span text:style-name="T4196"><text:s/>à la création d’assistant</text:span><text:span text:style-name="T4197">s</text:span><text:span text:style-name="T4198">.</text:span></text:p>
        </text:list-item>
      </text:list>
      <text:p text:style-name="P4199"/>
      <text:p text:style-name="Normal"><text:span text:style-name="T4200">Semaine du 21 au 23 janvier :</text:span></text:p>
      <text:list text:style-name="LFO4" text:continue-numbering="true">
        <text:list-item>
          <text:p text:style-name="P4201">Travail sur un assistant IA permettant de comparer des courriels.</text:p>
        </text:list-item>
      </text:list>
      <text:list text:style-name="LFO3" text:continue-numbering="true">
        <text:list-item>
          <text:p text:style-name="P4202">Finalisation des questionnaires pour recueillir retour utilisateurs.</text:p>
        </text:list-item>
      </text:list>
      <text:list text:style-name="LFO2" text:continue-numbering="true">
        <text:list-item>
          <text:p text:style-name="P4203">Début du projet jeudi 22 janvier sur la fonction JAVA pour réaliser des tests.</text:p>
        </text:list-item>
      </text:list>
      <text:list text:style-name="LFO1" text:continue-numbering="true">
        <text:list-item>
          <text:p text:style-name="P4204">Finalisation du projet, version 1 terminer, attente de vérification.</text:p>
        </text:list-item>
      </text:list>
      <text:p text:style-name="P4205"/>
      <text:p text:style-name="Normal"><text:span text:style-name="T4206">Semaine du 26 au 30 janvier :</text:span></text:p>
      <text:list text:style-name="LFO9" text:continue-numbering="true">
        <text:list-item>
          <text:p text:style-name="P4207">Prise en main d’un assistant IA pour<text:s/>aider la personne qui travaillais dessus. Passage du prompt du format brut au format MarkDown, ménage dans le prompt et dans les taches qu’il soit réalisé.</text:p>
        </text:list-item>
        <text:list-item>
          <text:p text:style-name="P4208">Travail sur un assistant qui analyse et fournit<text:s/>une synthèse détaillée<text:s/>sur les BIE (Bilan Information Entreprise)<text:s/>problème sur la compréhension de l’assistant avec les couleurs.<text:s/></text:p>
        </text:list-item>
        <text:list-item>
          <text:p text:style-name="P4209">Travail sur un assistant qui doit pouvoir répondre aux questions que se posent les employés de l’entreprise sur un thème précis. Il a pour<text:s/>réaliser<text:s/>cette tâche<text:s/>des documents en base de données. Le<text:s/>problème<text:s/>est le traitement de toute ces données, en effet il arrive que l’assistant écrase certaines informations importantes et les compare avec<text:s/>des données dépréciées.<text:s/></text:p>
        </text:list-item>
        <text:list-item>
          <text:p text:style-name="P4210">Poursuite du projet JAVA sur l’automatisation des tests d’assistant avec la bibliothèque Selenium.<text:s/></text:p>
        </text:list-item>
      </text:list>
      <text:p text:style-name="P4211"/>
      <text:p text:style-name="P4212"/>
      <text:p text:style-name="P4213">Semaine du 02 au 06 février :</text:p>
      <text:list text:style-name="LFO7" text:continue-numbering="true">
        <text:list-item>
          <text:p text:style-name="P4214"><text:span text:style-name="T4215">Finalisation de l’assistant qui permet d’analyser les demandes de projet, m’assistant a été déployé pour que<text:s/></text:span><text:span text:style-name="T4216">la personne concernée puisse réaliser des tests et nous retourner des éléments à améliorer si besoin.</text:span><text:span text:style-name="T4217"><text:s/></text:span></text:p>
        </text:list-item>
        <text:list-item>
          <text:p text:style-name="P4218"><text:span text:style-name="T4219">Finalisation de l’assistant qui permet de répondre aux questions que se posent les employés de l’entreprise sur un thème précis. L’assistant a été déployé<text:s/></text:span><text:span text:style-name="T4220">à</text:span><text:span text:style-name="T4221"><text:s/>l’équipe que m’avait d</text:span><text:span text:style-name="T4222">e</text:span><text:span text:style-name="T4223">m</text:span><text:span text:style-name="T4224">a</text:span><text:span text:style-name="T4225">nd</text:span><text:span text:style-name="T4226">é</text:span><text:span text:style-name="T4227"><text:s/></text:span><text:span text:style-name="T4228">de le réaliser.<text:s/></text:span><text:span text:style-name="T4229">Retour positif de la personne avec qui je suis en contact pour traiter ce sujet.<text:s/></text:span><text:span text:style-name="T4230">Demande de modification de l’assistant traité dans la journée.<text:s/></text:span></text:p>
        </text:list-item>
        <text:list-item>
          <text:p text:style-name="P4231"><text:span text:style-name="T4232">Comité trimestriel de la DSI RC, travail sur le futur de nos métiers respectif,<text:s/></text:span><text:span text:style-name="T4233">quel impact pourrais avoir l’IA sur nos métiers. Pendant environ 1h,<text:s/></text:span><text:span text:style-name="T4234">un travail personnel</text:span><text:span text:style-name="T4235"><text:s/>a été réaliser avant de m’être en commun avec les personnes de mon groupe.<text:s/></text:span><text:span text:style-name="T4236">Puis conclusion avec toute l’équipe de le DSI RC.<text:s/></text:span></text:p>
        </text:list-item>
        <text:list-item>
          <text:p text:style-name="P4237"><text:span text:style-name="T4238">Envoie des questionnaires pour obtenir un retour sur l’utilisation des assistants déjà déployé en mai dernier.<text:s/></text:span><text:span text:style-name="T4239">Première réponse reçue en fin de semaine, en attente de la majorité pour pouvoir faire une analyse avec mes collègues.</text:span></text:p>
        </text:list-item>
      </text:list>
      <text:p text:style-name="P4240"/>
      <text:p text:style-name="P4241">Semaine du 09 au 13 février :</text:p>
      <text:list text:style-name="LFO6" text:continue-numbering="true">
        <text:list-item>
          <text:p text:style-name="P4242">Travail sur l’assistant qui résume<text:s/>des<text:s/>fiches de<text:s/>projets<text:s/>ESPAS sous forme de tableau.</text:p>
        </text:list-item>
        <text:list-item>
          <text:p text:style-name="P4243">Présentation d’une<text:s/>nouvelle fonctionnalité<text:s/>lors de la réunion mensuelle<text:s/>sur<text:s/>l’IA.<text:s/>Mise<text:s/>à<text:s/>disposition<text:s/>des agents IA.</text:p>
        </text:list-item>
        <text:list-item>
          <text:p text:style-name="P4244">Visualisation de reportage sur le travail en entreprise. (Implémentation de l’IA en entreprise)</text:p>
        </text:list-item>
        <text:list-item>
          <text:p text:style-name="P4245">Modification de certain assistant pour se conformer avec la mise à jour effectuer par l’équipe qui gère l’intelligence artificielle au sein de l’entreprise.<text:s/></text:p>
        </text:list-item>
      </text:list>
      <text:p text:style-name="P4246"/>
      <text:p text:style-name="P4247">Semaine du 16 au 20 février :</text:p>
      <text:list text:style-name="LFO5" text:continue-numbering="true">
        <text:list-item>
          <text:p text:style-name="P4248">Peaufinage des prompts<text:s/>et des assistants avant livraison.</text:p>
        </text:list-item>
        <text:list-item>
          <text:p text:style-name="P4249">Livraison des projets<text:s/>réalisés<text:s/>lors du stage dans un répertoire accessible par l’équipe dans laquelle je travaille. Dans le but de poursuivre mon travail si nécessaire.<text:s/></text:p>
        </text:list-item>
        <text:list-item>
          <text:p text:style-name="P4250">Veille technologique sur l’Intelligence Artificielle, la tech et le développement.<text:s/></text:p>
        </text:list-item>
        <text:list-item>
          <text:p text:style-name="P4251">Point sur le retour des utilisateurs avec mon chef et mon tuteur de stage, en même temps que le bilan de mon stage.<text:s/></text:p>
        </text:list-item>
      </text:list>
      <text:p text:style-name="P4252"/>
      <text:p text:style-name="P4253"/>
      <text:p text:style-name="P4254"/>
      <text:p text:style-name="P4255"/>
      <text:p text:style-name="P4256"/>
      <text:p text:style-name="P4257"/>
      <text:p text:style-name="P4258"/>
      <text:p text:style-name="P4259"/>
      <text:p text:style-name="P4260"/>
      <text:p text:style-name="P4261"/>
      <text:p text:style-name="P4262"/>
      <text:p text:style-name="P4263"/>
      <text:p text:style-name="P4264"/>
      <text:p text:style-name="P4265"/>
      <text:p text:style-name="P4266"/>
      <text:p text:style-name="P4267"/>
      <text:p text:style-name="P4268"/>
      <text:p text:style-name="P4269"/>
      <text:p text:style-name="P4270"/>
      <text:p text:style-name="P4271"/>
      <text:p text:style-name="P4272"/>
      <text:p text:style-name="P4273"/>
      <text:p text:style-name="P4274"/>
      <text:list text:style-name="LFO18" text:continue-numbering="true">
        <text:list-item>
          <text:p text:style-name="P4275"><text:bookmark-start text:name="_Toc390273462"/>Participation à des entretiens ou réunions<text:bookmark-end text:name="_Toc390273462"/><text:s/></text:p>
        </text:list-item>
      </text:list>
      <text:p text:style-name="P4276"/>
      <text:p text:style-name="P4277"><text:span text:style-name="T4278">Lundi<text:s/></text:span><text:span text:style-name="T4279">05</text:span><text:span text:style-name="T4280">/0</text:span><text:span text:style-name="T4281">1</text:span><text:span text:style-name="T4282">/202</text:span><text:span text:style-name="T4283">6</text:span><text:span text:style-name="T4284">, participation au point<text:s/></text:span><text:span text:style-name="T4285">D</text:span><text:span text:style-name="T4286">SI RC de l’équipe.<text:s/></text:span></text:p>
      <text:p text:style-name="P4287"><text:span text:style-name="T4288">M</text:span><text:span text:style-name="T4289">ar</text:span><text:span text:style-name="T4290">di</text:span><text:span text:style-name="T4291"><text:s/></text:span><text:span text:style-name="T4292">06</text:span><text:span text:style-name="T4293">/0</text:span><text:span text:style-name="T4294">1</text:span><text:span text:style-name="T4295">/202</text:span><text:span text:style-name="T4296">6</text:span><text:span text:style-name="T4297">,<text:s/></text:span><text:span text:style-name="T4298">Séminaire mensuelle avec toutes les équipes de la retraite complémentaire, le sujet portait sur la feuille de route 2026 et les projets en cours</text:span><text:span text:style-name="T4299">.</text:span></text:p>
      <text:p text:style-name="P4300"/>
      <text:p text:style-name="P4301"><text:span text:style-name="T4302">Lundi 12/01/2026</text:span><text:span text:style-name="T4303">, participation au point DSI RC de l’équipe.</text:span></text:p>
      <text:p text:style-name="P4304"><text:span text:style-name="T4305">Mercredi 14/01/2026</text:span><text:span text:style-name="T4306">, appel de 2h avec le développeur de l’équipe sur le sujet du projet de simplification de code et de tests JAVA.</text:span></text:p>
      <text:p text:style-name="P4307"><text:span text:style-name="T4308">Vendredi 16/01/2026</text:span><text:span text:style-name="T4309">, participation à une réunion pour discuter d’un assistant IA</text:span><text:span text:style-name="T4310"><text:s/>qui traite de la reformulation synthétique de formulaires client.</text:span></text:p>
      <text:p text:style-name="P4311"/>
      <text:p text:style-name="P4312"><text:span text:style-name="T4313">Mercredi 21/01/2026</text:span><text:span text:style-name="T4314">, point avec le dév</text:span><text:span text:style-name="T4315">eloppeur</text:span><text:span text:style-name="T4316"><text:s/>de l’équipe. Proposition d’un nouveau projet.</text:span></text:p>
      <text:p text:style-name="P4317"><text:span text:style-name="T4318">Jeudi 22/01/2026</text:span><text:span text:style-name="T4319">,<text:s/></text:span><text:span text:style-name="T4320">suivi</text:span><text:span text:style-name="T4321"><text:s/>du projet, demande d’aide<text:s/></text:span><text:span text:style-name="T4322">a</text:span><text:span text:style-name="T4323">u développeur lorsque j’ai besoin d’aide.</text:span></text:p>
      <text:p text:style-name="P4324"><text:span text:style-name="T4325">Vendredi 23/01/2026</text:span><text:span text:style-name="T4326">, participation au séminaire sur le sexisme et les agissements sexistes au sein de l’entreprise.<text:s/></text:span></text:p>
      <text:p text:style-name="P4327"/>
      <text:p text:style-name="P4328"><text:span text:style-name="T4329">Lundi 26/01/2026</text:span><text:span text:style-name="T4330">, participation a</text:span><text:span text:style-name="T4331">u</text:span><text:span text:style-name="T4332"><text:s/>point DSI RC de l’équipe.</text:span></text:p>
      <text:p text:style-name="P4333"><text:span text:style-name="T4334">Lundi 26/01/2026</text:span><text:span text:style-name="T4335">, participation à Almia cast, road<text:s/></text:span><text:span text:style-name="T4336">M</text:span><text:span text:style-name="T4337">ap</text:span><text:span text:style-name="T4338"><text:s/>2026 sur l’IA.</text:span></text:p>
      <text:p text:style-name="P4339"><text:span text:style-name="T4340">Lundi 26/01/2026</text:span><text:span text:style-name="T4341">, point sur un assistant d’une employée qui a besoin d’aide.</text:span></text:p>
      <text:p text:style-name="P4342"><text:span text:style-name="T4343">Lundi 26/01/2026</text:span><text:span text:style-name="T4344">, réunion pour prendre des informations sur une potentiel réalisation d’un assistant.</text:span></text:p>
      <text:p text:style-name="P4345"><text:span text:style-name="T4346">Mardi 28/01/2026</text:span><text:span text:style-name="T4347">, appel avec<text:s/></text:span><text:span text:style-name="T4348">un employé</text:span><text:span text:style-name="T4349"><text:s/>d</text:span><text:span text:style-name="T4350">u</text:span><text:span text:style-name="T4351"><text:s/>Systèmes d'Information et Digital<text:s/></text:span><text:span text:style-name="T4352">spécialisé dans l’intelligence artificielle au sein de l’ag2r La Mondiale.<text:s/></text:span></text:p>
      <text:p text:style-name="P4353"><text:span text:style-name="T4354">Mardi 28/01/2026</text:span><text:span text:style-name="T4355">, appel avec le développeur de l’équipe pour lui faire<text:s/></text:span><text:span text:style-name="T4356">une synthèse de la réponse que ma fournit un expert sur l'IA de l’entreprise.<text:s/></text:span></text:p>
      <text:p text:style-name="P4357"><text:span text:style-name="T4358">Vendredi 30/01/2026</text:span><text:span text:style-name="T4359">, participation<text:s/></text:span><text:span text:style-name="T4360">à</text:span><text:span text:style-name="T4361"><text:s/></text:span><text:span text:style-name="T4362">un séminaire évènementiel</text:span><text:span text:style-name="T4363"><text:s/>sur le sujet de l’intelligence artificielle générative et la<text:s/></text:span><text:span text:style-name="T4364">réalité virtuelle.<text:s/></text:span></text:p>
      <text:p text:style-name="P4365"/>
      <text:p text:style-name="P4366"><text:span text:style-name="T4367">Lundi 02/02/2026</text:span><text:span text:style-name="T4368">, participation au<text:s/></text:span><text:span text:style-name="T4369">point DSI RC de l’équipe.</text:span></text:p>
      <text:p text:style-name="P4370"><text:span text:style-name="T4371">Mardi 03/02/2026</text:span><text:span text:style-name="T4372">, participation à un café IT sur le thème de l’intermédiation</text:span><text:span text:style-name="T4373">.</text:span></text:p>
      <text:p text:style-name="P4374"><text:span text:style-name="T4375">Jeudi 05/02/2026</text:span><text:span text:style-name="T4376">, participation au Comité trimestriel de le DSI RC, plénière<text:s/></text:span><text:span text:style-name="T4377">avec toute les équipes, activité sur l’impact de l’IA sur les métiers.<text:s/></text:span></text:p>
      <text:p text:style-name="P4378"><text:span text:style-name="T4379">Jeudi 05/02/2026</text:span><text:span text:style-name="T4380">, point de retour sur l’activité du matin avec la DSI RC, Comité mensuel</text:span><text:span text:style-name="T4381"><text:s/>“Si Métier et Pilotage transverse”.<text:s/></text:span></text:p>
      <text:p text:style-name="P4382"/>
      <text:p text:style-name="P4383"><text:span text:style-name="T4384">Lundi 09/02/2026</text:span><text:span text:style-name="T4385">, participation au point DSI RC de l’équipe.</text:span></text:p>
      <text:p text:style-name="P4386"><text:span text:style-name="T4387">Lundi 09/02/2026</text:span><text:span text:style-name="T4388">, participation à un Almia cast<text:s/></text:span><text:span text:style-name="T4389">sur le thème de la mise en place de cas concrets.</text:span></text:p>
      <text:p text:style-name="P4390"><text:span text:style-name="T4391">Mardi 10/02/2026</text:span><text:span text:style-name="T4392">,<text:s/></text:span><text:span text:style-name="T4393">participation<text:s/></text:span><text:span text:style-name="T4394">réunion Comité mensuel sur l’intelligence artificielle</text:span><text:span text:style-name="T4395">.<text:s/></text:span></text:p>
      <text:p text:style-name="P4396"><text:span text:style-name="T4397">Mardi 10/02/2026</text:span><text:span text:style-name="T4398">, réunion point sur la création de l’assistant qui résume les fiches projets. Msie en place de la présentation<text:s/></text:span><text:span text:style-name="T4399">d’une personne à son équipe.<text:s/></text:span></text:p>
      <text:p text:style-name="P4400"><text:span text:style-name="T4401">Vendredi 13/02/2026</text:span><text:span text:style-name="T4402">,<text:s/></text:span><text:span text:style-name="T4403">participation à un séminaire sur le sujet de l’innovation en entreprise.<text:s/></text:span></text:p>
      <text:p text:style-name="P4404"/>
      <text:p text:style-name="P4405"><text:span text:style-name="T4406">Lundi<text:s/></text:span><text:span text:style-name="T4407">16</text:span><text:span text:style-name="T4408">/02/2026</text:span><text:span text:style-name="T4409">, participation au point DSI RC de l’équipe.</text:span></text:p>
      <text:p text:style-name="P4410"><text:span text:style-name="T4411">Jeudi 19/02/2026</text:span><text:span text:style-name="T4412">, participation<text:s/></text:span><text:span text:style-name="T4413">à</text:span><text:span text:style-name="T4414"><text:s/>la suite de l’atelier réaliser lors de la plénière il y a deux semaines. Finalisation et réflexion sur l’avenir de notre métier suite<text:s/></text:span><text:span text:style-name="T4415">à</text:span><text:span text:style-name="T4416"><text:s/>l’évolution de<text:s/></text:span><text:span text:style-name="T4417">l’IA</text:span><text:span text:style-name="T4418"><text:s/>dans le domaine professionnel.<text:s/></text:span></text:p>
      <text:p text:style-name="P4419"/>
      <text:list text:style-name="LFO18" text:continue-numbering="true">
        <text:list-item>
          <text:p text:style-name="P4420"><text:bookmark-start text:name="_Toc1291158741"/>Documents annexes<text:bookmark-end text:name="_Toc1291158741"/></text:p>
        </text:list-item>
      </text:list>
      <text:p text:style-name="Normal"/>
      <text:p text:style-name="Normal"/>
      <text:p text:style-name="Normal"/>
      <text:p text:style-name="Normal"/>
      <text:p text:style-name="Normal">Problème de badgeuse lors du début de mon stage :</text:p>
      <text:p text:style-name="Normal"/>
      <text:p text:style-name="Normal"/>
      <text:p text:style-name="Normal"><draw:frame draw:style-name="a1" draw:name="drawing" text:anchor-type="as-char" svg:x="0in" svg:y="0in" svg:width="6.30208in" svg:height="1.35417in" style:rel-width="scale" style:rel-height="scale"><draw:image xlink:href="media/image2.png" xlink:type="simple" xlink:show="embed" xlink:actuate="onLoad"/><svg:title/><svg:desc/></draw:frame></text:p>
      <text:p text:style-name="Normal"/>
      <text:p text:style-name="Normal">Les formations à réaliser obligatoirement pour avoir accès à Almia.</text:p>
      <text:p text:style-name="Normal"/>
      <text:p text:style-name="Normal"><draw:frame draw:style-name="a2" draw:name="drawing" text:anchor-type="as-char" svg:x="0in" svg:y="0in" svg:width="6.30208in" svg:height="4.14583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Des problèmes de connexion à certains outils lors des premières semaines de stage :</text:p>
      <text:p text:style-name="Normal"><draw:frame draw:style-name="a3" draw:name="drawing" text:anchor-type="as-char" svg:x="0in" svg:y="0in" svg:width="6.30208in" svg:height="3.52083in" style:rel-width="scale" style:rel-height="scale"><draw:image xlink:href="media/image4.png" xlink:type="simple" xlink:show="embed" xlink:actuate="onLoad"/><svg:title/><svg:desc/></draw:frame></text:p>
      <text:p text:style-name="Normal">Un outil (C@SSIUS) est à disposition des employées pour faire des tickets d’incidents.<text:s/></text:p>
      <text:p text:style-name="Normal">Dans l’exemple ci-dessous, je fais une demande de restitution de matériel pour la fin de mon stage.</text:p>
      <text:p text:style-name="Normal"><draw:frame draw:style-name="a4" draw:name="drawing" text:anchor-type="as-char" svg:x="0in" svg:y="0in" svg:width="6.30208in" svg:height="3.02083in" style:rel-width="scale" style:rel-height="scale"><draw:image xlink:href="media/image5.png" xlink:type="simple" xlink:show="embed" xlink:actuate="onLoad"/><svg:title/><svg:desc/></draw:frame></text:p>
      <text:p text:style-name="Normal"/>
      <text:p text:style-name="Normal"/>
      <text:p text:style-name="Normal"/>
      <text:p text:style-name="Normal"/>
      <text:p text:style-name="P4421"/>
      <text:p text:style-name="Normal">Des tableau Kanban sont utilisés par les équipes pour avoir une bonne visualisation des tickets et des missions en cours. Il est utilisé lors des points<text:s/>hebdomadaires de l’équipe de la DSI RC.<text:s/></text:p>
      <text:p text:style-name="Normal"/>
      <text:p text:style-name="Normal"><draw:frame draw:style-name="a5" draw:name="drawing" text:anchor-type="as-char" svg:x="0in" svg:y="0in" svg:width="6.30208in" svg:height="2.80208in" style:rel-width="scale" style:rel-height="scale"><draw:image xlink:href="media/image6.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Utilisation de GitLab pour les programmeurs / développeurs :<text:s/></text:p>
      <text:p text:style-name="Normal"/>
      <text:p text:style-name="Normal"><draw:frame draw:style-name="a6" draw:name="drawing" text:anchor-type="as-char" svg:x="0in" svg:y="0in" svg:width="6.30208in" svg:height="2.25in" style:rel-width="scale" style:rel-height="scale"><draw:image xlink:href="media/image7.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Voici la page d’accueil de L’intelligence Artificielle de l’entreprise AG2R. Nous avons également à disposition une marketplace d’assistants<text:s/>à<text:s/>notre disposition.</text:p>
      <text:p text:style-name="Normal"/>
      <text:p text:style-name="Normal"><draw:frame draw:style-name="a7" draw:name="drawing" text:anchor-type="as-char" svg:x="0in" svg:y="0in" svg:width="6.30208in" svg:height="3.02083in" style:rel-width="scale" style:rel-height="scale"><draw:image xlink:href="media/image8.png" xlink:type="simple" xlink:show="embed" xlink:actuate="onLoad"/><svg:title/><svg:desc/></draw:fram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PAFJ+Aptos" svg:font-family="GPAFJ+Aptos" style:font-family-generic="system" style:font-pitch="variable"/>
    <style:font-face style:name="Yu Mincho" svg:font-family="Yu Mincho" style:font-family-generic="roman" style:font-pitch="variable" svg:panose-1="2 2 4 0 0 0 0 0 0 0"/>
    <style:font-face style:name="WYAXW+Aptos" svg:font-family="WYAXW+Apto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style:font-name-asian="Yu Gothic Light"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style:text-properties style:font-name-asian="Yu Gothic Light"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style:text-properties style:font-name-asian="Yu Gothic Light"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style:text-properties style:font-name-asian="Yu Gothic Light" style:font-name-complex="Times New Roman" fo:color="#272727" fo:hyphenate="false"/>
    </style:style>
    <style:style style:name="Normal" style:display-name="Normal" style:family="paragraph">
      <style:paragraph-properties fo:margin-bottom="0in" fo:line-height="107%"/>
      <style:text-properties style:font-name="Calibri" style:font-name-asian="Calibri" style:font-name-complex="Calibri" style:letter-kerning="false" fo:font-size="11pt" style:font-size-asian="11pt" style:font-size-complex="11pt" style:language-asian="fr" style:country-asian="FR"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Yu Gothic Light"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Yu Gothic Light" style:font-name-complex="Times New Roman" fo:color="#0F4761" fo:font-size="16pt" style:font-size-asian="16pt" style:font-size-complex="16pt"/>
    </style:style>
    <style:style style:name="Titre3Car" style:display-name="Titre 3 Car" style:family="text" style:parent-style-name="Policepardéfaut">
      <style:text-properties style:font-name-asian="Yu Gothic Light" style:font-name-complex="Times New Roman" fo:color="#0F4761" fo:font-size="14pt" style:font-size-asian="14pt" style:font-size-complex="14pt"/>
    </style:style>
    <style:style style:name="Titre4Car" style:display-name="Titre 4 Car" style:family="text" style:parent-style-name="Policepardéfaut">
      <style:text-properties style:font-name-asian="Yu Gothic Light"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Yu Gothic Light" style:font-name-complex="Times New Roman" fo:color="#0F4761"/>
    </style:style>
    <style:style style:name="Titre6Car" style:display-name="Titre 6 Car" style:family="text" style:parent-style-name="Policepardéfaut">
      <style:text-properties style:font-name-asian="Yu Gothic Light"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Yu Gothic Light" style:font-name-complex="Times New Roman" fo:color="#595959"/>
    </style:style>
    <style:style style:name="Titre8Car" style:display-name="Titre 8 Car" style:family="text" style:parent-style-name="Policepardéfaut">
      <style:text-properties style:font-name-asian="Yu Gothic Light"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Yu Gothic Light" style:font-name-complex="Times New Roman" fo:color="#272727"/>
    </style:style>
    <style:style style:name="Titre" style:display-name="Titre" style:family="paragraph" style:parent-style-name="Normal" style:next-style-name="Normal">
      <style:paragraph-properties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Yu Gothic Light"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Yu Gothic Light"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Calibri" style:font-name-asian="Calibri" style:font-name-complex="Calibri" style:letter-kerning="false" fo:font-size="11pt" style:font-size-asian="11pt" style:font-size-complex="11pt" style:language-asian="fr" style:country-asian="FR"/>
    </style:style>
    <style:style style:name="Pieddepage" style:display-name="Pied de pag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Calibri" style:font-name-asian="Calibri" style:font-name-complex="Calibri" style:letter-kerning="false" fo:font-size="11pt" style:font-size-asian="11pt" style:font-size-complex="11pt" style:language-asian="fr" style:country-asian="FR"/>
    </style:style>
    <style:style style:name="En-têtedetabledesmatières" style:display-name="En-tête de table des matières" style:family="paragraph" style:parent-style-name="Titre1" style:next-style-name="Normal">
      <style:paragraph-properties fo:margin-top="0.1666in" fo:margin-bottom="0in"/>
      <style:text-properties fo:font-size="16pt" style:font-size-asian="16pt" style:font-size-complex="16pt"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style:font-name="Calibri" style:font-name-asian="Calibri" style:font-name-complex="Calibri" style:letter-kerning="false" fo:font-size="10pt" style:font-size-asian="10pt" style:font-size-complex="10pt" style:language-asian="fr" style:country-asian="FR"/>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alibri" style:font-name-asian="Calibri" style:font-name-complex="Calibri" fo:font-weight="bold" style:font-weight-asian="bold" style:font-weight-complex="bold" style:letter-kerning="false" fo:font-size="10pt" style:font-size-asian="10pt" style:font-size-complex="10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Apto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Apto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Apto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Apto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Apto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Apto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Apto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Apto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Aptos"/>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Apto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Times New Roman"/>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Apto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Apto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Aptos"/>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7LVL1" style:family="text">
      <style:text-properties style:font-name="Times New Roman" style:font-name-asian="GPAFJ+Aptos" style:font-name-complex="Times New Roman"/>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fo:font-size="28pt" style:font-size-asian="28pt" style:font-size-complex="28pt"/>
    </style:style>
    <style:style style:name="WW_CharLFO19LVL1" style:family="text">
      <style:text-properties style:font-name="Times New Roman" style:font-name-asian="GPAFJ+Aptos" style:font-name-complex="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Times New Roman" style:font-name-asian="GPAFJ+Aptos" style:font-name-complex="Times New Roman"/>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text:style-name="WW_CharLFO18LV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ITOU Jérémy</meta:initial-creator>
    <dc:creator>GUITOU Jérémy</dc:creator>
    <meta:creation-date>2026-02-20T15:27:00Z</meta:creation-date>
    <dc:date>2026-02-20T15:27:00Z</dc:date>
    <meta:print-date>2025-06-23T09:38:00Z</meta:print-date>
    <meta:template xlink:href="Normal.dotm" xlink:type="simple"/>
    <meta:editing-cycles>29</meta:editing-cycles>
    <meta:editing-duration>PT0S</meta:editing-duration>
    <meta:document-statistic meta:page-count="1" meta:paragraph-count="46" meta:word-count="3617" meta:character-count="23467" meta:row-count="165" meta:non-whitespace-character-count="19896"/>
  </office:meta>
</office:document-meta>
</file>